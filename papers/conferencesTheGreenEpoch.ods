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14.6pt"/>
    </style:style>
    <style:style style:name="co2" style:family="table-column">
      <style:table-column-properties fo:break-before="auto" style:column-width="416.01pt"/>
    </style:style>
    <style:style style:name="co3" style:family="table-column">
      <style:table-column-properties fo:break-before="auto" style:column-width="40.31pt"/>
    </style:style>
    <style:style style:name="co4" style:family="table-column">
      <style:table-column-properties fo:break-before="auto" style:column-width="65.99pt"/>
    </style:style>
    <style:style style:name="co5" style:family="table-column">
      <style:table-column-properties fo:break-before="auto" style:column-width="70.16pt"/>
    </style:style>
    <style:style style:name="co6" style:family="table-column">
      <style:table-column-properties fo:break-before="auto" style:column-width="56.24pt"/>
    </style:style>
    <style:style style:name="co7" style:family="table-column">
      <style:table-column-properties fo:break-before="auto" style:column-width="129.91pt"/>
    </style:style>
    <style:style style:name="co8" style:family="table-column">
      <style:table-column-properties fo:break-before="auto" style:column-width="145.84pt"/>
    </style:style>
    <style:style style:name="co9" style:family="table-column">
      <style:table-column-properties fo:break-before="auto" style:column-width="7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onf_5f_main">
      <style:table-properties table:display="true" style:writing-mode="lr-tb"/>
    </style:style>
    <number:date-style style:name="N75" number:automatic-order="true">
      <number:month number:textual="true"/>
      <number:text> </number:text>
      <number:day/>
      <number:text>, </number:text>
      <number:year number:style="long"/>
    </number:date-style>
    <number:date-style style:name="N76" number:automatic-order="true">
      <number:month number:style="long" number:textual="true"/>
      <number:text> </number:text>
      <number:day/>
      <number:text>, </number:text>
      <number:year number:style="long"/>
    </number:date-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data-style-name="N7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data-style-name="N7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nf_mai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5" table:default-cell-style-name="Default"/>
        <table:table-column table:style-name="co9" table:default-cell-style-name="Default"/>
        <table:table-column table:style-name="co5" table:number-columns-repeated="1013" table:default-cell-style-name="Default"/>
        <table:table-row table:style-name="ro1">
          <table:table-cell table:style-name="ce1" office:value-type="string" calcext:value-type="string">
            <text:p>acronym</text:p>
          </table:table-cell>
          <table:table-cell table:style-name="ce1" office:value-type="string" calcext:value-type="string">
            <text:p>title</text:p>
          </table:table-cell>
          <table:table-cell table:style-name="ce1" office:value-type="string" calcext:value-type="string">
            <text:p>score</text:p>
          </table:table-cell>
          <table:table-cell table:style-name="ce1" office:value-type="string" calcext:value-type="string">
            <text:p>acceptance%</text:p>
          </table:table-cell>
          <table:table-cell table:style-name="ce1" office:value-type="string" calcext:value-type="string">
            <text:p>submission deadline</text:p>
          </table:table-cell>
          <table:table-cell table:style-name="ce1" office:value-type="string" calcext:value-type="string">
            <text:p>notification</text:p>
          </table:table-cell>
          <table:table-cell table:style-name="ce1" office:value-type="string" calcext:value-type="string">
            <text:p>final version</text:p>
          </table:table-cell>
          <table:table-cell table:style-name="ce1" office:value-type="string" calcext:value-type="string">
            <text:p>location</text:p>
          </table:table-cell>
          <table:table-cell table:style-name="ce1" office:value-type="string" calcext:value-type="string">
            <text:p>when</text:p>
          </table:table-cell>
          <table:table-cell table:style-name="ce1" office:value-type="string" calcext:value-type="string">
            <text:p>link</text:p>
          </table:table-cell>
          <table:table-cell table:style-name="ce1" office:value-type="string" calcext:value-type="string">
            <text:p>cfp</text:p>
          </table:table-cell>
          <table:table-cell table:style-name="ce5" table:number-columns-repeated="17"/>
          <table:table-cell table:number-columns-repeated="996"/>
        </table:table-row>
        <table:table-row table:style-name="ro1">
          <table:table-cell table:style-name="ce2" office:value-type="string" calcext:value-type="string">
            <text:p>GREEN 2026</text:p>
          </table:table-cell>
          <table:table-cell table:style-name="ce2" office:value-type="string" calcext:value-type="string">
            <text:p>The Eleventh International Conference on Green Communications, Computing and Technologies</text:p>
          </table:table-cell>
          <table:table-cell table:style-name="ce2" office:value-type="float" office:value="92" calcext:value-type="float">
            <text:p>92</text:p>
          </table:table-cell>
          <table:table-cell table:style-name="ce2" office:value-type="float" office:value="30" calcext:value-type="float">
            <text:p>30</text:p>
          </table:table-cell>
          <table:table-cell table:style-name="ce3" office:value-type="date" office:date-value="2026-07-06" calcext:value-type="date">
            <text:p>2026-07-06</text:p>
          </table:table-cell>
          <table:table-cell table:style-name="ce3" office:value-type="date" office:date-value="2026-08-23" calcext:value-type="date">
            <text:p>2026-08-23</text:p>
          </table:table-cell>
          <table:table-cell table:style-name="ce3" office:value-type="date" office:date-value="2026-09-06" calcext:value-type="date">
            <text:p>2026-09-06</text:p>
          </table:table-cell>
          <table:table-cell table:style-name="ce2" office:value-type="string" calcext:value-type="string">
            <text:p>Lisbon, Portugal</text:p>
          </table:table-cell>
          <table:table-cell table:style-name="ce2" office:value-type="string" calcext:value-type="string">
            <text:p>Oct 25, 2026 - Oct 29, 2026</text:p>
          </table:table-cell>
          <table:table-cell table:style-name="ce4" office:value-type="string" calcext:value-type="string">
            <text:p><text:a xlink:href="https://www.iaria.org/conferences2026/GREEN26.html" xlink:type="simple">https://www.iaria.org/conferences2026/GREEN26.html</text:a></text:p>
          </table:table-cell>
          <table:table-cell table:style-name="ce2" office:value-type="string" calcext:value-type="string">
            <text:p>Please consider to contribute to and/or forward to the appropriate groups the following opportunity to submit and publish original scientific results to: - GREEN 2026, The Eleventh International Conference on Green Communications, Computing and Technologies GREEN 2026 is scheduled to be October 25 - 29, 2026 in Lisbon, Portugal under the NetWare 2026 umbrella. The submission deadline is July 6, 2026. Authors of selected papers will be invited to submit extended article versions to one of the IARIA Journals: https://www.iariajournals.org All events will be held in a hybrid mode: on site, online, prerecorded videos, voiced presentation slides, pdf slides. ================= ============== GREEN 2026 | Call for Papers =============== CALL FOR PAPERS, TUTORIALS, PANELS GREEN 2026, The Eleventh International Conference on Green Communications, Computing and Technologies General page: https://www.iaria.org/conferences2026/GREEN26.html Submission page: https://www.iaria.org/conferences2026/SubmitGREEN26.html Event schedule: October 25 - 29, 2026 Contributions: - regular papers [in the proceedings, digital library] - short papers (work in progress) [in the proceedings, digital library] - ideas: two pages [in the proceedings, digital library] - extended abstracts: two pages [in the proceedings, digital library] - posters: two pages [in the proceedings, digital library] - posters: slide only [slide-deck posted at www.iaria.org] - presentations: slide only [slide-deck posted at www.iaria.org] - demos: two pages [posted at www.iaria.org] Submission deadline: July 6, 2026 Extended versions of selected papers will be published in IARIA Journals: https://www.iariajournals.org Print proceedings will be available via Curran Associates, Inc.: https://www.proceedings.com/9769.html Articles will be archived in the free access ThinkMind Digital Library: https://www.thinkmind.org The topics suggested by the conference can be discussed in term of concepts, state of the art, research, standards, implementations, running experiments, applications, and industrial case studies. Authors are invited to submit complete unpublished papers, which are not under review in any other conference or journal in the following, but not limited to, topic areas. All tracks are open to both research and industry contributions. Before submission, please check and comply with the editorial rules: https://www.iaria.org/editorialrules.html GREEN 2026 Topics (for topics and submission details: see CfP on the site) Call for Papers: https://www.iaria.org/conferences2026/CfPGREEN26.html ============================================================ GREEN 2026 Tracks (topics and submission details: see CfP on the site) Hot research/industrial areas Improving Green-ness Eco-Design-energy efficiency Green-oriented protocols, computation and services Circuitry for energy harvesting and scavenging Underwater energy harvesting Energy harvesting from stall flutter limit cycle oscillations Ultrasound acoustic wave energy transfer and harvesting Ocean wave vibration energy harvesting Atmosphere monitoring and Green-technologies for Environmental Challenges Remote monitoring the batteries Battery materials and mechanisms Hybrid solar energy - thermal energy - wind energy Energy storage Grid-oriented energy systems Vehicular pollution Electric/hybrid vehicles Harvesting of marine microalgae/agricultural crop for biodiesel production Power distribution grids Optimal planning in smart cities and smart meters Green-ness incentives Green-ness education and motivation Green-awarness Green-aware engineering methodologies Green and sustainable computing Green computing and communication technologies Data aware greed computing Energy-efficient computing and supercomputing Intelligent signal processing for Green communications Green cloud computing Green computing and Internet of Things (IoT) Energy-related Energy Harvesting Communications Energy-efficiency for 5G Networks Energy-efficient Data Centers Energy-efficient Data, Services and Memory Management Energy awareness in Big Data Processing and Storage Energy-efficient Protocols and Networking Green Scheduling and Resource Allocation for Communications Smart Energy and Smart Grid Power Quality, Power Electronics and Electric Machines Smart Grid Applications: Grid-to-Vehicle, Vehicle-to-Grid, Micro-Grid Renewable Energy Generation and New Energy Sources Pervasive Energy Services Green technologies and services Smart Sensing, Metering Systems, Smart Cities Green Vehicles, Green Homes, Green Buildings Green Industrial Automation and Control Green Intelligent Transport Systems Green Technologies for Mobile, Wireless, Wired Industrial Networking Green Data Storage, Data Centers Privacy, Safety, and Security in Green-aware Services Energy-constrained and Power-constrained Devices, Gateways and Systems Green Standardizations and Benchmarks for ICT Metrics for Sustainability and their Validation Ecosystem Modeling ------------------------ GREEN 2026 Committee: https://www.iaria.org/conferences2026/ComGREEN26.html IARIA Ambassadors Steve Chan, Decision Engineering Analysis Laboratory, USA Dirceu Cavendish, Kyushu Institute of Technology, Japan Monika Maria Moehring, Study Centre for Blind and Disabled Students, Technische Hochschule Mittelhessen, Gie en Germany Carlos Becker Westphall, Federal University of Santa Catarina, Brazil Lasse Berntzen, University of South-Eastern Norway, Norway Les Sztandera, Thomas Jefferson University, Philadelphia, USA Andreas Rausch, TU Clausthal, Clausthal-Zellerfeld, Germany Timothy Phan, NASA, Jet Propulsion Laboratory, USA Manuela Vieira, CTS/ISEL/IPL, Portugal Luigi Lavazza, Universit dell'Insubria - Varese, Italy</text:p>
          </table:table-cell>
          <table:table-cell table:style-name="ce6" table:number-columns-repeated="2"/>
          <table:table-cell table:number-columns-repeated="6"/>
          <table:table-cell table:style-name="ce3" table:number-columns-repeated="3"/>
          <table:table-cell table:number-columns-repeated="1002"/>
        </table:table-row>
        <table:table-row table:style-name="ro1">
          <table:table-cell table:style-name="ce2" office:value-type="string" calcext:value-type="string">
            <text:p>CEEE 2026</text:p>
          </table:table-cell>
          <table:table-cell table:style-name="ce2" office:value-type="string" calcext:value-type="string">
            <text:p>The Second International Conference on Global Environment Ecosystem Equilibrium</text:p>
          </table:table-cell>
          <table:table-cell table:style-name="ce2" office:value-type="float" office:value="85" calcext:value-type="float">
            <text:p>85</text:p>
          </table:table-cell>
          <table:table-cell table:style-name="ce2" office:value-type="float" office:value="35" calcext:value-type="float">
            <text:p>35</text:p>
          </table:table-cell>
          <table:table-cell table:style-name="ce3" office:value-type="date" office:date-value="2026-07-06" calcext:value-type="date">
            <text:p>2026-07-06</text:p>
          </table:table-cell>
          <table:table-cell table:style-name="ce3" office:value-type="date" office:date-value="2026-08-23" calcext:value-type="date">
            <text:p>2026-08-23</text:p>
          </table:table-cell>
          <table:table-cell table:style-name="ce3" office:value-type="date" office:date-value="2026-09-06" calcext:value-type="date">
            <text:p>2026-09-06</text:p>
          </table:table-cell>
          <table:table-cell table:style-name="ce2" office:value-type="string" calcext:value-type="string">
            <text:p>Lisbon, Portugal</text:p>
          </table:table-cell>
          <table:table-cell table:style-name="ce2" office:value-type="string" calcext:value-type="string">
            <text:p>Oct 25, 2026 - Oct 29, 2026</text:p>
          </table:table-cell>
          <table:table-cell table:style-name="ce4" office:value-type="string" calcext:value-type="string">
            <text:p><text:a xlink:href="https://www.iaria.org/conferences2026/CEEE26.html" xlink:type="simple">https://www.iaria.org/conferences2026/CEEE26.html</text:a></text:p>
          </table:table-cell>
          <table:table-cell table:style-name="ce2" office:value-type="string" calcext:value-type="string">
            <text:p>Please consider to contribute to and/or forward to the appropriate groups the following opportunity to submit and publish original scientific results to: - CEEE 2026, The Second International Conference on Global Environment Ecosystem Equilibrium CEEE 2026 is scheduled to be October 25 - 29, 2026 in Lisbon, Portugal under the DigitalSustainability 2026 umbrella. The submission deadline is July 6, 2026. Authors of selected papers will be invited to submit extended article versions to one of the IARIA Journals: https://www.iariajournals.org All events will be held in a hybrid mode: on site, online, prerecorded videos, voiced presentation slides, pdf slides. ================= ============== CEEE 2026 | Call for Papers =============== CALL FOR PAPERS, TUTORIALS, PANELS CEEE 2026, The Second International Conference on Global Environment Ecosystem Equilibrium General page: https://www.iaria.org/conferences2026/CEEE26.html Submission page: https://www.iaria.org/conferences2026/SubmitCEEE26.html Event schedule: October 25 - 29, 2026 Contributions: - regular papers [in the proceedings, digital library] - short papers (work in progress) [in the proceedings, digital library] - ideas: two pages [in the proceedings, digital library] - extended abstracts: two pages [in the proceedings, digital library] - posters: two pages [in the proceedings, digital library] - posters: slide only [slide-deck posted at www.iaria.org] - presentations: slide only [slide-deck posted at www.iaria.org] - demos: two pages [posted at www.iaria.org] Submission deadline: July 6, 2026 Extended versions of selected papers will be published in IARIA Journals: https://www.iariajournals.org Print proceedings will be available via Curran Associates, Inc.: https://www.proceedings.com/9769.html Articles will be archived in the free access ThinkMind Digital Library: https://www.thinkmind.org The topics suggested by the conference can be discussed in term of concepts, state of the art, research, standards, implementations, running experiments, applications, and industrial case studies. Authors are invited to submit complete unpublished papers, which are not under review in any other conference or journal in the following, but not limited to, topic areas. All tracks are open to both research and industry contributions. Before submission, please check and comply with the editorial rules: https://www.iaria.org/editorialrules.html CEEE 2026 Topics (for topics and submission details: see CfP on the site) Call for Papers: https://www.iaria.org/conferences2026/CfPCEEE26.html ============================================================ CEEE 2026 Tracks (topics and submission details: see CfP on the site) Climate Change and Atmospheric Science - Analytics on global warming trends and projections - Observational data collection of aerosols - Metrics for assessing aerosol effects - Climate models including aerosols-clouds models - Models for ocean-atmosphere interactions - Sea level rise and its effects on coastal ecosystems - Sensors for carbon capture and sequestration technologies - Strategies for measurement, analysis and reduction of carbon footprint - Models for extreme weather events forecasting - Impact analysis of the impact of climate change on biodiversity Sustainable Agriculture and Food Security - Precision agriculture via remote sensing, drones, and IoT applications - Genetic modifications for crop resilience - Strategies for soil health and carbon sequestration - Agroforestry and land use management - Innovative practices in organic and regenerative agriculture - Water management techniques for agriculture - Sustainable livestock management practices Renewable and Clean Energy Technologies - Advances in hydroelectric power - Geothermal energy technologies - Nuclear energy challenges - Solar and wind energy technologies - Bioenergy and sustainability - Hybrid systems of multiple renewable sources - Energy efficiency and energy storage solutions - Integrating renewable energy into existing grids Water Resources and Aquatic Systems - Analysis of aquifer depletion and remediation strategies - Monitoring saltwater intrusion in freshwater systems - Sustainable fisheries and aquaculture practices - Innovative wastewater treatment technologies - Flood risk management protective systems - Management and challenges of freshwater ecosystems - Sustainable water harvesting technologies - Detection and filtering of microplastics in marine and freshwater systems - Coral reef restoration and protection - Technologies for water conservation and use management - Water rights and geo-data access and sharing - Impact analysis on dams on river ecosystems Pollution, Waste Management, and Environmental Toxicology - Detection of emerging contaminants and studies ecological impacts - Air quality monitoring and improvement strategies - Industrial pollution control technologies - Bioremediation technologies for contaminated sites - Health impacts of environmental toxins - Technologies for managing chemical pollutants - Control of noise pollution - Sustainable management solutions of hazardous materials - Air pollution control technologies and policies - Solutions for plastic pollution - Recycling technologies and circular economy - Solutions for electronic waste management Biodiversity and Wildlife Conservation - Landscape connectivity and wildlife corridors - Conservation genetics and biodiversity banking - Invasive species control and biosecurity measures - Impact of climate change on migratory patterns - Ecosystem services and valuation - Technology in wildlife monitoring and protection - Strategies for habitat restoration and conservation - Case studies on genetic diversity for ecosystem resilience - Monitoring and tracking wildlife trafficking Urban Planning, Green Infrastructure, and Sustainable Development - Smart city technologies for sustainability - Urban transportation solutions - Sustainable land use and zoning practices - Strategies for green infrastructure and urban greening - Resilience planning for natural disasters - Waste reduction and management in urban settings - Urban ecology, green buildings and sustainable architecture - Urban heat island effect and mitigation strategies Environmental Education, Awareness, and Communication - Approaches to environmental education - Educational technologies for environmental learning - Citizen science and participatory data collection - Community engagement and participatory monitoring - Digital tools and technologies for environmental education - Sustainable tourism strategies and eco-friendly practices - Corporate sustainability and green business practices - Interdisciplinary approaches to environmental law - Future directions in global environmental governance ------------------------ CEEE 2026 Committee: https://www.iaria.org/conferences2026/ComCEEE26.html IARIA Ambassadors Steve Chan, Decision Engineering Analysis Laboratory, USA Dirceu Cavendish, Kyushu Institute of Technology, Japan Monika Maria Moehring, Study Centre for Blind and Disabled Students, Technische Hochschule Mittelhessen, Gie en Germany Carlos Becker Westphall, Federal University of Santa Catarina, Brazil Lasse Berntzen, University of South-Eastern Norway, Norway Les Sztandera, Thomas Jefferson University, Philadelphia, USA Andreas Rausch, TU Clausthal, Clausthal-Zellerfeld, Germany Timothy Phan, NASA, Jet Propulsion Laboratory, USA Manuela Vieira, CTS/ISEL/IPL, Portugal Luigi Lavazza, Universit dell'Insubria - Varese, Italy</text:p>
          </table:table-cell>
          <table:table-cell table:style-name="ce6" table:number-columns-repeated="2"/>
          <table:table-cell table:number-columns-repeated="3"/>
          <table:table-cell table:style-name="ce7"/>
          <table:table-cell table:style-name="ce8"/>
          <table:table-cell table:style-name="ce7"/>
          <table:table-cell table:style-name="ce3" table:number-columns-repeated="3"/>
          <table:table-cell table:number-columns-repeated="1002"/>
        </table:table-row>
        <table:table-row table:style-name="ro1">
          <table:table-cell table:style-name="ce2" office:value-type="string" calcext:value-type="string">
            <text:p>MECN 2026</text:p>
          </table:table-cell>
          <table:table-cell table:style-name="ce2" office:value-type="string" calcext:value-type="string">
            <text:p>7th International Conference on Mechanical Engineering</text:p>
          </table:table-cell>
          <table:table-cell table:style-name="ce2" office:value-type="float" office:value="38" calcext:value-type="float">
            <text:p>38</text:p>
          </table:table-cell>
          <table:table-cell table:style-name="ce2" office:value-type="float" office:value="32" calcext:value-type="float">
            <text:p>32</text:p>
          </table:table-cell>
          <table:table-cell table:style-name="ce3" office:value-type="date" office:date-value="2026-07-11" calcext:value-type="date">
            <text:p>2026-07-11</text:p>
          </table:table-cell>
          <table:table-cell table:style-name="ce3" office:value-type="date" office:date-value="2026-07-27" calcext:value-type="date">
            <text:p>2026-07-27</text:p>
          </table:table-cell>
          <table:table-cell table:style-name="ce3" office:value-type="date" office:date-value="2026-08-03" calcext:value-type="date">
            <text:p>2026-08-03</text:p>
          </table:table-cell>
          <table:table-cell table:style-name="ce2" office:value-type="string" calcext:value-type="string">
            <text:p>Virtual Conference</text:p>
          </table:table-cell>
          <table:table-cell table:style-name="ce2" office:value-type="string" calcext:value-type="string">
            <text:p>Aug 27, 2026 - Aug 28, 2026</text:p>
          </table:table-cell>
          <table:table-cell table:style-name="ce4" office:value-type="string" calcext:value-type="string">
            <text:p><text:a xlink:href="https://mecn2026.org/index" xlink:type="simple">https://mecn2026.org/index</text:a></text:p>
          </table:table-cell>
          <table:table-cell table:style-name="ce2" office:value-type="string" calcext:value-type="string">
            <text:p>7 th International Conference on Mechanical Engineering (MECN 2026) August 27 ~ 28, 2026, Virtual Conference Scope &amp; Topics 7 th International Conference on Mechanical Engineering (MECN 2026) will provide an excellent international forum for sharing knowledge ath results in theory, methodology ath applications impacts challenges of Mechanical Engineering. The conference documents practical ath theoretical results which make a fundamental contribution for the development of Mechanical Engineering. Authors are solicited to contribute to the conference by submitting articles that illustrate research results, projects, surveying works at hithustrial experiences that describe significant advances in the following areas, but are not limited to. Topics of interest include, but are not limited to, the following Advances of Aero Space Technology Artificial Intelligence ath Expert Systems CAD/CAM, Automation &amp; Robotics Design Tools, Cutting Tool Material ath Coatings Energy Conservation, Renewable Energy Techniques Fluid Dynamics, Bio-fuels, Fuel Cells Logistics ath Supply Chain Management Machinability of Materials, Composite Materials Operations Management Recent Treths ath Advances Total Quality Management ath Quality Engineering Transportation Systems Tribology Paper Submission Authors are invited to submit papers through the conference Submission System by July 11, 2026 . Submissions must be original and should not have been published previously or be under consideration for publication while being evaluated for this conference. The proceedings of the conference will be published by International Journal of Recent advances in Mechanical Engineering (IJMECH) (Confirmed). Selected papers from MECN 2026 , after further revisions, will be published in the special issues of the following journals. Mechanical Engineering: An International Journal (MEIJ) Important Dates Submission Deadline : July 11, 2026 Authors Notification : July 27, 2026 Final Manuscript Due : August 03, 2026 Co - Located Event 4 th International Conference on Blockchain and Applications (BLKCA 2026) 4 th International Conference on Machine Learning and IoT (MLIoT 2026) 4 th International Conference on Computer Science, Engineering and Information Technology Trends (CGASP 2026) 4 th International Conference on Vision and Computational Intelligence (VCOI 2026) 4 th International Conferences in Clinical Research and Pharmaceutical Sciences (CRPS 2026) 7 th International Conference on Applied Control, Electrical and Electronics Engineering (CEEE 2026) 7 th International Conference on Electrical Engineering (ELEG 2026) 4 th International Conference on Computer Science, Engineering and Information Technology Trends (CSEITT 2026) ***** The invited talk proposals can be submitted to mecn@mecn2026.org</text:p>
          </table:table-cell>
          <table:table-cell table:number-columns-repeated="1013"/>
        </table:table-row>
        <table:table-row table:style-name="ro1">
          <table:table-cell table:style-name="ce2" office:value-type="string" calcext:value-type="string">
            <text:p>Springer ACESD 2026</text:p>
          </table:table-cell>
          <table:table-cell table:style-name="ce2" office:value-type="string" calcext:value-type="string">
            <text:p>Springer--2026 11th Asia Conference on Environment and Sustainable Development (ACESD 2026)</text:p>
          </table:table-cell>
          <table:table-cell table:style-name="ce2" office:value-type="float" office:value="70" calcext:value-type="float">
            <text:p>70</text:p>
          </table:table-cell>
          <table:table-cell table:style-name="ce2" office:value-type="float" office:value="35" calcext:value-type="float">
            <text:p>35</text:p>
          </table:table-cell>
          <table:table-cell table:style-name="ce3" office:value-type="date" office:date-value="2026-07-15" calcext:value-type="date">
            <text:p>2026-07-15</text:p>
          </table:table-cell>
          <table:table-cell table:style-name="ce3" table:number-columns-repeated="2"/>
          <table:table-cell table:style-name="ce2" office:value-type="string" calcext:value-type="string">
            <text:p>Tokyo, Japan</text:p>
          </table:table-cell>
          <table:table-cell table:style-name="ce2" office:value-type="string" calcext:value-type="string">
            <text:p>Nov 6, 2026 - Nov 9, 2026</text:p>
          </table:table-cell>
          <table:table-cell table:style-name="ce4" office:value-type="string" calcext:value-type="string">
            <text:p><text:a xlink:href="http://www.acesd.org/" xlink:type="simple">http://www.acesd.org/</text:a></text:p>
          </table:table-cell>
          <table:table-cell table:style-name="ce2" office:value-type="string" calcext:value-type="string">
            <text:p>Abbreviation: ACESD 2026 Full Name: 2026 11th Asia Conference on Environment and Sustainable Development Tokyo, Japan November 6-9, 2026 http://www.acesd.org/ Call for Papers: Environmental dynamics: Meteorology, Hydrology, Geophysics, Atmospheric physics, Physical oceanography Global environmental change and ecosystems management: Climate and climatic changes, Global warming, Ozone layer depletion, Carbon capture and storage, Biofuels, Integrated ecosystems management, Satellite applications in the environment Environmental restoration and ecological engineering: Advanced treatment of water and secondary effluents (membranes, adsorption, ion exchange, oxidation etc), Disinfection and disinfection by- products, Management of water treatment residuals, Aesthetic quality of drinking water (taste, odors), Effect of distribution systems on potable water quality, Reuse of reclaimed waters Environmental sustainability: Resource management, Life cycle analysis, Environmental systems approach, Renewable sources of energy-energy savings, Clean technologies, Sustainable cities Health and the Environment: Health related organisms, Hazardous substances and detection techniques, Biodegradation of hazardous substances, Toxicity assessment and epidemiological studies, Quality guidelines, environmental regulation and monitoring, Indoor air pollution More topics: http://www.acesd.org/ Publication: All reviewed and registered papers will be pulished into the International Conference Proceedings, which will be published as a volume of Springer book series: Environmental Science and Engineering which will be submitted for indexing by EI Compendex, Scopus, SCImago and the other major databases. Special Journal: Authors are encouraged to submit your extended paper with at least 35% new added content and new title to the two journals below for publication after the conference: 1. International Journal of Environmental Science and Development, which will be indexed by Scopus(CiteScore 2024: 1.5), Chemical Abstracts Services (CAS), CABI, DOAJ, Ulrich Periodicals Directory, Crossref, ProQuest, etc. 2. Environment: Science and Policy for Sustainable Development, which will be indexed by SCIE (Impact factor 2021: 4.108), Scopus (Citescore 2024: 6.2), etc. Venue: Tokyo, Japan Submission Methods: Full Paper(publication and oral presentation) Abstract(oral presentation only) Electronic Submission System (.pdf) http://confsys.iconf.org/submission/acesd2026 Conference Secretary: Ms. Ching Cao Tel.: +86-13290000003 E-mail: acesd_conf@126.com</text:p>
          </table:table-cell>
          <table:table-cell table:number-columns-repeated="1013"/>
        </table:table-row>
        <table:table-row table:style-name="ro1">
          <table:table-cell table:style-name="ce2" office:value-type="string" calcext:value-type="string">
            <text:p>PASTE 2026</text:p>
          </table:table-cell>
          <table:table-cell table:style-name="ce2" office:value-type="string" calcext:value-type="string">
            <text:p>[Call for Abstract] Pacific Asia Summit on Transdisciplinary Education</text:p>
          </table:table-cell>
          <table:table-cell table:style-name="ce2" office:value-type="float" office:value="62" calcext:value-type="float">
            <text:p>62</text:p>
          </table:table-cell>
          <table:table-cell table:style-name="ce2" office:value-type="float" office:value="40" calcext:value-type="float">
            <text:p>40</text:p>
          </table:table-cell>
          <table:table-cell table:style-name="ce3" office:value-type="date" office:date-value="2026-07-20" calcext:value-type="date">
            <text:p>2026-07-20</text:p>
          </table:table-cell>
          <table:table-cell table:style-name="ce3" office:value-type="date" office:date-value="2026-08-19" calcext:value-type="date">
            <text:p>2026-08-19</text:p>
          </table:table-cell>
          <table:table-cell table:style-name="ce3"/>
          <table:table-cell table:style-name="ce2" office:value-type="string" calcext:value-type="string">
            <text:p>Hong Kong</text:p>
          </table:table-cell>
          <table:table-cell table:style-name="ce2" office:value-type="string" calcext:value-type="string">
            <text:p>Nov 26, 2026 - Nov 27, 2026</text:p>
          </table:table-cell>
          <table:table-cell table:style-name="ce4" office:value-type="string" calcext:value-type="string">
            <text:p><text:a xlink:href="https://transdisciplinary.hkbu.edu.hk/paste2026/" xlink:type="simple">https://transdisciplinary.hkbu.edu.hk/paste2026/</text:a></text:p>
          </table:table-cell>
          <table:table-cell table:style-name="ce2" office:value-type="string" calcext:value-type="string">
            <text:p>CFP📢: Pacific Asia Summit on Transdisciplinary Education (PASTE) 2026, (Submission: 30 Jun 2026) The Pacific Asia Summit on Transdisciplinary Education (PASTE) 2026 will bring together educators, and students from across the Pacific Asia region to facilitate dialogue and knowledge exchange. We invite examples that demonstrate how inter- and transdisciplinary teaching and learning can impact learners through transcultural and cross-sector collaborations. Conference Theme: Transcultural and Transectoral Collaboration in Transdisciplinary Education Conference Dates: Day 1 - 26 November 2026 (Thursday), 9:00 am to 5:00 pm (HK Time, GMT +8) Day 2 - 27 November 2026 (Friday), 9:00 am to 1:30pm (HK Time, GMT +8) Conference Venue: Hong Kong Baptist University, Hong Kong SAR Target Participants: • University faculty, researchers, and educators from diverse disciplines • Undergraduate and Postgraduate students • Representatives from academic institutions, NGOs, and other relevant sectors within Pacific Asia [Call for Abstracts and Papers📢]: This conference calls for submissions from various disciplines, including but not limited to: • AI and EdTech • Global Challenges and Sustainability • Resilience, Well-being and Creativity Engagement • Transdisciplinary Partnerships and Innovations Submission Deadline: 20 July 2026 Notification of Results: 19 August 2026 Submission Format and More Information: https://transdisciplinary.hkbu.edu.hk/paste2026/call_for_paper ------------------------------------------------------------------ Registration for PASTE 2026 is now available at: https://hkbupaste2026.brandactivation.hk/web/6a152dfb3a31f32eb33b6004/register Registration Fee and other details: https://transdisciplinary.hkbu.edu.hk/paste2026/reg ------------------------------------------------------------------</text:p>
          </table:table-cell>
          <table:table-cell table:number-columns-repeated="1013"/>
        </table:table-row>
        <table:table-row table:style-name="ro1">
          <table:table-cell table:style-name="ce2" office:value-type="string" calcext:value-type="string">
            <text:p>CGEE 2026</text:p>
          </table:table-cell>
          <table:table-cell table:style-name="ce2" office:value-type="string" calcext:value-type="string">
            <text:p>IEEE--2026 7th International Conference on Clean and Green Energy Engineering (CGEE 2026)</text:p>
          </table:table-cell>
          <table:table-cell table:style-name="ce2" office:value-type="float" office:value="75" calcext:value-type="float">
            <text:p>75</text:p>
          </table:table-cell>
          <table:table-cell table:style-name="ce2" office:value-type="float" office:value="32" calcext:value-type="float">
            <text:p>32</text:p>
          </table:table-cell>
          <table:table-cell table:style-name="ce3" office:value-type="date" office:date-value="2026-07-20" calcext:value-type="date">
            <text:p>2026-07-20</text:p>
          </table:table-cell>
          <table:table-cell table:style-name="ce3" table:number-columns-repeated="2"/>
          <table:table-cell table:style-name="ce2" office:value-type="string" calcext:value-type="string">
            <text:p>Split, Croatia</text:p>
          </table:table-cell>
          <table:table-cell table:style-name="ce2" office:value-type="string" calcext:value-type="string">
            <text:p>Sep 12, 2026 - Sep 14, 2026</text:p>
          </table:table-cell>
          <table:table-cell table:style-name="ce4" office:value-type="string" calcext:value-type="string">
            <text:p><text:a xlink:href="https://www.cgee.org/" xlink:type="simple">https://www.cgee.org/</text:a></text:p>
          </table:table-cell>
          <table:table-cell table:style-name="ce2" office:value-type="string" calcext:value-type="string">
            <text:p>Full Name: IEEE--2026 7th International Conference on Clean and Green Energy Engineering (CGEE 2026) Abbreviation: CGEE 2026 Welcome to join in the 2026 7th International Conference on Clean and Green Energy Engineering, which will be held in Split, Croatia from September 12-14, 2026 Paper Publishing： For papers submitted to CGEE 2026, accepted and presented papers at the conference will be published in the proceedings of CGEE 2026 and included into IEEE Xplore, which will be sent to EI Compendex, Scopus for indexing. A set of selected papers with extended version (at least 40% new content) will be sent to Journal of Energy – Energija for review and published as regular papers after the conference, which will be indexed by Inspec, Google Scholar and Scilit. CGEE 2025 Conference Proceedings available in IEEE Xplore, will be indexed by EI Compendex, and Scopus. CGEE 2024 Conference Proceedings available in IEEE Xplore, indexed by EI Compendex, and Scopus. CGEE 2023 Conference Proceedings available in IEEE Xplore, indexed by EI Compendex, and Scopus. CGEE 2022 Conference Proceedings available in IEEE Xplore, indexed by EI Compendex, and Scopus. Conference Venue: Split, Croatia Call For Paper 1. Clean and Renewable Energy Technologies Clean Energy Systems and Technologies Solar Energy Engineering Biomass Energy Engineering Wind Energy Engineering Hydrogen and Fuel Cell Nuclear Energy Engineering 2. Energy Storage and Saving Technologies Energy Materials Storage Technology Energy-saving Technology Energy Chemical Engineering Energy-efficient Lighting Products and Technologies Gasification Green Energy Systems Green Power Production and Cogeneration CO2 Capture, Storage, and Utilization Exergetic and Exergoeconomic Analyses The method for submitting your paper: Electronic Submission system: https://confsys.iconf.org/submission/CGEE2026 Please feel free contact with us: Paulina Aydogan (Conference Secretary) E-mail: cgeeconf@163.com For more information about international conferences, please visit our conference website: CGEE 2026 Website: https://www.cgee.org/</text:p>
          </table:table-cell>
          <table:table-cell table:number-columns-repeated="1013"/>
        </table:table-row>
        <table:table-row table:style-name="ro1">
          <table:table-cell table:style-name="ce2" office:value-type="string" calcext:value-type="string">
            <text:p>ICRER 2026</text:p>
          </table:table-cell>
          <table:table-cell table:style-name="ce2" office:value-type="string" calcext:value-type="string">
            <text:p>Springer--2026 8th International Conference on Resources and Environmental Research (ICRER 2026)</text:p>
          </table:table-cell>
          <table:table-cell table:style-name="ce2" office:value-type="float" office:value="85" calcext:value-type="float">
            <text:p>85</text:p>
          </table:table-cell>
          <table:table-cell table:style-name="ce2" office:value-type="float" office:value="30" calcext:value-type="float">
            <text:p>30</text:p>
          </table:table-cell>
          <table:table-cell table:style-name="ce3" office:value-type="date" office:date-value="2026-07-20" calcext:value-type="date">
            <text:p>2026-07-20</text:p>
          </table:table-cell>
          <table:table-cell/>
          <table:table-cell table:style-name="ce3"/>
          <table:table-cell table:style-name="ce2" office:value-type="string" calcext:value-type="string">
            <text:p>Kyoto, Japan</text:p>
          </table:table-cell>
          <table:table-cell table:style-name="ce2" office:value-type="string" calcext:value-type="string">
            <text:p>Oct 10, 2026 - Oct 12, 2026</text:p>
          </table:table-cell>
          <table:table-cell table:style-name="ce4" office:value-type="string" calcext:value-type="string">
            <text:p><text:a xlink:href="https://www.icrer.us/" xlink:type="simple">https://www.icrer.us/</text:a></text:p>
          </table:table-cell>
          <table:table-cell table:style-name="ce2" office:value-type="string" calcext:value-type="string">
            <text:p>Full name: Springer--2026 8th International Conference on Resources and Environmental Research (ICRER 2026) Abbreviation: ICRER 2026 Conference Website: https://www.icrer.us/ Conference venue: Kyoto, Japan 2026 8th International Conference on Resources and Environmental Research (ICRER 2026) will be held during October 10-12, 2026, in Kyoto, Japan. ICRER 2026 is sponsored by Beijing CAS Industrial Energy and Environment Technology Institute and supported by Kyoto University, Japan. Paper Publishing Accepted and presented full papers will be included in a volume of Springer Book Series Environmental Science and Engineering (ISSN: 1863-5520)and published as post-proceedings, which will be submitted to EI Compendex, Scopus, SCImago and other major databases for indexing. Journal Recommendation Authors are encouraged to submit your extended paper with at least 35% new added content and new title to the journal below for publication after full paper is accepted into conference proceedings. Environmental Technology, indexed by SCIE (Impact factor 2021: 3.475), Scopus (Citescore 2021:5.4, Q1), etc. Deadline for manuscript submissions: November 10, 2026 Call for papers 1)Environmental Science and Technology ●Mechanism of multi-media migration and transformation of new pollutants ●Treatment and recycling technology of high salt wastewater ●Collaborative governance mechanism and key path of atmospheric pollution reduction and carbon reduction ●Ecological effects of microplastics in offshore waters ●Study on carbon sequestration and accumulation in coastal wetland ecosystem ●Application of machine learning to Earth system observation and prediction ●Study on biological characteristics and ecological effects of microorganisms in Marine extreme environment ●Study on clean production technology of tanning without tanning agent ●Food function factors and the mechanism of chronic metabolic syndrome ●Extraction and development of new natural cellulose fibers 2)Environmental Ecological Engineering ●Ecosystem Management and Sustainable Development ●Global environmental change and ecosystems management ●Environmental restoration and ecological engineering ●Habitat reconstruction ●Deforestation ●Wetlands ●Landscape degradation and restoration ●Soil decontamination ●Environmental Monitoring and Management ●Hazardous substances and detection techniques ●Biodegradation of hazardous substances ●Toxicity assessment and epidemiological studies ●Management and regulation of point and diffuse pollution ●Monitoring and analysis of environmental contaminant ●Quality guidelines, environmental regulation and monitoring 3)Resources and Environment Engineering ●Water Resources Management and Water Pollution Control ●Atmospheric science and air pollution control ●Solid Waste Pollution Control and Resource Utilization ●Ground water remediation and management ●Global environmental change and ecosystems management ●Climate and climatic changes ●Global warming ●Ozone layer depletion ●Carbon capture and storage ●Recycling and reuse ●Waste valorization Committee Conference Chairs Kaimin Shih, The University of Hong Kong, China Kokyo Oh, Center for Environmental Science in Saitama, Japan Conference local arrangement Chair Setsuhisa Tanabe Kyoto University, Japan Conference Program Chairs Xueming Chen, Fuzhou University, China Miwako Hosoda, Seisa University, Tokyo, Japan Conference Regional Chairs Tjokorda Gde Tirta Nindhia, Udayana University, Indonesia Flora Elvistia, Jayabaya University, Indonesia Conference Publication Chair Chaolei Yuan, Sun Yat-sen University, China Conference Steering Committee Mohamed El-Din, University of Alberta, Canada Satya Harpalani, Southern Illinois University Carbondale, USA Submission and Contact Methods Submission Methods: https://confsys.iconf.org/submission/icrer2026 E-mail: icrer_secretary@163.com Tel: +86-17311381986 Conference Specialist: Ms. Vera Liao ICRER 2026 can provide a platform for Resources and Environmental Research. For more conference information, please visit the conference website: http://www.icrer.us/index.html</text:p>
          </table:table-cell>
          <table:table-cell table:number-columns-repeated="1013"/>
        </table:table-row>
        <table:table-row table:style-name="ro1">
          <table:table-cell table:style-name="ce2" office:value-type="string" calcext:value-type="string">
            <text:p>ICBSTS 2026</text:p>
          </table:table-cell>
          <table:table-cell table:style-name="ce2" office:value-type="string" calcext:value-type="string">
            <text:p>2026 7th International Conference on Building Science, Technology and Sustainability (ICBSTS 2026)</text:p>
          </table:table-cell>
          <table:table-cell table:style-name="ce2" office:value-type="float" office:value="40" calcext:value-type="float">
            <text:p>40</text:p>
          </table:table-cell>
          <table:table-cell table:style-name="ce2" office:value-type="float" office:value="30" calcext:value-type="float">
            <text:p>30</text:p>
          </table:table-cell>
          <table:table-cell table:style-name="ce3" office:value-type="date" office:date-value="2026-07-25" calcext:value-type="date">
            <text:p>2026-07-25</text:p>
          </table:table-cell>
          <table:table-cell table:style-name="ce3" table:number-columns-repeated="2"/>
          <table:table-cell table:style-name="ce2" office:value-type="string" calcext:value-type="string">
            <text:p>University of Lisbon, Portugal</text:p>
          </table:table-cell>
          <table:table-cell table:style-name="ce2" office:value-type="string" calcext:value-type="string">
            <text:p>Sep 2, 2026 - Sep 4, 2026</text:p>
          </table:table-cell>
          <table:table-cell table:style-name="ce4" office:value-type="string" calcext:value-type="string">
            <text:p><text:a xlink:href="http://www.icbsts.org" xlink:type="simple">http://www.icbsts.org</text:a></text:p>
          </table:table-cell>
          <table:table-cell table:style-name="ce2" office:value-type="string" calcext:value-type="string">
            <text:p>2026 7th International Conference on Building Science, Technology and Sustainability (ICBSTS 2026) University of Lisbon, Portugal September 2-4, 2026 Website: www.icbsts.org Welcome to join the 2026 7th International Conference on Building Science, Technology and Sustainability (ICBSTS 2026), where you will encounter groundbreaking ideas and have the opportunity to meet experts from around the world! [Publication]: Accepted and register full papers will be published in E3S Web of Conferences(ISSN: 2267-1242), which will be indexed by Scopus, CPCI (Web of Science), CAS, DOAJ, EBSCO, ProQuest, et al. [Conference Committees in 2025]: 1. Conference Chair Nuno Dinis Cortiços, University of Lisbon, Portugal 2. Conference Co-Chairs Eric J. Strauss, Michigan State University, USA Paulo Mendonça, University of Minho, Portugal 3. Program Chairs Yoshiaki Yamato, National Institute of Technology, Kure College, Japan Carol Monticelli, Politecnico di Milano, Italy Kurazumi Yoshihito, Sugiyama Jogakuen University, Japan Angel Jimenez-Aranda, University of Salford, United Kingdom 4. Program Co-Chairs Shino Okuda, Doshisha Women's College of Liberal Arts, Japan Claudia Casapulla, University of Napoli Federico II, Italy Tomonori Sakoi, Shinshu University, Japan João Pedro Costa, University of Lisbon, Portugal &gt;&gt; For more committees, you can visit: http://icbsts.org/com.html &gt;&gt; Looking forward to the Conference Committees in 2026! [Speakers in 2025]: 1. Prof. Ariya Aruninta, Chulalongkorn University, Thailand 2. Prof. Qing Wang, Taishan University, China 3. Prof. Tomonori Sakoi, Shinshu University, Japan &gt;&gt; For more details, you can visit: http://icbsts.org/speaker.html &gt;&gt; Looking forward to the speakers in 2026! [Conference Topics (but not limited to)]: ☆ Intelligent Building System ☆ Advanced HVAC Systems ☆ Life Cycle Assessment Methodology ☆ Environmental Product Declarations ☆ Climate Declarations ☆ Environment and Local Authorities &gt;&gt; Please check the following link which you can find more topics: http://icbsts.org/cfp.html [Submission Types]: 1. Full Paper (Publication &amp; Presentation) Minimum Page: Five Pages. Accepted and registered full papers will be published into the conference proceedings, authors will be invited to give oral presentation at site. 2. Abstract (Presentation ONLY) Abstract registration is for Presentation ONLY. The abstract will NOT be published. [Submission Method]: * You can submit your paper via submission system: https://confsys.iconf.org/submission/icbsts2026 * Or directly send to the conference email box: icbsts@cbees.net &gt;&gt; For more details, you can learn through: http://icbsts.org/sub.html [Conference Venue]: Universidade de Lisboa (University of Lisbon) Faculdade de Arquitectura (Faculty of Architecture) Address: Rua Sá Nogueira, Pólo Universitário do Alto da Ajuda, 1349-063 Lisboa &gt;&gt; More information, please visit: https://icbsts.org/venue.html [Contact Us]: Conference Secretary: Ms. Rachel Liu Email: icbsts@cbees.net Tel: +852-3155-4897 (Speaking English) +86-28-87577778 (Speaking Chinese &amp; English) Working Time: 9:30-18:00 (UTC/GMT+8, Monday to Friday) Welcome to submit your contribution to ICBSTS 2026. We hope you can be a part of the conference and look forward to meeting you in Lisbon, Portugal. For more information and submission guidelines, please visit our conference website: www.icbsts.org</text:p>
          </table:table-cell>
          <table:table-cell table:style-name="ce6" table:number-columns-repeated="2"/>
          <table:table-cell table:number-columns-repeated="3"/>
          <table:table-cell table:style-name="ce7" table:number-columns-repeated="2"/>
          <table:table-cell table:style-name="ce8"/>
          <table:table-cell table:style-name="ce3" table:number-columns-repeated="3"/>
          <table:table-cell table:number-columns-repeated="1002"/>
        </table:table-row>
        <table:table-row table:style-name="ro1">
          <table:table-cell table:style-name="ce2" office:value-type="string" calcext:value-type="string">
            <text:p>ICREC--EI 2026</text:p>
          </table:table-cell>
          <table:table-cell table:style-name="ce2" office:value-type="string" calcext:value-type="string">
            <text:p>2026 11th International Conference on Renewable Energy and Conservation (ICREC 2026)</text:p>
          </table:table-cell>
          <table:table-cell table:style-name="ce2" office:value-type="float" office:value="68" calcext:value-type="float">
            <text:p>68</text:p>
          </table:table-cell>
          <table:table-cell table:style-name="ce2" office:value-type="float" office:value="30" calcext:value-type="float">
            <text:p>30</text:p>
          </table:table-cell>
          <table:table-cell table:style-name="ce3" office:value-type="date" office:date-value="2026-07-25" calcext:value-type="date">
            <text:p>2026-07-25</text:p>
          </table:table-cell>
          <table:table-cell table:style-name="ce3" table:number-columns-repeated="2"/>
          <table:table-cell table:style-name="ce2" office:value-type="string" calcext:value-type="string">
            <text:p>Rome, Italy</text:p>
          </table:table-cell>
          <table:table-cell table:style-name="ce2" office:value-type="string" calcext:value-type="string">
            <text:p>Nov 20, 2026 - Nov 22, 2026</text:p>
          </table:table-cell>
          <table:table-cell table:style-name="ce4" office:value-type="string" calcext:value-type="string">
            <text:p><text:a xlink:href="http://www.icrec.org/" xlink:type="simple">http://www.icrec.org/</text:a></text:p>
          </table:table-cell>
          <table:table-cell table:style-name="ce2" office:value-type="string" calcext:value-type="string">
            <text:p>ICREC 2026 2026 11th International Conference on Renewable Energy and Conservation (ICREC 2026) Rome, Italy November 20-22, 2026 http://www.icrec.org/ Publication: ICREC 2026 all accepted papers will be published into ICREC Conference Proceedings, which submitted for Ei Compendex, Scopus, et al. Call for Papers: New Trends and Technologies for RESSs Policies and Strategies for RESSs Energy Transformation from Renewable Energy System (RES) to Grid Novel Energy Conversion Studies for RESs Power Devices and Driving Circuits for RESs Control Techniques for RESs Grid Interactive Systems Used in Hybrid RESs Performance Analysis of RESs Hybrid RESSs Decision Support Systems for RESSs Renewable Energy Research and Applications for Industries RESSs for Electrical Vehicles and Components Artificial Intelligence and Machine Learning Studies for RESs and Applications Computational Methods for RESSs More topics: http://www.icrec.org/cfp.html Submission Methods: Full Paper (publication and oral presentation) Abstract (oral presentation only) Electronic Submission System (.pdf) http://confsys.iconf.org/submission/icrec2026 or send it directly to conference email: icrec_conf@163.com Contacts: Ms. Nina Lee E-mail: icrec_conf@163.com Tel: +86-19382255134</text:p>
          </table:table-cell>
          <table:table-cell table:style-name="ce6" table:number-columns-repeated="2"/>
          <table:table-cell table:number-columns-repeated="6"/>
          <table:table-cell table:style-name="ce3" table:number-columns-repeated="3"/>
          <table:table-cell table:number-columns-repeated="1002"/>
        </table:table-row>
        <table:table-row table:style-name="ro1">
          <table:table-cell table:style-name="ce2" office:value-type="string" calcext:value-type="string">
            <text:p>ICEST 2026</text:p>
          </table:table-cell>
          <table:table-cell table:style-name="ce2" office:value-type="string" calcext:value-type="string">
            <text:p>Springer--2026 17th International Conference on Environmental Science and Technology (ICEST 2026)</text:p>
          </table:table-cell>
          <table:table-cell table:style-name="ce2" office:value-type="float" office:value="72" calcext:value-type="float">
            <text:p>72</text:p>
          </table:table-cell>
          <table:table-cell table:style-name="ce2" office:value-type="float" office:value="30" calcext:value-type="float">
            <text:p>30</text:p>
          </table:table-cell>
          <table:table-cell table:style-name="ce3" office:value-type="date" office:date-value="2026-07-30" calcext:value-type="date">
            <text:p>2026-07-30</text:p>
          </table:table-cell>
          <table:table-cell/>
          <table:table-cell table:style-name="ce3"/>
          <table:table-cell table:style-name="ce2" office:value-type="string" calcext:value-type="string">
            <text:p>Xiamen, China</text:p>
          </table:table-cell>
          <table:table-cell table:style-name="ce2" office:value-type="string" calcext:value-type="string">
            <text:p>Dec 4, 2026 - Dec 6, 2026</text:p>
          </table:table-cell>
          <table:table-cell table:style-name="ce4" office:value-type="string" calcext:value-type="string">
            <text:p><text:a xlink:href="https://icest.org/" xlink:type="simple">https://icest.org/</text:a></text:p>
          </table:table-cell>
          <table:table-cell table:style-name="ce2" office:value-type="string" calcext:value-type="string">
            <text:p>Full Name: 2026 17th International Conference on Environmental Science and Technology Abbreviation: ICEST 2026 Conference Website: https://icest.org/ Conference Time: December 4-6, 2026 Conference Venue: Jimei University, Xiamen, China ICEST 2026 will be held in Xiamen, China during December 4-6, 2026. It is organized by International Society for Environmental Information Sciences, co-organized by Jimei University and United Nations Development Programme. The ICEST conference has been successfully held for 16 editions in the field of Environmental Science and Technology, successively in Bangkok, Singapore, Poland, Barcelona, Madrid, the Czech Republic, China, Japan and other locations around the world. The conference received great support from the Conference Chair Prof. Gordon Huang. The conference provides a forum for researchers and practitioners in this field to exchange ideas, designs, and experiments, promoting academic exchange and international cooperation in related fields. _x001f_★Publication Papers accepted by ICEST 2026, after registration and presentation, will be included in Springer Book Series Environmental Science and Engineering (ISSN: 1863-5520), which will be submitted to EI Compendex, Scopus, SCImago and other major databases for indexing. ★Topics(Topics of interest for submission include, but are not limited to:) Ecosystem Management and Sustainable Development Environmental Monitoring and Management Water Resources Management and Water Pollution Control Atmospheric science and air pollution control Solid Waste Pollution Control and Resource Utilization Global environmental change and ecosystems management Health and the Environment Water resources and river basin management Climate and climatic changes Optimization of collection systems For more topics and scope please check: https://icest.org/cfp.html _x001f_ ★Submission Instructions 2). Language: English is the official language of the conference; the paper should be written and presented only in English. 3). Submission Types * Abstract submission for presentation only without publication. * Full paper submission for both presentation and publication. 4). Paper Page Limits: Each full paper should be no less than 10 pages, including all figures, tables, and reference. When it exceeds 15 pages, extra page will be charged at 30 USD / 200 CNY / Page. 5). Submission Methods ▪By online submission system: https://www.zmeeting.org/submission/ICEST2026 ▪By Email: icest@academic.net ★Contact us Conference secretary: Ms. Ace Wong Tel: +86-17765145794 Email: icest@academic.net Website: https://icest.org/ Office Time: 9:00--18:00, Monday to Friday (GMT+8 Time Zone)</text:p>
          </table:table-cell>
          <table:table-cell table:number-columns-repeated="1013"/>
        </table:table-row>
        <table:table-row table:style-name="ro1">
          <table:table-cell table:style-name="ce2" office:value-type="string" calcext:value-type="string">
            <text:p>ICEOE 2026</text:p>
          </table:table-cell>
          <table:table-cell table:style-name="ce2" office:value-type="string" calcext:value-type="string">
            <text:p>Springer--2026 9th International Conference on Environment and Ocean Engineering (ICEOE 2026)</text:p>
          </table:table-cell>
          <table:table-cell table:style-name="ce2" office:value-type="float" office:value="42" calcext:value-type="float">
            <text:p>42</text:p>
          </table:table-cell>
          <table:table-cell table:style-name="ce2" office:value-type="float" office:value="30" calcext:value-type="float">
            <text:p>30</text:p>
          </table:table-cell>
          <table:table-cell table:style-name="ce3" office:value-type="date" office:date-value="2026-07-30" calcext:value-type="date">
            <text:p>2026-07-30</text:p>
          </table:table-cell>
          <table:table-cell/>
          <table:table-cell table:style-name="ce3"/>
          <table:table-cell table:style-name="ce2" office:value-type="string" calcext:value-type="string">
            <text:p>Ho Chi Minh City, Vietnam</text:p>
          </table:table-cell>
          <table:table-cell table:style-name="ce2" office:value-type="string" calcext:value-type="string">
            <text:p>Nov 25, 2026 - Nov 27, 2026</text:p>
          </table:table-cell>
          <table:table-cell table:style-name="ce4" office:value-type="string" calcext:value-type="string">
            <text:p><text:a xlink:href="https://www.iceoe.org/" xlink:type="simple">https://www.iceoe.org/</text:a></text:p>
          </table:table-cell>
          <table:table-cell table:style-name="ce2" office:value-type="string" calcext:value-type="string">
            <text:p>Full Name: Springer--2026 9th International Conference on Environment and Ocean Engineering (ICEOE 2026) Abbreviation: ICEOE 2026 Venue: Ho Chi Minh City, Vietnam Time: November 25-27, 2026 Website:https://www.iceoe.org/ Welcome to join in the 2026 9th International Conference on Environment and Ocean Engineering (ICEOE 2026), which will be held in Ho Chi Minh City, Vietnam during November 25-27, 2026. Paper Publishing Full papers submitted will go through peer reviewing process by technical program committees and international reviewers. Selected and presented papers will be published as Post-Proceedings in a volume of Springer book series: Lecture Notes in Civil Engineering, which will be abstracted and indexed by EI Compendex , Scopus, Inspec, SCImago, ZbMATH etc. Call for papers Topics of interest for submission include, but are not limited to: Coastal and Ocean Engineering | Beach erosion and sediment transport | Climate change and sea level rise | Coastal infrastructure developments | Hydrodynamics of off shore structures | Lowland development and reclamation | Marine ecology and environments | Marine and offshore wind energy | Oil spill and environmental hazards Port works (dredging, seawall design, etc.) | Sea water intrusion | Tsunami, waves and tides | Wastewater disposal | Estuary coastal engineering | Offshore engineering | Deep sea engineering | Port waterway Marine energy engineering | Underwater engineering | Salvage technique | Offshore oil development technology and equipment | Offshore fixed jacket platform | The ocean activities platform | Subsea pipeline | Oil and gas gathering and transferring | Wetlands For details about topics, please visit at https://www.iceoe.org/cfp.html Conference Schedule November 25, 2026----Sign-in and Conference materials collections November 26, 2026---- Opening Ceremony&amp;Keynote Speeches&amp;Group Photo&amp;Technical Sessions&amp;Dinner Banquet and Award Ceremony November 27, 2026----Invited Speeches&amp;Technical Sessions Submission A.Full paper Accepted full papers will be invited to give oral or poster presentation at the conference, which will also be published in the conference proceedings. B.Abstract Accepted abstracts will just be invited for presentation at the conference, which will not be included into conference proceedings. Please send the Full paper/Abstract to Electronic Submission System https://confsys.iconf.org/submission/iceoe2026 Contact Methods E-mail: iceoe@ieet.ac.cn Conference Specialist: Ms. Stacey Li Tel: +86-18117801445 ICEOE 2026 can provide a platform for academic communication in Environment and Ocean Engineering. For more conference information, please visit the conference website: https://www.iceoe.org/</text:p>
          </table:table-cell>
          <table:table-cell table:number-columns-repeated="1013"/>
        </table:table-row>
        <table:table-row table:style-name="ro1">
          <table:table-cell table:style-name="ce2" office:value-type="string" calcext:value-type="string">
            <text:p>ICREE--EI 2026</text:p>
          </table:table-cell>
          <table:table-cell table:style-name="ce2" office:value-type="string" calcext:value-type="string">
            <text:p>2026 10th International Conference on Renewable Energy and Environment (ICREE 2026)</text:p>
          </table:table-cell>
          <table:table-cell table:style-name="ce2" office:value-type="float" office:value="72" calcext:value-type="float">
            <text:p>72</text:p>
          </table:table-cell>
          <table:table-cell table:style-name="ce2" office:value-type="float" office:value="30" calcext:value-type="float">
            <text:p>30</text:p>
          </table:table-cell>
          <table:table-cell table:style-name="ce3" office:value-type="date" office:date-value="2026-08-05" calcext:value-type="date">
            <text:p>2026-08-05</text:p>
          </table:table-cell>
          <table:table-cell/>
          <table:table-cell table:style-name="ce3"/>
          <table:table-cell table:style-name="ce2" office:value-type="string" calcext:value-type="string">
            <text:p>Brisbane, Australia</text:p>
          </table:table-cell>
          <table:table-cell table:style-name="ce2" office:value-type="string" calcext:value-type="string">
            <text:p>Nov 28, 2026 - Nov 30, 2026</text:p>
          </table:table-cell>
          <table:table-cell table:style-name="ce4" office:value-type="string" calcext:value-type="string">
            <text:p><text:a xlink:href="https://www.icree.org" xlink:type="simple">https://www.icree.org</text:a></text:p>
          </table:table-cell>
          <table:table-cell table:style-name="ce2" office:value-type="string" calcext:value-type="string">
            <text:p>★ICREE 2026-EI Compendex &amp; Scopus indexed★ ★Abbreviation: ICREE 2026 ★Full name: 2026 10th International Conference on Renewable Energy and Environment (ICREE 2026) ★Venue: Brisbane, Australia ★Time: November 28-30, 2026 ★Website: https://www.icree.org/ ★Co-sponsored By: Griffith University, Australia ★Technically Supported by: The University of Queensland, Australia ★★Publication All submitted papers will be reviewed by technical program committees and accepted full papers will be published into conference proceedings which will be submitted to be indexed by EI compendex, Scopus, SCImago, etc. ★Call for General Papers★ Topics related to: Wind Energy Applications, Wind Resources Environmental Impact, Hydropower Applications, Construction and Design Issues, Environmental Impact Assessment, Solar Cell Technology, PV for Rural Development, Solar Thermal Electricity,Geothermal Applications, Environmental Impacts and Sustainability, Technology and System Aspects, Machines and Wind Farms, Turbines and Generators, Small and Micro Scale hydropower, Photovoltaic Technology, PV Manufacture, Testing and Certification, Solar Thermal Applications, Solar Heating and Cooling Systems, Geothermal Heating and Heat Pumps... For details about topics, please visit https://www.icree.org/cfp.html ★Submission★ 1. Full paper(publication and presentation) 2. Abstract (presentation only) Submission Methods: https://confsys.iconf.org/submission/icree2026 E-mail: icree@chairmen.org More details about submission, please visit https://www.icree.org/sub.html ★★Conference Schedule★★ November 28, 2026---Conference Sign-in and Materials Collection November 29, 2026(Morning)----Opening Remarks &amp; Keynote Speeches&amp;Group Photo &amp; Coffee Break November 29, 2026(Afternoon)----Invited Speeches &amp; Parallel Sessions for Oral Presentations November 30, 2026----Invited Speeches &amp; Parallel Sessions for Oral Presentations ★★Contact: Ms. Iris Tang Website: https://www.icree.org Email: icree@chairmen.org Contact Number: +86-18117808141</text:p>
          </table:table-cell>
          <table:table-cell table:number-columns-repeated="1013"/>
        </table:table-row>
        <table:table-row table:style-name="ro1">
          <table:table-cell table:style-name="ce2" office:value-type="string" calcext:value-type="string">
            <text:p>IEEA--EI 2027</text:p>
          </table:table-cell>
          <table:table-cell table:style-name="ce2" office:value-type="string" calcext:value-type="string">
            <text:p>2027 The 16th International Conference on Informatics, Environment, Energy and Applications (IEEA 2027)</text:p>
          </table:table-cell>
          <table:table-cell table:style-name="ce2" office:value-type="float" office:value="82" calcext:value-type="float">
            <text:p>82</text:p>
          </table:table-cell>
          <table:table-cell table:style-name="ce2" office:value-type="float" office:value="40" calcext:value-type="float">
            <text:p>40</text:p>
          </table:table-cell>
          <table:table-cell table:style-name="ce3" office:value-type="date" office:date-value="2026-09-30" calcext:value-type="date">
            <text:p>2026-09-30</text:p>
          </table:table-cell>
          <table:table-cell table:style-name="ce3" table:number-columns-repeated="2"/>
          <table:table-cell table:style-name="ce2" office:value-type="string" calcext:value-type="string">
            <text:p>Tokyo, Japan</text:p>
          </table:table-cell>
          <table:table-cell table:style-name="ce2" office:value-type="string" calcext:value-type="string">
            <text:p>Feb 24, 2027 - Feb 26, 2027</text:p>
          </table:table-cell>
          <table:table-cell table:style-name="ce4" office:value-type="string" calcext:value-type="string">
            <text:p><text:a xlink:href="http://ieea.org/" xlink:type="simple">http://ieea.org/</text:a></text:p>
          </table:table-cell>
          <table:table-cell table:style-name="ce2" office:value-type="string" calcext:value-type="string">
            <text:p>Full name: 2027 The 16th International Conference on Informatics, Environment, Energy and Applications (IEEA 2027) Abbreviation: IEEA 2027 http://ieea.org/ The 16th International Conference on Informatics, Environment, Energy and Applications (IEEA 2027) will be held in Tokyo, Japan, during February 24-26, 2027. IEEA conference is initiated by Science and Engineering Institute, USA and assisted by National University of Ireland Galway, Ireland, University of Wollongong, Australia, Tokai University, Japan, Agriculture University, China, Chulalongkorn University, Thailand and German University in Cairo, Egypt This is an annual conference started in Singapore, 2012. Then, it was successfully held in major cities, such as Bali, Shanghai, Pattaya, Hong Kong, Jeju Island, Beijing, Osaka, Amsterdam, Tokyo. It has been attended by more than 500 participants from 20 countries. On behalf of the Organizing Committee, we warmly invite you, informatics, environment, energy and applications scientist, engineer or technician, graduate student, or simply interested by the technique, to take part in this unique and innovative conference with your enthusiasm to develop, your desire to apply and your willingness to mature the informatics, environment, energy and applications. Publication and Indexing: Accepted and Registered papers can be published by conference proceedings, which will be indexed by Ei Compendex, Scopus, etc main database. IEEA conference proceedings for last 15 years are all indexed successfully by EI Compendex and SCOPUS in three months after online. IEEA 2026, ACM proceeding (ISBN:979-8-4007-2209-7), Online | EI Compendex | SCOPUS IEEA 2025, Springer proceeding (Electronic ISSN: 1876-1119; Print ISSN: 1876-1100), Online | EI Compendex | SCOPUS IEEA 2024, ACM proceeding (ISBN:979-8-4007-1642-3), Online | EI Compendex | SCOPUS IEEA 2023, ACM proceeding (ISBN:979-8-4007-0012-5), Online | EI Compendex | SCOPUS IEEA 2022, ACM proceeding (ISBN:978-1-4503-9583-0), Online | EI Compendex | SCOPUS IEEA 2021, ACM proceeding (ISBN:978-1-4503-8902-0), Online | EI Compendex | SCOPUS ........ Submission ways: Submission is available now: https://www.zmeeting.org/submission/ieea2027 An account is need. If you have any questions, feel free to contact conference secretary ieea@sciei.org. Call for Papers: Informatics and Applications Environmental Informatics Energy Informatics For more topics, please visit: http://ieea.org/cfp.html Submission Types below: *Submitting an Abstract: Presentation Only *Submitting a full Paper: Publication and Presentation Call for Special Session: IEEA proposals for special sessions within the technical scope of the conference. Special-session proposals should be submitted by the prospective organizer(s) who will commit to promoting and handling the review process of special session as Chair or Co-Chair of the event. Accepted papers will be published by conference proceedings, inclusion to indexing databases. *Proposals should include the following information: *Title *Brief description of the session *Related topics *Name, brief biodata and photo of organizer *E-mail address of main contact person *Please send these information to mail address ieea@sciei.org Program February 24, 2027--Registration,collecting conference materials February 25, 2027--Keynote Speech &amp; Presentation Day February 26, 2027--Presentation Day (Pending) Contact Us: Mail Us: Ms. Amber Lin; ieea@sciei.org Call Us: +1-562-606-1057 (English); +86 18207777775 (English&amp;Chinese)</text:p>
          </table:table-cell>
          <table:table-cell table:number-columns-repeated="1013"/>
        </table:table-row>
        <table:table-row table:style-name="ro1">
          <table:table-cell table:style-name="ce2" office:value-type="string" calcext:value-type="string">
            <text:p>SIP 2027</text:p>
          </table:table-cell>
          <table:table-cell table:style-name="ce2" office:value-type="string" calcext:value-type="string">
            <text:p>4th International Conference on Sustainable Innovations and Partnerships</text:p>
          </table:table-cell>
          <table:table-cell table:style-name="ce2" office:value-type="float" office:value="90" calcext:value-type="float">
            <text:p>90</text:p>
          </table:table-cell>
          <table:table-cell table:style-name="ce2" office:value-type="float" office:value="25" calcext:value-type="float">
            <text:p>25</text:p>
          </table:table-cell>
          <table:table-cell table:style-name="ce3" office:value-type="date" office:date-value="2027-02-28" calcext:value-type="date">
            <text:p>2027-02-28</text:p>
          </table:table-cell>
          <table:table-cell table:style-name="ce3" office:value-type="date" office:date-value="2027-03-10" calcext:value-type="date">
            <text:p>2027-03-10</text:p>
          </table:table-cell>
          <table:table-cell table:style-name="ce3" office:value-type="date" office:date-value="2027-03-15" calcext:value-type="date">
            <text:p>2027-03-15</text:p>
          </table:table-cell>
          <table:table-cell table:style-name="ce2" office:value-type="string" calcext:value-type="string">
            <text:p>University of British Columbia (UBC), Va</text:p>
          </table:table-cell>
          <table:table-cell table:style-name="ce2" office:value-type="string" calcext:value-type="string">
            <text:p>Mar 18, 2027 - Mar 19, 2027</text:p>
          </table:table-cell>
          <table:table-cell table:style-name="ce4" office:value-type="string" calcext:value-type="string">
            <text:p><text:a xlink:href="https://sip2027.org/" xlink:type="simple">https://sip2027.org/</text:a></text:p>
          </table:table-cell>
          <table:table-cell table:style-name="ce2" office:value-type="string" calcext:value-type="string">
            <text:p>The 4th International Conference on Sustainable Innovations and Partnerships (SIP 2027) will be held on 18–19 March 2027 at the University of British Columbia (UBC), Vancouver, Canada. The conference provides an international forum for researchers, professionals, policymakers, educators, industry practitioners, and students to present work related to sustainability, innovation, applied engineering, smart technologies, renewable energy, environmental protection, business, education, and global partnerships. SIP 2027 welcomes abstract and full paper submissions from academic, professional, and interdisciplinary fields. Contributions may address theoretical studies, applied research, case studies, policy analysis, technical innovation, digital transformation, and practical solutions for sustainable development. Suggested topics include, but are not limited to: - Sustainable development and global partnerships - Renewable energy and energy sustainability - Smart technologies and digital transformation - Artificial intelligence, data science, and applied computing - Applied engineering and technology innovation - Environmental sustainability and climate-related solutions - Sustainable business, management, and entrepreneurship - Education, policy, social sustainability, and community development - Green infrastructure, urban sustainability, and resilient systems - Interdisciplinary research for sustainability and innovation Authors should prepare abstracts of 200–400 words. The abstract should clearly state the research purpose, methods, main findings, and contribution. Full papers should present original work with clear methodology, results, discussion, and references. Important dates: Abstract submission deadline: 28 February 2027 Acceptance notification: 10 March 2027 Final paper submission deadline: 15 March 2027 Conference dates: 18–19 March 2027 Publication and indexing: Selected accepted and presented papers may be considered for post-conference publication pathways, subject to peer review, editorial approval, plagiarism screening, manuscript quality, publisher requirements, and final editorial decision. Publication consideration may include conference proceedings or affiliated journal pathways as described on the official SIP 2027 website. Submission: All abstract and full paper submissions must be completed through the official EasyChair submission platform after the approved EasyChair link is published on the SIP 2027 website. Authors should not submit by email or through any unofficial system. Registration and participation: At least one author of each accepted abstract or paper must complete registration and present the work. SIP 2027 supports in-person and virtual participation where applicable. Registration details are available on the official website. Official website: https://sip2027.org/ Call for Papers: https://sip2027.org/call-for-papers.html Submission information: https://sip2027.org/abstract-submission.html Registration: https://sip2027.org/register.html Contact: support@sip2027.org +1 (323) 369-6688</text:p>
          </table:table-cell>
          <table:table-cell table:number-columns-repeated="1013"/>
        </table:table-row>
        <table:table-row table:style-name="ro1">
          <table:table-cell table:style-name="ce2" office:value-type="string" calcext:value-type="string">
            <text:p>PGES 2026</text:p>
          </table:table-cell>
          <table:table-cell table:style-name="ce2" office:value-type="string" calcext:value-type="string">
            <text:p>2026 4th International Conference on Power, Grid and Energy Storage</text:p>
          </table:table-cell>
          <table:table-cell table:style-name="ce2" office:value-type="float" office:value="90" calcext:value-type="float">
            <text:p>90</text:p>
          </table:table-cell>
          <table:table-cell table:style-name="ce2" office:value-type="float" office:value="30" calcext:value-type="float">
            <text:p>30</text:p>
          </table:table-cell>
          <table:table-cell table:style-name="ce3" office:value-type="date" office:date-value="2026-07-06" calcext:value-type="date">
            <text:p>2026-07-06</text:p>
          </table:table-cell>
          <table:table-cell/>
          <table:table-cell table:style-name="ce3" office:value-type="date" office:date-value="2026-07-21" calcext:value-type="date">
            <text:p>2026-07-21</text:p>
          </table:table-cell>
          <table:table-cell table:style-name="ce2" office:value-type="string" calcext:value-type="string">
            <text:p>Chengdu,China</text:p>
          </table:table-cell>
          <table:table-cell table:style-name="ce2" office:value-type="string" calcext:value-type="string">
            <text:p>Aug 21, 2026 - Aug 23, 2026</text:p>
          </table:table-cell>
          <table:table-cell table:style-name="ce4" office:value-type="string" calcext:value-type="string">
            <text:p><text:a xlink:href="https://ais.cn/u/vINrqi" xlink:type="simple">https://ais.cn/u/vINrqi</text:a></text:p>
          </table:table-cell>
          <table:table-cell table:style-name="ce2" office:value-type="string" calcext:value-type="string">
            <text:p>2026 4th International Conference on Power, Grid and Energy Storage (PGES 2026) will be held in Chengdu,China from August 21 to 23, 2026. 𝗖𝗼𝗻𝗳𝗲𝗿𝗲𝗻𝗰𝗲 𝗪𝗲𝗯𝘀𝗶𝘁𝗲: https://ais.cn/u/vINrqi ---𝗖𝗮𝗹𝗹 𝗳𝗼𝗿 𝗽𝗮𝗽𝗲𝗿𝘀--- The topics of interest for submission include, but are not limited to: ◕Track 1: Electric power ·Power systems and automation ·Energy storage equipment and systems ·Power electronics technology ·Power energy systems ·Power system analysis ·Control and stability ·Intelligent technology and its application in power systems ·Other related topics ◕Track 2: Grid ·Smart grid information engineering ·Many applications in the field of smart grid ·Power transmission and distribution ·Power quality ·Protection and electromagnetic compatibility ·Electrical power generation technology ·Electric drive and application of large power grid stability control ·Communication and control in the power system ·Other Related Topics ◕Track 3: Energy Storage ·Electrochemical energy storage ·Thermal energy storage ·Mechanical energy storage ·Wing energy storage ·Hydrogen energy storage ·Inductor energy storage ·Pumped storage power generation ·Capacitive energy storage systems ·Solar cells ·Fuel cells ·Other Related Topics ---𝗣𝘂𝗯𝗹𝗶𝗰𝗮𝘁𝗶𝗼𝗻--- All papers will be reviewed by two or three expert reviewers from the conference committees. After a careful reviewing process, all accepted papers will be published by Conference Proceedings and will be submitted to EI Compendex,Scopus for indexing. ---𝗜𝗺𝗽𝗼𝗿𝘁𝗮𝗻𝘁 𝗗𝗮𝘁𝗲𝘀--- Full Paper Submission Date: July 6, 2026 Registration Deadline: July 21, 2026 Final Paper Submission Date: July 21, 2026 Conference Dates: August 21-23, 2026 ---𝗣𝗮𝗽𝗲𝗿 𝗦𝘂𝗯𝗺𝗶𝘀𝘀𝗶𝗼𝗻--- Please send the full paper(word+pdf) to Submission System: https://ais.cn/u/vINrqi</text:p>
          </table:table-cell>
          <table:table-cell table:number-columns-repeated="1013"/>
        </table:table-row>
        <table:table-row table:style-name="ro1">
          <table:table-cell table:style-name="ce2" office:value-type="string" calcext:value-type="string">
            <text:p>SDER 2026</text:p>
          </table:table-cell>
          <table:table-cell table:style-name="ce2" office:value-type="string" calcext:value-type="string">
            <text:p>2026 3rd International Conference on Sustainable Development and Energy Resources</text:p>
          </table:table-cell>
          <table:table-cell table:style-name="ce2" office:value-type="float" office:value="80" calcext:value-type="float">
            <text:p>80</text:p>
          </table:table-cell>
          <table:table-cell table:style-name="ce2" office:value-type="float" office:value="42" calcext:value-type="float">
            <text:p>42</text:p>
          </table:table-cell>
          <table:table-cell table:style-name="ce3" office:value-type="date" office:date-value="2026-07-08" calcext:value-type="date">
            <text:p>2026-07-08</text:p>
          </table:table-cell>
          <table:table-cell/>
          <table:table-cell table:style-name="ce3" office:value-type="date" office:date-value="2026-07-23" calcext:value-type="date">
            <text:p>2026-07-23</text:p>
          </table:table-cell>
          <table:table-cell table:style-name="ce2" office:value-type="string" calcext:value-type="string">
            <text:p>Guangzhou, China</text:p>
          </table:table-cell>
          <table:table-cell table:style-name="ce2" office:value-type="string" calcext:value-type="string">
            <text:p>Aug 7, 2026 - Aug 9, 2026</text:p>
          </table:table-cell>
          <table:table-cell table:style-name="ce4" office:value-type="string" calcext:value-type="string">
            <text:p><text:a xlink:href="https://ais.cn/u/FZZbiu" xlink:type="simple">https://ais.cn/u/FZZbiu</text:a></text:p>
          </table:table-cell>
          <table:table-cell table:style-name="ce2" office:value-type="string" calcext:value-type="string">
            <text:p>2026 3rd International Conference on Sustainable Development and Energy Resources (SDER 2026) will be held grandly in Guangzhou, China, from August 7th to 9th, 2026. 𝗖𝗼𝗻𝗳𝗲𝗿𝗲𝗻𝗰𝗲 𝗪𝗲𝗯𝘀𝗶𝘁𝗲: https://ais.cn/u/FZZbiu ---𝗖𝗮𝗹𝗹 𝗳𝗼𝗿 𝗽𝗮𝗽𝗲𝗿𝘀--- The topics of interest include, but are not limited to: · New Energy Materials and Clean Energy Technologies · Renewable Energy Systems · Energy Storage Technologies and Battery Management Systems · Electric Vehicles and Hybrid Power Systems · Smart Energy Management and Energy System Optimization · Low-Carbon Emissions and Energy-Saving Technologies · Sustainable Transportation and Green Mobility Solutions · Green Propulsion and Energy Efficiency in Aerospace · Hydrogen Energy Technologies and Fuel Cell Systems · Vehicle Thermal Management and Energy Efficiency Enhancement Technologies · Intelligent Manufacturing and Industrial Energy Conservation · Life Cycle Assessment (LCA) and Environmental Impact Analysis · Carbon-Neutral Transportation Technologies and Policies · Energy Infrastructure in Smart Cities · Measurement Techniques for Energy System · Multiphase Flow for Energy Applications ---𝗦𝗽𝗲𝗮𝗸𝗲𝗿𝘀--- Prof.Tongyi Zhang,The Hong Kong University of Science and Technology (Guangzhou), China &amp; Shanghai University,Academician of the Chinese Academy of Sciences Prof. Marc A. Rosen,Ontario Tech University, Canada,Fellow of Canadian Academy of Engineering Assoc. Prof.Yunlong Zi,The Hong Kong University of Science and Technology (Guangzhou), China ---𝗣𝘂𝗯𝗹𝗶𝗰𝗮𝘁𝗶𝗼𝗻--- All accepted papers, whether invited or contributed, will be published in the Journal of Physics: Conference Series (JPCS) (ISSN: 1742-6596), subject to meeting the conference's scope and quality requirements. Furthermore, these papers will be submitted for indexing in EI Compendex and Scopus. Each conference proceeding paper must be no less than 6 pages in length. ---𝗜𝗺𝗽𝗼𝗿𝘁𝗮𝗻𝘁 𝗗𝗮𝘁𝗲𝘀--- Full Paper Submission Date: July 8, 2026 Registration Deadline: July 23, 2026 Final Paper Submission Date: July 23, 2026 Conference Dates: August 7-9, 2026 ---𝗣𝗮𝗽𝗲𝗿 𝗦𝘂𝗯𝗺𝗶𝘀𝘀𝗶𝗼𝗻--- Please send the full paper(word+pdf) to Submission System: https://ais.cn/u/FZZbiu</text:p>
          </table:table-cell>
          <table:table-cell table:number-columns-repeated="1013"/>
        </table:table-row>
        <table:table-row table:style-name="ro1">
          <table:table-cell table:style-name="ce2" office:value-type="string" calcext:value-type="string">
            <text:p>ICEMEE 2026</text:p>
          </table:table-cell>
          <table:table-cell table:style-name="ce2" office:value-type="string" calcext:value-type="string">
            <text:p>IEEE 2026 12th International Conference on Energy Materials and Electrical Engineering</text:p>
          </table:table-cell>
          <table:table-cell table:style-name="ce2" office:value-type="float" office:value="70" calcext:value-type="float">
            <text:p>70</text:p>
          </table:table-cell>
          <table:table-cell table:style-name="ce2" office:value-type="float" office:value="30" calcext:value-type="float">
            <text:p>30</text:p>
          </table:table-cell>
          <table:table-cell table:style-name="ce3" office:value-type="date" office:date-value="2026-07-08" calcext:value-type="date">
            <text:p>2026-07-08</text:p>
          </table:table-cell>
          <table:table-cell/>
          <table:table-cell table:style-name="ce3" office:value-type="date" office:date-value="2026-08-13" calcext:value-type="date">
            <text:p>2026-08-13</text:p>
          </table:table-cell>
          <table:table-cell table:style-name="ce2" office:value-type="string" calcext:value-type="string">
            <text:p>Hangzhou, China</text:p>
          </table:table-cell>
          <table:table-cell table:style-name="ce2" office:value-type="string" calcext:value-type="string">
            <text:p>Aug 28, 2026 - Aug 30, 2026</text:p>
          </table:table-cell>
          <table:table-cell table:style-name="ce4" office:value-type="string" calcext:value-type="string">
            <text:p><text:a xlink:href="https://ais.cn/u/FVRZnu" xlink:type="simple">https://ais.cn/u/FVRZnu</text:a></text:p>
          </table:table-cell>
          <table:table-cell table:style-name="ce2" office:value-type="string" calcext:value-type="string">
            <text:p>IEEE 2026 12th International Conference on Energy Materials and Electrical Engineering (ICEMEE 2026) will be held in Hangzhou, China, during August 28-30, 2026. 𝗖𝗼𝗻𝗳𝗲𝗿𝗲𝗻𝗰𝗲 𝗪𝗲𝗯𝘀𝗶𝘁𝗲: https://ais.cn/u/FVRZnu ---𝗖𝗮𝗹𝗹 𝗙𝗼𝗿 𝗣𝗮𝗽𝗲𝗿𝘀--- The topics of interest for submission include, but are not limited to: ◕ Track 1: Power Engineering · Power system modeling and simulation · Power system stability and control · High-voltage transmission and distribution technology · Power system protection and relay schemes · Power electronics and power converters · Electrical machine design and operation optimization · Power system fault diagnosis and fault-tolerant control · Power system reliability and risk assessment · Power system automation and monitoring technology · Power system operation and scheduling optimization · Electromagnetic compatibility and safety in power systems · Big data and artificial intelligence applications in power systems · Power quality analysis and improvement · Energy storage and peak shaving technologies in power systems · Green and low-carbon operation strategies for power systems ◕ Track 2: Smart Grid · Smart grid architecture and key technologies · Distributed generation and microgrid control · Internet of Things and communication technologies in power systems · Cybersecurity and information protection in power systems · Smart meters and demand-side management · Electric vehicle charging and grid interaction · Smart grid scheduling and optimization algorithms · Renewable energy integration into power systems · Big data analysis and forecasting in smart grids · Artificial intelligence and machine learning applications in power systems · Multi-energy complementarity and integrated energy systems in smart grids · Real-time monitoring and control of smart grids · Resilience and disaster resistance of smart grids ◕ Track 3: Energy Materials · Power semiconductor devices · Wide bandgap semiconductor materials (SiC, GaN) · Electromagnetic functional materials · High-frequency electromagnetic materials · Superconducting materials and superconducting power technology · Dielectric materials and high-voltage insulation technology · Conductive films and transparent electrodes · Micro/nano-structured electronic materials · Electromagnetic shielding and electromagnetic compatibility materials · Power electronics packaging and thermal management materials · Novel electronic materials · Electromagnetic energy harvesting and conversion materials · Reliability of power devices ◕ Track 4: Energy Systems and Low-Carbon Technologies · Renewable energy systems integration (wind/solar/hydro/geothermal) · Hydrogen energy full-chain technology and applications (production, storage, transportation, utilization) · Clean utilization of fossil energy and carbon emission reduction technologies · Integrated energy systems and multi-energy complementarity · Electrochemical energy storage and novel energy storage technologies · Battery management systems and safety · Digitalization and intelligent transformation of energy systems · Distributed generation and microgrids · Energy Internet of Things (IoT) and smart energy management · Low-carbon transportation and transportation-energy integration · Biomass energy and waste-to-energy · Energy storage materials and devices · Marine energy and nuclear energy technologies ---𝗦𝗽𝗲𝗮𝗸𝗲𝗿𝘀--- Honghai Liu,Southeast University, China Daogang‌ Peng,Shanghai University of Electric Power, China Juan Yan,Anhui University, China Xiong Liu,Jinan University, China ---𝗣𝘂𝗯𝗹𝗶𝗰𝗮𝘁𝗶𝗼𝗻--- All accepted papers will be published by IEEE (ISBN: 979-8-3195-0882-9) and submitted for inclusion into IEEE Xplore subject to meeting IEEE Xplore's scope and quality requirements, and also submitted to EI Compendex and Scopus for indexing. All conference proceedings papers cannot be fewer than 4 pages. ---𝗜𝗺𝗽𝗼𝗿𝘁𝗮𝗻𝘁 𝗗𝗮𝘁𝗲𝘀--- Full Paper Submission Date: July 8, 2026 Notification Date: July 28, 2026 Registration Deadline: August 13, 2026 Final Paper Submission Date: August 13, 2026 Conference Dates: August 28-30, 2026 --- 𝗣𝗮𝗽𝗲𝗿 𝗦𝘂𝗯𝗺𝗶𝘀𝘀𝗶𝗼𝗻--- Please send the abstract or full paper(word+pdf) to Submission System: https://ais.cn/u/FVRZnu</text:p>
          </table:table-cell>
          <table:table-cell table:number-columns-repeated="1013"/>
        </table:table-row>
        <table:table-row table:style-name="ro1">
          <table:table-cell table:style-name="ce2" office:value-type="string" calcext:value-type="string">
            <text:p>ICEEPS 2026</text:p>
          </table:table-cell>
          <table:table-cell table:style-name="ce2" office:value-type="string" calcext:value-type="string">
            <text:p>IEEE 2026 5th International Conference on Energy and Electrical Power Systems</text:p>
          </table:table-cell>
          <table:table-cell table:style-name="ce2" office:value-type="float" office:value="82" calcext:value-type="float">
            <text:p>82</text:p>
          </table:table-cell>
          <table:table-cell table:style-name="ce2" office:value-type="float" office:value="30" calcext:value-type="float">
            <text:p>30</text:p>
          </table:table-cell>
          <table:table-cell table:style-name="ce3" office:value-type="date" office:date-value="2026-07-10" calcext:value-type="date">
            <text:p>2026-07-10</text:p>
          </table:table-cell>
          <table:table-cell/>
          <table:table-cell table:style-name="ce3" office:value-type="date" office:date-value="2026-07-10" calcext:value-type="date">
            <text:p>2026-07-10</text:p>
          </table:table-cell>
          <table:table-cell table:style-name="ce2" office:value-type="string" calcext:value-type="string">
            <text:p>Lanzhou, China</text:p>
          </table:table-cell>
          <table:table-cell table:style-name="ce2" office:value-type="string" calcext:value-type="string">
            <text:p>Jul 24, 2026 - Jul 26, 2026</text:p>
          </table:table-cell>
          <table:table-cell table:style-name="ce4" office:value-type="string" calcext:value-type="string">
            <text:p><text:a xlink:href="https://ais.cn/u/JvmM3i" xlink:type="simple">https://ais.cn/u/JvmM3i</text:a></text:p>
          </table:table-cell>
          <table:table-cell table:style-name="ce2" office:value-type="string" calcext:value-type="string">
            <text:p>IEEE 2026 5th International Conference on Energy and Electrical Power Systems (ICEEPS 2026) will be held from July 24 to 26, 2026, in Lanzhou, China. 𝗖𝗼𝗻𝗳𝗲𝗿𝗲𝗻𝗰𝗲 𝗪𝗲𝗯𝘀𝗶𝘁𝗲: https://ais.cn/u/JvmM3i ---𝗖𝗮𝗹𝗹 𝗳𝗼𝗿 𝗽𝗮𝗽𝗲𝗿𝘀--- The topics of interest include, but are not limited to: ·Energy Technology and Systems Renewable Energy Technologies (Wind, Solar, Biomass, Geothermal/Tidal, etc.) Solar Photovoltaic and Solar Thermal Technologies Wind Power Generation Technology and Systems Energy Storage Technologies Renewable Energy-Based Hydrogen Production and Storage Technologies Integrated Technologies for Wind, Solar, and Energy Storage Hybrid Energy Systems and Multi-Energy Complementarity New Energy Power Generation Technologies Nuclear Power Technology and Nuclear Energy Utilization Hydropower and Ocean Energy Advanced Thermal Engineering and Energy-Saving Technologies Energy Equipment Energy Conversion and Efficiency New Energy Vehicles and Electric Drive Technologies ·Power Systems and Electrical Engineering Power System and Its Automation Power System Planning, Operation, and Control Power System Modeling, Simulation, and Analysis Power System Stability, Reliability, and Security Power System Protection and Control Power System Communication and Control Power System Resilience and Black Start Power System Deregulation Power Systems and Energy High Voltage and Insulation Technology Power Transmission and Distribution Systems and Equipment Electric Energy Transmission Distributed Generation Power Electronics and Electric Drives Inverter and Converter Technologies Analog and Digital Circuits Battery Management Systems Electric Traction Systems and Control Power Quality and Electromagnetic Compatibility Power Optimization Computational Intelligence in Electrical Engineering Diagnostic and Sensing Systems Electro-Energy Processing ·Smart Grids and Information Technology Smart Grids Microgrids Smart Sensors Intelligent Networks and Communication Machine Learning and Artificial Intelligence in Power Systems Big Data Applications in Power Systems Machine Learning/Big Data in Power Systems Advanced Sensing and Control Energy Internet Emerging Energy Measurement and Control Intelligent Energy Information Support Technologies ---𝗦𝗽𝗲𝗮𝗸𝗲𝗿𝘀--- Prof. Loi Lei Lai,IEEE Fellow,Guangdong University of Technology, China Prof. Zhigang Liu,IEEE Fellow,Southwest Jiaotong University, China Prof. Junbo Zhao,IET Fellow,Southwest Jiaotong University, China ---𝗣𝘂𝗯𝗹𝗶𝗰𝗮𝘁𝗶𝗼𝗻--- Papers must be original and unpublished, and must not be submitted for publication elsewhere concurrently. All accepted papers will be published by IEEE (ISBN: 979-8-3315-4572-7) and submitted for inclusion into IEEE Xplore subject to meeting IEEE Xplore's scope and quality requirements, and also submitted to EI Compendex and Scopus for indexing. All conference proceedings papers cannot be fewer than 4 pages. ---𝗜𝗺𝗽𝗼𝗿𝘁𝗮𝗻𝘁 𝗗𝗮𝘁𝗲𝘀--- Registration Deadline: July 17, 2026 Final Paper Due: July 10, 2026 Conference Dates: July 24-26, 2026 ---𝗣𝗮𝗽𝗲𝗿 𝗦𝘂𝗯𝗺𝗶𝘀𝘀𝗶𝗼𝗻--- Please send the full paper(word+pdf) to Submission System: https://ais.cn/u/JvmM3i</text:p>
          </table:table-cell>
          <table:table-cell table:number-columns-repeated="1013"/>
        </table:table-row>
        <table:table-row table:style-name="ro1">
          <table:table-cell table:style-name="ce2" office:value-type="string" calcext:value-type="string">
            <text:p>EI² 2026</text:p>
          </table:table-cell>
          <table:table-cell table:style-name="ce2" office:value-type="string" calcext:value-type="string">
            <text:p>The 10th IEEE Conference on Energy Internet and Energy System Integration (IEEE EI² 2026)</text:p>
          </table:table-cell>
          <table:table-cell table:style-name="ce2" office:value-type="float" office:value="83" calcext:value-type="float">
            <text:p>83</text:p>
          </table:table-cell>
          <table:table-cell table:style-name="ce2" office:value-type="float" office:value="28" calcext:value-type="float">
            <text:p>28</text:p>
          </table:table-cell>
          <table:table-cell table:style-name="ce3" office:value-type="date" office:date-value="2026-07-10" calcext:value-type="date">
            <text:p>2026-07-10</text:p>
          </table:table-cell>
          <table:table-cell table:number-columns-repeated="2"/>
          <table:table-cell table:style-name="ce2" office:value-type="string" calcext:value-type="string">
            <text:p>Shanghai, China</text:p>
          </table:table-cell>
          <table:table-cell table:style-name="ce2" office:value-type="string" calcext:value-type="string">
            <text:p>Sep 11, 2026 - Sep 14, 2026</text:p>
          </table:table-cell>
          <table:table-cell table:style-name="ce4" office:value-type="string" calcext:value-type="string">
            <text:p><text:a xlink:href="https://attend.ieee.org/ei2-2026" xlink:type="simple">https://attend.ieee.org/ei2-2026</text:a></text:p>
          </table:table-cell>
          <table:table-cell table:style-name="ce2" office:value-type="string" calcext:value-type="string">
            <text:p>The 10th IEEE Conference on Energy Internet and Energy System Integration (IEEE EI² 2026) Shanghai, China | September 11-14, 2026 https://attend.ieee.org/ei2-2026 1. About Conference The 10th IEEE Conference on Energy Internet and Energy System Integration (IEEE EI² 2026), organized by IEEE Power and Energy Society, Chinese Society for Electrical Engineering, Shanghai University of Electric Power, Taiyuan University of Technology and Tsinghua University, will be held in Shanghai,China during September 11 – September 14, 2026. EI² 2026 focuses on innovative technologies and practical applications in the fields of Energy Internet and Energy System Integration (ESI), aiming at the integration of multiple energy sources such as electricity, gas, heating, cooling and transportation to shape a green, low-carbon, smart and efficient ecosystem. The theme of the conference is "Towards the Net-zero and AI Era"，which explores artificial intelligence technologies for the Energy Internet, zero-carbon and low-carbon energy interconnection system, new quality productivity construction for the energy sector, energy big data processing, new energy technologies and system integration, control and optimization of the Energy Internet, energy market and energy trading, energy security and risk, electric motor technologies and intelligent drive systems, and key support technologies for new-type power systems, etc. The goal is to push forward the process of AI-enabling of the energy system, to improve the efficiency of energy and to achieve sustainable development of energy and resources. 2. Conference Committee ▪ General Chair Yinbiao Shu, Academician of Chinese Academy of Engineering, President of Chinese Society for Electrical Engineering, The 36th President of International Electrotechnical Commission ▪ Conference Chairs Hongbin Sun, Taiyuan University of Technology, Tsinghua University, China Chiyung Chung, Hong Kong Polytechnic University, China Mei Chen, Chinese Society for Electrical Engineering, China Yang Fu, Shanghai University of Electric Power, China ▪ Conference Co-Chairs Jianming Liu, Chinese Society for Electrical Engineering, China Jinyue Yan, Hong Kong Polytechnic University, China Jianzhong Wu, Cardiff University, UK Jianjun Zhao, Chinese Society for Electrical Engineering, China Zheng Yan, Shanghai Jiao Tong University, China Jing Ma, Shanghai University of Electric Power, China ▪ Organization Committee Chair Ying Tao, Shanghai University of Electric Power, China ▪ Technical Program Committee Chairs Yanbo Chen, North China Electric Power University, China Feng Deng, Changsha University of Science and Technology, China Yinke Dou, Taiyuan University of Technology, China Wei Gu, Southeast University, China Ye Guo, Tsinghua Shenzhen International Graduate School, China Bo Hu, Chongqing University, China Cungang Hu, Anhui University, China Haitao Hu, Southwest Jiaotong University, China Wentao Huang, Shanghai Jiao Tong University, China Tao Jiang, Northeast Electric Power University, China Tao Jin, Fuzhou University, China Gengfeng Li, Xi’an Jiaotong University, China Weilin Li, Northwestern Polytechnical University, China Xiaolu Li, Shanghai University of Electric Power, China Chengxi Liu, Wuhan University, China Hui Liu, Guangxi University, China Yiqi Liu, Northeast Forestry University, China Dazhong Ma, Northeastern University, China Fujun Ma, Hunan University, China Qiuyue Nie, Harbin Institute of Technology, China Yunfei Mu, Tianjin University, China Ying Wang, Sichuan University, China Qianggang Wang, Chongqing University, China Wenhu Tang, South China University of Technology, China Yin Xu, Beijing Jiaotong University, China Huanhai Xin, Zhejiang University, China Xingwu Yang, Shanghai University of Electric Power, China Wei Yao, Huazhong University of Science and Technology, China Li Zhang, Hohai University, China Pinjia Zhang, Tsinghua University, China Yue Zhang, Shandong University, China Haoran Zhao, Shandong University, China ▪ Publication Chairs Xinwei Shen, Tsinghua Shenzhen International Graduate School, China Lei Han, China Electric Power Research Institute, China Lanxin Li, China Electric Power Research Institute, China Shunfu Lin, Shanghai University of Electric Power, China ▪ Publicity Chair Huagang Ye, Shanghai University of Electric Power, China ▪ Forum Chairs Jianming Liu, Chinese Society for Electrical Engineering, China Hao Li, Shanghai University of Electric Power, China ▪ Panel Session Chairs Qinglai Guo, Tsinghua University, China Shurong Wei, Shanghai University of Electric Power, China ▪ Special Session Chairs Wu Lu, Shanghai University of Electric Power, China Jiangjiao Xu, Shanghai University of Electric Power, China ▪ Treasure Xiaolu Li, Shanghai University of Electric Power, China ▪ General Secretaries Yao Zhao, Shanghai University of Electric Power, China Lirong Deng, Shanghai University of Electric Power, China 3. Topics associated with EI² Low-Carbon Planning and Operation for Energy Internet Modeling and stability analysis of renewable energy system Modern Power System Stability, Control, and Resilience Digital Twin and AI Co-optimization for Multi-Energy Systems Cyber-Physical-Social Systems for Energy Security under Zero-Carbon Transition Market Mechanisms and Trading Platforms for Carbon-Aware Electricity Coordinated Optimization of Energy and Computing Power for Carbon Neutrality AI-Empowered Energy Storage and Electric Vehicle Grid Integration Advanced Power Electronics and Control for Next-Generation Power Systems AI and Big Data Processing for Energy Applications Cross-Domain Cascading Failure Prevention in Coupled Energy Systems Market Trading Mechanism for Power System 4. Publication Submissions will be reviewed by the conference technical committees, and accepted papers will be published in IEEE EI² 2026 International Conference Proceedings. 5. Paper Submission Please submit your paper through: https://easychair.org/conferences/?conf=ieeeei2026 6. Important Dates Deadline for Paper Submission: 25 June 2026 Deadline for Notification of Acceptance: 25 July 2026 Deadline for Final Paper Submission: 10 August 2026 Deadline for Author Registration: 10 August 2026 Conference Date: 11-14 September 2026 7. Contact Us Conference Secretary: Ms. Lorna Ren Tel.: (86) 191 8224 0053 Email: contact@ei2conf.com</text:p>
          </table:table-cell>
          <table:table-cell table:number-columns-repeated="1013"/>
        </table:table-row>
        <table:table-row table:style-name="ro1">
          <table:table-cell table:style-name="ce2" office:value-type="string" calcext:value-type="string">
            <text:p>EEET 2026</text:p>
          </table:table-cell>
          <table:table-cell table:style-name="ce2" office:value-type="string" calcext:value-type="string">
            <text:p>2026 9th International Conference on Electronics and Electrical Engineering Technology (EEET 2026)</text:p>
          </table:table-cell>
          <table:table-cell table:style-name="ce2" office:value-type="float" office:value="85" calcext:value-type="float">
            <text:p>85</text:p>
          </table:table-cell>
          <table:table-cell table:style-name="ce2" office:value-type="float" office:value="40" calcext:value-type="float">
            <text:p>40</text:p>
          </table:table-cell>
          <table:table-cell table:style-name="ce3" office:value-type="date" office:date-value="2026-07-10" calcext:value-type="date">
            <text:p>2026-07-10</text:p>
          </table:table-cell>
          <table:table-cell table:number-columns-repeated="2"/>
          <table:table-cell table:style-name="ce2" office:value-type="string" calcext:value-type="string">
            <text:p>Tianjin, China</text:p>
          </table:table-cell>
          <table:table-cell table:style-name="ce2" office:value-type="string" calcext:value-type="string">
            <text:p>Dec 4, 2026 - Dec 6, 2026</text:p>
          </table:table-cell>
          <table:table-cell table:style-name="ce4" office:value-type="string" calcext:value-type="string">
            <text:p><text:a xlink:href="http://www.eeet.org/" xlink:type="simple">http://www.eeet.org/</text:a></text:p>
          </table:table-cell>
          <table:table-cell table:style-name="ce2" office:value-type="string" calcext:value-type="string">
            <text:p>Full name: 2026 9th International Conference on Electronics and Electrical Engineering Technology (EEET 2026) Abbreviation: EEET 2026 2026 9th International Conference on Electronics and Electrical Engineering Technology (EEET 2026) will be held on December 4-6, 2026 in Tianjin, China. The EEET 2026 is supported by Tianjin University of Science and Technology, Universiti Tun Hussein Onn Malaysia, Beijing Cas Spark Institute Information Technology, Beihang University, Southeast University, Tiangong University, and Universiti Sains Malaysia. Conference Website: http://www.eeet.org/ Conference Highlights: 1. Academic Visit: Campus Tour (Tianjin University of Science and Technology) &amp; Tianjin City Tour 2. EEET Conference Proceedings have been consistently published and indexed for eight consecutive years. ※Paper Publication: 1. EEET 2026 Conference Proceedings, submitted for indexing by Ei Compendex and Scopus. 2. International Journal of Electrical and Electronic Engineering &amp; Telecommunications (IJEETC, ISSN: 2319-2518): indexed in Scopus (since 2017), Google Scholar, Crossref, Citefactor, etc. Excellent papers will be recommended to be published in: Energies (ISSN 1996-1073), SI: Threats and Protection of Energy Systems, Impact Factor: 3.2, Citescore: 7.3, which will be indexed in SCIE, Ei Compendex, Scopus, etc. Since 2018, EEET conference proceedings have been published and indexed by Ei Compendex and Scopus. ※History: EEET 2018丨Tianjin, China丨ISBN: 978-1-4503-6541-3 EEET 2019丨Penang, Malaysia丨ISBN: 978-1-4503-7214-5 EEET 2020丨Kitakyushu, Japan丨ISBN: 978-1-4503-8756-9 EEET 2021丨Nanjing, China丨ISBN: 978-1-4503-8516-9 EEET 2022丨Beijing, China丨ISBN-13: 979-8-3503-2042-8 EEET 2023丨Nanjing, China丨ISBN: 979-8-3503-9559-4 EEET 2024丨Malacca, Malaysia丨ISBN: 13: 979-8-3315-2786-0 EEET 2025 | Chiba, Japan | In press ※Topics： Track 1: Electronics &amp; Semiconductor Technology Track 2: Electrical Engineering &amp; Sustainable Energy Track 3: Communication &amp; Computer Engineering Track 4: Robotics, Industrial Automation &amp; Instrumentation Track 5: Cybersecurity and Data Privacy Track 6: Artificial Intelligence and Machine Learning For more information, please visit：http://www.eeet.org/cfp.html Submission Methods: Submission System: http://www.easychair.org/conferences/?conf=eeet2026 Submission E-mail: eeet@siit.ac.cn Listener Registration: http://confsys.iconf.org/register/eeet2026 Call for Invited Speakers: Research Area: Electronics and Electrical Engineering Technology Presentation Format: 20 minutes English presentation &amp; 5 minutes Q-A Session Application Materials: Please submit your bio (within 200 words) and a photo to the conference email: eeet@siit.ac.cn. Upon successful application, your information will be updated on the conference website. *Both submission and registration must follow the procedures for invited speakers. Upon successful application, the conference will provide partial financial support. Call for Special Sessions: 1. To complement the regular conference schedule and focus on emerging topics in the field of Electronics and Electrical Engineering Technology, EEET 2026 welcomes proposals for special sessions from experts and scholars. Please submit your proposals to: eeet@siit.ac.cn. The proposal should include the following content: 1). Title of Special Session 2). Brief description of Special Session 3). Related topics 4). Name, Affiliation, E-mail, Short biography of the organizers *After the organization of the Special Sessions is successful, the organizing committee will provide certain financial support. 2. Optional Topics: 1. Intelligent Power Systems and Smart Grid Technologies 2. Advanced Semiconductor Devices and Nanoelectronics 3. AI-Driven Signal Processing and Embedded Systems 4. Renewable Energy Integration and Electrification Technologies Contact Methods: Conference Email: eeet@siit.ac.cn Tel: +86-18000595361 Wechat: CBEES-BBS Conference Secretary: Ms. Ruby He Conference Venue： Tianjin University of Science and Technology Addr.: Tianjin University of Science &amp; Technology, 1038 Dagu Nanlu, Hexi District, Tianjin, P.R.China Web: https://en.tust.edu.cn/ EEET 2026 can provide a platform for academic communication in Electronics and Electrical Engineering Technology and related areas. For more conference information, please visit the conference website: http://www.eeet.org/.</text:p>
          </table:table-cell>
          <table:table-cell table:number-columns-repeated="1013"/>
        </table:table-row>
        <table:table-row table:style-name="ro1">
          <table:table-cell table:style-name="ce2" office:value-type="string" calcext:value-type="string">
            <text:p>AIEE--EI 2026</text:p>
          </table:table-cell>
          <table:table-cell table:style-name="ce2" office:value-type="string" calcext:value-type="string">
            <text:p>2026 7th International Conference on Artificial Intelligence in Electronics Engineering (AIEE 2026)</text:p>
          </table:table-cell>
          <table:table-cell table:style-name="ce2" office:value-type="float" office:value="42" calcext:value-type="float">
            <text:p>42</text:p>
          </table:table-cell>
          <table:table-cell table:style-name="ce2" office:value-type="float" office:value="35" calcext:value-type="float">
            <text:p>35</text:p>
          </table:table-cell>
          <table:table-cell table:style-name="ce3" office:value-type="date" office:date-value="2026-07-10" calcext:value-type="date">
            <text:p>2026-07-10</text:p>
          </table:table-cell>
          <table:table-cell table:number-columns-repeated="2"/>
          <table:table-cell table:style-name="ce2" office:value-type="string" calcext:value-type="string">
            <text:p>Hangzhou, China</text:p>
          </table:table-cell>
          <table:table-cell table:style-name="ce2" office:value-type="string" calcext:value-type="string">
            <text:p>Sep 11, 2026 - Sep 13, 2026</text:p>
          </table:table-cell>
          <table:table-cell table:style-name="ce4" office:value-type="string" calcext:value-type="string">
            <text:p><text:a xlink:href="https://aiee.net" xlink:type="simple">https://aiee.net</text:a></text:p>
          </table:table-cell>
          <table:table-cell table:style-name="ce2" office:value-type="string" calcext:value-type="string">
            <text:p>AIEE 2026 2026 7th International Conference on Artificial Intelligence in Electronics Engineering (AIEE 2026) Indexed by Ei Compendex Core &amp; Scopus Basic Information Full Name: 2026 7th International Conference on Artificial Intelligence in Electronics Engineering Abbreviation: AIEE 2026 Official Website: https://aiee.net Date: September 11–13, 2026 Venue: Hangzhou, China Conference Overview 2026 7th International Conference on Artificial Intelligence in Electronics Engineering (AIEE 2026) will be held on September 11–13, 2026 in Hangzhou, China. Hosted by Hangzhou Innovation Institute, Beihang University, AIEE is a high-level international academic conference focusing on the interdisciplinary integration of electronic engineering and artificial intelligence. The conference aims to provide a high-level platform for global researchers, engineers, and industrial practitioners to exchange cutting‑edge ideas, share recent advances, and strengthen academic cooperation. It will feature in-depth discussions on the latest theories, technological innovations, and practical applications in the convergence of electronic engineering and artificial intelligence. In particular, AIEE 2026 will support young scholars by offering opportunities to present their work, communicate with leading experts, and receive international feedback. The conference will promote international collaboration and drive innovations in smart terminals, communication systems, modern industry, energy and power, and other key fields. Call for Papers Topics of interest include but are not limited to: Track 1: AI-driven Electronic Circuit &amp; System Design Track 2: AI in Signal Processing &amp; Communication Track 3: Intelligent Sensing &amp; Electronic Measurement Track 4: AI for Power Electronics &amp; Energy Systems Track 5: AI-enabled Embedded &amp; Industrial Electronics For more topics: https://aiee.net/cfp.html Publication All accepted and registered papers will be published in the AIEE 2026 Conference Proceedings, and indexed by Ei Compendex and Scopus. Submission Guidelines Language: English only Length: At least 4 pages Papers must be formatted strictly according to the official template. Abstract-only submission: Presentations without publication in the proceedings are allowed. Submission channels (choose one): Online system: https://www.zmeeting.org/submission/aiee2026 Email: aiee_conf@163.com Detailed guidelines: https://aiee.net/submission.html Tentative Schedule September 11, 2026: On-site registration &amp; academic visit September 12, 2026: Opening ceremony, keynote speeches, parallel sessions September 13, 2026: Parallel sessions Conference City — Hangzhou As a core city in the Yangtze River Delta and a hub of digital economy, Hangzhou combines profound historical heritage with strong innovation vitality. It is home to world cultural heritages including West Lake, the Grand Canal, and the Archaeological Ruins of Liangzhu City, inheriting the elegance of Jiangnan culture. Meanwhile, Hangzhou boasts a booming industrial cluster in artificial intelligence, electronic information, and intelligent manufacturing, making it an important center for scientific and technological innovation and talent exchange. By holding AIEE 2026 in Hangzhou, we aim to create a world-class academic platform that integrates technological innovation with cultural charm, promoting interdisciplinary research and industry‑academia collaboration. Contact Information Conference Secretary: Ms. Wu Email: aiee_conf@163.com Tel: +86-132-9000-0002 WeChat: Add "iconf-ras" with note "AIEE 2026"</text:p>
          </table:table-cell>
          <table:table-cell table:number-columns-repeated="1013"/>
        </table:table-row>
        <table:table-row table:style-name="ro1">
          <table:table-cell table:style-name="ce2" office:value-type="string" calcext:value-type="string">
            <text:p>CPESE 2026</text:p>
          </table:table-cell>
          <table:table-cell table:style-name="ce2" office:value-type="string" calcext:value-type="string">
            <text:p>2026 13th International Conference on Power and Energy Systems Engineering (CPESE 2026)</text:p>
          </table:table-cell>
          <table:table-cell table:style-name="ce2" office:value-type="float" office:value="75" calcext:value-type="float">
            <text:p>75</text:p>
          </table:table-cell>
          <table:table-cell table:style-name="ce2" office:value-type="float" office:value="32" calcext:value-type="float">
            <text:p>32</text:p>
          </table:table-cell>
          <table:table-cell table:style-name="ce3" office:value-type="date" office:date-value="2026-07-10" calcext:value-type="date">
            <text:p>2026-07-10</text:p>
          </table:table-cell>
          <table:table-cell table:number-columns-repeated="2"/>
          <table:table-cell table:style-name="ce2" office:value-type="string" calcext:value-type="string">
            <text:p>Osaka, Japan</text:p>
          </table:table-cell>
          <table:table-cell table:style-name="ce2" office:value-type="string" calcext:value-type="string">
            <text:p>Sep 25, 2026 - Sep 27, 2026</text:p>
          </table:table-cell>
          <table:table-cell table:style-name="ce4" office:value-type="string" calcext:value-type="string">
            <text:p><text:a xlink:href="http://www.cpese.net" xlink:type="simple">http://www.cpese.net</text:a></text:p>
          </table:table-cell>
          <table:table-cell table:style-name="ce2" office:value-type="string" calcext:value-type="string">
            <text:p>★Full Name: 2026 13th International Conference on Power and Energy Systems Engineering (CPESE 2026) ★Abbreviation: CPESE 2026 ★Dates: September 25-27, 2026 ★Place: Suita Campus - The University of Osaka, Osaka, Japan ★Website: http://www.cpese.net ★Conference Venue: Suita Campus - The University of Osaka Address: The University of Osaka, 1-1 Yamadaoka, Suita, Osaka 565-0871, Japan ★Building on the accomplishments of earlier CPESE conferences, we are pleased to announced that the 13th International Conference on Power and Energy Systems Engineering (CPESE 2026) will be held during September 25–27, 2026, in Osaka, Japan, CPESE continues to serve as a leading global platform for researchers, industry experts, and educators. The conference facilitates the exchange of the latest innovations, trends, practical experiences, and key challenges in Power and Energy Systems Engineering. ****** ★Publication All submissions will be peer reviewed by 2-3 reviewers. The registered and presented papers will be published into CPESE 2026 Conference Proceedings. ****** ★Publication History CPESE2025-Springer-Lecture Notes in Electrical Engineering - Ei Compendex &amp; Scopus INDEX CPESE2024 - IEEE | ISBN: 979-8-3503-7742-2 - Ei Compendex &amp; Scopus INDEX CPESE2023 - IEEE | ISBN: 979-8-3503-2761-8 - Ei Compendex &amp; Scopus INDEX CPESE2022 - Energy Reports Volume 9, Supplement 1 | Science Citation Index Expanded (SCIE), Ei Compendex &amp; Scopus INDEX CPESE2021 - Energy Reports Volume 8, Supplement 1 | Science Citation Index Expanded (SCIE), Ei Compendex &amp; Scopus INDEX CPESE2020 - Energy Reports Volume 6, Supplement 9 | Science Citation Index Expanded (SCIE), Ei Compendex &amp; Scopus INDEX CPESE2019 - Energy Reports Volume 6, Supplement 2 | Science Citation Index Expanded (SCIE), Ei Compendex &amp; Scopus INDEX CPESE2018 - Energy Procedia Vol. 156 | Ei-Compendex &amp; Scopus CPESE2017 - Energy Procedia Vol. 141 | Ei-Compendex &amp; Scopus CPESE2016 - Energy Procedia Vol. 100 | Ei-Compendex &amp; Scopus Looking for more publication details, please visit at http://www.cpese.net/publication.html ****** ★Submission (Both full paper and abstract can be accepted but only full paper will be published on conference proceedings.) Submission System: https://easychair.org/conferences/?conf=cpese2026 Submission Template: Word Template: https://www.cpese.net/CAL_ST_EN%20(Springer).docx Japanese Abstract Template: https://www.cpese.net/CPESE-Japanese-Abstract_Template.docx ****** ★Conference Committee Chairs Tsuyoshi Funaki, Osaka University, Japan Nguyen Dinh Hoa, Kyushu University, Japan ****** ★Keynote Speaker: The information will be announced soon, please visit: http://www.cpese.net/keynote.html ****** ★Call for Papers Track 1: Power Systems and Control Track 2: Microgrids and Smart Grids Track 3: Energy Efficiency and Sustainable Solutions Track 4: Power Distribution and Quality More topics, please click: http://www.cpese.net/cfp.html ****** ★Call for Special Sessions &amp; Workshops Proposal Submission Deadline: May 20, 2026 Notification of Selection: June 10, 2026 Special Sessions: http://www.cpese.net/special.html Workshops: http://www.cpese.net/workshop.html ****** ★Contact us Conference Secretary: Ms. Saya Y. Shen Conference Email: cpese@zhconf.ac.cn Tel: +86-(0)28-83533337 Linkedin: https://www.linkedin.com/company/cpese-power-and-energy-systems-engineering</text:p>
          </table:table-cell>
          <table:table-cell table:number-columns-repeated="1013"/>
        </table:table-row>
        <table:table-row table:style-name="ro1">
          <table:table-cell table:style-name="ce2" office:value-type="string" calcext:value-type="string">
            <text:p>PEIS 2026</text:p>
          </table:table-cell>
          <table:table-cell table:style-name="ce2" office:value-type="string" calcext:value-type="string">
            <text:p>2026 International Conference on Power Energy, Electronics and Intelligent Systems (PEIS 2026)</text:p>
          </table:table-cell>
          <table:table-cell table:style-name="ce2" office:value-type="float" office:value="85" calcext:value-type="float">
            <text:p>85</text:p>
          </table:table-cell>
          <table:table-cell table:style-name="ce2" office:value-type="float" office:value="28" calcext:value-type="float">
            <text:p>28</text:p>
          </table:table-cell>
          <table:table-cell table:style-name="ce3" office:value-type="date" office:date-value="2026-07-10" calcext:value-type="date">
            <text:p>2026-07-10</text:p>
          </table:table-cell>
          <table:table-cell table:number-columns-repeated="2"/>
          <table:table-cell table:style-name="ce2" office:value-type="string" calcext:value-type="string">
            <text:p>Nanjing, China</text:p>
          </table:table-cell>
          <table:table-cell table:style-name="ce2" office:value-type="string" calcext:value-type="string">
            <text:p>Nov 6, 2026 - Nov 8, 2026</text:p>
          </table:table-cell>
          <table:table-cell table:style-name="ce4" office:value-type="string" calcext:value-type="string">
            <text:p><text:a xlink:href="https://peis.org/" xlink:type="simple">https://peis.org/</text:a></text:p>
          </table:table-cell>
          <table:table-cell table:style-name="ce2" office:value-type="string" calcext:value-type="string">
            <text:p>Full Name: 2026 International Conference on Power Energy, Electronics and Intelligent Systems (PEIS 2026) Abbreviation: PEIS 2026 Nanjing, China | November 6-8, 2026 More details, please visit: https://peis.org/ International Conference on Power Energy, Electronics and Intelligent Systems(PElS 2026) will be held in Nanjing, China during November 6-8, 2026. Sponsored by Nanjing Institute of Technology, this conference will convene global experts, scholars, and engineers to explore the integration of power electronics with AI and IT—a key driver in reshaping modern energy and industrial systems. The forum aims to foster discussions on new theories and technologies, promote interdisciplinary collaboration, and accelerate the translation of innovations into practical solutions for building a clean, low-carbon, safe, and efficient energy future. 【Conference Awards】 Young Researcher Award | Outstanding Reviewer Award | Outstanding Organization Award| Best Paper Award | Best Paper Runner-up | Best PhD Student Award | Best Student Paper Award | Best Industrial Paper Award | Best Oral Presentation Award | Best Poster Presentation Award 【Proceedings】 Submitted papers will be peer-reviewed by the Technical Program Committee based on relevance, quality, and originality. Accepted papers within the conference scope will be published in the PElS Conference Proceedings. At least one author of each accepted paper must register and present at the conference. 【 Call for Papers 】 Topics of interest include, but are not limited to: Topic 1: Intelligent Energy Conversion &amp; Storage Technologies *Renewable Energy Systems *Photovoltaic Power Generation *Electrical Machines and Drives *Electrical Batteries and BMS *Energy Storage Technology ...... Topic 2: High-efficiency Power Electronics and Intelligent Equipment *GaN/SiC High-Frequency High-Density Converters *High-Frequency Magnetic Integration *Predictive &amp; Intelligent Control for Converters *AI-Driven Condition Monitoring &amp; Prognostics *Digital Twin for Power Electronics ...... Topic 3: Smart Grid &amp; Energy System Integration *Grid Stability with High Renewables *Grid Integration of Distributed Renewables *Cooperative Optimization of Grids &amp; Microgrids *Virtual Power Plants &amp; Market Trading *Power System Cybersecurity ...... Topic 4: High Voltage Engineering &amp; Grid Security *Nanocomposite Dielectrics *Insulation for HVDC/FACTS Equipment *Fault Diagnosis for GIS &amp; Transformers *Lightning &amp; Switching Overvoltage Protection *Insulation in Hybrid AC/DC Grids ..... more please click: https://peis.org/topics.html [ Call for Tracks ] We are now welcoming proposals for thematic tracks to be held as part of the International Conference on Power Energy, Electronics and Intelligent Systems. Proposals should be submitted by September 30th, 2026 via the conference email: peis_conference@vip.163.com (please ensure you have read the rules and guidelines beforehand). ► Overview Tracks that organized by leading experts, form a core component of our conference. They are designed to create a focused forum for in-depth discussion and collaboration on specific, cutting-edge topics within the broader fields of power energy, electronics, and intelligent systems. We encourage proposals that bring together an international group of researchers to explore new challenges and advancements. Proposals that highlight the role of electronics and intelligent systems in advancing sustainable power and energy solutions will be particularly welcomed. ► Submission Guidelines for Track Proposals All track proposals must be submitted through the conference email: peis_conference@vip.163.com. A complete proposal should include: #Title of the proposed track. #Scope and Rationale: A brief description (approx. 200-300 words) outlining the track's focus, its relevance to the conference theme, and why it would appeal to a broad international audience. #Organizers: Names, affiliations, and short bios of the track chairs (typically 2-4 experts in the field). #Preliminary Program Committee: A list of potential PC members who have agreed to review for the track. Registration Fee Waiver: A registration fee waiver for one track chair will be granted for tracks that achieve sufficient participation. The condition is: (# of in-person registrations for the track) + (0.5 * # of online registrations for the track) ≥ 8 [ Submission ] Make a submission via Easychair: https://easychair.org/my/conference?conf=pels2026 PS: Listener is warmly welcomed to register via: https://www.zmeeting.org/register/peis2026 [ Contact us ] Ms. Yuki Yu E-mail: peis_conference@vip.163.com</text:p>
          </table:table-cell>
          <table:table-cell table:number-columns-repeated="1013"/>
        </table:table-row>
        <table:table-row table:style-name="ro1">
          <table:table-cell table:style-name="ce2" office:value-type="string" calcext:value-type="string">
            <text:p>IEEE AEET 2026</text:p>
          </table:table-cell>
          <table:table-cell table:style-name="ce2" office:value-type="string" calcext:value-type="string">
            <text:p>IEEE--2026 The 2nd International Conference on Applied Electrical Engineering and Technology (AEET 2026)</text:p>
          </table:table-cell>
          <table:table-cell table:style-name="ce2" office:value-type="float" office:value="75" calcext:value-type="float">
            <text:p>75</text:p>
          </table:table-cell>
          <table:table-cell table:style-name="ce2" office:value-type="float" office:value="30" calcext:value-type="float">
            <text:p>30</text:p>
          </table:table-cell>
          <table:table-cell table:style-name="ce3" office:value-type="date" office:date-value="2026-07-10" calcext:value-type="date">
            <text:p>2026-07-10</text:p>
          </table:table-cell>
          <table:table-cell table:number-columns-repeated="2"/>
          <table:table-cell table:style-name="ce2" office:value-type="string" calcext:value-type="string">
            <text:p>Xining, (Qinghai Province), China</text:p>
          </table:table-cell>
          <table:table-cell table:style-name="ce2" office:value-type="string" calcext:value-type="string">
            <text:p>Aug 28, 2026 - Aug 30, 2026</text:p>
          </table:table-cell>
          <table:table-cell table:style-name="ce4" office:value-type="string" calcext:value-type="string">
            <text:p><text:a xlink:href="http://www.aeet.net" xlink:type="simple">http://www.aeet.net</text:a></text:p>
          </table:table-cell>
          <table:table-cell table:style-name="ce2" office:value-type="string" calcext:value-type="string">
            <text:p>★IEEE★AEET 2026--Ei Compendex,Scopus--August 28 to 30, 2026 at Xining, China★ ★Full name: 2026 The 2nd International Conference on Applied Electrical Engineering and Technology ★Abbreviation: AEET 2026 **Place: Xining, (Qinghai Province), China **Time: August 28-30, 2026 **Website: www.aeet.net ★Sponsored by IEEE&amp;Qinghai University ★Hosted by Energy and Electrical Engineering, Qinghai University, China ==Submission== 1. Full paper (publication and presentation) 2. Abstract (presentation only) 3. Temlate download link: https://aeet.net/files/IEEE%20Template.docx https://aeet.net/files/IEEE-conference-proceeding-Latex.rar 4. Submission Link: https://confsys.iconf.org/submission/aeet2026 More details about submission, please visit at https://aeet.net/submit.html And consult us via aeet_contact@vip.163.com =Publication= All accepted and presented papers at AEET 2026 will be included in the IEEE Conference Proceedings, included in IEEE Xplore, and indexed by EI Compendex and Scopus. *AEET 2025 has been successfully published in IEEE Xplore and indexed. =Topics (include but not limit)= 1. Power and Energy Systems 2. Electrical Machines and Drives 3. Electrical and Electronic Circuits 4. Electromagnetic Fields and Waves 5. Automation and Control Systems 6. Power Electronics and Drives for Industrial Applications 7. Signal Processing and Communications 8. Advanced Electrical Engineering Technologies 9. Sustainable and Green Technologies 10. Emerging Trends in Electrical Engineering For more topics, please visit at: https://aeet.net/call-for-papers.html ==Committee(Part)== Conference Chairs Shengwei Mei, Qinghai University; Tsinghua University, China, IEEE Fellow Peng Wang, Taiyuan University of Technology, China, IEEE Fellow Xiaoqing Han, Taiyuan University of Technology, China, IEEE PES Taiyuan Chapter Chair Program Chairs Yinke Dou, Taiyuan University of Technology, China Yang Si, Qinghai University, China Program Co-Chairs Haochun Zhang, Harbin Institute of Technology, China, Member of AAAS, ASME, AIAA Hartmut Hinz, Frankfurt University of Applied Sciences, Germany Wenping Qin, Taiyuan University of Technology, China Award Chairs Laijun Chen, Qinghai University; Tsinghua University, China, Vice Chairman of IEEE PES China Membership Committee Yanbing Jia, Taiyuan University of Technology, China Student Program Chairs Chua Kian Jon, National University of Singapore, Singapore Zhaojian Wang, Shanghai Jiao Tong University, China, IEEE Member Yizhou Zhou, Hohai University, China Kai Hou, Tianjin University, China Aref Afsharfard, Pusan National University, South Korea Local Chairs Yanbo Chen, Qinghai University; North China Electric Power University, China Xiaoling Su, Qinghai University, China ==Preliminary Schedule== Aug. 28, 2026---Onsite Registration&amp;Warm-Up Session&amp;Workshop: Emerging Trends in Electrical Engineering Aug. 29, 2026---Opening &amp; Keynote Speeches &amp; Track 1, 2&amp;Parallel Sessions Aug. 30, 2026---Track 3-6&amp;Parallel Sessions&amp;Poster Session =Contact Us= Secretary: Jennie Zhou Email: aeet_contact@vip.163.com Web: www.aeet.net Phone: +86-155-7490-6062</text:p>
          </table:table-cell>
          <table:table-cell table:number-columns-repeated="1013"/>
        </table:table-row>
        <table:table-row table:style-name="ro1">
          <table:table-cell table:style-name="ce2" office:value-type="string" calcext:value-type="string">
            <text:p>ICSGCE 2026</text:p>
          </table:table-cell>
          <table:table-cell table:style-name="ce2" office:value-type="string" calcext:value-type="string">
            <text:p>IEEE--2026 14th International Conference on Smart Grid and Clean Energy Technologies (ICSGCE 2026)</text:p>
          </table:table-cell>
          <table:table-cell table:style-name="ce2" office:value-type="float" office:value="75" calcext:value-type="float">
            <text:p>75</text:p>
          </table:table-cell>
          <table:table-cell table:style-name="ce2" office:value-type="float" office:value="32" calcext:value-type="float">
            <text:p>32</text:p>
          </table:table-cell>
          <table:table-cell table:style-name="ce3" office:value-type="date" office:date-value="2026-07-10" calcext:value-type="date">
            <text:p>2026-07-10</text:p>
          </table:table-cell>
          <table:table-cell table:number-columns-repeated="2"/>
          <table:table-cell table:style-name="ce2" office:value-type="string" calcext:value-type="string">
            <text:p>Sydney, Australia</text:p>
          </table:table-cell>
          <table:table-cell table:style-name="ce2" office:value-type="string" calcext:value-type="string">
            <text:p>Oct 16, 2026 - Oct 18, 2026</text:p>
          </table:table-cell>
          <table:table-cell table:style-name="ce4" office:value-type="string" calcext:value-type="string">
            <text:p><text:a xlink:href="https://www.icsgce.org/" xlink:type="simple">https://www.icsgce.org/</text:a></text:p>
          </table:table-cell>
          <table:table-cell table:style-name="ce2" office:value-type="string" calcext:value-type="string">
            <text:p>★ICSGCE 2026-Ei Compendex and Scopus★ ★Abbreviation: ICSGCE 2026 ★Full name: 2026 14th International Conference on Smart Grid and Clean Energy Technologies ★Venue: Central Queensland University(Sydney Campus), Australia ★Time: October 16-18, 2026 ★Website: https://www.icsgce.org/ ★Sponsored By: Central Queensland University, Australia ★Supported by: RMIT University, Australia and University of Electronic Science and Technology of China, China ★★Publication All accepted papers will be published in the ICSGCE Conference Proceedings by IEEE, included into IEEE Xplore, and submitted for Ei Compendex and Scopus, etc, as in previous years. ★★The papers of previous ICSGCE were published in IEEE Conference Proceedings, had been indexed by *EI Compendex*, *Scopus* alreadly.(https://www.icsgce.org/index.html). ★Call for General Papers★ Topics related to: Track 1-Smart Grid Architectures: National/Global Energy Interconnection, Smart Grid Architectures and Models, Integration of Distributed Resources, Smart Grid Cyber &amp; Physical Security, Smart Grid Testing and Assessing Technologies... Track 2-Clean and Renewable Energy: Wind Energy Generation, Renewable Energy Grid, Renewable Energy Utilizations, Electric Vehicles and Vehicle-to-Grid (V2G), New Energy Materials and Devices... Track 3-Power and Energy Engineering: Electricity Market and Power System Economics, Power Generation, Transmission and Distribution, Energy Storage and Distributed Energy Resources, Intelligent Monitoring and Outage Management, Power Electronics and Drives... For details about topics, please visit at https://www.icsgce.org/cfp.html ★Submission★ 1. Full paper(publication and presentation) 2. Abstract (presentation only) For full paper, please upload it to the Electronic Submission System (.doc&amp;.pdf) https://confsys.iconf.org/submission/icsgce2026 For abstract, please send it to icsgce_conf@126.com More detail about submission, please visit at https://www.icsgce.org/sub.html ★★Conference Schedule★★ October 16, 2026---Participants check-in &amp; Materials Collection October 17, 2026(Morning)----Opening Remarks &amp; Keynote Speeches October 17, 2026(Afternoon)----Author Presentation October 18, 2026----Academic Visiting &amp; One day tour (pending) ★Conference Venue★ Central Queensland University(Sydney Campus), Australia Address: 400 Kent St, Sydney NSW 2000, Australia ★★Contact: Dr. Chole Chou Website: www.icsgce.org Email:icsgce_conf@126.com</text:p>
          </table:table-cell>
          <table:table-cell table:number-columns-repeated="1013"/>
        </table:table-row>
        <table:table-row table:style-name="ro1">
          <table:table-cell table:style-name="ce2" office:value-type="string" calcext:value-type="string">
            <text:p>SGSE 2026</text:p>
          </table:table-cell>
          <table:table-cell table:style-name="ce2" office:value-type="string" calcext:value-type="string">
            <text:p>2026 2nd International Conference on Smart Grid and Sustainable Energy (SGSE 2026)</text:p>
          </table:table-cell>
          <table:table-cell table:style-name="ce2" office:value-type="float" office:value="85" calcext:value-type="float">
            <text:p>85</text:p>
          </table:table-cell>
          <table:table-cell table:style-name="ce2" office:value-type="float" office:value="30" calcext:value-type="float">
            <text:p>30</text:p>
          </table:table-cell>
          <table:table-cell table:style-name="ce3" office:value-type="date" office:date-value="2026-07-10" calcext:value-type="date">
            <text:p>2026-07-10</text:p>
          </table:table-cell>
          <table:table-cell table:number-columns-repeated="2"/>
          <table:table-cell table:style-name="ce2" office:value-type="string" calcext:value-type="string">
            <text:p>Lanzhou, China</text:p>
          </table:table-cell>
          <table:table-cell table:style-name="ce2" office:value-type="string" calcext:value-type="string">
            <text:p>Dec 4, 2026 - Dec 6, 2026</text:p>
          </table:table-cell>
          <table:table-cell table:style-name="ce4" office:value-type="string" calcext:value-type="string">
            <text:p><text:a xlink:href="http://sgse.net/" xlink:type="simple">http://sgse.net/</text:a></text:p>
          </table:table-cell>
          <table:table-cell table:style-name="ce2" office:value-type="string" calcext:value-type="string">
            <text:p>Full Name: 2026 2nd International Conference on Smart Grid and Sustainable Energy Abbreviation: SGSE 2026 December 4-6, 2026 | Lanzhou, China More details, please visit: http://sgse.net/ 【Sponsors】 State Grid Gansu Electric Power Company Lanzhou Jiaotong University Hexi University 【Conference Awards】 Young Scientist Award Outstanding Contribution Award Outstanding Paper Award Best Reviewer Award Best Paper Award Best Presentation Award SGSE is a gathering of experts, scholars, and practitioners from various fields who are committed to discussing and exploring the latest advancements in smart grid technology and sustainable energy solutions. This conference provides a platform for sharing knowledge, discussing challenges, and fostering collaborations that aim to enhance the efficiency, reliability, and sustainability of the global energy system. [ Proceedings ] Submitted papers will be peer-reviewed by technical program committees based on the paper's topic, quality, etc. Accepted papers that fall within the technical scope of the conference will be published into Conference Proceedings, and submitted for Ei Compendex and Scopus index. [ Previous SGSE ] ► SGSE 2025 has been included in the official list of IEEE conferences: https://conferences.ieee.org/conferences_events/conferences/conferencedetails/66281 [ Call for Papers ] Include but not limited: Smart Grid * Smart Grid Device * Smart Metering and Pricing * Home and Building Energy ICT Technologies for Power Systems *Data Analytics and Forecasting *Smart Grid Architecture and Model *Policies and Strategies for Smart Grid Sustainable Energy *Hydroelectricity *Energy Harvesting Devices *Batteries and Energy Storage ..... more please click: https://sgse.net/cfp.html [ Special Session ] Track 1: Smart Large Scale Energy Storage State Monitoring Chair: Shunli Wang, Inner Mongolia University of Technology ..... [SCI Special Issues] Selected excellent full papers will be recommended to journal: International Journal of Electrical Power &amp; Energy Systems (ISSN: 1879-3517) CiteScore: 12.1 Impact Factor: 5.0 Electricity (ISSN: 2673-4826) High Visibility: ESCI (Web of Science), Scopus, EBSCO and other databases. [ Submission ] Make a submission via Zmeeting: https://www.zmeeting.org/submission/sgse2026 PS: Listener is warmly welcomed to register via: https://www.zmeeting.org/register/sgse2026 [ Contact us ] Ms. Yuki Yu E-mail: sgse_conference@163.com</text:p>
          </table:table-cell>
          <table:table-cell table:number-columns-repeated="1013"/>
        </table:table-row>
        <table:table-row table:style-name="ro1">
          <table:table-cell table:style-name="ce2" office:value-type="string" calcext:value-type="string">
            <text:p>VCOI 2026</text:p>
          </table:table-cell>
          <table:table-cell table:style-name="ce2" office:value-type="string" calcext:value-type="string">
            <text:p>4th International Conference on Vision and Computational Intelligence</text:p>
          </table:table-cell>
          <table:table-cell table:style-name="ce2" office:value-type="float" office:value="78" calcext:value-type="float">
            <text:p>78</text:p>
          </table:table-cell>
          <table:table-cell table:style-name="ce2" office:value-type="float" office:value="30" calcext:value-type="float">
            <text:p>30</text:p>
          </table:table-cell>
          <table:table-cell table:style-name="ce3" office:value-type="date" office:date-value="2026-07-11" calcext:value-type="date">
            <text:p>2026-07-11</text:p>
          </table:table-cell>
          <table:table-cell table:style-name="ce3" office:value-type="date" office:date-value="2026-07-27" calcext:value-type="date">
            <text:p>2026-07-27</text:p>
          </table:table-cell>
          <table:table-cell table:style-name="ce3" office:value-type="date" office:date-value="2026-08-03" calcext:value-type="date">
            <text:p>2026-08-03</text:p>
          </table:table-cell>
          <table:table-cell table:style-name="ce2" office:value-type="string" calcext:value-type="string">
            <text:p>Virtual Conference</text:p>
          </table:table-cell>
          <table:table-cell table:style-name="ce2" office:value-type="string" calcext:value-type="string">
            <text:p>Aug 27, 2026 - Aug 28, 2026</text:p>
          </table:table-cell>
          <table:table-cell table:style-name="ce4" office:value-type="string" calcext:value-type="string">
            <text:p><text:a xlink:href="https://vcoi2026.org/index" xlink:type="simple">https://vcoi2026.org/index</text:a></text:p>
          </table:table-cell>
          <table:table-cell table:style-name="ce2" office:value-type="string" calcext:value-type="string">
            <text:p>4 th International Conference on Vision and Computational Intelligence (VCOI 2026) August 27 ~ 28, 2026, Virtual Conference Scope &amp; Topics The 4 th International Conference on Vision and Computational Intelligence (VCOI 2026) will provide an excellent international forum for sharing knowledge and results in theory, methodology and applications of Computer Science, Computer Engineering and Information Technology Trends. The aim of the conference is to provide a platform to the researchers and practitioners from both academia as well as industry to meet and share cutting-edge development in the fields. Authors are solicited to contribute to the conference by submitting articles that illustrate research results, projects, surveying works and industrial experiences that describe significant advances in the areas of vision computing &amp; Computational Intelligence. Topics of interest include, but are not limited to, the following Vision 3D Modeling, Visualization, Shape, Structure Action Recognition Active and robot vision Analysis &amp; Vision Augmented Reality (AR) and Virtual Reality (VR) Biomedical , Biomedical Imaging and Applications Biometrics, Face and Gesture Biometrics Camera networks and vision Cognitive and Biologically-inspired Vision Compiler Design Computational photography, photometry Computer Vision and Image Processing Applications Deep Learning in Vision Document Image Processing Ethics in Computer Vision Face and Gesture Recognition Fuzzy and Neural Techniques in Vision Human-Computer Interaction (HCI) and Vision Image Feature Extraction Invariance in Pattern Recognition Knowledge-Based Recognition Machine Learning Technologies for vision Medical Image Analysis Motion and Tracking Multi-modal Vision Neuro-Inspired Vision Models Recognition: Detection, Categorization, Indexing and Matching Robust Vision under Adverse Conditions Segmentation, Grouping and Shape Representation Statistical Pattern Recognition Structural and Syntactic Pattern Recognition Video Analysis and Event Recognition, Monitoring Vision for Autonomous Vehicles Vision for Smart Cities Visual SLAM (Simultaneous Localization and Mapping) Visual Special Effects Web Graphics Computational Intelligence AI for Climate Change and Sustainability CI for Internet of Things (IoT) CI for Multimedia, Signal, Image Processing &amp; Pattern Recognition CI for Wireless Systems CI in Bioinformatics CI in Control and Automation, Decision CI in Cyber Security CI in Data Mining CI in E-governance CI in Healthcare, E-health &amp; Health Informatics CI in Image and Pattern Recognition CI in Internet of Everything CI in Remote Sensing Computational Intelligence in Big Data Deep Learning Evolutionary Algorithms and Genetic Programming Explainable AI (XAI) in Computational Intelligence Federated Learning Intelligent Agents Meta-Learning (Learning to Learn) Neuro-Inspired Computational Intelligence Quantum Computing in Computational Intelligence Robotics and control applications Self-organizing and Self-adaptive Systems Swarm Intelligence Transfer Learning in Computational Intelligence Uncertainty Modeling and Decision Making Paper Submission Authors are invited to submit papers through the conference Submission System by July 11, 2026 . Submissions must be original and should not have been published previously or be under consideration for publication while being evaluated for this conference. The proceedings of the conference will be published by The proceedings of the conference will be published by International Journal of Computer Science, Engineering and Information Technology (IJCSEIT) (Confirmed). Selected papers from VCOI 2026 , after further revisions, will be published in the special issue of the following journals. International Journal of Ambient Systems and Applications (IJASA) International Journal of Computer Graphics &amp; Animation (IJCGA) Advances in Vision Computing: An International Journal (AVC) Important Dates Submission Deadline : July 11, 2026 Authors Notification : July 27, 2026 Final Manuscript Due : August 03, 2026 Co - Located Event 4 th International Conference on Blockchain and Applications (BLKCA 2026) 4 th International Conference on Machine Learning and IoT (MLIoT 2026) 4 th International Conference on Computer Science, Engineering and Information Technology Trends (CGASP 2026) 4 th International Conference on Computer Science, Engineering and Information Technology Trends (CSEITT 2026) 4 th International Conferences in Clinical Research and Pharmaceutical Sciences (CRPS 2026) 7 th International Conference on Applied Control, Electrical and Electronics Engineering (CEEE 2026) 7 th International Conference on Electrical Engineering (ELEG 2026) 7 th International Conference on Mechanical Engineering (MECN 2026) ***** The invited talk proposals can be submitted to vcoi@vcoi2026.org</text:p>
          </table:table-cell>
          <table:table-cell table:number-columns-repeated="1013"/>
        </table:table-row>
        <table:table-row table:style-name="ro1">
          <table:table-cell table:style-name="ce2" office:value-type="string" calcext:value-type="string">
            <text:p>AESSC 2026</text:p>
          </table:table-cell>
          <table:table-cell table:style-name="ce2" office:value-type="string" calcext:value-type="string">
            <text:p>Asia Environment and Social Science Conference (AESSC 2026)</text:p>
          </table:table-cell>
          <table:table-cell table:style-name="ce2" office:value-type="float" office:value="84" calcext:value-type="float">
            <text:p>84</text:p>
          </table:table-cell>
          <table:table-cell table:style-name="ce2" office:value-type="float" office:value="25" calcext:value-type="float">
            <text:p>25</text:p>
          </table:table-cell>
          <table:table-cell table:style-name="ce3" office:value-type="date" office:date-value="2026-07-15" calcext:value-type="date">
            <text:p>2026-07-15</text:p>
          </table:table-cell>
          <table:table-cell table:number-columns-repeated="2"/>
          <table:table-cell table:style-name="ce2" office:value-type="string" calcext:value-type="string">
            <text:p>Kyoto, Japan</text:p>
          </table:table-cell>
          <table:table-cell table:style-name="ce2" office:value-type="string" calcext:value-type="string">
            <text:p>Dec 11, 2026 - Dec 13, 2026</text:p>
          </table:table-cell>
          <table:table-cell table:style-name="ce4" office:value-type="string" calcext:value-type="string">
            <text:p><text:a xlink:href="http://www.aessc.org/" xlink:type="simple">http://www.aessc.org/</text:a></text:p>
          </table:table-cell>
          <table:table-cell table:style-name="ce2" office:value-type="string" calcext:value-type="string">
            <text:p>Full name：Asia Environment and Social Science Conference Abbreviation：AESSC 2026 Asia Environment and Social Science Conference (AESSC 2026) will be held in Kyoto, Japan during December 11-13, 2026. Conference Website: http://www.aessc.org/ Conference Venue Kyoto, Japan AESSC 2026 Shining Points: 1.Papers submitted to AESSC 2026 will be sent for peer review process by at least 2 independent reviewers, the accepted papers will be published into an issue of one of the two journals below: International Journal of Environmental Science and Development (IJESD, ISSN:2010-0264), which will be indexed by Scopus (CiteScore 2024: 1.5) and Chemical Abstracts Services (CAS), CABI, Ulrich Periodicals Directory, Electronic Journals Library, Crossref, ProQuest. International Journal of Social Science and Humanity (e-ISSN: 2010-3646), papers related will be reviewed by both conference committee and IJSSH editorial team,accepted papers will be published into regular issues of IJSSH. The journal is now indexed by Google Scholar, Crossref. 2. AESSC 2026 will be held in Kyoto, Japan. Call for papers 1）General &amp; Interdisciplinary Themes Socio-Ecological Systems and Resilience Thinking Political Ecology of Resource Management Environmental Justice and Equity Science and Technology Studies (STS) and the Environment Interdisciplinary Approaches to Sustainability Science The Human Dimensions of Global Environmental Change Social-Ecological-Technological Systems (SETS) Slow Violence and Environmental Degradation 2）Climate Change &amp; Society Social Vulnerability and Adaptation to Climate Change Climate Migration and Displacement Just Transitions and Decarbonization Pathways Public Perception and Communication of Climate Science Climate Governance and Policy Loss and Damage in Vulnerable Communities The Politics of Climate Adaptation and Mitigation 3）Energy, Resources &amp; Economy Social Acceptance of Renewable Energy Projects Energy Poverty and Access The Political Economy of Fossil Fuels and Extractivism Circular Economy and Social Practices Sustainable Consumption and Production Community-Based Resource Management Water, Food, and Energy Nexus 4）Urban Environments &amp; Infrastructure Urban Sustainability and Resilience Green Infrastructure and Social Equity Environmental Gentrification Smart Cities and Environmental Data Nature-Based Solutions in Urban Planning Environmental Health and Well-being in Cities 5）Conservation &amp; Land Use Political Ecology of Conservation Community-Based Conservation and Indigenous Rights Land Use Change and Land Grabbing Biodiversity Conservation and Social Impacts Restoration Ecology and Social Participation Human-Wildlife Conflict and Coexistence 6）Governance, Policy &amp; Social Movements Environmental Policy and Governance Grassroots Environmental Movements and Activism Corporate Social Responsibility and Environmental Standards Multi-Level Governance and Transnational Networks Public Participation in Environmental Decision-Making Rights of Nature and Legal Personhood Paper Publishing Papers submitted to AESSC 2026 will be sent for peer review process by at least 2 independent reviewers, the accepted papers will be published into an issue of one of the two journals below: 1.International Journal of Environmental Science and Development (IJESD, ISSN:2010-0264), which will be indexed by Scopus (CiteScore 2024: 1.5) and Chemical Abstracts Services (CAS), CABI, Ulrich Periodicals Directory, Electronic Journals Library, Crossref, ProQuest. 2.International Journal of Social Science and Humanity (e-ISSN: 2010-3646), papers related will be reviewed by both conference committee and IJSSH editorial team,accepted papers will be published into regular issues of IJSSH. The journal is now indexed by Google Scholar, Crossref. Committee Conference Chair Makoto Usami, Kyoto University, Japan Program Chairs Chunrong Jia, University of Memphis, Tennessee, USA Yong-Suk Jang, Chonbuk National University, Korea Kaimin Shih, The University of Hong Kong Publication Chair Masafumi Yamaguchi, Toyota Technological Institute, Japan keynote Speakers: 1.Makoto Usami Kyoto University, Japan 2.Masafumi Yamaguchi Toyota Technological Institute, Japan 3.Zhijun Peng Northwestern Polytechnical University, China Program December 11 | Friday 10:00 - 17:00 Participants Onsite Registration &amp; Conference Materials Collection 14:00 - 16:00 Executive Meeting December 12 | Saturday 09:00 - 09:10 Opening Ceremony 09:10 - 10:30 Keynote Speech 10:30 - 11:00 Coffee Break and Group Photo 11:00 - 12:20 Keynote Speech 12:20 - 13:30 Lunch 13:30 - 15:15 Parallel Sessions 15:15 - 15:30 Coffee break 15:30 - 18:30 Parallel Sessions 19:00 - 20:30 Dinner December 13 | Sunday 10:00 - 17:00 Day Tour Program (Extra fee should be paid) Submission and Contact Methods Submission Methods: Electronic Submission System: https://confsys.iconf.org/register/AESSC2026 E-mail: aesscconf@126.com Tel: +86-17311381986 Conference Specialist: Vera Liao AESSC2026 can provide a platform for academic communication in Environment and Social Science Conference. For more conference information, please visit the conference website:http://www.aessc.org/</text:p>
          </table:table-cell>
          <table:table-cell table:number-columns-repeated="1013"/>
        </table:table-row>
        <table:table-row table:style-name="ro1">
          <table:table-cell table:style-name="ce2" office:value-type="string" calcext:value-type="string">
            <text:p>ACESD 2026</text:p>
          </table:table-cell>
          <table:table-cell table:style-name="ce2" office:value-type="string" calcext:value-type="string">
            <text:p>Springer--2026 11th Asia Conference on Environment and Sustainable Development (ACESD 2026)</text:p>
          </table:table-cell>
          <table:table-cell table:style-name="ce2" office:value-type="float" office:value="68" calcext:value-type="float">
            <text:p>68</text:p>
          </table:table-cell>
          <table:table-cell table:style-name="ce2" office:value-type="float" office:value="30" calcext:value-type="float">
            <text:p>30</text:p>
          </table:table-cell>
          <table:table-cell table:style-name="ce3" office:value-type="date" office:date-value="2026-07-15" calcext:value-type="date">
            <text:p>2026-07-15</text:p>
          </table:table-cell>
          <table:table-cell table:number-columns-repeated="2"/>
          <table:table-cell table:style-name="ce2" office:value-type="string" calcext:value-type="string">
            <text:p>Tokyo, Japan</text:p>
          </table:table-cell>
          <table:table-cell table:style-name="ce2" office:value-type="string" calcext:value-type="string">
            <text:p>Nov 6, 2026 - Nov 9, 2026</text:p>
          </table:table-cell>
          <table:table-cell table:style-name="ce4" office:value-type="string" calcext:value-type="string">
            <text:p><text:a xlink:href="http://www.acesd.org/" xlink:type="simple">http://www.acesd.org/</text:a></text:p>
          </table:table-cell>
          <table:table-cell table:style-name="ce2" office:value-type="string" calcext:value-type="string">
            <text:p>Abbreviation: ACESD 2026 Full Name: 2026 11th Asia Conference on Environment and Sustainable Development Tokyo, Japan November 6-9, 2026 http://www.acesd.org/ Call for Papers: Environmental dynamics: Meteorology, Hydrology, Geophysics, Atmospheric physics, Physical oceanography Global environmental change and ecosystems management: Climate and climatic changes, Global warming, Ozone layer depletion, Carbon capture and storage, Biofuels, Integrated ecosystems management, Satellite applications in the environment Environmental restoration and ecological engineering: Advanced treatment of water and secondary effluents (membranes, adsorption, ion exchange, oxidation etc), Disinfection and disinfection by- products, Management of water treatment residuals, Aesthetic quality of drinking water (taste, odors), Effect of distribution systems on potable water quality, Reuse of reclaimed waters Environmental sustainability: Resource management, Life cycle analysis, Environmental systems approach, Renewable sources of energy-energy savings, Clean technologies, Sustainable cities Health and the Environment: Health related organisms, Hazardous substances and detection techniques, Biodegradation of hazardous substances, Toxicity assessment and epidemiological studies, Quality guidelines, environmental regulation and monitoring, Indoor air pollution More topics: http://www.acesd.org/ Publication: All reviewed and registered papers will be pulished into the International Conference Proceedings, which will be published as a volume of Springer book series: Environmental Science and Engineering which will be submitted for indexing by EI Compendex, Scopus, SCImago and the other major databases. Special Journal: Authors are encouraged to submit your extended paper with at least 35% new added content and new title to the two journals below for publication after the conference: 1. International Journal of Environmental Science and Development, which will be indexed by Scopus(CiteScore 2024: 1.5), Chemical Abstracts Services (CAS), CABI, DOAJ, Ulrich Periodicals Directory, Crossref, ProQuest, etc. 2. Environment: Science and Policy for Sustainable Development, which will be indexed by SCIE (Impact factor 2021: 4.108), Scopus (Citescore 2024: 6.2), etc. Venue: Tokyo, Japan Submission Methods: Full Paper(publication and oral presentation) Abstract(oral presentation only) Electronic Submission System (.pdf) http://confsys.iconf.org/submission/acesd2026 Conference Secretary: Ms. Ching Cao Tel.: +86-13290000003 E-mail: acesd_conf@126.com</text:p>
          </table:table-cell>
          <table:table-cell table:number-columns-repeated="1013"/>
        </table:table-row>
        <table:table-row table:style-name="ro1">
          <table:table-cell table:style-name="ce2" office:value-type="string" calcext:value-type="string">
            <text:p>IEEE ICSGSC 2026</text:p>
          </table:table-cell>
          <table:table-cell table:style-name="ce2" office:value-type="string" calcext:value-type="string">
            <text:p>IEEE--2026 the 10th International Conference on Smart Grid and Smart Cities (ICSGSC 2026)</text:p>
          </table:table-cell>
          <table:table-cell table:style-name="ce2" office:value-type="float" office:value="75" calcext:value-type="float">
            <text:p>75</text:p>
          </table:table-cell>
          <table:table-cell table:style-name="ce2" office:value-type="float" office:value="28" calcext:value-type="float">
            <text:p>28</text:p>
          </table:table-cell>
          <table:table-cell table:style-name="ce3" office:value-type="date" office:date-value="2026-07-15" calcext:value-type="date">
            <text:p>2026-07-15</text:p>
          </table:table-cell>
          <table:table-cell table:number-columns-repeated="2"/>
          <table:table-cell table:style-name="ce2" office:value-type="string" calcext:value-type="string">
            <text:p>Guangzhou, China</text:p>
          </table:table-cell>
          <table:table-cell table:style-name="ce2" office:value-type="string" calcext:value-type="string">
            <text:p>Dec 4, 2026 - Dec 6, 2026</text:p>
          </table:table-cell>
          <table:table-cell table:style-name="ce4" office:value-type="string" calcext:value-type="string">
            <text:p><text:a xlink:href="https://www.icsgsc.org/" xlink:type="simple">https://www.icsgsc.org/</text:a></text:p>
          </table:table-cell>
          <table:table-cell table:style-name="ce2" office:value-type="string" calcext:value-type="string">
            <text:p>Full Name: IEEE--2026 the 10th International Conference on Smart Grid and Smart Cities (ICSGSC 2026) Abbreviation: ICSGSC 2026 December 4-6, 2026 | Guangzhou, China Official website: https://www.icsgsc.org/ ICSGSC 2026 is sponsored by South China University of Technology, China. Proceedings After a careful reviewing process, all accepted papers after proper registration and presentation, will be published into ICSGSC2026 Conference Proceedings, and reviewed by the IEEE Conference Publication Program for IEEE Xplore, Ei Compendex and Scopus. ICSGSC 2025 - IEEE ISBN: 979-8-3315-6846-7 | IEEE Xplore | Ei Compendex and Scopus ICSGSC 2024 - IEEE ISBN: 979-8-3503-7740-8 | IEEE Xplore | Ei Compendex and Scopus ICSGSC 2023 - IEEE ISBN: 979-8-3503-0590-6 | IEEE Xplore | Ei Compendex and Scopus ICSGSC 2022 - IEEE ISBN: 978-1-6654-8783-2 | IEEE Xplore | Ei Compendex and Scopus ICSGSC 2021 - IEEE ISBN: 978-0-7381-3314-0 | IEEE Xplore | Ei Compendex and Scopus ICSGSC 2020 - IEEE ISBN: 978-1-7281-9403-5 | IEEE Xplore | Ei Compendex and Scopus ICSGSC 2019 - IEEE ISBN: 978-1-7281-3848-0 | IEEE Xplore | Ei Compendex and Scopus ICSGSC 2018 - IEEE ISBN: 978-1-5386-8101-5 | IEEE Xplore | Ei Compendex and Scopus ICSGSC 2017 - IEEE ISBN: 978-1-5386-0503-5 | IEEE Xplore | Ei Compendex and Scopus Submission Please submit your full paper to us: icsgsc_contact@vip.163.com or log in https://easychair.org/conferences/?conf=icsgsc2026 Paper Template: https://icsgsc.org/IEEE-Formatting.docx Call for Paper Topics of interest for submission include, but are not limited to: *Smart Grid Smart grid planning, design, and operation Information and communication technologies for smart grids, interoperability, and cyber-security Wide area monitoring, protection, and control Power electronics, control, and protection systems for smart grid applications Demand response and real-time pricing Electric vehicles and interactions with the grid Large-scale integration of renewable energy and virtual power plants Multi-domain energy systems Power quality and power electronics application and control Sensors, advanced metering, data acquisition, and monitoring Innovative hardware and components for smart grids Smart grid maintenance and asset management Costs, risks, and benefits associated with smart grid technologies Diagnostics, self-healing, and reliability of smart grids *Smart City Smart city theory, modeling and simulation Intelligent infrastructure Sensors and actuators Open data and big data analytics AI powered smart cities services Safety and security systems Smart healthcare Smart emergency management IoT and Smart X services Data security and privacy Connected Vehicle (CV) technologies Unmanned Aerial Vehicles (UAVs) Smart mobility and transportation Smart buildings and Smart grid Digital city and smart growth Smart traffic system operations Environmental monitoring technologies Contact us ------------------------------------------------------------------ Ms. Emma Zhang Email: icsgsc_contact@vip.163.com Wechat: Iconf-ee-1 (09:30-18:00, Monday to Friday)</text:p>
          </table:table-cell>
          <table:table-cell table:number-columns-repeated="1013"/>
        </table:table-row>
        <table:table-row table:style-name="ro1">
          <table:table-cell table:style-name="ce2" office:value-type="string" calcext:value-type="string">
            <text:p>IEEE ICPRE 2026</text:p>
          </table:table-cell>
          <table:table-cell table:style-name="ce2" office:value-type="string" calcext:value-type="string">
            <text:p>IEEE--2026 The 11th International Conference on Power and Renewable Energy (ICPRE 2026)--SCI</text:p>
          </table:table-cell>
          <table:table-cell table:style-name="ce2" office:value-type="float" office:value="68" calcext:value-type="float">
            <text:p>68</text:p>
          </table:table-cell>
          <table:table-cell table:style-name="ce2" office:value-type="float" office:value="30" calcext:value-type="float">
            <text:p>30</text:p>
          </table:table-cell>
          <table:table-cell table:style-name="ce3" office:value-type="date" office:date-value="2026-07-15" calcext:value-type="date">
            <text:p>2026-07-15</text:p>
          </table:table-cell>
          <table:table-cell table:number-columns-repeated="2"/>
          <table:table-cell table:style-name="ce2" office:value-type="string" calcext:value-type="string">
            <text:p>Shanghai, China</text:p>
          </table:table-cell>
          <table:table-cell table:style-name="ce2" office:value-type="string" calcext:value-type="string">
            <text:p>Sep 18, 2026 - Sep 21, 2026</text:p>
          </table:table-cell>
          <table:table-cell table:style-name="ce4" office:value-type="string" calcext:value-type="string">
            <text:p><text:a xlink:href="http://www.icpre.org" xlink:type="simple">http://www.icpre.org</text:a></text:p>
          </table:table-cell>
          <table:table-cell table:style-name="ce2" office:value-type="string" calcext:value-type="string">
            <text:p>★The 11th ICPRE2026--SCI, Ei Compendex, Scopus-IEEE(ISSN: 2768-0525) ★co-sponsored by Shanghai University of Electric Power, Shanghai Jiao Tong University, Shanghai University, hosted by Shanghai University ★IEEE Event List, stable publication &amp; indexing, Awards to encourage scholars, Track Organization &amp; Invited Speaker invitation ★Best Paper Award, Best Student Paper Award, Best Industrial Paper Award, Young Scientist Award* ★20% of accepted papers will be recommended to IEEE Transactions on Industry Applications(SCI,JCR-Q2) for review and publication for free of charge. ★ICPRE2026 included in the IEEE Official Event List. Abb: ICPRE2026 Full name: The 11th International Conference on Power and Renewable Energy September 18-21,2026 | Shanghai, China www.icpre.org ☆Co-Sponsored by IEEE, IEEE IAS, Shanghai University of Electric Power, Shanghai Jiao Tong University, Shanghai University ☆Hosted by Shanghai University ☆Technically supported by South China University of Technology Shanghai Maritime University Anhui University of Science and Technology Ningxia University ☆Awards: Best Paper Award, Best Student Paper Award, Best Industrial Paper Award, Young Scientist Award ☆Track Application &amp; Excellent Organization Award To set a track under the conference scope, can gather the experts in a specific area from academic communication. If you are interested, you can write the application to icpre@young.ac.cn Each track should have 1 organizer and committee members, who are responsible for the track publicity. At least 6-8 presentations/full paper can be collected in a successful track. The privileges for the organizer -organization award -free to attend the conference without registration fee ☆Invited Speaker Application If you are a professor or an assoc.professor who are interested to share your research idea during the conference, you can write the application to icpre@young.ac.cn ☆Publication Accepted papers will be collected in IEEE the Conference Proceedings, and indexed by Ei Compendex, and Scopus, etc major databases. ★A few out of 20% recommended papers from ICPRE2021-2025 have been reviewed and published by IEEE Transactions on Industry Applications(JCR-Q2) for free of charge successfully. ★Selected papers of ICPRE2026 will be recommended to prepare extended version of paper to Protection and Control of Modern Power Systems (ISSN: 2367-2617) ★ICPRE2026 included in the IEEE Official Event List. *ICPRE 2025 | September 19-22 | Hangzhou, China | IEEE(ISBN: 979-8-3315-8661-4 &amp; ISSN: 2768-0525) *ICPRE 2024 | September 20-23 | Guangzhou, China | IEEE (ISBN: 979-8-3503-7746-0 &amp; ISSN: 2768-0525) *ICPRE 2023 | September 22-25 | Shanghai,China | IEEE (ISBN: 979-8-3503-2881-3 &amp; ISSN: 2768-0525 ) *ICPRE 2022 | September 23-26 | Shanghai,China | IEEE (ISBN: 978-1-6654-5062-1 &amp; ISSN: 2768-0525) *ICPRE 2021 | September 24-27 | Shanghai,China | IEEE (ISBN: 978-1-6654-4960-1) *ICPRE 2020 | September 12-14 | Shanghai, China (Virtual Conference) | IEEE (ISBN: 978-1-7281-9025-9) *ICPRE 2019 | September 21-23 | Chengdu,China | IEEE (ISBN: 978-1-7281-4573-0) *ICPRE 2018 | September 21-24 | Berlin, Germany E3S | Web of Conferences (eISSN: 2267-1242) *ICPRE 2017 | September 20-23 | Chengdu, China | IEEE (ISBN: 978-1-5386-2156-1) *ICPRE 2016 | October 21-23 | Shanghai, China | IEEE (ISBN: 978-1-5090-3068-2) ==Part of the Organizing Committee== General Chairs Wang Zhixin, Shanghai Jiao Tong University Peng Daogang, Shanghai University of Electric Power Fei Minrui, Shanghai University General Co-Chairs Huang Ying, Zhejiang University, IEEE Senior Member Chen Hui, Shanghai University of Electric Power Mohamed Benbouzid, University of Brest, France, IEEE Fellow Kai Strunz, TU Berlin, Germany,,IEEE Fellow Program Chairs Yang Qiang, Zhejiang University,IEEE Senior Member Xue Ying, South China University of Technology,IEEE Senior Member Zhang Xuelai, Shanghai Maritime University Wu Weimin, Anhui University of Science and Technology Program Co-Chairs Ouyang Mingsan, Anhui University of Science and Technology Xu Guoqing, Shanghai University Huiyu Zhou, Queen’s University Belfast, UK Axel Sikora, Offenburg University of Applied Sciences, Germany Yang Bo, Kunming University of Science and Technology Shang Ce, Shanghai Jiao Tong University Program Committee Members Wang Zhen, Zhejiang University Lin Zhenzhi, Zhejiang University Zhong Dongliang, Chongqing University Wu Zhen, Xi'an Jiaotong University Xue Yang, Shanghai University of Electric Power Li Zhiyi, Zhejiang University Huang Gang, Zhejiang University,IEEE Senior Member Wang Guoteng, Zhejiang University Zhang Jin, Shanghai University Song Yue, Tongji University Wang Rui, Northeastern University,IEEE Senior Member Wang Zhongcheng, Shanghai Maritime University Kan Ankang, Shanghai Maritime University Women Engineers Huang Ying, Zhejiang University Li Xue, Shanghai University Bai Zhihong, Zhejiang University Wang Huifang, Zhejiang University Bao Zhejing, Zhejiang University Zhao Huirong, Shanghai University of Electric Power Hui Jingshu, Soochow University Yan Yunfeng, Zhejiang University Liu Li, Ludong University International Technical Program Committee Kang Li, University of Leeds, UK Sheng Chen, University of Southampton, UK Junye Wang, Athabasca University, Canada Yegui Xiao, Hiroshima Prefectural University, Japan Enrico Zio, Politecnico di Milano, Italy For more information, please visit the official website. ☆Conference Scope Topics （Including but not limited） Topic I: Power and Energy Engineering • Active Distribution Networks Technology • Electric Grid of the Future • Energy Interconnection, Integrated Energy System • Energy Storage Technologies and Devices • Fault Monitoring and Predictive Maintenance • Power Systems and Automation • UHV AC/DC Transmission • Virtual Power Plant • VSC-HVDC Topic II: Clean and Renewable Energy • Distributed Generation (DG) • Energy-Saving Technology • New Energy Applications • New Energy Materials and Devices • Photovoltaic Systems and Solar Energy Engineering • Renewable Energy Utilizations • Wind Energy Systems Topic III: Intelligent Computing and Applications for Sustainable Energy and Environment • Advanced intelligent theory and algorithms • Intelligent modelling, monitoring, and control theory and algorithms • Intelligent computing, modelling, optimization and control in utilization of clean and renewable energy resources • Intelligent modeling, simulation and control of environment such as climate change, water treatment and waste management, etc. ☆Submission requirement English is the only the acceptable language for your paper. Each full paper should be with at least 4 full pages-5pages by following the standard template You can submit your paper to the Easychair system https://easychair.org/conferences/?conf=icpre2026 or email: icpre_contact@vip.163.com ☆Conference Brief Program September 18, 2026 (Friday) 10:00-17:00 Registration &amp; Material Collecting 14:00-18:00 Workshop-Smart Grid Technologies September 19, 2026 (Saturday) 09:00-12:10 Opening &amp; Keynote Speeches 12:10-13:30 Lunch 13:30-18:00 Authors' Oral Presentation 18:30-20:00 Banquet and Best Paper Awards September 20, 2026 (Sunday) 09:30-11:30 Invited Speeches 12:00-13:30 Lunch 13:30-18:00 Authors' Oral Presentation &amp; Authors' Poster Presentation 18:30-20:00 Banquet and Best Presentation Awards &amp; Closing September 21, 2026 (Monday) 10:00-18:00 Social Program (Optional and Paid) ☆Conference Contact ☺ Secretary: Li Chen ✉ Email: icpre_contact@vip.163.com ☎ Tel: +86-132-9869-9999 Workdays from Monday to Friday 9:30-18:00(GMT+8) Welcome to submit to the 11 the ICPRE2026, this will be the special and important year for ICPRE.</text:p>
          </table:table-cell>
          <table:table-cell table:number-columns-repeated="1013"/>
        </table:table-row>
        <table:table-row table:style-name="ro1">
          <table:table-cell table:style-name="ce2" office:value-type="string" calcext:value-type="string">
            <text:p>Springer ICNEA 2026</text:p>
          </table:table-cell>
          <table:table-cell table:style-name="ce2" office:value-type="string" calcext:value-type="string">
            <text:p>Springer--2026 10th International Conference on New Energy and Applications (ICNEA 2026)</text:p>
          </table:table-cell>
          <table:table-cell table:style-name="ce2" office:value-type="float" office:value="82" calcext:value-type="float">
            <text:p>82</text:p>
          </table:table-cell>
          <table:table-cell table:style-name="ce2" office:value-type="float" office:value="30" calcext:value-type="float">
            <text:p>30</text:p>
          </table:table-cell>
          <table:table-cell table:style-name="ce3" office:value-type="date" office:date-value="2026-07-15" calcext:value-type="date">
            <text:p>2026-07-15</text:p>
          </table:table-cell>
          <table:table-cell table:number-columns-repeated="2"/>
          <table:table-cell table:style-name="ce2" office:value-type="string" calcext:value-type="string">
            <text:p>Kyoto, Japan</text:p>
          </table:table-cell>
          <table:table-cell table:style-name="ce2" office:value-type="string" calcext:value-type="string">
            <text:p>Dec 11, 2026 - Dec 13, 2026</text:p>
          </table:table-cell>
          <table:table-cell table:style-name="ce4" office:value-type="string" calcext:value-type="string">
            <text:p><text:a xlink:href="http://www.icnea.org/" xlink:type="simple">http://www.icnea.org/</text:a></text:p>
          </table:table-cell>
          <table:table-cell table:style-name="ce2" office:value-type="string" calcext:value-type="string">
            <text:p>Full Name: Springer--2026 10th International Conference on New Energy and Applications (ICNEA 2026) Abbreviation: ICNEA 2026 2026 10th International Conference on New Energy and Applications (ICNEA 2026), will be held in Kyoto, Japan during December 11-13, 2026. Conference Website: http://www.icnea.org/ ICNEA 2026 Shining Points: 1.Selected and presented papers will be published into a volume of Springer Book Series Green Energy and Technology. The book series is now indexed EI compendex, Scopus, SCImago, etc. A few selected papers will be recommended to International Journal of Smart Grid and Clean Energy for publication after being extended, which will be indexed by Inspec (IET), CNKI, Crossref, Google Scholar, etc. 2. ICNEA 2025 was held successfully during December 28-30, 2025 in Tokyo, Japan. 3.There are three outstanding professors who will join the conference as keynote speakers. Prof. Makoto Usami from Kyoto University, Japan；Prof. Zhijun Peng from Northwestern Polytechnical University, China and Prof. Masafumi Yamaguchi from Toyota Technological Institute, Japan. Paper Publishing： Selected and presented papers will be published into a volume of Springer Book Series Green Energy and Technology. The book series is now indexed EI compendex, Scopus, SCImago, etc. A few selected papers will be recommended to International Journal of Smart Grid and Clean Energy for publication after being extended, which will be indexed by Inspec (IET), CNKI, Crossref, Google Scholar, etc. Conference Venue: Kyoto, Japan Call For Paper Topics of interest for submission include, but are not limited to: 1. Green Energy Systems Ocean Energy Wind Energy Solar Energy Green power production and cogeneration CO2 capture, storage and utilization 2. New Energy Applications Geothermal Energy Hydrogen Energy and hydropower Low carbon technologies Nuclear Energy technologies and application Materials and Nanotechnology for energy systems 3.Energy Storage and Saving Technologies Energy-saving Technology Energy Chemical Engineering Energy-efficient Lighting Products Green Power Production and Cogeneration CO2 Capture, Storage, and Utilization Submission and contact information： Electronic Submission system: https://confsys.iconf.org/submission/icnea2026 E-mail:icnea_conference@126.com Contact number: +86-18148151445 Conference secretary, Ms Alice Lin For more information about international conferences, please visit our conference website: ICNEA 2026 Website: https://www.icnea.org</text:p>
          </table:table-cell>
          <table:table-cell table:number-columns-repeated="1013"/>
        </table:table-row>
        <table:table-row table:style-name="ro1">
          <table:table-cell table:style-name="ce2" office:value-type="string" calcext:value-type="string">
            <text:p>IoTAIEE 2026</text:p>
          </table:table-cell>
          <table:table-cell table:style-name="ce2" office:value-type="string" calcext:value-type="string">
            <text:p>IEEE 2026 7th International Conference on Internet of Things, Artificial Intelligence and Electronical Energy</text:p>
          </table:table-cell>
          <table:table-cell table:style-name="ce2" office:value-type="float" office:value="82" calcext:value-type="float">
            <text:p>82</text:p>
          </table:table-cell>
          <table:table-cell table:style-name="ce2" office:value-type="float" office:value="30" calcext:value-type="float">
            <text:p>30</text:p>
          </table:table-cell>
          <table:table-cell table:style-name="ce3" office:value-type="date" office:date-value="2026-07-17" calcext:value-type="date">
            <text:p>2026-07-17</text:p>
          </table:table-cell>
          <table:table-cell/>
          <table:table-cell table:style-name="ce3" office:value-type="date" office:date-value="2026-08-17" calcext:value-type="date">
            <text:p>2026-08-17</text:p>
          </table:table-cell>
          <table:table-cell table:style-name="ce2" office:value-type="string" calcext:value-type="string">
            <text:p>Lanzhou, China</text:p>
          </table:table-cell>
          <table:table-cell table:style-name="ce2" office:value-type="string" calcext:value-type="string">
            <text:p>Aug 21, 2026 - Aug 23, 2026</text:p>
          </table:table-cell>
          <table:table-cell table:style-name="ce4" office:value-type="string" calcext:value-type="string">
            <text:p><text:a xlink:href="https://ais.cn/u/aURFVv" xlink:type="simple">https://ais.cn/u/aURFVv</text:a></text:p>
          </table:table-cell>
          <table:table-cell table:style-name="ce2" office:value-type="string" calcext:value-type="string">
            <text:p>IEEE 2026 7th International Conference on Internet of Things, Artificial Intelligence and Electronical Energy (IoTAIEE 2026), which will be held on August 21-23, 2026 in Lanzhou, China. 𝗖𝗼𝗻𝗳𝗲𝗿𝗲𝗻𝗰𝗲 𝗪𝗲𝗯𝘀𝗶𝘁𝗲: https://ais.cn/u/aURFVv ---𝗖𝗮𝗹𝗹 𝗙𝗼𝗿 𝗣𝗮𝗽𝗲𝗿𝘀--- The topics of interest include, but are not limited to: · Internet of Things (IoT) Technology Radio Frequency Identification (RFID),intelligent recognition technologies,automatic positioning and tracking technologies,sensors,sensor signal processing,sensor control Smart Home:smart appliances,home security systems,home automation solutions Industrial Internet of Things (IIoT):remote equipment monitoring,predictive maintenance,production process optimization Smart Cities:traffic management systems,public safety surveillance,digitalization of city services Environmental Monitoring:water quality monitoring,air quality monitoring,climate change monitoring technologies Smart Agriculture:precision agriculture solutions,crop growth monitoring,intelligent irrigation systems Internet of Things Security:data encryption technologies,network security measures,device authentication mechanisms Intelligent Sensors: novel sensor technologies and systems, intelligent sensors and control, sensor networks, multi-sensor systems ·Artificial Intelligence Machine Learning: supervised and unsupervised learning algorithms, transfer learning applications Natural Language Processing: sentiment analysis, speech recognition, chatbot design AI Ethics: algorithmic bias, privacy protection, legal issues of artificial intelligence Computer Vision: image recognition, video surveillance applications, augmented reality technologies Intelligent Decision-Making: recommender systems, predictive analytics, integration of big data and AI AI Applications in Healthcare: disease prediction, personalized treatment, medical image analysis · Electronical Energy Electric Power Systems: power system planning, control and optimization, smart grid technologies, distributed generation and microgrids Renewable Energy: wind energy, photovoltaics, biomass energy, energy conversion and storage technologies Electrical Equipment: design and control of high-efficiency motors, power electronic devices, transmission and transformation equipment technologies New Energy Vehicles: electric vehicle powertrains, charging technologies, battery management systems Energy Internet: smart metering and data analysis, energy big data, Internet of Things applications Power Quality: power quality monitoring and improvement, electromagnetic compatibility technologies ---𝗦𝗽𝗲𝗮𝗸𝗲𝗿𝘀--- Prof. Jungong Han丨Tsinghua University, China (IET/AAIA Fellow, H-index: 80) Prof. Yuchao Dai丨Northwestern Polytechnical University, China (H-index: 60) Prof. Shunli Wang丨Inner Mongolia University of Technology, China ---𝗣𝘂𝗯𝗹𝗶𝗰𝗮𝘁𝗶𝗼𝗻--- All papers will be reviewed by two or three experts from the committees. After a careful reviewing process, all accepted papers of IoTAIEE 2026 will be published in the IEEE(ISBN: 979-8-3195-1771-5), which will be indexed by IEEE Xplore, EI Compendex and Scopus. ---𝗜𝗺𝗽𝗼𝗿𝘁𝗮𝗻𝘁 𝗗𝗮𝘁𝗲𝘀--- Full Paper Submission Date: July 17, 2026 Registration Deadline: August 10, 2026 Final Paper Submission Date: August 17, 2026 Conference Dates: August 21-23, 2026 --- 𝗣𝗮𝗽𝗲𝗿 𝗦𝘂𝗯𝗺𝗶𝘀𝘀𝗶𝗼𝗻--- Please send the abstract or full paper(word+pdf) to Submission System: https://ais.cn/u/aURFVv</text:p>
          </table:table-cell>
          <table:table-cell table:number-columns-repeated="1013"/>
        </table:table-row>
        <table:table-row table:style-name="ro1">
          <table:table-cell table:style-name="ce2" office:value-type="string" calcext:value-type="string">
            <text:p>CCESEM 2026</text:p>
          </table:table-cell>
          <table:table-cell table:style-name="ce2" office:value-type="string" calcext:value-type="string">
            <text:p>2026 8th International Conference on Civil Engineering, Environment Resources and Energy Materials</text:p>
          </table:table-cell>
          <table:table-cell table:style-name="ce2" office:value-type="float" office:value="42" calcext:value-type="float">
            <text:p>42</text:p>
          </table:table-cell>
          <table:table-cell table:style-name="ce2" office:value-type="float" office:value="30" calcext:value-type="float">
            <text:p>30</text:p>
          </table:table-cell>
          <table:table-cell table:style-name="ce3" office:value-type="date" office:date-value="2026-07-17" calcext:value-type="date">
            <text:p>2026-07-17</text:p>
          </table:table-cell>
          <table:table-cell/>
          <table:table-cell table:style-name="ce3" office:value-type="date" office:date-value="2026-08-08" calcext:value-type="date">
            <text:p>2026-08-08</text:p>
          </table:table-cell>
          <table:table-cell table:style-name="ce2" office:value-type="string" calcext:value-type="string">
            <text:p>Zhengzhou, China</text:p>
          </table:table-cell>
          <table:table-cell table:style-name="ce2" office:value-type="string" calcext:value-type="string">
            <text:p>Aug 28, 2026 - Aug 30, 2026</text:p>
          </table:table-cell>
          <table:table-cell table:style-name="ce4" office:value-type="string" calcext:value-type="string">
            <text:p><text:a xlink:href="https://ais.cn/u/au6Jva" xlink:type="simple">https://ais.cn/u/au6Jva</text:a></text:p>
          </table:table-cell>
          <table:table-cell table:style-name="ce2" office:value-type="string" calcext:value-type="string">
            <text:p>2026 8th International Conference on Civil Engineering, Environment Resources and Energy Materials (CCESEM 2026) will be held in Zhengzhou, China, from August 28 to 30, 2026. 𝗖𝗼𝗻𝗳𝗲𝗿𝗲𝗻𝗰𝗲 𝗪𝗲𝗯𝘀𝗶𝘁𝗲: https://ais.cn/u/au6Jva ---𝗖𝗮𝗹𝗹 𝗳𝗼𝗿 𝗽𝗮𝗽𝗲𝗿𝘀--- The topics of interest for submission include, but are not limited to: ◕ Soil Improvement · Agricultural Waste Resource Utilization · New Technologies for Saline Soil Remediation · Biochar and Soil Amendment · Study on Soil Erosion Resistance · Soil Heavy Metal Passivation Technology · Organic Agriculture and Soil Health · Soil Acidification Control · Intelligent Soil Monitoring Systems ◕ Unsaturated Soil · Optimization of Unsaturated Soil Seepage Models · Study on Mechanical Properties of Unsaturated Soils · Unsaturated Soils and Climate Change · Slope Stability Analysis · Study on Freeze-Thaw Characteristics · Mechanism of Microbial Action in Unsaturated Soils · Unsaturated Soils and Environmental Geotechnics · Foundation Settlement · Improvement of Unsaturated Soil Experimental Techniques ◕ Geotechnical Mechanics Calculation · Numerical Simulation Techniques in Rock Mechanics · Geotechnical Engineering Disaster Prediction · Study on the Mechanical Properties of Deep Rock Masses · Geotechnical Parameter Inversion Technology · Geotechnical Engineering Response under Earthquake Action · Numerical Analysis and Algorithms ◕ Geological Environment · Impact of Climate Change on Geological Environment · Urban Geological Environment and Underground Space Development · Geological Disaster Monitoring and Early Warning Systems · Evolution of Coastal Wetland Geological Environment · Regional Geological Environment Assessment and Protection · Groundwater Pollution Control and Remediation Technology · Interdisciplinary Research on Ecological and Geological Environment · Critical Zone Research ◕ Energy · Energy Saving Technologies · Coal Mine Engineering and Technology · Energy Storage Technologies · Renewable Energy · Thermal and Power Engineering · Energy Engineering and Environmental Engineering · Alternative Fuels · Greenhouse Gas Treatment · Clean Energy Development · Conventional energy engineering (coal, oil, natural gas, etc. without conventional power) · Clean Coal and Fossil Fuels ---𝗣𝘂𝗯𝗹𝗶𝗰𝗮𝘁𝗶𝗼𝗻--- After 2-3 experts of the organizing committee strictly audited the contribution of the conference, all the final papers will be officially published in the Conference Proceedings. The published papers will then be submitted to CNKI、Inspec、Google Scholarfor indexing. ---𝗜𝗺𝗽𝗼𝗿𝘁𝗮𝗻𝘁 𝗗𝗮𝘁𝗲𝘀--- Submission Deadline: July 17,2026 Notification Deadline: July 24, 2026 Registration Deadline: August 8, 2026 Conference Dates: August 28-30, 2026 --- 𝗣𝗮𝗽𝗲𝗿 𝗦𝘂𝗯𝗺𝗶𝘀𝘀𝗶𝗼𝗻--- Please send the full paper(word+pdf) to Submission System: https://ais.cn/u/au6Jva</text:p>
          </table:table-cell>
          <table:table-cell table:number-columns-repeated="1013"/>
        </table:table-row>
        <table:table-row table:style-name="ro1">
          <table:table-cell table:style-name="ce2" office:value-type="string" calcext:value-type="string">
            <text:p>ETEE 2026</text:p>
          </table:table-cell>
          <table:table-cell table:style-name="ce2" office:value-type="string" calcext:value-type="string">
            <text:p>2026 2nd International Conference on Energy Technology and Electrical Engineering</text:p>
          </table:table-cell>
          <table:table-cell table:style-name="ce2" office:value-type="float" office:value="76" calcext:value-type="float">
            <text:p>76</text:p>
          </table:table-cell>
          <table:table-cell table:style-name="ce2" office:value-type="float" office:value="30" calcext:value-type="float">
            <text:p>30</text:p>
          </table:table-cell>
          <table:table-cell table:style-name="ce3" office:value-type="date" office:date-value="2026-07-17" calcext:value-type="date">
            <text:p>2026-07-17</text:p>
          </table:table-cell>
          <table:table-cell/>
          <table:table-cell table:style-name="ce3" office:value-type="date" office:date-value="2026-07-30" calcext:value-type="date">
            <text:p>2026-07-30</text:p>
          </table:table-cell>
          <table:table-cell table:style-name="ce2" office:value-type="string" calcext:value-type="string">
            <text:p>Shenyang, China</text:p>
          </table:table-cell>
          <table:table-cell table:style-name="ce2" office:value-type="string" calcext:value-type="string">
            <text:p>Aug 14, 2026 - Aug 16, 2026</text:p>
          </table:table-cell>
          <table:table-cell table:style-name="ce4" office:value-type="string" calcext:value-type="string">
            <text:p><text:a xlink:href="https://ais.cn/u/MVbIjy" xlink:type="simple">https://ais.cn/u/MVbIjy</text:a></text:p>
          </table:table-cell>
          <table:table-cell table:style-name="ce2" office:value-type="string" calcext:value-type="string">
            <text:p>2026 2nd International Conference on Energy Technology and Electrical Engineering (ETEE 2026) will be held in Shenyang, China, from August 14 to 16, 2026. 𝗖𝗼𝗻𝗳𝗲𝗿𝗲𝗻𝗰𝗲 𝗪𝗲𝗯𝘀𝗶𝘁𝗲: https://ais.cn/u/MVbIjy ---𝗖𝗮𝗹𝗹 𝗳𝗼𝗿 𝗽𝗮𝗽𝗲𝗿𝘀--- The topics of interest include, but are not limited to: ◕ Energy Technology · Energy Saving Technology · Energy Storage Technology · Thermoelectric Engineering · Renewable Energy Technologies and Systems · Wind Power Generation · Thermal Engineering and Thermodynamics · Energy Equipment and Energy Management · Thermal and Wind Energy Engineering · Nuclear Engineering and Hydrogen Energy Resources · Energy Security and Energy Systems · Energy Conversion and Energy Efficiency · Energy Analysis and Energy Transfer · Hybrid Energy Systems · Power System Modeling, Simulation and Analysis · Power Systems and Automation · Power System Planning and Scheduling · Power System Protection, Operation and Control · Power System Reliability and Security · Power System Stability · Power System and Energy · Power Electronics and Electric Drives · Power Machinery and Engineering · Electric Drives ◕ Electrical Engineering · Electrical Automation and Power Engineering · Smart Grid / Power IC · Electrical Energy Processing · High Voltage and Insulation Technology · Electric Motors and Electrics · Electrical Engineering Theory and New Technologies · Antennas and Propagation · Electro-Optical Phenomena in Semiconductors · Modulation, Coding and Channel Analysis · Remote Control and Technology for Global Positioning Systems · Smart Grid Technology · Electrical Engineering Technology · Computational Intelligence in Electrical Engineering · Distributed Generation, Fuel Cells and Renewable Energy Systems · Microwave and Millimeter Wave Circuits and Antennas · Diagnostic and Sensing Systems · Power Electronics --- 𝗞𝗲𝘆𝗻𝗼𝘁𝗲 𝗦𝗽𝗲𝗮𝗸𝗲𝗿𝘀--- Prof. Weixing Li,Dalian University of Technology, China,Chair of the IEEE PES Northeast Chapter, China ---𝗣𝘂𝗯𝗹𝗶𝗰𝗮𝘁𝗶𝗼𝗻--- Papers submitted to ETEE 2025 will be reviewed by technical committees of the conference. All accepted full papers will be published by conference proceedings and submitted to EI Compendex and Scopus for indexing. ---𝗜𝗺𝗽𝗼𝗿𝘁𝗮𝗻𝘁 𝗗𝗮𝘁𝗲𝘀--- Full Paper Submission Date: July 17, 2026 Registration Deadline: August 5, 2026 Final Paper Submission Date: July 30, 2026 Conference Dates: August 14-16, 2026 --- 𝗣𝗮𝗽𝗲𝗿 𝗦𝘂𝗯𝗺𝗶𝘀𝘀𝗶𝗼𝗻--- Please send the full paper(word+pdf) to Submission System: https://ais.cn/u/MVbIjy</text:p>
          </table:table-cell>
          <table:table-cell table:number-columns-repeated="1013"/>
        </table:table-row>
        <table:table-row table:style-name="ro1">
          <table:table-cell table:style-name="ce2" office:value-type="string" calcext:value-type="string">
            <text:p>Springer ICRER 2026</text:p>
          </table:table-cell>
          <table:table-cell table:style-name="ce2" office:value-type="string" calcext:value-type="string">
            <text:p>Springer--2026 8th International Conference on Resources and Environmental Research (ICRER 2026)</text:p>
          </table:table-cell>
          <table:table-cell table:style-name="ce2" office:value-type="float" office:value="78" calcext:value-type="float">
            <text:p>78</text:p>
          </table:table-cell>
          <table:table-cell table:style-name="ce2" office:value-type="float" office:value="32" calcext:value-type="float">
            <text:p>32</text:p>
          </table:table-cell>
          <table:table-cell table:style-name="ce3" office:value-type="date" office:date-value="2026-07-20" calcext:value-type="date">
            <text:p>2026-07-20</text:p>
          </table:table-cell>
          <table:table-cell table:number-columns-repeated="2"/>
          <table:table-cell table:style-name="ce2" office:value-type="string" calcext:value-type="string">
            <text:p>Kyoto, Japan</text:p>
          </table:table-cell>
          <table:table-cell table:style-name="ce2" office:value-type="string" calcext:value-type="string">
            <text:p>Oct 10, 2026 - Oct 12, 2026</text:p>
          </table:table-cell>
          <table:table-cell table:style-name="ce4" office:value-type="string" calcext:value-type="string">
            <text:p><text:a xlink:href="https://www.icrer.us/" xlink:type="simple">https://www.icrer.us/</text:a></text:p>
          </table:table-cell>
          <table:table-cell table:style-name="ce2" office:value-type="string" calcext:value-type="string">
            <text:p>Full name: Springer--2026 8th International Conference on Resources and Environmental Research (ICRER 2026) Abbreviation: ICRER 2026 Conference Website: https://www.icrer.us/ Conference venue: Kyoto, Japan 2026 8th International Conference on Resources and Environmental Research (ICRER 2026) will be held during October 10-12, 2026, in Kyoto, Japan. ICRER 2026 is sponsored by Beijing CAS Industrial Energy and Environment Technology Institute and supported by Kyoto University, Japan. Paper Publishing Accepted and presented full papers will be included in a volume of Springer Book Series Environmental Science and Engineering (ISSN: 1863-5520)and published as post-proceedings, which will be submitted to EI Compendex, Scopus, SCImago and other major databases for indexing. Journal Recommendation Authors are encouraged to submit your extended paper with at least 35% new added content and new title to the journal below for publication after full paper is accepted into conference proceedings. Environmental Technology, indexed by SCIE (Impact factor 2021: 3.475), Scopus (Citescore 2021:5.4, Q1), etc. Deadline for manuscript submissions: November 10, 2026 Call for papers 1)Environmental Science and Technology ●Mechanism of multi-media migration and transformation of new pollutants ●Treatment and recycling technology of high salt wastewater ●Collaborative governance mechanism and key path of atmospheric pollution reduction and carbon reduction ●Ecological effects of microplastics in offshore waters ●Study on carbon sequestration and accumulation in coastal wetland ecosystem ●Application of machine learning to Earth system observation and prediction ●Study on biological characteristics and ecological effects of microorganisms in Marine extreme environment ●Study on clean production technology of tanning without tanning agent ●Food function factors and the mechanism of chronic metabolic syndrome ●Extraction and development of new natural cellulose fibers 2)Environmental Ecological Engineering ●Ecosystem Management and Sustainable Development ●Global environmental change and ecosystems management ●Environmental restoration and ecological engineering ●Habitat reconstruction ●Deforestation ●Wetlands ●Landscape degradation and restoration ●Soil decontamination ●Environmental Monitoring and Management ●Hazardous substances and detection techniques ●Biodegradation of hazardous substances ●Toxicity assessment and epidemiological studies ●Management and regulation of point and diffuse pollution ●Monitoring and analysis of environmental contaminant ●Quality guidelines, environmental regulation and monitoring 3)Resources and Environment Engineering ●Water Resources Management and Water Pollution Control ●Atmospheric science and air pollution control ●Solid Waste Pollution Control and Resource Utilization ●Ground water remediation and management ●Global environmental change and ecosystems management ●Climate and climatic changes ●Global warming ●Ozone layer depletion ●Carbon capture and storage ●Recycling and reuse ●Waste valorization Committee Conference Chairs Kaimin Shih, The University of Hong Kong, China Kokyo Oh, Center for Environmental Science in Saitama, Japan Conference local arrangement Chair Setsuhisa Tanabe Kyoto University, Japan Conference Program Chairs Xueming Chen, Fuzhou University, China Miwako Hosoda, Seisa University, Tokyo, Japan Conference Regional Chairs Tjokorda Gde Tirta Nindhia, Udayana University, Indonesia Flora Elvistia, Jayabaya University, Indonesia Conference Publication Chair Chaolei Yuan, Sun Yat-sen University, China Conference Steering Committee Mohamed El-Din, University of Alberta, Canada Satya Harpalani, Southern Illinois University Carbondale, USA Submission and Contact Methods Submission Methods: https://confsys.iconf.org/submission/icrer2026 E-mail: icrer_secretary@163.com Tel: +86-17311381986 Conference Specialist: Ms. Vera Liao ICRER 2026 can provide a platform for Resources and Environmental Research. For more conference information, please visit the conference website: http://www.icrer.us/index.html</text:p>
          </table:table-cell>
          <table:table-cell table:number-columns-repeated="1013"/>
        </table:table-row>
        <table:table-row table:style-name="ro1">
          <table:table-cell table:style-name="ce2" office:value-type="string" calcext:value-type="string">
            <text:p>EREE 2026</text:p>
          </table:table-cell>
          <table:table-cell table:style-name="ce2" office:value-type="string" calcext:value-type="string">
            <text:p>2026 the 8th International Conference on Environment, Resources and Energy Engineering (EREE 2026)</text:p>
          </table:table-cell>
          <table:table-cell table:style-name="ce2" office:value-type="float" office:value="72" calcext:value-type="float">
            <text:p>72</text:p>
          </table:table-cell>
          <table:table-cell table:style-name="ce2" office:value-type="float" office:value="30" calcext:value-type="float">
            <text:p>30</text:p>
          </table:table-cell>
          <table:table-cell table:style-name="ce3" office:value-type="date" office:date-value="2026-07-20" calcext:value-type="date">
            <text:p>2026-07-20</text:p>
          </table:table-cell>
          <table:table-cell table:number-columns-repeated="2"/>
          <table:table-cell table:style-name="ce2" office:value-type="string" calcext:value-type="string">
            <text:p>Singapore</text:p>
          </table:table-cell>
          <table:table-cell table:style-name="ce2" office:value-type="string" calcext:value-type="string">
            <text:p>Oct 5, 2026 - Oct 7, 2026</text:p>
          </table:table-cell>
          <table:table-cell table:style-name="ce4" office:value-type="string" calcext:value-type="string">
            <text:p><text:a xlink:href="http://www.eree.org" xlink:type="simple">http://www.eree.org</text:a></text:p>
          </table:table-cell>
          <table:table-cell table:style-name="ce2" office:value-type="string" calcext:value-type="string">
            <text:p>★Full Name: 2026 the 8th International Conference on Environment, Resources and Energy Engineering ★Abbreviation: EREE 2026 ★Conference Theme: Environmental Solutions Towards Sustainable Society ★Dates: October 5-7, 2026 ★Venue: Singapore ★Website: www.eree.org ★EREE2026 is co-sponsored by Singapore Institute of Electronics, Universiti Malaya, Malaysia, technical sponsored by Kobe University, Japan; University of Wollongong, Australia; Mie University, Japan ★Conference Committees *Conference Committee Chairs Saad Mekhilef, Swinburne University of Technology, Australia &amp; University of Malaya, Malaysia (IEEE Fellow) Danny Sutanto, University of Wollongong, Australia *Program Committee Chairs Tomokazu Mishima, Kobe University, Japan T M Indra Mahlia, University of Technology Sydney (UTS), Australia / University of Indonesia, Indonesia Ab Halim Abu Bakar, University of Malaya, Malaysia Chawalit Ratanathamsakul, Chulalongkorn University, Thailand Sarunya Promkotra, Khon Kaen University, Thailand ★Conference Proceedings All submissions will be sent for double-blind review. Accepted and registered papers with presentation will be included in EREE Conference Proceedings, which will be indexed by Ei Compendex, Scopus, etc. ★Histories EREE2019-October 9-11, 2019, Bangkok, Thailand EREE2020-July 24-26, 2020, Online EREE2021-July 15-17, 2021, Online EREE2022-June 10-12, 2022, Online EREE2023-June 15-17, 2023, Bangkok, Thailand EREE2024-November 7-9, 2024, Bali, Indonesia EREE2025-July 25-27, 2025, Tokyo, Japan ★Call for Paper *Environmental Science Climate Change and Global Warming Atmospheric Environment Aquatic Environment Terrestrial Environment Pollution Control (Air, Water, Soil, Waste) Environmental Monitoring and Analysis Environmental Biology and Microbiology Environmental Chemistry Environmental Nanotechnology and Materials Environmental Safety and Health Environmental Sustainability *Energy &amp; Resources Renewable Energy (Wind, Solar, Biomass, Geothermal) Energy Efficiency and Conservation Energy Storage Technologies Smart Grids and Microgrids Hydrogen and Alternative Fuels Nuclear Power Energy Systems Analysis and Planning Natural Resource Management Life Cycle Assessment (LCA) Energy Transition and Policy Sustainable and Resilient Energy Systems *Sustainable Systems Sustainable Cities and Communities Environmental Systems Approach Green Building and Sustainable Infrastructure Climate Adaptation and Resilience Environmental, Social, and Governance (ESG) Sustainable Transportation Just Transition and Energy Equity Looking for more topics about EREE2026, please see the website http://www.eree.org/cfp.html ★Submission a. Full Paper (Presentation and Publication) Accepted full paper will be invited to give the oral presentation at the conference and recommended to get published EREE Conference Proceedings. b. Abstract (Presentation only) Accepted abstract will be invited to give the oral presentation at the conference, only full paper will not be published after the conference. ★Submission Template: https://www.eree.org/IOP-Template.doc ★Please submit your full paper to: Submission system: http://confsys.iconf.org/submission/eree2026 Submission email: eree_contact@academic.net ★Contact us -------------------------------------------------------------- ---- Ms. Greta Shen Email: eree_contact@academic.net</text:p>
          </table:table-cell>
          <table:table-cell table:number-columns-repeated="1013"/>
        </table:table-row>
        <table:table-row table:style-name="ro1">
          <table:table-cell table:style-name="ce2" office:value-type="string" calcext:value-type="string">
            <text:p>Springer ICPSG 2026</text:p>
          </table:table-cell>
          <table:table-cell table:style-name="ce2" office:value-type="string" calcext:value-type="string">
            <text:p>Springer--2026 9th International Conference on Power and Smart Grid (ICPSG 2026)</text:p>
          </table:table-cell>
          <table:table-cell table:style-name="ce2" office:value-type="float" office:value="86" calcext:value-type="float">
            <text:p>86</text:p>
          </table:table-cell>
          <table:table-cell table:style-name="ce2" office:value-type="float" office:value="30" calcext:value-type="float">
            <text:p>30</text:p>
          </table:table-cell>
          <table:table-cell table:style-name="ce3" office:value-type="date" office:date-value="2026-07-20" calcext:value-type="date">
            <text:p>2026-07-20</text:p>
          </table:table-cell>
          <table:table-cell table:number-columns-repeated="2"/>
          <table:table-cell table:style-name="ce2" office:value-type="string" calcext:value-type="string">
            <text:p>Seoul, South Korea</text:p>
          </table:table-cell>
          <table:table-cell table:style-name="ce2" office:value-type="string" calcext:value-type="string">
            <text:p>Nov 14, 2026 - Nov 16, 2026</text:p>
          </table:table-cell>
          <table:table-cell table:style-name="ce4" office:value-type="string" calcext:value-type="string">
            <text:p><text:a xlink:href="https://www.icpsg.org/" xlink:type="simple">https://www.icpsg.org/</text:a></text:p>
          </table:table-cell>
          <table:table-cell table:style-name="ce2" office:value-type="string" calcext:value-type="string">
            <text:p>★ICPSG 2026-EI Compendex&amp;Scopus★ ★Abbreviation: ICPSG 2026 ★Full Name: Springer--2026 9th International Conference on Power and Smart Grid (ICPSG 2026) ★Venue: Seoul, South Korea ★Time: November 14-16, 2026 ★Sponsored by: Kookmin University, South Korea ★Web: https://www.icpsg.org/ ★Call for papers★ * Advanced Energy Technologies * Battery and Fuel Cell Technology * Electric Power Engineering * Energy and Power Engineering * Energy Systems and Power Engineering * Energy Technology and Power Engineering * Power and Energy Technology Systems * Power Engineering and Power Generation Technology * Power Technology and Power Engineering * Renewable Energy Technology * Wind and Renewable Energy For details about topics, please visit: https://www.icpsg.org/cfp.html ★★Publication Accepted and presented papers from ICPSG 2026 will be published into a volume of Lecture Notes in Networks and Systems as book chapter by Springer. The book series is now indexed by EI Compendex, SCOPUS, INSPEC, WTI Frankfurt eG, zbMATH, SCImago. All books published in the series are submitted for consideration in Web of Science. ★Submission★ 1. Full paper(publication and presentation) 2. Abstract (presentation) For full paper, please upload it to the Electronic Submission System. http://confsys.iconf.org/submission/icpsg2026 For abstract, please send it to icpsg_conf@126.com More detail about submission, please visit: https://www.icpsg.org/sub.html ★★Conference Schedule★★ November 14, 2026---Participants check-in &amp; Materials Collection November 15, 2026(Morning)----Opening Remarks &amp; Keynote Speeches November 15, 2026(Afternoon)----Author Presentation November 16, 2026----Author Presentation ★Conference Venue★ Kookmin University, South Korea ★★Contact: Ms. Stacey Li Website: https://www.icpsg.org/ Email: icpsg_conf@126.com Tel: +86-137-3111-1131</text:p>
          </table:table-cell>
          <table:table-cell table:number-columns-repeated="1013"/>
        </table:table-row>
        <table:table-row table:style-name="ro1">
          <table:table-cell table:style-name="ce2" office:value-type="string" calcext:value-type="string">
            <text:p>GEPE 2026</text:p>
          </table:table-cell>
          <table:table-cell table:style-name="ce2" office:value-type="string" calcext:value-type="string">
            <text:p>2026 International Conference on Green Energy and Power Engineering (GEPE 2026)</text:p>
          </table:table-cell>
          <table:table-cell table:style-name="ce2" office:value-type="float" office:value="78" calcext:value-type="float">
            <text:p>78</text:p>
          </table:table-cell>
          <table:table-cell table:style-name="ce2" office:value-type="float" office:value="25" calcext:value-type="float">
            <text:p>25</text:p>
          </table:table-cell>
          <table:table-cell table:style-name="ce3" office:value-type="date" office:date-value="2026-07-20" calcext:value-type="date">
            <text:p>2026-07-20</text:p>
          </table:table-cell>
          <table:table-cell table:number-columns-repeated="2"/>
          <table:table-cell table:style-name="ce2" office:value-type="string" calcext:value-type="string">
            <text:p>Singapore</text:p>
          </table:table-cell>
          <table:table-cell table:style-name="ce2" office:value-type="string" calcext:value-type="string">
            <text:p>Oct 5, 2026 - Oct 7, 2026</text:p>
          </table:table-cell>
          <table:table-cell table:style-name="ce4" office:value-type="string" calcext:value-type="string">
            <text:p><text:a xlink:href="https://www.gepe.net/" xlink:type="simple">https://www.gepe.net/</text:a></text:p>
          </table:table-cell>
          <table:table-cell table:style-name="ce2" office:value-type="string" calcext:value-type="string">
            <text:p>2026 International Conference on Green Energy and Power Engineering (GEPE 2026) October 5-7, 2026 | Singapore https://www.gepe.net/ ★ GEPE 2026 is co-sponsored by Sanya Global Energy Research Institute; Nanyang Technological University, Singapore; Hainan Institute of Zhejiang University, China and The Chinese University of Hong Kong (Shenzhen), China. ****** ★Conference Chairs Fushuan Wen, Zhejiang University, China (IEEE Fellow &amp; IEEE PES Member) Junhua Zhao, The Chinese University of Hong Kong (Shenzhen), China (IEEE Senior Member &amp; IEEE PES Member) Yan Xu, Nanyang Technological University, Singapore (IEEE Senior Member &amp; Committee Member for IEEE PES Singapore Chapter) ****** ★Conference Proceedings All submissions will be sent for double-blind review. Accepted and registered papers with presentation will be included in GEPE Conference Proceedings, which will be indexed by Ei Compendex, Scopus, etc. ****** ★Call for Papers *Power Systems and Engineering Power Systems &amp; Automation Hybrid Power &amp; Energy Systems Monitoring and Control Smart Grid and Micro Grid Power System Fault and Diagnosis Risk Assessment and Reliability Auto-control of Power System Fault Monitoring &amp; Predictive Maintenance Power Semiconductor Devices and Modules *Green Energy and Energy Economy Fuel Cells Nuclear Energy Biomass Conversion Geothermal Energy Wave and Tidal Energy Hydro and Wind Energy Energy Storage Techniques Solar and Photovoltaic Systems Hydrogen Energy and Transport Renewable and Clean Energy Technologies More topics, please click: https://www.gepe.net/cfp.html ****** ★Submission Info GEPE2026 Submission Link: https://confsys.iconf.org/submission/gepe2026 Full Paper (Publication &amp; Presentation) ☆ Submitted manuscripts should be written in English conforming to the required template. ☆ All paper submissions must represent original and unpublished work. ☆ Submitted manuscripts should have at least 5 pages in required template. ☆ Template: https://www.gepe.net/download/IEEE-Formatting.doc Abstract (Presentation) ☆ Submitted abstract should be written in English conforming to the required template. ☆ Abstract submission is just for presentation, it will not be published officially. ☆ Submitted abstract should have no more than 300 words. ☆ Template: https://www.gepe.net/download/Abstract_template.doc ****** ★Call for Special Sessions The special session proposal should contain the following information: A short description (2-3 lines) &amp; covered topics. Brief biographies of session organizer(s) and chair(s). Tentative papers with title, authors, and short abstract. List of invited speakers (when available). ****** ★Contact us Conference Secretary: Ms. Luna Wang Conference Email: gepe_info@yeah.net</text:p>
          </table:table-cell>
          <table:table-cell table:number-columns-repeated="1013"/>
        </table:table-row>
        <table:table-row table:style-name="ro1">
          <table:table-cell table:style-name="ce2" office:value-type="string" calcext:value-type="string">
            <text:p>MEPE 2026</text:p>
          </table:table-cell>
          <table:table-cell table:style-name="ce2" office:value-type="string" calcext:value-type="string">
            <text:p>2026 5th International Conference on Mechanical Engineering and Power Engineering (MEPE 2026)</text:p>
          </table:table-cell>
          <table:table-cell table:style-name="ce2" office:value-type="float" office:value="60" calcext:value-type="float">
            <text:p>60</text:p>
          </table:table-cell>
          <table:table-cell table:style-name="ce2" office:value-type="float" office:value="30" calcext:value-type="float">
            <text:p>30</text:p>
          </table:table-cell>
          <table:table-cell table:style-name="ce3" office:value-type="date" office:date-value="2026-07-20" calcext:value-type="date">
            <text:p>2026-07-20</text:p>
          </table:table-cell>
          <table:table-cell table:number-columns-repeated="2"/>
          <table:table-cell table:style-name="ce2" office:value-type="string" calcext:value-type="string">
            <text:p>Seoul, South Korea</text:p>
          </table:table-cell>
          <table:table-cell table:style-name="ce2" office:value-type="string" calcext:value-type="string">
            <text:p>Nov 14, 2026 - Nov 16, 2026</text:p>
          </table:table-cell>
          <table:table-cell table:style-name="ce4" office:value-type="string" calcext:value-type="string">
            <text:p><text:a xlink:href="http://www.mepe.org/" xlink:type="simple">http://www.mepe.org/</text:a></text:p>
          </table:table-cell>
          <table:table-cell table:style-name="ce2" office:value-type="string" calcext:value-type="string">
            <text:p>Abbreviation: MEPE 2026 Full Name: 2026 5th International Conference on Mechanical Engineering and Power Engineering (MEPE 2026) Seoul, South Korea November 14-16, 2026 http://www.mepe.org/ Publication: Accepted and presented papers will be published into MEPE 2026 Conference Proceedings, submitted for EI Compendex, Scopus, etc. Call for Paper: Acoustics and Noise Control Applied Mechanics Biomechanics CAD/CAM/CIM Dynamics and Vibration Engineering Materials Fuels and Combustion Machinery and Machine Design Manufacturing and Production Processes Nonlinear Dynamics Oil and Gas Exploration Operations Management PC guided design and manufacture Plasticity Mechanics System Dynamics and Simulation Textile and Leather Technology Transport Phenomena Tribology More topics: http://www.mepe.org/cfp.html Agenda Overview： Nov. 14, 2026 Registration Nov. 15, 2026 Keynote Speech (Morning) Nov. 15, 2026 Session Presentation (Afternoon) Nov. 16, 2026 One-day Tour Submission Methods: Full Paper (publication and oral presentation) Abstract (oral presentation only) Electronic Submission System (.pdf) http://confsys.iconf.org/submission/mepe2026 By email: mepe_conf@yeah.net Contacts: Ms. Rachel Cao Email: mepe_conf@yeah.net Tel: +86-130-9633-3337</text:p>
          </table:table-cell>
          <table:table-cell table:number-columns-repeated="1013"/>
        </table:table-row>
        <table:table-row table:style-name="ro1">
          <table:table-cell table:style-name="ce2" office:value-type="string" calcext:value-type="string">
            <text:p>SPIES 2026</text:p>
          </table:table-cell>
          <table:table-cell table:style-name="ce2" office:value-type="string" calcext:value-type="string">
            <text:p>2026 8th International Conference on Smart Power &amp; Internet Energy Systems (SPIES 2026)</text:p>
          </table:table-cell>
          <table:table-cell table:style-name="ce2" office:value-type="float" office:value="68" calcext:value-type="float">
            <text:p>68</text:p>
          </table:table-cell>
          <table:table-cell table:style-name="ce2" office:value-type="float" office:value="32" calcext:value-type="float">
            <text:p>32</text:p>
          </table:table-cell>
          <table:table-cell table:style-name="ce3" office:value-type="date" office:date-value="2026-07-20" calcext:value-type="date">
            <text:p>2026-07-20</text:p>
          </table:table-cell>
          <table:table-cell table:number-columns-repeated="2"/>
          <table:table-cell table:style-name="ce2" office:value-type="string" calcext:value-type="string">
            <text:p>Sunshine Coast, Australia</text:p>
          </table:table-cell>
          <table:table-cell table:style-name="ce2" office:value-type="string" calcext:value-type="string">
            <text:p>Sep 28, 2026 - Sep 30, 2026</text:p>
          </table:table-cell>
          <table:table-cell table:style-name="ce4" office:value-type="string" calcext:value-type="string">
            <text:p><text:a xlink:href="http://www.icspies.org/" xlink:type="simple">http://www.icspies.org/</text:a></text:p>
          </table:table-cell>
          <table:table-cell table:style-name="ce2" office:value-type="string" calcext:value-type="string">
            <text:p>Full name: 2026 8th International Conference on Smart Power &amp; Internet Energy Systems (SPIES 2026) Abbreviation: SPIES 2026 2026 8th International Conference on Smart Power &amp; Internet Energy Systems will be held in Sunshine Coast, Australia during September 28-30, 2026. Conference Website: http://www.icspies.org/ SPIES 2026 Information: 1. The accepted and presented papers of 2026 8th International Conference on Smart Power &amp; Internet Energy Systems (SPIES 2026) will be published in conference proceedings, which will be indexed by Ei Compendex, Scopus, INSPEC, Thomson Reuters’ Web of Science, and others. 2. SPIES 2026 is sponsored by University of the Sunshine Coast. And it is also technically supported by University of Vaasa, Macquarie University, Chiang Mai University, Universite de Bretagne Occidentable, University of Nottingham and Auckland University of Technology. 3. Prof. Bikash Pal from Imperial College London, UK, Prof. Kashem Muttaqi from University of Wollongong, Australia and Prof. Hua Geng from Tsinghua University, China will be the keynote speakers. SPIES History: SPIES 2019 was Technically Supported by Prince of Songkla University, Changmai University, Universiti Tenaga Nasional, University of Malaya, Tsinghua University and Curtin University. SPIES 2019 papers have been presented in IOP Conference Series: Earth and Environmental Science (EES) (ISSN: 1755-1315), which have been indexed in EI compendex and Scopus. SPIES 2020 was Technically Supported by Prince of Songkla University, Changmai University, Universiti Tenaga Nasional, University of Malaya,Tsinghua University, KITAMI Institute of Technology, King Mongkut's University of Technology North Bangkok, Universite de Bretagne Occidentale and Shanghai University of Electric Power, China. SPIES 2020 was held successfully during September 15-18, 2020. SPIES 2021 was hosted by Shanghai University of Electric Power and Technically Supported by IEEE Industry Applications Society, South Asia Institute of Science and Engineering, KITAMI Institute of Technology, King Mongkut‘s University of Technology North Bangkok, University of Western Brittany, Federation University and Curtin University. SPIES 2021 was held successfully during September 25-28, 2021. SPIES 2022 was held successfully online in Beijing, China during December 9-12, 2022. SPIES 2022 was co-sponsored by Tsinghua University and Shandong University, and technically supported by IEEE Industry Applications Society, IEEE Industrial Electronics Society, IEEE Power, and Energy Society. SPIES 2023 was held successfully in Shenyang, China during December 1-4, 2023. SPIES 2023 was co-sponsored by Shenyang University of Technology and Northeastern University, China. SPIES 2024 was held successfully in Khalifa University, UAE during December 4-6, 2024. SPIES 2024 was co-sponsored by Khalifa University, UAE, IEEE IAS and PES. And it was also technically supported by University of Vaasa, Macquarie University, Chiang Mai University, Universite de Bretagne Occidentale, University of Nottingham and Auckland University of Technology. SPIES 2025 was held successfully in Shanghai, China during October 17-20, 2025. SPIES 2025 was sponsored by Shanghai University of Electric Power, China and technically co-sponsored by IEEE PES and IEEE IAS. And it is also technically supported by University of Vaasa, Macquarie University, Chiang Mai University, Université de Bretagne Occidentale, University of Nottingham and Auckland University of Technology, Journal of Shanghai University of Electric Power and Virtual Teaching and Research Section for Electrical Engineering and Automation Specialization of the Ministry of Education. SPIES 2020-2024 has been included in IEEE explore and it has been indexed by EI compendex and Scopus! SPIES 2025 will be included in IEEE explore and indexed by EI compendex and Scopus. Submission and Contact Methods: Submission Methods: https://www.zmeeting.org/submission/SPIES2026 Email: secretary@icspies.org Conference Specialist: Ms. Willow Wong SPIES 2026 conference is a timely event to share your views on energy transformation and discuss these with power and energy leaders from Australia, Asia, Europe, North America, and Africa.</text:p>
          </table:table-cell>
          <table:table-cell table:number-columns-repeated="1013"/>
        </table:table-row>
        <table:table-row table:style-name="ro1">
          <table:table-cell table:style-name="ce2" office:value-type="string" calcext:value-type="string">
            <text:p>ICECE 2026</text:p>
          </table:table-cell>
          <table:table-cell table:style-name="ce2" office:value-type="string" calcext:value-type="string">
            <text:p>2026 the 9th International Conference on Electronics and Communication Engineering (ICECE 2026)</text:p>
          </table:table-cell>
          <table:table-cell table:style-name="ce2" office:value-type="float" office:value="72" calcext:value-type="float">
            <text:p>72</text:p>
          </table:table-cell>
          <table:table-cell table:style-name="ce2" office:value-type="float" office:value="30" calcext:value-type="float">
            <text:p>30</text:p>
          </table:table-cell>
          <table:table-cell table:style-name="ce3" office:value-type="date" office:date-value="2026-07-20" calcext:value-type="date">
            <text:p>2026-07-20</text:p>
          </table:table-cell>
          <table:table-cell table:number-columns-repeated="2"/>
          <table:table-cell table:style-name="ce2" office:value-type="string" calcext:value-type="string">
            <text:p>Xi'an, China</text:p>
          </table:table-cell>
          <table:table-cell table:style-name="ce2" office:value-type="string" calcext:value-type="string">
            <text:p>Dec 26, 2026 - Dec 28, 2026</text:p>
          </table:table-cell>
          <table:table-cell table:style-name="ce4" office:value-type="string" calcext:value-type="string">
            <text:p><text:a xlink:href="https://www.icece.net/" xlink:type="simple">https://www.icece.net/</text:a></text:p>
          </table:table-cell>
          <table:table-cell table:style-name="ce2" office:value-type="string" calcext:value-type="string">
            <text:p>Abbreviation: ICECE 2026 Full Name: 2026 the 9th International Conference on Electronics and Communication Engineering (ICECE 2026) Xi'an, China December 26-28, 2026 https://www.icece.net/ Publication: All accepted papers in the regular oral presentation will be published in ICECE 2026 Conference Proceedings, which will be submitted for EI Compendex, Scopus indexing. Call for Papers: Computer Science Electronics and Communication Broadcasting Technology Multimedia Networking 5G: New Radio &amp; New Core MISO and MIMO processing More topics: https://www.icece.net/cfp.html Agenda Overview： DAY 1 December 26, 2026 10:00am--17:00pm Conference Sign in and Materials Collection DAY 2 December 27, 2026 09:00am--17:30pm Opening Remarks, Keynote Session, Onsite Parallel Sessions DAY 3 December 28, 2026 09:00 am--17:00 pm Online Parallel Sessions Submission Methods: Full Paper (publication and oral presentation) Abstract (oral presentation only) Electronic Submission System: https://confsys.iconf.org/submission/icece2026 Or you could submit your paper by email directly via icece_conf@vip.163.com Contact: Ms. Rachel Cao Email: icece_conf@vip.163.com Tel: +86 13880104217</text:p>
          </table:table-cell>
          <table:table-cell table:number-columns-repeated="1013"/>
        </table:table-row>
        <table:table-row table:style-name="ro1">
          <table:table-cell table:style-name="ce2" office:value-type="string" calcext:value-type="string">
            <text:p>IEEE PSSGT 2026</text:p>
          </table:table-cell>
          <table:table-cell table:style-name="ce2" office:value-type="string" calcext:value-type="string">
            <text:p>IEEE--2026 2nd International Conference on Power System and Smart Grid Technologies (PSSGT 2026)</text:p>
          </table:table-cell>
          <table:table-cell table:style-name="ce2" office:value-type="float" office:value="57" calcext:value-type="float">
            <text:p>57</text:p>
          </table:table-cell>
          <table:table-cell table:style-name="ce2" office:value-type="float" office:value="30" calcext:value-type="float">
            <text:p>30</text:p>
          </table:table-cell>
          <table:table-cell table:style-name="ce3" office:value-type="date" office:date-value="2026-07-20" calcext:value-type="date">
            <text:p>2026-07-20</text:p>
          </table:table-cell>
          <table:table-cell table:number-columns-repeated="2"/>
          <table:table-cell table:style-name="ce2" office:value-type="string" calcext:value-type="string">
            <text:p>Chongqing, China</text:p>
          </table:table-cell>
          <table:table-cell table:style-name="ce2" office:value-type="string" calcext:value-type="string">
            <text:p>Oct 17, 2026 - Oct 19, 2026</text:p>
          </table:table-cell>
          <table:table-cell table:style-name="ce4" office:value-type="string" calcext:value-type="string">
            <text:p><text:a xlink:href="https://pssgt.org/" xlink:type="simple">https://pssgt.org/</text:a></text:p>
          </table:table-cell>
          <table:table-cell table:style-name="ce2" office:value-type="string" calcext:value-type="string">
            <text:p>Full name: 2026 2nd International Conference on Power System and Smart Grid Technologies Abbreviation: PSSGT 2026 Venue: Chongqing, China Time: October 17-19, 2026 Website: https://pssgt.org/index.html Co-hosted by: Chongqing University, China; The University of Tokyo, Japan 2026 2nd International Conference on Power System and Smart Grid Technologies (PSSGT 2026) is going to be held in Chongqing, China during October 17-19, 2026. Paper Publishing Accepted papers will be published into the PSSGT 2026 international conference proceedings by IEEE, which will be included in IEEE Xplore and submitted for Ei Compendex and Scopus. Call for papers The conference is soliciting state-of-the-art research papers in the following areas of interest: Smart Grid Architectures,National/Global Energy Interconnection,Smart Grid Strategy, Planning, and Standards, Smart Grid Architectures and Models,Smart Grid Security and Reliability Management Clean and Renewable Energy,Photovoltaic Systems and Solar Energy Engineering,Wind Energy Generation,Renewable Energy Grid,Renewable Energy Utilizations,Electric Vehicles and Vehicle-to-Grid (V2G) Power and Energy Engineering,Electricity Market and Power System Economics,Power Generation, Transmission and Distribution, Energy Storage and Distributed Energy Resources,Intelligent Monitoring and Outage Management Applications of smart grid to cyber and physical security systems,Microgrids,Energy storage and distributed energy resources,Intelligent monitoring and outage management Conference Schedule October 17, 2026(Morning)---Sign in and Collect Conference Materials October 17, 2026(Afternoon)---Conference Program Committee Meeting October 18, 2026(Morning)----Opening Remarks &amp; Keynote Speeches&amp;Group Photo October 18, 2026(Afternoon)----Invited speeches&amp;Parallel sessions October 19, 2026(Morning)----Parallel sessions October 19, 2026(Afternoon)----Academic Visit(pending) Submission and Contact Methods Submission Methods: https://confsys.iconf.org/submission/pssgt2026 E-mail: pssgt_contact@126.com Tel: +86-18117805914 Conference Specialist: Ms. Echo Xiong PSSGT 2026 can provide a platform for Power System and Smart Grid Technologies. For more conference information, please visit the conference website: https://pssgt.org/index.html</text:p>
          </table:table-cell>
          <table:table-cell table:number-columns-repeated="1013"/>
        </table:table-row>
        <table:table-row table:style-name="ro1">
          <table:table-cell table:style-name="ce2" office:value-type="string" calcext:value-type="string">
            <text:p>AEES 2026</text:p>
          </table:table-cell>
          <table:table-cell table:style-name="ce2" office:value-type="string" calcext:value-type="string">
            <text:p>2026 the 7th International Conference on Advanced Electrical and Energy Systems (AEES 2026)</text:p>
          </table:table-cell>
          <table:table-cell table:style-name="ce2" office:value-type="float" office:value="72" calcext:value-type="float">
            <text:p>72</text:p>
          </table:table-cell>
          <table:table-cell table:style-name="ce2" office:value-type="float" office:value="34" calcext:value-type="float">
            <text:p>34</text:p>
          </table:table-cell>
          <table:table-cell table:style-name="ce3" office:value-type="date" office:date-value="2026-07-20" calcext:value-type="date">
            <text:p>2026-07-20</text:p>
          </table:table-cell>
          <table:table-cell table:number-columns-repeated="2"/>
          <table:table-cell table:style-name="ce2" office:value-type="string" calcext:value-type="string">
            <text:p>Dalian, China</text:p>
          </table:table-cell>
          <table:table-cell table:style-name="ce2" office:value-type="string" calcext:value-type="string">
            <text:p>Sep 18, 2026 - Sep 20, 2026</text:p>
          </table:table-cell>
          <table:table-cell table:style-name="ce4" office:value-type="string" calcext:value-type="string">
            <text:p><text:a xlink:href="http://www.aees.org" xlink:type="simple">http://www.aees.org</text:a></text:p>
          </table:table-cell>
          <table:table-cell table:style-name="ce2" office:value-type="string" calcext:value-type="string">
            <text:p>★Full Name: 2026 the 7th International Conference on Advanced Electrical and Energy Systems (AEES 2026) ★Abbreviation: AEES 2026 ★Dates: September 18-20, 2026 ★Place: Dalian, China ★Website: http://www.aees.org ★2026 the 7th International Conference on Advanced Electrical and Energy Systems (AEES 2026) will be held in Dalian, China during September 18th - 20th, 2026. This conference is hosted by the School of Electrical Engineering at Dalian University of Technology in China, jointly organized by the School of Electrical and Control Engineering at Shenyang Jianzhu University, and co organized by the Electrical Intelligent System and Application Professional Committee of the China Electrotechnical Society and the Intelligent Power Equipment and System Professional Committee of the China Electrical Engineering Society. ****** ★Conference Committees Conference Chairs Enyuan Dong, Dalian University of Technology, China Om Malik, University of Calgary, Canada Technical Program Chairs Wenfu Wei, Southwest Jiaotong University, China Zhifang Yang, Chongqing University, China Jianning Yin, Xi'an University of Technology, China Vijay K. Sood, Ontario Technical University, Canada Technical Program Co-chairs Zhonggang Yin, Xi'an University of Technology, China Xian Cheng, Zhengzhou University, China Shuaibing Li, Lanzhou Jiaotong University, China ****** ★Publication After a careful reviewing process, all accepted papers after proper registration and presentation, will be published in the AEES 2026 Conference Proceedings, indexed by Ei-Compendex &amp; Scopus. ****** ★Publication History AEES 2025 - IEEE | ISBN: 979-8-3315-8620-1 | Ei-Compendex &amp; Scopus AEES 2024 - IEEE | ISBN: 979-8-3315-1771-7 | Ei-Compendex &amp; Scopus AEES 2023 - IEEE | ISBN: 979-8-3503-4264-2 | Ei-Compendex &amp; Scopus AEES 2022 - IEEE | ISBN: 978-1-6654-7207-4 | Ei-Compendex &amp; Scopus AEES 2021 - Journal of Physics: Conference Series, Vol. 2022 | Ei-Compendex &amp; Scopus AEES 2020 - IOP Conference Series: Earth and Environmental Science, Vol. 582 | Ei-Compendex &amp; Scopus ****** ★Call for Papers Track 1: Intelligent power equipment disconnection technology Track 2: High Voltage Track 3: Power System Analysis and Optimization Track 4: Renewable Energy Sources and Integration Track 5: Energy Conversion and Management More topics, please visit http://www.aees.org/cfp.html ****** ★Submission (Both full paper and abstract can be accepted, but only full paper will be published on conference proceedings.) Submission System: https://easychair.org/conferences/?conf=aees2026 Submission Template: Word Template: http://www.aees.org/IEEE-Formatting.docx Latex Template: http://www.aees.org/ieee-latex-conference-template.zip ****** ★Contact us Conference Secretary of AEES | Ms. Katharine Shui Conference Information | Ms. Saya Shen Conference Email: aees2020@126.com Tel: +86-(0)28-83533337</text:p>
          </table:table-cell>
          <table:table-cell table:number-columns-repeated="1013"/>
        </table:table-row>
        <table:table-row table:style-name="ro1">
          <table:table-cell table:style-name="ce2" office:value-type="string" calcext:value-type="string">
            <text:p>IEEE ICPES 2026</text:p>
          </table:table-cell>
          <table:table-cell table:style-name="ce2" office:value-type="string" calcext:value-type="string">
            <text:p>IEEE--2026 The 16th International Conference on Power and Energy Systems (ICPES 2026)</text:p>
          </table:table-cell>
          <table:table-cell table:style-name="ce2" office:value-type="float" office:value="82" calcext:value-type="float">
            <text:p>82</text:p>
          </table:table-cell>
          <table:table-cell table:style-name="ce2" office:value-type="float" office:value="30" calcext:value-type="float">
            <text:p>30</text:p>
          </table:table-cell>
          <table:table-cell table:style-name="ce3" office:value-type="date" office:date-value="2026-07-20" calcext:value-type="date">
            <text:p>2026-07-20</text:p>
          </table:table-cell>
          <table:table-cell table:number-columns-repeated="2"/>
          <table:table-cell table:style-name="ce2" office:value-type="string" calcext:value-type="string">
            <text:p>Xi'an, China</text:p>
          </table:table-cell>
          <table:table-cell table:style-name="ce2" office:value-type="string" calcext:value-type="string">
            <text:p>Dec 4, 2026 - Dec 6, 2026</text:p>
          </table:table-cell>
          <table:table-cell table:style-name="ce4" office:value-type="string" calcext:value-type="string">
            <text:p><text:a xlink:href="https://www.icpes.org" xlink:type="simple">https://www.icpes.org</text:a></text:p>
          </table:table-cell>
          <table:table-cell table:style-name="ce2" office:value-type="string" calcext:value-type="string">
            <text:p>★ Full Conference Name: IEEE--2026 The 16th International Conference on Power and Energy Systems (ICPES 2026) ★ Conference Website: https://www.icpes.org/ ★ Conference Date: December 4-6, 2026 ★ Conference Venue: Xi'an, China ★ Co-organizers: Xi'an University of Technology; University of Electronic Science and Technology of China; IEEE ★ Organizing Institution: School of Electrical Engineering, Xi'an University of Technology The 16th International Conference on Power and Energy Systems (ICPES 2026) will be held in Xi'an, China from December 4 to 6, 2026, co-organized by Xi'an University of Technology, University of Electronic Science and Technology of China, and IEEE. Scholars worldwide are warmly invited to submit manuscripts and participate. With over a decade of development, ICPES has become a world-renowned high-level academic event in power and energy systems, dedicated to building an international exchange platform. Focusing on core directions (power engineering, renewable energy, energy storage, smart grids, etc.), it promotes integration of academic research and industrial practice. Key Conference Arrangements: Well-known experts will deliver keynote reports; excellent reports/papers will be selected to encourage young scholars. The conference also provides young researchers with opportunities to present achievements, communicate with top experts, and expand international cooperation networks. We sincerely invite global researchers to gather in Xi'an for in-depth exchanges, build industry consensus, and jointly promote the innovative and sustainable development of power and energy systems. Conference Publication All accepted papers will be included in the IEEE Xplore Digital Library and indexed by internationally renowned retrieval institutions such as Ei Compendex Core and Scopus. The proceedings of previous ICPES conferences have been published by IEEE and successfully indexed by Ei Compendex and Scopus. For details on the previous publication history, please visit: https://www.icpes.org/pub.html Call for Papers The topics of the conference include but are not limited to: Track 1. Electrical Power Engineering Track 2. Renewable Energy Technologies Track 3. Energy System Modelling &amp; Sustainability Track 4. Digitalization &amp; IT Applications Track 5. Energy Storage &amp; Conversion Track 6. Power System Stability &amp; Emerging Tech Track 7: Artificial Intelligence in Energy For more topics, please visit: https://www.icpes.org/cfp.html Submission Guidelines Language Requirement: English only Length Requirement: The number of pages of the paper shall be 4-12 pages, and it shall be typeset strictly in accordance with the conference template. Abstract Submission: For oral presentation only, not included in the conference proceedings. Submission Methods (Choose One): Online Submission System: https://easychair.org/conferences/?conf=icpes2026 Email Submission: icpes@outlook.com Detailed Submission Guidelines: https://www.icpes.org/submission.html Conference Schedule December 4: Registration &amp; Academic Visit December 5: Opening Ceremony + Keynote Speech + Invited Speech + Author Presentations December 6: Author Presentations Conference Venue Venue: Xi'an University of Technology Detailed Address Information: https://www.icpes.org/venue.html Conference City - Xi'an Xi'an, formerly known as Chang'an, is the ancient capital of thirteen dynasties, the starting point of the ancient Silk Road, as well as a national central city and an important science and education base in western China. Located at the southern foot of the Qinling Mountains and the northern bank of the Weihe River, it not only embodies the glorious cultural heritage of the Zhou, Qin, Han and Tang dynasties (world heritage sites such as the Terracotta Army, the Ancient City Wall, and the Giant Wild Goose Pagoda), but also gathers top universities and scientific research forces such as Xi'an Jiaotong University and Northwestern Polytechnical University, boasting strong strength in fields such as energy, power, and electronic information. As a core hub of the "Belt and Road" Initiative, Xi'an combines profound historical heritage with modern scientific and technological innovation vitality, making it an ideal place for holding international academic conferences. Contact Information Conference Secretary: Ms. Wu Phone: +86-132-9000-0002 Email: icpes@outlook.com; icpes_group@163.com (Office Time 9:30 - 18:00, Time zone: GMT+8; Monday to Friday) WeChat ID: iconf-ee-1 (Please note the conference abbreviation "ICPES 2026" when adding via WeChat)</text:p>
          </table:table-cell>
          <table:table-cell table:number-columns-repeated="1013"/>
        </table:table-row>
        <table:table-row table:style-name="ro1">
          <table:table-cell table:style-name="ce2" office:value-type="string" calcext:value-type="string">
            <text:p>IEEE ICSGE 2026</text:p>
          </table:table-cell>
          <table:table-cell table:style-name="ce2" office:value-type="string" calcext:value-type="string">
            <text:p>2026 The 2nd IEEE International Conference on Smart Grid and Energy (IEEE ICSGE 2026)</text:p>
          </table:table-cell>
          <table:table-cell table:style-name="ce2" office:value-type="float" office:value="82" calcext:value-type="float">
            <text:p>82</text:p>
          </table:table-cell>
          <table:table-cell table:style-name="ce2" office:value-type="float" office:value="30" calcext:value-type="float">
            <text:p>30</text:p>
          </table:table-cell>
          <table:table-cell table:style-name="ce3" office:value-type="date" office:date-value="2026-07-20" calcext:value-type="date">
            <text:p>2026-07-20</text:p>
          </table:table-cell>
          <table:table-cell table:number-columns-repeated="2"/>
          <table:table-cell table:style-name="ce2" office:value-type="string" calcext:value-type="string">
            <text:p>Paris, France</text:p>
          </table:table-cell>
          <table:table-cell table:style-name="ce2" office:value-type="string" calcext:value-type="string">
            <text:p>Dec 3, 2026 - Dec 5, 2026</text:p>
          </table:table-cell>
          <table:table-cell table:style-name="ce4" office:value-type="string" calcext:value-type="string">
            <text:p><text:a xlink:href="http://www.icsge.org/" xlink:type="simple">http://www.icsge.org/</text:a></text:p>
          </table:table-cell>
          <table:table-cell table:style-name="ce2" office:value-type="string" calcext:value-type="string">
            <text:p>※IEEE ICSGE 2026 ※ Paris, France | December 3-5, 2026 ※ Scopus &amp;EI Compendex Full Name: 2026 The 2nd IEEE International Conference on Smart Grid and Energy (IEEE ICSGE 2026) Abbreviation: IEEE ICSGE 2026 *Place: Paris, France *Time: December 3-5, 2026 *Website: http://www.icsge.org/ Sponsored by Université de Bretagne Occidentale, France; Institut de Recherche Dupuy de Lôme, France; Institut supérieur de l'électronique et du numérique, France ★=Publication= All accepted (Registered &amp; Presented) papers of ICSGE2026 will be collected in the IEEE conference proceedings and included in IEEE Xplore, which will be indexed by EI Compendex and Scopus, etc. ICSGE 2025 has been published online by IEEE and indexed by Scopus and EI Compendex. ★=Paper Submission= *All papers must be written in English. Word Template Download: https://www.icsge.org/files/IEEE%20Template.docx Latex Template Download: https://www.icsge.org/files/IEEE-conference-proceeding-Latex.rar Submission link: https://easychair.org/conferences?conf=icsge2026 or Send to Email: icsge_contact@academic.net ★=Committee= Advisory Chair Kai Strunz, Technical University of Berlin, Germany Conference Chairs Mohamed Benbouzid, University of Brest, France Elmar Bollin, Offenburg University of Applied Sciences, Germany Program Chairs Emmanuel DELALEAU, ENI Brest, France Demba Diallo, University of Paris-Saclay, France Carlos Felgueiras, Polytechcnic of Porto, Portugal M. S. Muyeen, Qatar University, Qatar Local Chair Yassine Amirat, ISEN Yncréa Ouest, France Regional Chairs Patrizia Beraldi,University of Calabria, Italy Antonio Violi, University of Sannio, Italy Jean Frédéric Charpentier, Ecole Navale, France Publicity Chairs Elhoussin ELBOUCHIKHI: ISEN Yncréa Ouest, France Teresa DONATEO, University of Salento,Italy ★=Topics (included but not limited)= ► Grid Technologies Microgrid, smart grid, cloud system Large power grid security control Communication-based control and protection Energy transfer and interaction technology Smart sensors and advanced metering infrastructure Smart grid safety and reliability Smart grid testing and evaluation technology Smart grid implementation and field test Smart grid network and communication Smart grid network and physical security ► Energy Systems Smart grid strategy Power Electronics and Energy Conversion Energy storage and management Electronic smart meters for transmission technology Embedded and autonomous systems Distributed resource integration National/Global Energy Interconnection Smart grid technology and equipment Smart grid architecture and model ►Green Technology Energy saving Sustainable development Sustainable energy policy Renewable energy Green technology Green energy Progress in green energy technology The future of green energy systems Nano environmental technology ★=Contact us= Conference Secretary: Sara Young E-mail: icsge_contact@academic.net Tel: (86) 134-0855-5552 (CN) (00) 1 6193091099 (EN) Website: http://www.icsge.org/</text:p>
          </table:table-cell>
          <table:table-cell table:number-columns-repeated="1013"/>
        </table:table-row>
        <table:table-row table:style-name="ro1">
          <table:table-cell table:style-name="ce2" office:value-type="string" calcext:value-type="string">
            <text:p>IEEE CGEE 2026</text:p>
          </table:table-cell>
          <table:table-cell table:style-name="ce2" office:value-type="string" calcext:value-type="string">
            <text:p>IEEE--2026 7th International Conference on Clean and Green Energy Engineering (CGEE 2026)</text:p>
          </table:table-cell>
          <table:table-cell table:style-name="ce2" office:value-type="float" office:value="88" calcext:value-type="float">
            <text:p>88</text:p>
          </table:table-cell>
          <table:table-cell table:style-name="ce2" office:value-type="float" office:value="30" calcext:value-type="float">
            <text:p>30</text:p>
          </table:table-cell>
          <table:table-cell table:style-name="ce3" office:value-type="date" office:date-value="2026-07-20" calcext:value-type="date">
            <text:p>2026-07-20</text:p>
          </table:table-cell>
          <table:table-cell table:number-columns-repeated="2"/>
          <table:table-cell table:style-name="ce2" office:value-type="string" calcext:value-type="string">
            <text:p>Split, Croatia</text:p>
          </table:table-cell>
          <table:table-cell table:style-name="ce2" office:value-type="string" calcext:value-type="string">
            <text:p>Sep 12, 2026 - Sep 14, 2026</text:p>
          </table:table-cell>
          <table:table-cell table:style-name="ce4" office:value-type="string" calcext:value-type="string">
            <text:p><text:a xlink:href="https://www.cgee.org/" xlink:type="simple">https://www.cgee.org/</text:a></text:p>
          </table:table-cell>
          <table:table-cell table:style-name="ce2" office:value-type="string" calcext:value-type="string">
            <text:p>Full Name: IEEE--2026 7th International Conference on Clean and Green Energy Engineering (CGEE 2026) Abbreviation: CGEE 2026 Welcome to join in the 2026 7th International Conference on Clean and Green Energy Engineering, which will be held in Split, Croatia from September 12-14, 2026 Paper Publishing： For papers submitted to CGEE 2026, accepted and presented papers at the conference will be published in the proceedings of CGEE 2026 and included into IEEE Xplore, which will be sent to EI Compendex, Scopus for indexing. A set of selected papers with extended version (at least 40% new content) will be sent to Journal of Energy – Energija for review and published as regular papers after the conference, which will be indexed by Inspec, Google Scholar and Scilit. CGEE 2025 Conference Proceedings available in IEEE Xplore, will be indexed by EI Compendex, and Scopus. CGEE 2024 Conference Proceedings available in IEEE Xplore, indexed by EI Compendex, and Scopus. CGEE 2023 Conference Proceedings available in IEEE Xplore, indexed by EI Compendex, and Scopus. CGEE 2022 Conference Proceedings available in IEEE Xplore, indexed by EI Compendex, and Scopus. Conference Venue: Split, Croatia Call For Paper 1. Clean and Renewable Energy Technologies Clean Energy Systems and Technologies Solar Energy Engineering Biomass Energy Engineering Wind Energy Engineering Hydrogen and Fuel Cell Nuclear Energy Engineering 2. Energy Storage and Saving Technologies Energy Materials Storage Technology Energy-saving Technology Energy Chemical Engineering Energy-efficient Lighting Products and Technologies Gasification Green Energy Systems Green Power Production and Cogeneration CO2 Capture, Storage, and Utilization Exergetic and Exergoeconomic Analyses The method for submitting your paper: Electronic Submission system: https://confsys.iconf.org/submission/CGEE2026 Please feel free contact with us: Paulina Aydogan (Conference Secretary) E-mail: cgeeconf@163.com For more information about international conferences, please visit our conference website: CGEE 2026 Website: https://www.cgee.org/</text:p>
          </table:table-cell>
          <table:table-cell table:number-columns-repeated="1013"/>
        </table:table-row>
        <table:table-row table:style-name="ro1">
          <table:table-cell table:style-name="ce2" office:value-type="string" calcext:value-type="string">
            <text:p>IEEE PEIE 2026</text:p>
          </table:table-cell>
          <table:table-cell table:style-name="ce2" office:value-type="string" calcext:value-type="string">
            <text:p>2026 IEEE International Conference on Power Engineering and Industrial Electronics (PEIE 2026)</text:p>
          </table:table-cell>
          <table:table-cell table:style-name="ce2" office:value-type="float" office:value="40" calcext:value-type="float">
            <text:p>40</text:p>
          </table:table-cell>
          <table:table-cell table:style-name="ce2" office:value-type="float" office:value="28" calcext:value-type="float">
            <text:p>28</text:p>
          </table:table-cell>
          <table:table-cell table:style-name="ce3" office:value-type="date" office:date-value="2026-07-20" calcext:value-type="date">
            <text:p>2026-07-20</text:p>
          </table:table-cell>
          <table:table-cell table:number-columns-repeated="2"/>
          <table:table-cell table:style-name="ce2" office:value-type="string" calcext:value-type="string">
            <text:p>Xi'an, China</text:p>
          </table:table-cell>
          <table:table-cell table:style-name="ce2" office:value-type="string" calcext:value-type="string">
            <text:p>Oct 16, 2026 - Oct 19, 2026</text:p>
          </table:table-cell>
          <table:table-cell table:style-name="ce4" office:value-type="string" calcext:value-type="string">
            <text:p><text:a xlink:href="https://peie.org/" xlink:type="simple">https://peie.org/</text:a></text:p>
          </table:table-cell>
          <table:table-cell table:style-name="ce2" office:value-type="string" calcext:value-type="string">
            <text:p>Full name: 2026 IEEE International Conference on Power Engineering and Industrial Electronics Abbreviation: PEIE 2026 October 16-19, 2026 | Xi'an, China More details, please visit: https://peie.org/ ★ ★ ★ Dear Scholars and Researchers, You are cordially to participate in the 2026 IEEE International Conference on Power Engineering and Industrial Electronics (PEIE 2026). Sponsored by IEEE and Xi'an University of Technology, patroned by Zhejiang University, Shanghai Jiao Tong University, Lanzhou Jiaotong University, Zhejiang University of Technology, Chang'an University, Harbin Institute of Technology, China, Cardiff University, UK, this prestigious event will be held from October 16-19, 2026, in the historic and culturally rich city of Xi'an, China. Providing an international symposium for sharing knowledge and results in theory, methodology and new advances and research results. We will be thankful for the contributions to PEIE 2026. * PEIE 2026 has been included in IEEE Conference List: https://conferences.ieee.org/conferences_events/conferences/conferencedetails/72167 【Awards】 Young Scientist Award Outstanding Reviewer Award Outstanding Organization Award Best Student Paper Award Best Industrial Paper Award Outstanding PhD Student Award Best Oral Presentation Award Best Poster Presentation Award 【Proceedings】 Accepted papers that fall within the technical scope of the IEEE will be published into IEEE Conference Proceedings, which will be included in IEEE Xplore, and submitted for indexing of Ei Compendex &amp; Scopus after conference. 【Keynote Speakers】 Wei Xu, University of Chinese Academy of Sciences (Fellow of IEEE, IET) Jamshid Aghaei, CQUniversity Australia (H-index: 77) More speakers to be announced. 【Special Sessions】 Special Session I: Key Technologies and Implementation Paths of Relay Protection for New Power Systems Chairs: Zainan Li, Chongqing University, China Yang Bin, Hebei University of Technology, China Lu Wenchao, Xi'an University of Technology, China Special Session II : Electrical Fault Detection Chairs: Yankai Xing, Chengdu University of Technology, China Ze Yang, Chengdu University of Technology, China Special Session III : Electric–Traffic–Hydrogen Nexus and Industrial Flexibility for Low-Carbon Grid Chairs: Kecheng He, Lanzhou Jiaotong University, China Xinxiong Jiang, Wuhan University, China Special Session IV : Key Technologies of Power Switching Equipment and Technologies for Emerging Power Systems Chairs: Siyuan Liu, Xi'an Jiaotong University, China Hongxu Li, Hohai University, China 【Submission】 By online submission system: https://www.zmeeting.org/submission/peie2026 【Call for Papers】 https://peie.org/cfp.html -Included but not limited: * Power Engineering and Energy Systems Power Systems and Automation Smart Grids Power System Stability and Control Power System Protection Renewable Energy Systems Integration Advanced Power Semiconductors High-Frequency Converters and Novel Topologies Electrical Machines and Apparatus Electric Drives and Control Wireless Power Transfer AI and Big Data for Power Systems Modeling and Simulation of Power Systems Internet of Things (IoT) and Cyber-Physical Systems Image Processing and Machine Vision * Industrial Electronics and Intelligent Applications Advanced Control Theory and Applications Industrial Automation and Smart Manufacturing Robotics and Mechatronics Sensor and Actuator Technologies Sustainable Energy Generation and Storage Technologies Energy Storage Devices and Systems Transportation Electrification (including Electric Vehicles and Charging Infrastructure) Energy Efficiency and Conservation Plasma Science and Applications Superconducting Technology and Applications Biomedical Electronics Emerging Electrical Materials and Processes .... 【Call for Special Session】 https://peie.org/ss.html The PEIE2026 conference seeks timely, relevant, and practical special session topics. Special session proposals should be submitted in PDF format via email to peie-official@outlook.com. Proposals should include the following information: Title and Abstract: Suggest a title and a brief abstract of no more than approximately 100 words to help conference participants understand the theme and focus of the special session. Proposed Speakers: Provide personal information (name, affiliation) and biographies of all organizers and speakers. Special sessions are typically expected to have 5-8 papers. The committee will select proposals based on the topic, the quality of the outlined papers, and the qualifications of the contributors. 【Venue】 Holiday Inn Xi'an Big Goose Pagoda (Pending) Add: No 398 South 2nd Ring Road, Xi'an, Shaanxi 710061 【Contact us】 Ms. Maggie Xu Email: peie-official@outlook.com Tel: +86 180 8007 5398 Wechat: iconf-ee-1</text:p>
          </table:table-cell>
          <table:table-cell table:number-columns-repeated="1013"/>
        </table:table-row>
        <table:table-row table:style-name="ro1">
          <table:table-cell table:style-name="ce2" office:value-type="string" calcext:value-type="string">
            <text:p>IEEE PREE 2026</text:p>
          </table:table-cell>
          <table:table-cell table:style-name="ce2" office:value-type="string" calcext:value-type="string">
            <text:p>IEEE--2026 4th International Conference on Power and Renewable Energy Engineering (PREE 2026)</text:p>
          </table:table-cell>
          <table:table-cell table:style-name="ce2" office:value-type="float" office:value="60" calcext:value-type="float">
            <text:p>60</text:p>
          </table:table-cell>
          <table:table-cell table:style-name="ce2" office:value-type="float" office:value="30" calcext:value-type="float">
            <text:p>30</text:p>
          </table:table-cell>
          <table:table-cell table:style-name="ce3" office:value-type="date" office:date-value="2026-07-25" calcext:value-type="date">
            <text:p>2026-07-25</text:p>
          </table:table-cell>
          <table:table-cell table:number-columns-repeated="2"/>
          <table:table-cell table:style-name="ce2" office:value-type="string" calcext:value-type="string">
            <text:p>Tokyo, Japan</text:p>
          </table:table-cell>
          <table:table-cell table:style-name="ce2" office:value-type="string" calcext:value-type="string">
            <text:p>Oct 3, 2026 - Oct 6, 2026</text:p>
          </table:table-cell>
          <table:table-cell table:style-name="ce4" office:value-type="string" calcext:value-type="string">
            <text:p><text:a xlink:href="http://www.pree.net" xlink:type="simple">http://www.pree.net</text:a></text:p>
          </table:table-cell>
          <table:table-cell table:style-name="ce2" office:value-type="string" calcext:value-type="string">
            <text:p>IEEE--2026 4th International Conference on Power and Renewable Energy Engineering (PREE 2026) October 3-6, 2026 &amp; Tokyo, Japan Website: http://www.pree.net Dear distinguished scholars from around the globe： With sincere and fervent enthusiasm, we extend to you an invitation to attend 2026 4th International Conference on Power and Renewable Energy Engineering (PREE 2026) will be held in Tokyo, Japan during October 3-6, 2026. Scholars who are interested are welcome to submit ingeniously creative papers for presentation at PREE 2026. All submissions will be sent for double-blind review. Accepted papers with registration and presentation will be published in Conference Proceedings by IEEE, which will be included in IEEE Xplore and indexed by EI Compendex and Scopus, etc. Advisory Chairs Atsuo Kawamura, Yokohama National University, Japan (IEEE PES Member, IEEE Life Fellow) Takashi Hiyama, Kumamoto University, Japan (IEEE PES Member, IEEE Life Fellow) Kenji Ushimaru, Infra Innovations, Inc., USA (IEEE PES Member) General Chair Masayuki Morimoto, Kanagawa University, Japan (IEEE Life Member, IEEJ Fellow) Conference Co-Chair Hirohito Yamada, Tohoku University, Japan (IEEE Photonics Society Member) Program Chairs Juri Jatskevich, University of British Columbia, Canada (IEEE PES Member, IEEE Fellow) Kien Wen Sun, National Yang Ming Chiao Tung University, Taiwan Program Co-Chairs Tek-Tjing Lie, Auckland University of Technology, New Zealand (IEEE PES Member) Bo Jie, The University of Tokyo, Japan (IEEE PES Member) Publicity Chairs Daigo Yonetsu, Kansai University, Japan Jun Hieng Kiat, Universiti Tunku Abdul Rahman, Malaysia Publicity Committee Rozaimi Ghazali, Universiti Teknikal Malaysia Melaka, Malaysia Paprapee Buason, Los Alamos National Laboratory in Los Alamos, USA Publication Chairs CHEUNG Chun Ching, City University of Hong Kong, Hong Kong Elaine Chou, Tohoku University, Japan Treasurer Ngoc Hieu Pham, Saigon University, Vietnam &gt;&gt;For more committees, you can visit: https://www.pree.net/committee.html Looking forward to Committees in 2026! Prof. King-Jet Tseng, Singapore Institute of Technology, Singapore (IEEE Fellow, IET Fellow, IES Fellow) &gt;&gt;For more details, you can visit: https://www.pree.net/keynote-speaker.html Looking forward to keynote speaker in 2026! Prof. Kien Wen Sun, National Yang Ming Chiao Tung University, Taiwan Assoc. Prof. Daigo Yonetsu, Kansai University, Japan Prof. Kwan San Oscar Hui, Prince Mohammad Bin Fahd University, Saudi Arabia Assoc. Prof. Kwati Leonard, Kyushu University, Japan Prof. Muammer Koc, Hamad bin Khalifa University, Qatar Dr. Daisuke Kodaira, University of Tsukuba, Japan Assoc. Prof. Kwun Nam Hui, University of Macau, China Dr. Yukai Wang, Tokyo University of Science, Japan Assoc. Prof. Hironobu Matsuo, Shizuoka University, Japan Assoc. Prof. Shinya Sekizaki, Hiroshima University, Japan Dr. Bo Jie, The University of Tokyo, Japan Dr. Nanae Kaneko, Waseda University, Japan &gt;&gt;For more details, you can visit: https://www.pree.net/invited-speaker.html Looking forward to invited speakers in 2026! Wind energy systems Renewable energy utilizations Energy-saving technology Power electronics Grid and off-grid issues Remote area power supply Power system technology Sustainable energy and environment Energy security and clean use &gt;&gt; For more details, you can visit: https://www.pree.net/cfp.html 1. Full Paper (Publication &amp; Presentation) Minimum Page: 4 Pages. Accepted and registered full papers will be published into the conference proceedings, authors will be invited to give oral presentation at site. 2. Abstract (Presentation ONLY) Abstract registration is for Presentation ONLY. The abstract will NOT be published. 1. You can submit your paper via submission system: https://confsys.iconf.org/submission/pree2026 2. Or directly send to the conference email box: pree_secretary@vip.163.com &gt;&gt; For more details, you can learn through: https://www.pree.net/submission.html Conference Secretary: Ms. Rachel Liu Email: pree_secretary@vip.163.com Working Time: 9:30 - 18:00 (Time zone: GMT+8, Monday to Friday) Seize this chance to present your cutting-edge research findings, play a pivotal role in propelling the progress of power and renewable energy engineering, and engage in in-depth dialogues with distinguished scholars in the field. Don't hesitate! Submit your full paper or abstract and become an integral part of PREE 2026. We are eagerly anticipating your arrival in Tokyo.</text:p>
          </table:table-cell>
          <table:table-cell table:number-columns-repeated="1013"/>
        </table:table-row>
        <table:table-row table:style-name="ro1">
          <table:table-cell table:style-name="ce2" office:value-type="string" calcext:value-type="string">
            <text:p>ICPEE 2026</text:p>
          </table:table-cell>
          <table:table-cell table:style-name="ce2" office:value-type="string" calcext:value-type="string">
            <text:p>2026 10th International Conference on Power and Energy Engineering (ICPEE 2026)</text:p>
          </table:table-cell>
          <table:table-cell table:style-name="ce2" office:value-type="float" office:value="78" calcext:value-type="float">
            <text:p>78</text:p>
          </table:table-cell>
          <table:table-cell table:style-name="ce2" office:value-type="float" office:value="35" calcext:value-type="float">
            <text:p>35</text:p>
          </table:table-cell>
          <table:table-cell table:style-name="ce3" office:value-type="date" office:date-value="2026-07-25" calcext:value-type="date">
            <text:p>2026-07-25</text:p>
          </table:table-cell>
          <table:table-cell table:number-columns-repeated="2"/>
          <table:table-cell table:style-name="ce2" office:value-type="string" calcext:value-type="string">
            <text:p>Chengdu, China</text:p>
          </table:table-cell>
          <table:table-cell table:style-name="ce2" office:value-type="string" calcext:value-type="string">
            <text:p>Dec 26, 2026 - Dec 28, 2026</text:p>
          </table:table-cell>
          <table:table-cell table:style-name="ce4" office:value-type="string" calcext:value-type="string">
            <text:p><text:a xlink:href="https://www.icpee.org" xlink:type="simple">https://www.icpee.org</text:a></text:p>
          </table:table-cell>
          <table:table-cell table:style-name="ce2" office:value-type="string" calcext:value-type="string">
            <text:p>Full name: 2026 10th International Conference on Power and Energy Engineering (ICPEE 2026) Abbreviation: ICPEE 2026 2026 10th International Conference on Power and Energy Engineering (ICPEE 2026) to be held in Chengdu, China during December 26-28, 2026. Conference Website: https://www.icpee.org The conference aims to address key challenges in the field and explore innovative solutions in areas such as power generation, energy conversion, grid integration, energy management, and sustainability. Participants of the conference will have the opportunity to present their research findings, showcase technological advancements, and discuss case studies. The conference program will include keynote speeches, technical sessions, workshops, and panel discussions, providing a conducive environment for collaboration and networking among participants from academia, industry, and government sectors. Paper Publishing Accepted full papers will be published into ICPEE 2026 International Conference Proceedings. Call for paper 1. Cyber-Physical Systems 2. Electrical Machines &amp; Drives 3. Energy Harvesting and Interfacing of Energy Sources 4. Integrated Energy Systems 5. Power and Energy Circuits and Systems 6. Power Disaster and Protection 7. Power Electronics and its Applications in Smart Grids 8. Power IOT 9. Power Market 10. Power Quality, Protection and Electromagnetic Compatibility 11. Power System Analysis 12. Power System Resilience 13. Renewable &amp; Sustainable Energy Technologies 14. Smart Energy Grids 15. Smart Grid Technologies and Utility Applications 16. Wide Bandgap Semiconductors for Power Electronics 17. Artificial Intelligence Applications for Power Electronics Submission Guideline Electronic Submission System: https://confsys.iconf.org/submission/icpee2026_1 Paper Page Limits: Regular Papers: 5-8 pages, including the abstract, all figures, tables, and references. Abstract Submission: For those a few authors who don't expect any publication of your abstracts, please submit the abstracts to us for presentation at the conference without publishing. Contact Methods E-mail: icpee@academic.net Conference Specialist: Ms. Rachyl Hou ICPEE 2026 can provide a platform for academic communication in Power and Energy Engineering. For more conference information, please visit the conference website:https://www.icpee.org/index.html</text:p>
          </table:table-cell>
          <table:table-cell table:number-columns-repeated="1013"/>
        </table:table-row>
        <table:table-row table:style-name="ro1">
          <table:table-cell table:style-name="ce2" office:value-type="string" calcext:value-type="string">
            <text:p>ICREC 2026</text:p>
          </table:table-cell>
          <table:table-cell table:style-name="ce2" office:value-type="string" calcext:value-type="string">
            <text:p>2026 11th International Conference on Renewable Energy and Conservation (ICREC 2026)</text:p>
          </table:table-cell>
          <table:table-cell table:style-name="ce2" office:value-type="float" office:value="78" calcext:value-type="float">
            <text:p>78</text:p>
          </table:table-cell>
          <table:table-cell table:style-name="ce2" office:value-type="float" office:value="35" calcext:value-type="float">
            <text:p>35</text:p>
          </table:table-cell>
          <table:table-cell table:style-name="ce3" office:value-type="date" office:date-value="2026-07-25" calcext:value-type="date">
            <text:p>2026-07-25</text:p>
          </table:table-cell>
          <table:table-cell table:number-columns-repeated="2"/>
          <table:table-cell table:style-name="ce2" office:value-type="string" calcext:value-type="string">
            <text:p>Rome, Italy</text:p>
          </table:table-cell>
          <table:table-cell table:style-name="ce2" office:value-type="string" calcext:value-type="string">
            <text:p>Nov 20, 2026 - Nov 22, 2026</text:p>
          </table:table-cell>
          <table:table-cell table:style-name="ce4" office:value-type="string" calcext:value-type="string">
            <text:p><text:a xlink:href="http://www.icrec.org/" xlink:type="simple">http://www.icrec.org/</text:a></text:p>
          </table:table-cell>
          <table:table-cell table:style-name="ce2" office:value-type="string" calcext:value-type="string">
            <text:p>ICREC 2026 2026 11th International Conference on Renewable Energy and Conservation (ICREC 2026) Rome, Italy November 20-22, 2026 http://www.icrec.org/ Publication: ICREC 2026 all accepted papers will be published into ICREC Conference Proceedings, which submitted for Ei Compendex, Scopus, et al. Call for Papers: New Trends and Technologies for RESSs Policies and Strategies for RESSs Energy Transformation from Renewable Energy System (RES) to Grid Novel Energy Conversion Studies for RESs Power Devices and Driving Circuits for RESs Control Techniques for RESs Grid Interactive Systems Used in Hybrid RESs Performance Analysis of RESs Hybrid RESSs Decision Support Systems for RESSs Renewable Energy Research and Applications for Industries RESSs for Electrical Vehicles and Components Artificial Intelligence and Machine Learning Studies for RESs and Applications Computational Methods for RESSs More topics: http://www.icrec.org/cfp.html Submission Methods: Full Paper (publication and oral presentation) Abstract (oral presentation only) Electronic Submission System (.pdf) http://confsys.iconf.org/submission/icrec2026 or send it directly to conference email: icrec_conf@163.com Contacts: Ms. Nina Lee E-mail: icrec_conf@163.com Tel: +86-19382255134</text:p>
          </table:table-cell>
          <table:table-cell table:number-columns-repeated="1013"/>
        </table:table-row>
        <table:table-row table:style-name="ro1">
          <table:table-cell table:style-name="ce2" office:value-type="string" calcext:value-type="string">
            <text:p>IEEE ICPE 2026</text:p>
          </table:table-cell>
          <table:table-cell table:style-name="ce2" office:value-type="string" calcext:value-type="string">
            <text:p>IEEE--2026 the 7th International Conference on Power Engineering (ICPE 2026)</text:p>
          </table:table-cell>
          <table:table-cell table:style-name="ce2" office:value-type="float" office:value="68" calcext:value-type="float">
            <text:p>68</text:p>
          </table:table-cell>
          <table:table-cell table:style-name="ce2" office:value-type="float" office:value="30" calcext:value-type="float">
            <text:p>30</text:p>
          </table:table-cell>
          <table:table-cell table:style-name="ce3" office:value-type="date" office:date-value="2026-07-25" calcext:value-type="date">
            <text:p>2026-07-25</text:p>
          </table:table-cell>
          <table:table-cell table:number-columns-repeated="2"/>
          <table:table-cell table:style-name="ce2" office:value-type="string" calcext:value-type="string">
            <text:p>Jilin, China</text:p>
          </table:table-cell>
          <table:table-cell table:style-name="ce2" office:value-type="string" calcext:value-type="string">
            <text:p>Nov 20, 2026 - Nov 23, 2026</text:p>
          </table:table-cell>
          <table:table-cell table:style-name="ce4" office:value-type="string" calcext:value-type="string">
            <text:p><text:a xlink:href="http://www.icpe.net/" xlink:type="simple">http://www.icpe.net/</text:a></text:p>
          </table:table-cell>
          <table:table-cell table:style-name="ce2" office:value-type="string" calcext:value-type="string">
            <text:p>Full name: IEEE--2026 the 7th International Conference on Power Engineering (ICPE 2026) Abbreviation: ICPE 2026 2026 the 7th International Conference on Power Engineering (ICPE) will take place in Jilin, China from November 20-23, 2026. Sponsored by Northeast Electric Power University, organized by School of Electrical Engineering of Northeast Electric Power University. The conference has patrons such as University of Electronic Science and Technology of China, University of Quebec at Trois-Rivieres, Harbin Institute of Technology(Shenzhen), Politecnico di Milano, Kunming University of Science and Technology, Northeastern University, Faculty of Engineering, Mansoura University, University of Ferrara, Horus University-Egypt, and others. Publication: Submissions will be peer-reviewed and evaluated based on originality, relevance to conference, contributions, and presentation. Accepted full papers will be collected in IEEE Conference Proceedings, Which can be included in IEEE Xplore, indexed by EI Compendex, SCOPUS, etc. ICPE papers for last four year have been published by Energy Reports and successfully indexed by SCI, SCOPUS (JA), EI COMPENDEX (JA) during one month after papers' online. ICPE 2024 &amp; 2025 conference proceedings have been successfully indexed by SCOPUS, EI COMPENDEX. Submission ways: Submit full paper or abstract to Submission System: http://www.easychair.org/conferences/?conf=icpe2026 Call for Papers: Track 1: Power and Energy Systems Track 2: Power System Planning, Operation &amp; Control Track 3: Electrical Machines and Drives Track 4: Power Electronics and Energy Storage Systems Track 5: Power Quality and Electromagnetic Compatibility Track 6: Power System Modeling and Simulation Track 7: Power System Analysis and Security For more topics, please visit: https://icpe.net/cfp.html Submission Types below: *Submitting an Abstract: Presentation Only *Submitting a full Paper: Publication and Presentation Call for Special Session Special-session proposals should be submitted by the prospective organizer(s) who will commit to promoting and handling the review process of their special session as Chairs or Co-Chairs of the event. Proposals should include the following information: Title of the Special Session General information of organizers (mail address of main contact person, biodata) Brief description of special session Scope and topics of of the special session Names of potential participants, such as program committee members and invited speakers Please send your proposal to icpe@sciei.org. Program November 20, 2026--Sign in and Collect Conference Materials November 21, 2026--Keynote Speech &amp; Presentation Day November 22, 2026--Presentation Day November 23, 2026--Presentation Day&amp;Optional One Day Visit (pending) Conference secretary: Miss. Amber Lin E-mail: For inquiry: icpe@sciei.org. For official notice: icpe_official@163.com Tel:+86 182-0777-7775 (Chinese &amp; English) | +1-562-606-1057 (English) ICPE Website: http://www.icpe.net/</text:p>
          </table:table-cell>
          <table:table-cell table:number-columns-repeated="1013"/>
        </table:table-row>
        <table:table-row table:style-name="ro1">
          <table:table-cell table:style-name="ce2" office:value-type="string" calcext:value-type="string">
            <text:p>IEEE IPEE 2026</text:p>
          </table:table-cell>
          <table:table-cell table:style-name="ce2" office:value-type="string" calcext:value-type="string">
            <text:p>IEEE--2026 2nd International Power and Electrical Engineering Conference (IPEE 2026)</text:p>
          </table:table-cell>
          <table:table-cell table:style-name="ce2" office:value-type="float" office:value="72" calcext:value-type="float">
            <text:p>72</text:p>
          </table:table-cell>
          <table:table-cell table:style-name="ce2" office:value-type="float" office:value="30" calcext:value-type="float">
            <text:p>30</text:p>
          </table:table-cell>
          <table:table-cell table:style-name="ce3" office:value-type="date" office:date-value="2026-07-30" calcext:value-type="date">
            <text:p>2026-07-30</text:p>
          </table:table-cell>
          <table:table-cell table:number-columns-repeated="2"/>
          <table:table-cell table:style-name="ce2" office:value-type="string" calcext:value-type="string">
            <text:p>Penang, Malaysia</text:p>
          </table:table-cell>
          <table:table-cell table:style-name="ce2" office:value-type="string" calcext:value-type="string">
            <text:p>Dec 11, 2026 - Dec 14, 2026</text:p>
          </table:table-cell>
          <table:table-cell table:style-name="ce4" office:value-type="string" calcext:value-type="string">
            <text:p><text:a xlink:href="https://ipee.net/" xlink:type="simple">https://ipee.net/</text:a></text:p>
          </table:table-cell>
          <table:table-cell table:style-name="ce2" office:value-type="string" calcext:value-type="string">
            <text:p>Full name: 2026 2nd International Power and Electrical Engineering Conference Abbreviation: IPEE 2026 Penang, Malaysia | December 11-14 , 2026 More details, please visit: https://ipee.net/ ★ ★ ★ 2026 2nd International Power and Electrical Engineering Conference will take place in Penang, Malaysia during December 11-14, 2026. IPEE 2026 is co-sponsored by IEEE Industry Applications Society, Universiti Sains Malaysia, Chongqing University and Tokyo University, Xiangtan University, co-organized by Wuxi University, Nanjing University of Information Science and Technology, Shanghai Jiao Tong University, Shanghai Energy-Saving Engineering Technology Association, Institute of Engineering Thermophysics, Chinese Academy of Sciences, Shanghai University of Electric Power, and WuXi Association of Automation. The key goal of the conference is aimed at bringing together academicians, scientists, engineers, and researchers working in various disciplines of these fields to exchange views as well as to share their expertise, experience and research results, and discuss the challenges and future directions in their specialized areas of research in these fields. We look forward to your participation! &gt;&gt;&gt; Conference Proceedings All accepted and registered papers will be published by IEEE Conference Proceedings, and submitted for Ei Compendex &amp; Scopus index. IPEE2025-IEEE ISBN: 979-8-3503-5755-4 (Ei&amp;Scopus) * SCI Special Issue IEEE Transactions on Industry Applications (E-ISSN: 1939-9367) JCR: Q1 CiteScore:9.9 Impact Factor: 4.4 Index: SCI, Ei Compendex, Scopus, etc. Up to 30% excellent papers of IPEE 2026 will be selected and recommended to IEEE Transactions on Industry Applications. &gt;&gt;&gt; Conference Awards - Young Scientist Award - Outstanding Organization Award - Outstanding Reviewer Award - Outstanding Student Paper Award - Outstanding Industrial Paper Award - Best Oral Presentation Award - Best Poster Presentation Award &gt;&gt;&gt; IPEE 2026 Tracks Track 1: Virtual Power Plant (Big Data Center, Energy Storage System) Chairs: Jian Wang, Shanghai Jiao Tong University, China Jiawei Dong, China Electric Power Research Institute, Co., Ltd, China Chunyang Gong, Shanghai University of Electric Power, China Track 2: Building Integrated Photovoltaic (BIPV) Chairs: Xiaoping Feng, Jiangnan University, China Shuiming Bian, Yangtze River Delta BIPV Research Institute, China Tao Ma, Shanghai Jiaotong University, China Track 3: Smart Energy Storage Power Stations and Operation Optimization Chairs: Hui Chen, Shanghai University of Electric Power, China Heng Chen, North China Electric Power University, China Track 4: Key Technologies and Applications of DC Systems Chairs: Jinbin Zhao, Shanghai University of Electric Power, China Wei Jia, Shanghai Institute of Space Power-Sources, China Yuanjun Hou, Shanghai Dayu Information Technology Co., Ltd., China Track 5: Resilient Wireless Power Transfer Technologies: Advanced Control, Topology Design and System Characteristic Identification Chairs: Song Xu, Jiangsu University of Science and Technology, China Wei Jiang, Yangzhou Polytechnic Institute, China Seiji Hashimoto, Gunma University, Japan Track 6: AI for Future Energy Systems: Forecasting, Control, Security, and Sustainability Chair: Yi Su, Xiangtan University, China Track 7 Co-Optimization of Power and Computing Systems in Hybrid AC/DC Grids Chairs: Kai Gong, Zhejiang University, China Xu Wang, Shanghai Jiao Tong University, China Xiaolei Yuan, LUT University, Finland &gt;&gt;&gt; Call for Papers via: https://ipee.net/cfp.html (Included but not limited) - Advanced Power Semiconductors - Electrical Materials and Process - Electromagnetic and Applied Superconductivity - Electromagnetic Compatibility - Electromagnetic Transients Programs - Control Theory and Application - Diagnosis and Sensing Systems - Intelligent control systems - Inverter and Converter Technology - Power Electronics and Power Drives - High Voltage and Insulation Technology - High Voltage Engineering and Insulation Technology - Electric Vehicle Technologies - Power Market and Power System Economics - Power System Planning and Scheduling - Power Systems Deregulation &gt;&gt;&gt; Submission Online submission system: https://easychair.org/conferences/?conf=ipee2026 &gt;&gt;&gt; Conference Venue Penang Waterfront Convention Centre-Pending Add: 1B, PWCC, The Light City, Persiaran Pantai Sinaran, 11700 Gelugor, Penang, Malaysia &gt;&gt;&gt; Contact us Secretary: Amy Hu Email: ipee_official@vip.163.com Wechat: iconf-ee-1</text:p>
          </table:table-cell>
          <table:table-cell table:number-columns-repeated="1013"/>
        </table:table-row>
        <table:table-row table:style-name="ro1">
          <table:table-cell table:style-name="ce2" office:value-type="string" calcext:value-type="string">
            <text:p>CSPE 2026</text:p>
          </table:table-cell>
          <table:table-cell table:style-name="ce2" office:value-type="string" calcext:value-type="string">
            <text:p>IEEE--2026 International Conference on Computational Science and Power Engineering (CSPE 2026)</text:p>
          </table:table-cell>
          <table:table-cell table:style-name="ce2" office:value-type="float" office:value="82" calcext:value-type="float">
            <text:p>82</text:p>
          </table:table-cell>
          <table:table-cell table:style-name="ce2" office:value-type="float" office:value="25" calcext:value-type="float">
            <text:p>25</text:p>
          </table:table-cell>
          <table:table-cell table:style-name="ce3" office:value-type="date" office:date-value="2026-07-30" calcext:value-type="date">
            <text:p>2026-07-30</text:p>
          </table:table-cell>
          <table:table-cell table:number-columns-repeated="2"/>
          <table:table-cell table:style-name="ce2" office:value-type="string" calcext:value-type="string">
            <text:p>Hefei, Anhui, China</text:p>
          </table:table-cell>
          <table:table-cell table:style-name="ce2" office:value-type="string" calcext:value-type="string">
            <text:p>Nov 13, 2026 - Nov 15, 2026</text:p>
          </table:table-cell>
          <table:table-cell table:style-name="ce4" office:value-type="string" calcext:value-type="string">
            <text:p><text:a xlink:href="http://www.cspe.org" xlink:type="simple">http://www.cspe.org</text:a></text:p>
          </table:table-cell>
          <table:table-cell table:style-name="ce2" office:value-type="string" calcext:value-type="string">
            <text:p>★Full Name: 2026 the International Conference on Computational Science and Power Engineering ★Abbreviation: CSPE 2026 ★Dates: November 13-15, 2026 ★Location: Hefei, Anhui, China ★Website: www.cspe.org ★CSPE 2026 is sponsored by Hefei University of Technology, China, and hosted by School of Electrical Engineering and Automation of Hefei University of Technology, China. ****** Organizing Committees -Advisory Chair Lijian Ding, Vice President of Hefei University of Technology, China -Conference Committee Chairs Yuan Ge, Anhui Polytechnic University, China Bing Li, Hefei University of Technology, China Saad Mekhilef, Swinburne University of Technology, Australia &amp; University of Malaya, Malaysia Zhixin Wang, Shanghai Jiao Tong University, China Nianwen Xiang, Hefei University of Technology, China -Conference Committee Co-chair A. R.Al-Ali, American University of Sharjah, UAE Mingsan Ouyang, Anhui University of Science and Technology, China Jinping Wang, Hefei University of Technology, China Yujiao Zhang, Hefei University of Technology, China -Program Committee Chairs Hui Chen, Shanghai University of Electric Power, China Woongchul Choi, Kookmin University, South Korea Baiqiang Yin, Hefei University of Technology, China Miao Yu, Zhejiang University, China Rigui Zhou, Shanghai Maritime University, China Lei Zuo, Hefei University of Technology, China -Program Committee Co-Chairs Fei Wang, Shanghai University, China Haoyu Wang, ShanghaiTech University, China Zhiwei Chen, Hefei University of Technology, China Wenlong Ming, Cardiff University, UK ****** ★Publication All submissions will be peer reviewed by 2-3 reviewers. The registered and presented papers will be published into CSPE2026 Conference Proceedings. ****** ★Submission (Both full paper and abstract can be accepted but only full paper will be published on conference proceedings.) Submission System: https://easychair.org/conferences/?conf=cspe20260 Submission Template: https://www.cspe.org/IEEE-Formatting.docx Submission Inquery: cspe_conf@vip.163.com ****** ★Call for Papers Track 1: Computational models and algorithms Track 2: Simulation and modeling Track 3: Data Analysis in Power Systems Track 4: Renewable Energy Technologies Track 5: Automation and Control of Power Systems Track 6: Grid security and protection technology More topics, please click: https://www.cspe.org/cfp.html ****** ★Call for Special Sessions Proposal should include the following information: 1. Session title 2. Session overview or scope (abstract) 3. Contact information: organizer names and contact Email address 4. List of prospective papers including authors, affiliations, title, and Emil address Proposal: https://www.cspe.org/CSPE2026-Special-Session-Proposal-template.docx More information, please click: https://www.cspe.org/special.html ★CSPE Award *Young Investigator Award *Outstanding Organization Award *Best Paper Award *Best Student Paper Award *Best Industrial Paper Award *Outstanding Contribution Award *Outstanding Reviewer Award *Best Oral Presentation Award More information, please click: https://www.cspe.org/award.html ****** ★Contact us Conference Secretary: Ms. Greta Shen Conference Email: cspe_conf@vip.163.com</text:p>
          </table:table-cell>
          <table:table-cell table:number-columns-repeated="1013"/>
        </table:table-row>
        <table:table-row table:style-name="ro1">
          <table:table-cell table:style-name="ce2" office:value-type="string" calcext:value-type="string">
            <text:p>IEEE PCPE 2026</text:p>
          </table:table-cell>
          <table:table-cell table:style-name="ce2" office:value-type="string" calcext:value-type="string">
            <text:p>IEEE--2026 International Conference on Power Conversion and Power Engineering (PCPE 2026)</text:p>
          </table:table-cell>
          <table:table-cell table:style-name="ce2" office:value-type="float" office:value="68" calcext:value-type="float">
            <text:p>68</text:p>
          </table:table-cell>
          <table:table-cell table:style-name="ce2" office:value-type="float" office:value="28" calcext:value-type="float">
            <text:p>28</text:p>
          </table:table-cell>
          <table:table-cell table:style-name="ce3" office:value-type="date" office:date-value="2026-07-30" calcext:value-type="date">
            <text:p>2026-07-30</text:p>
          </table:table-cell>
          <table:table-cell table:number-columns-repeated="2"/>
          <table:table-cell table:style-name="ce2" office:value-type="string" calcext:value-type="string">
            <text:p>Hangzhou, China</text:p>
          </table:table-cell>
          <table:table-cell table:style-name="ce2" office:value-type="string" calcext:value-type="string">
            <text:p>Nov 27, 2026 - Nov 29, 2026</text:p>
          </table:table-cell>
          <table:table-cell table:style-name="ce4" office:value-type="string" calcext:value-type="string">
            <text:p><text:a xlink:href="https://www.pcpe.org/" xlink:type="simple">https://www.pcpe.org/</text:a></text:p>
          </table:table-cell>
          <table:table-cell table:style-name="ce2" office:value-type="string" calcext:value-type="string">
            <text:p>Full name: International Conference on Power Conversion and Power Engineering Abbreviation: PCPE 2026 The International Conference on Power Conversion and Power Engineering will be held in Zhejiang University of Technology, Hangzhou, China during November 27-29, 2026. Conference Website: https://www.pcpe.org/ PCPE 2026 information: 1. PCPE 2026 is hosted by Zhejiang University of Technology, China. It is an international academic conference dedicated to the fields of power systems, power conversion technology, and power engineering. This conference typically brings together scholars, engineers, researchers, and industry experts from around the world to share and discuss the latest research findings, technological advancements, and application cases in power conversion and power engineering. 2. The accepted and registered papers can be published in conference proceedings to be archived into IEEE Xplore® Digital Library, indexed by Ei Compendex, Scopus, INSPEC, Thomson Reuters’ Web of Science, and others. 3. Prof. Syed Mofizul Islam from Federation University Australia, Australia is the Conference Chair; Prof. Gaolin Wang from Harbin Institute of Technology, China is the Program Chair. Topics: Advanced Power Conversion Technologies High-Efficiency Power Converters and Systems Wide Bandgap Semiconductors in Power Electronics Next-Generation Inverter and Rectifier Technologies Smart Grids and Power System Automation Smart Grid Architecture and Implementation Demand Response and Load Balancing Grid Modernization and Power System Automation Renewable Energy Integration and Storage Solutions Energy Storage Systems for Power Grid Stability Challenges in Wind and Solar Power Integration Hybrid Power Systems with Renewable and Storage Integration Electric Vehicles (EV) and Vehicle-to-Grid (V2G) Systems Power Conversion in Electric Vehicle Charging Systems Vehicle-to-Grid Integration (V2G) Power Electronics for Electric Vehicle Drive Systems High Voltage Direct Current (HVDC) and Power Transmission HVDC Transmission for Long-Distance Power Delivery Ultra High Voltage (UHV) Transmission Systems Power Loss Reduction and Voltage Regulation in Power Transmission Power System Protection and Reliability Advanced Protection Schemes for Power Systems Power System Stability and Fault Detection Cybersecurity for Power Systems Energy Efficiency and Power Quality Power Quality Management and Harmonics Energy Efficiency in Power Conversion Systems Grid Optimization for Power Quality Improvement Emerging Materials and Technologies in Power Engineering Advanced Materials for Power Equipment Quantum Computing for Power Systems Optimization Solid-State Transformers and Their Role in Future Power Grids Power Electronics in Industrial Applications Power Electronics in Industrial Motor Drives Industrial Automation and Power Electronics Energy Management Systems for Industrial Applications Future Trends and Innovations in Power Engineering Decentralized Energy Systems and Microgrids Blockchain for Energy Trading and System Management Artificial Intelligence and Machine Learning in Power Engineering Conference Venue: Zhejiang University of Technology, China Submission and Contact Methods: Submission Methods: https://www.zmeeting.org/submission/PCPE2026 E-mail: pcpe_contact@bmail.org Conference Specialist: Ms. Willow Wong Wechat: 18149749902 PCPE 2026 can provide a better platform for academic communication in Power Conversion and Power Engineering in theoretical and practical aspects. For more conference information, please visit the conference website: https://www.pcpe.org/</text:p>
          </table:table-cell>
          <table:table-cell table:number-columns-repeated="1013"/>
        </table:table-row>
        <table:table-row table:style-name="ro1">
          <table:table-cell table:style-name="ce2" office:value-type="string" calcext:value-type="string">
            <text:p>ICEST 2026</text:p>
          </table:table-cell>
          <table:table-cell table:style-name="ce2" office:value-type="string" calcext:value-type="string">
            <text:p>Springer--2026 17th International Conference on Environmental Science and Technology (ICEST 2026)</text:p>
          </table:table-cell>
          <table:table-cell table:style-name="ce2" office:value-type="float" office:value="52" calcext:value-type="float">
            <text:p>52</text:p>
          </table:table-cell>
          <table:table-cell table:style-name="ce2" office:value-type="float" office:value="28" calcext:value-type="float">
            <text:p>28</text:p>
          </table:table-cell>
          <table:table-cell table:style-name="ce3" office:value-type="date" office:date-value="2026-07-30" calcext:value-type="date">
            <text:p>2026-07-30</text:p>
          </table:table-cell>
          <table:table-cell table:number-columns-repeated="2"/>
          <table:table-cell table:style-name="ce2" office:value-type="string" calcext:value-type="string">
            <text:p>Xiamen, China</text:p>
          </table:table-cell>
          <table:table-cell table:style-name="ce2" office:value-type="string" calcext:value-type="string">
            <text:p>Dec 4, 2026 - Dec 6, 2026</text:p>
          </table:table-cell>
          <table:table-cell table:style-name="ce4" office:value-type="string" calcext:value-type="string">
            <text:p><text:a xlink:href="https://icest.org/" xlink:type="simple">https://icest.org/</text:a></text:p>
          </table:table-cell>
          <table:table-cell table:style-name="ce2" office:value-type="string" calcext:value-type="string">
            <text:p>Full Name: 2026 17th International Conference on Environmental Science and Technology Abbreviation: ICEST 2026 Conference Website: https://icest.org/ Conference Time: December 4-6, 2026 Conference Venue: Jimei University, Xiamen, China ICEST 2026 will be held in Xiamen, China during December 4-6, 2026. It is organized by International Society for Environmental Information Sciences, co-organized by Jimei University and United Nations Development Programme. The ICEST conference has been successfully held for 16 editions in the field of Environmental Science and Technology, successively in Bangkok, Singapore, Poland, Barcelona, Madrid, the Czech Republic, China, Japan and other locations around the world. The conference received great support from the Conference Chair Prof. Gordon Huang. The conference provides a forum for researchers and practitioners in this field to exchange ideas, designs, and experiments, promoting academic exchange and international cooperation in related fields. _x001f_★Publication Papers accepted by ICEST 2026, after registration and presentation, will be included in Springer Book Series Environmental Science and Engineering (ISSN: 1863-5520), which will be submitted to EI Compendex, Scopus, SCImago and other major databases for indexing. ★Topics(Topics of interest for submission include, but are not limited to:) Ecosystem Management and Sustainable Development Environmental Monitoring and Management Water Resources Management and Water Pollution Control Atmospheric science and air pollution control Solid Waste Pollution Control and Resource Utilization Global environmental change and ecosystems management Health and the Environment Water resources and river basin management Climate and climatic changes Optimization of collection systems For more topics and scope please check: https://icest.org/cfp.html _x001f_ ★Submission Instructions 2). Language: English is the official language of the conference; the paper should be written and presented only in English. 3). Submission Types * Abstract submission for presentation only without publication. * Full paper submission for both presentation and publication. 4). Paper Page Limits: Each full paper should be no less than 10 pages, including all figures, tables, and reference. When it exceeds 15 pages, extra page will be charged at 30 USD / 200 CNY / Page. 5). Submission Methods ▪By online submission system: https://www.zmeeting.org/submission/ICEST2026 ▪By Email: icest@academic.net ★Contact us Conference secretary: Ms. Ace Wong Tel: +86-17765145794 Email: icest@academic.net Website: https://icest.org/ Office Time: 9:00--18:00, Monday to Friday (GMT+8 Time Zone)</text:p>
          </table:table-cell>
          <table:table-cell table:number-columns-repeated="1013"/>
        </table:table-row>
        <table:table-row table:style-name="ro1">
          <table:table-cell table:style-name="ce2" office:value-type="string" calcext:value-type="string">
            <text:p>ICESE 2026</text:p>
          </table:table-cell>
          <table:table-cell table:style-name="ce2" office:value-type="string" calcext:value-type="string">
            <text:p>Springer--2026 16th International Conference on Environmental Science and Engineering (ICESE 2026)</text:p>
          </table:table-cell>
          <table:table-cell table:style-name="ce2" office:value-type="float" office:value="78" calcext:value-type="float">
            <text:p>78</text:p>
          </table:table-cell>
          <table:table-cell table:style-name="ce2" office:value-type="float" office:value="25" calcext:value-type="float">
            <text:p>25</text:p>
          </table:table-cell>
          <table:table-cell table:style-name="ce3" office:value-type="date" office:date-value="2026-07-30" calcext:value-type="date">
            <text:p>2026-07-30</text:p>
          </table:table-cell>
          <table:table-cell table:number-columns-repeated="2"/>
          <table:table-cell table:style-name="ce2" office:value-type="string" calcext:value-type="string">
            <text:p>Tokyo, Japan</text:p>
          </table:table-cell>
          <table:table-cell table:style-name="ce2" office:value-type="string" calcext:value-type="string">
            <text:p>Sep 18, 2026 - Sep 20, 2026</text:p>
          </table:table-cell>
          <table:table-cell table:style-name="ce4" office:value-type="string" calcext:value-type="string">
            <text:p><text:a xlink:href="https://www.icese.org" xlink:type="simple">https://www.icese.org</text:a></text:p>
          </table:table-cell>
          <table:table-cell table:style-name="ce2" office:value-type="string" calcext:value-type="string">
            <text:p>Full Name: 2026 16th International Conference on Environmental Science and Engineering Abbreviation: ICESE 2026 Welcome to join in the 2026 16th International Conference on Environmental Science and Engineering, which will be held during September 18-20, 2026, in Tokyo, Japan. Paper Publishing： For papers submitted to ICESE 2026, accepted and presented papers at the conference will be published into Springer Book Series - Springer Proceedings in Earth and Environmental Sciences (ISSN: 1863-5520), which is indexed by Scopus. ICESE 2025 Conference Proceedings will be available in Springer Book Series - Springer Proceedings in Earth and Environmental Sciences (ISSN: 1863-5520), The book series is abstracted and indexed by Scopus. ICESE 2024 Conference Proceedings available in Springer Book Series - Springer Proceedings in Earth and Environmental Sciences (ISSN: 1863-5520), The book series is abstracted and indexed by Scopus. ICESE 2023 Conference Proceedings available in Springer Book Series - Springer Proceedings in Earth and Environmental Sciences (ISSN: 1863-5520)， The book series is abstracted and indexed by Scopus. ICESE 2022 Conference Proceedings available in Springer Book Series - Springer Proceedings in Environmental Sciences and Engineering, indexed by EI Compendex, and Scopus. Conference Website: https://www.icese.org/index.html Conference Venue: Sophia University, Tokyo, Japan, Call For Paper Topics of interest for submission include, but are not limited to: 1. Ecosystem Management and Sustainable Development Global environmental change and ecosystems management Integrated ecosystems management Environmental restoration and ecological engineering Habitat reconstruction Biodiversity conservation Landscape degradation and restoration Soil decontamination Environmental sustainability Environmental systems approach Renewable sources of energy-energy savings 2. Water Resources Management and Water Pollution Control Hydrology Flood protection Integrated water resources management Physical oceanography Ground water remediation Water resources and river basin management Regulatory practice, water quality objectives standard setting, water quality classification Ground water management Wastewater and sludge treatment The method for submitting your paper: Electronic Submission system: https://confsys.iconf.org/submission/icese2026 Please feel free contact with us: Conference secretary, Ms Alice Lin E-mail: icese@ieet.ac.cn Contact number: 18148151445 For more information about international conferences, please visit our conference website: ICESE 2026 Website: https://www.icese.org</text:p>
          </table:table-cell>
          <table:table-cell table:number-columns-repeated="1013"/>
        </table:table-row>
        <table:table-row table:style-name="ro1">
          <table:table-cell table:style-name="ce2" office:value-type="string" calcext:value-type="string">
            <text:p>Springer ICEOE 2026</text:p>
          </table:table-cell>
          <table:table-cell table:style-name="ce2" office:value-type="string" calcext:value-type="string">
            <text:p>Springer--2026 9th International Conference on Environment and Ocean Engineering (ICEOE 2026)</text:p>
          </table:table-cell>
          <table:table-cell table:style-name="ce2" office:value-type="float" office:value="25" calcext:value-type="float">
            <text:p>25</text:p>
          </table:table-cell>
          <table:table-cell table:style-name="ce2" office:value-type="float" office:value="30" calcext:value-type="float">
            <text:p>30</text:p>
          </table:table-cell>
          <table:table-cell table:style-name="ce3" office:value-type="date" office:date-value="2026-07-30" calcext:value-type="date">
            <text:p>2026-07-30</text:p>
          </table:table-cell>
          <table:table-cell table:number-columns-repeated="2"/>
          <table:table-cell table:style-name="ce2" office:value-type="string" calcext:value-type="string">
            <text:p>Ho Chi Minh City, Vietnam</text:p>
          </table:table-cell>
          <table:table-cell table:style-name="ce2" office:value-type="string" calcext:value-type="string">
            <text:p>Nov 25, 2026 - Nov 27, 2026</text:p>
          </table:table-cell>
          <table:table-cell table:style-name="ce4" office:value-type="string" calcext:value-type="string">
            <text:p><text:a xlink:href="https://www.iceoe.org/" xlink:type="simple">https://www.iceoe.org/</text:a></text:p>
          </table:table-cell>
          <table:table-cell table:style-name="ce2" office:value-type="string" calcext:value-type="string">
            <text:p>Full Name: Springer--2026 9th International Conference on Environment and Ocean Engineering (ICEOE 2026) Abbreviation: ICEOE 2026 Venue: Ho Chi Minh City, Vietnam Time: November 25-27, 2026 Website:https://www.iceoe.org/ Welcome to join in the 2026 9th International Conference on Environment and Ocean Engineering (ICEOE 2026), which will be held in Ho Chi Minh City, Vietnam during November 25-27, 2026. Paper Publishing Full papers submitted will go through peer reviewing process by technical program committees and international reviewers. Selected and presented papers will be published as Post-Proceedings in a volume of Springer book series: Lecture Notes in Civil Engineering, which will be abstracted and indexed by EI Compendex , Scopus, Inspec, SCImago, ZbMATH etc. Call for papers Topics of interest for submission include, but are not limited to: Coastal and Ocean Engineering | Beach erosion and sediment transport | Climate change and sea level rise | Coastal infrastructure developments | Hydrodynamics of off shore structures | Lowland development and reclamation | Marine ecology and environments | Marine and offshore wind energy | Oil spill and environmental hazards Port works (dredging, seawall design, etc.) | Sea water intrusion | Tsunami, waves and tides | Wastewater disposal | Estuary coastal engineering | Offshore engineering | Deep sea engineering | Port waterway Marine energy engineering | Underwater engineering | Salvage technique | Offshore oil development technology and equipment | Offshore fixed jacket platform | The ocean activities platform | Subsea pipeline | Oil and gas gathering and transferring | Wetlands For details about topics, please visit at https://www.iceoe.org/cfp.html Conference Schedule November 25, 2026----Sign-in and Conference materials collections November 26, 2026---- Opening Ceremony&amp;Keynote Speeches&amp;Group Photo&amp;Technical Sessions&amp;Dinner Banquet and Award Ceremony November 27, 2026----Invited Speeches&amp;Technical Sessions Submission A.Full paper Accepted full papers will be invited to give oral or poster presentation at the conference, which will also be published in the conference proceedings. B.Abstract Accepted abstracts will just be invited for presentation at the conference, which will not be included into conference proceedings. Please send the Full paper/Abstract to Electronic Submission System https://confsys.iconf.org/submission/iceoe2026 Contact Methods E-mail: iceoe@ieet.ac.cn Conference Specialist: Ms. Stacey Li Tel: +86-18117801445 ICEOE 2026 can provide a platform for academic communication in Environment and Ocean Engineering. For more conference information, please visit the conference website: https://www.iceoe.org/</text:p>
          </table:table-cell>
          <table:table-cell table:number-columns-repeated="1013"/>
        </table:table-row>
        <table:table-row table:style-name="ro1">
          <table:table-cell table:style-name="ce2" office:value-type="string" calcext:value-type="string">
            <text:p>APET 2026</text:p>
          </table:table-cell>
          <table:table-cell table:style-name="ce2" office:value-type="string" calcext:value-type="string">
            <text:p>IEEE--2026 5th Asia Power and Electrical Technology Conference (APET 2026)</text:p>
          </table:table-cell>
          <table:table-cell table:style-name="ce2" office:value-type="float" office:value="75" calcext:value-type="float">
            <text:p>75</text:p>
          </table:table-cell>
          <table:table-cell table:style-name="ce2" office:value-type="float" office:value="45" calcext:value-type="float">
            <text:p>45</text:p>
          </table:table-cell>
          <table:table-cell table:style-name="ce3" office:value-type="date" office:date-value="2026-07-30" calcext:value-type="date">
            <text:p>2026-07-30</text:p>
          </table:table-cell>
          <table:table-cell table:number-columns-repeated="2"/>
          <table:table-cell table:style-name="ce2" office:value-type="string" calcext:value-type="string">
            <text:p>Fuzhou, China</text:p>
          </table:table-cell>
          <table:table-cell table:style-name="ce2" office:value-type="string" calcext:value-type="string">
            <text:p>Dec 18, 2026 - Dec 20, 2026</text:p>
          </table:table-cell>
          <table:table-cell table:style-name="ce4" office:value-type="string" calcext:value-type="string">
            <text:p><text:a xlink:href="http://www.apet.net" xlink:type="simple">http://www.apet.net</text:a></text:p>
          </table:table-cell>
          <table:table-cell table:style-name="ce2" office:value-type="string" calcext:value-type="string">
            <text:p>Full name: IEEE--2026 5th Asia Power and Electrical Technology Conference (APET 2026) Abbreviation: APET 2026 Fuzhou, China | December 18-20, 2026 More details, please visit: http://www.apet.net Sponsored by • Fuzhou University APET 2026 will feature contributed papers, keynote &amp; invited talks, special sessions, as well as parallel oral &amp; poster sessions. The conference aims to bring together researchers, engineers, and industry experts from the Asia-Pacific region and beyond to share their latest research findings and innovative ideas in the field of power and electrical technology. 【APET Awards】 Young Scientist Award Outstanding Organization Award Outstanding Reviewer Award Best Student Paper Award Best Industrial Paper Award Best Oral Presentation Award Best Poster Presentation Award 【Publication History】 APET 2025 proceedings included in IEEE Xplore, and successfully indexed by Ei &amp; Scopus. APET 2024 proceedings included in IEEE Xplore, and successfully indexed by Ei &amp; Scopus. APET 2023 proceedings included in IEEE Xplore, and successfully indexed by Ei &amp; Scopus. APET 2022 proceedings included in IEEE Xplore, and successfully indexed by Ei &amp; Scopus. 【Conference Proceedings】 Submitted papers will be peer-reviewed by technical program committees based on the paper's topic, quality, etc. Accepted papers that fall within the technical scope of the will be published into APET Conference Proceedings 【Call for Papers】 &gt;&gt;Power System and Smart Grid • Power Electronics and Key Technologies • Advanced Power Semiconductors • Semiconductor Technology • Diagnosis and Sensing Systems • MEMS-Micro Sensors And Structures • Power Distribution • Power System Design • Power Electronics and Power Drives • Power Generation and Sustainable Environment • Power Market and Power System Economics • Power Quality and Electromagnetic Compatibility • Power System and Its Automation • Smart Grid • Smart Sensors and Advanced Metrology Infrastructure • Power and Energy System Applications • Impact of Smart Grid on Distributed Energy &gt;&gt;Electrical Engineering and Automation • Converters and Inverters • Electric Drivers and Application • Electric Vehicle Technologies • Electrical Machinery and Electrical Apparatus • Electrical Machines, Power Electronics and Industry Applications • Electrical Materials and Process • Electrical Traction Systems and Control • Inverter and Converter Technology • Materials for Electrotechnics • Transmission and Distribution Systems and Apparatus • High Voltage and Insulation Technology • High Voltage Engineering and Insulation Technology • Computation Intelligence in Electrical Engineering • Computer and AI Applications in Power Industry • Application of Artificial Intelligence in Power IoT • Application of Power IoT 【Submission】 Easychair Submission System: https://easychair.org/conferences/?conf=apet2026 【Call for Special Session】 APET seeks special session proposals, which provide clear and focused research covering new and emerging topics within the scope of the conference. Please check details via: http://apet.net/session.html. Special Session 1: Advanced Control and Optimal Management of Cyber-Physical Smart Grids Special Session 2: Control and Protection of Hybrid AC/DC Transmission Systems Special Session 3: Numerical Simulation of Partial Discharge, Online Insulation Monitoring and Fault Diagnosis for Electrical Equipment Special Session 4: Advances in Eco-Friendly Electrical Materials And Its Application in High Voltage Power Equipment Special Session 5: Advanced Key Theory and Technology for DC Breaking Special Session 6: Operation and Planning of Energy Storage in Active Distribution Networks Special Session 7: Resilient Operation and Optimization of Integrated Energy Systems Special Session 8: Digital-Intelligence Empowered Operation and Maintenance Technologies for Power Transmission and Distribution Equipment - Contact us - Ms. Danica Cong E-mail: apet_official@vip.163.com TEL: +86-139-8006-2041 Wechat: iconf-ee-1</text:p>
          </table:table-cell>
          <table:table-cell table:number-columns-repeated="1013"/>
        </table:table-row>
        <table:table-row table:style-name="ro1">
          <table:table-cell table:style-name="ce2" office:value-type="string" calcext:value-type="string">
            <text:p>EMGN 2026</text:p>
          </table:table-cell>
          <table:table-cell table:style-name="ce2" office:value-type="string" calcext:value-type="string">
            <text:p>Emerging Materials Global Network</text:p>
          </table:table-cell>
          <table:table-cell table:style-name="ce2" office:value-type="float" office:value="30" calcext:value-type="float">
            <text:p>30</text:p>
          </table:table-cell>
          <table:table-cell table:style-name="ce2" office:value-type="float" office:value="45" calcext:value-type="float">
            <text:p>45</text:p>
          </table:table-cell>
          <table:table-cell table:style-name="ce3" office:value-type="date" office:date-value="2026-07-31" calcext:value-type="date">
            <text:p>2026-07-31</text:p>
          </table:table-cell>
          <table:table-cell table:style-name="ce3" office:value-type="date" office:date-value="2026-08-15" calcext:value-type="date">
            <text:p>2026-08-15</text:p>
          </table:table-cell>
          <table:table-cell table:style-name="ce3" office:value-type="date" office:date-value="2026-08-31" calcext:value-type="date">
            <text:p>2026-08-31</text:p>
          </table:table-cell>
          <table:table-cell table:style-name="ce2" office:value-type="string" calcext:value-type="string">
            <text:p>Marrakech, Morocco</text:p>
          </table:table-cell>
          <table:table-cell table:style-name="ce2" office:value-type="string" calcext:value-type="string">
            <text:p>Oct 26, 2026 - Oct 27, 2026</text:p>
          </table:table-cell>
          <table:table-cell table:style-name="ce4" office:value-type="string" calcext:value-type="string">
            <text:p><text:a xlink:href="https://2026.emgn-meeting.org/" xlink:type="simple">https://2026.emgn-meeting.org/</text:a></text:p>
          </table:table-cell>
          <table:table-cell table:style-name="ce2" office:value-type="string" calcext:value-type="string">
            <text:p>Dear colleagues, The Emerging Materials Global Network (EMGN) organizes the 2nd EMGN Annual Meeting at the conference center of Cadi Ayyad University (Marrakech). The 2nd EMGN Annual Meeting will be organized in collaboration with UCA and Mohammed VI Polytechnic University (Ben Guerir Campus). The proceedings papers will be published in the Springer ESE Book Series (indexed in Scopus and SCImago) and extended papers will be published in Special Issues of journals indexed in Scopus and Web of Science. Visit our website (2026.emgn-meeting.org) to learn more about the event, which highlights the contribution of the materials science community in addressing the UN Sustainable Development Goals (SDGs). On this occasion, we are pleased to invite you to take part in the conference (in-person or virtually) and share/discuss your latest research findings. EMGN-26 Keypoints: The EMGN Annual Meeting is one of the largest international materials science meetings in the region. The EMGN Annual Meeting aims to provide a forum where materials scientists, especially early career researchers, can present and discuss their findings with experts in all fields of materials science. The EMGN-26 Annual Meeting will take place on 26—27 October 2026 in Marrakech, Morocco. It will go ahead in person but there will be a possibility to present online (virtually). It will feature talks and panels covering a diverse range of materials science, materials engineering, and materials science-society topics. Abstract submissions (max. 350 words) will be accepted until 31 July 2026. Please read the Guidelines on the website before submitting. The EMGN-26 encourages submissions of research works from all regions of the world. Read about our EMGN-26 Publication Plan. Discover the Related Events which also aim at addressing research topics that support the UN SDGs.</text:p>
          </table:table-cell>
          <table:table-cell table:number-columns-repeated="1013"/>
        </table:table-row>
        <table:table-row table:style-name="ro1">
          <table:table-cell table:style-name="ce2" office:value-type="string" calcext:value-type="string">
            <text:p>IEEE PCCE 2026</text:p>
          </table:table-cell>
          <table:table-cell table:style-name="ce2" office:value-type="string" calcext:value-type="string">
            <text:p>IEEE--2026 The 2nd International Conference on Power Conversion and Control Engineering (PCCE 2026)</text:p>
          </table:table-cell>
          <table:table-cell table:style-name="ce2" office:value-type="float" office:value="42" calcext:value-type="float">
            <text:p>42</text:p>
          </table:table-cell>
          <table:table-cell table:style-name="ce2" office:value-type="float" office:value="28" calcext:value-type="float">
            <text:p>28</text:p>
          </table:table-cell>
          <table:table-cell table:style-name="ce3" office:value-type="date" office:date-value="2026-08-01" calcext:value-type="date">
            <text:p>2026-08-01</text:p>
          </table:table-cell>
          <table:table-cell table:number-columns-repeated="2"/>
          <table:table-cell table:style-name="ce2" office:value-type="string" calcext:value-type="string">
            <text:p>Guangzhou, China</text:p>
          </table:table-cell>
          <table:table-cell table:style-name="ce2" office:value-type="string" calcext:value-type="string">
            <text:p>Nov 13, 2026 - Nov 15, 2026</text:p>
          </table:table-cell>
          <table:table-cell table:style-name="ce4" office:value-type="string" calcext:value-type="string">
            <text:p><text:a xlink:href="http://icpcce.org/" xlink:type="simple">http://icpcce.org/</text:a></text:p>
          </table:table-cell>
          <table:table-cell table:style-name="ce2" office:value-type="string" calcext:value-type="string">
            <text:p>※PCCE 2026--IEEE&amp;EI Compendex and Scopus※ Full Name: IEEE--2026 The 2nd International Conference on Power Conversion and Control Engineering (PCCE 2026) Abbreviation: PCCE 2026 *Place: Guangzhou, China *Time: November13-15, 2026 *Website: http://icpcce.org/ ★=Sponsored by= South China University of Technology and IEEE ★=Publication= The accepted and registered ones will be published in the IEEE conference proceedings to be included in IEEE Xplore, which will be indexed by EI Compendex, Scopus, etc. PCCE 2025 has been indexed by the IEEE database: https://ieeexplore.ieee.org/xpl/conhome/11406205/proceeding ★=Submission Guidelines= 1. Full paper (publication and presentation) 2. Abstract (presentation only) Listener Registration: November 8, 2026 **Submit paper via online system: https://easychair.org/conferences/?conf=pcce2026 **For more details about submission, please visit: https://icpcce.org/submission.html ★=Committee= *Advisory Chair Qinghua Wu, South China University of Technology *Conference Chairs Tianyao Ji, South China University of Technology *Conference Co-Chair Kai Strunz, Technical University of Berlin, Germany *Program Chairs Xuelai Zhang, Shanghai Maritime University, China Sizhe Chen, Guangdong University of Technology, China Ruiwen He, Guangdong University of Technology, China Zhuoli Zhao, Guangdong University of Technology, China *Local Chair Wenyang Deng, Guangdong University of Technology, China Dongliang Xiao, Guangdong University of Technology, China *Publicity Chairs Adrian Olaru, University Politehnica of Bucharest, Romania ★=Topics= Submission can belong to the following fields, but not limited: *Track 1: Power Conversion Systems and Design Power Electronics for Renewable Energy Systems Power Converter Design and Modeling Power Conversion Topologies and Circuit Design High-Efficiency Power Converters and Inverters Power Conversion for Industrial Applications *Track 2: Control Systems and Power Management Advanced Control Strategies for Power Systems Control of Power Converters and Inverters Power Flow Control and Optimization Smart Grid Control and Integration Automation and Control in Power Systems *Track 3: Power Electronics for Electric Vehicles Electric Vehicle Powertrain Technologies Battery Management and Charging Infrastructure Power Management for Electric and Hybrid Vehicles Vehicle-to-Grid (V2G) and Grid Integration Power Conversion Systems for EVs and Charging Stations *Track 4: Energy Storage and Power Conversion Energy Storage Systems and Power Electronics Battery Energy Storage and Management Supercapacitors and Flywheels for Energy Storage Power Conversion for Storage Systems Energy Harvesting Techniques and Applications *Track 5: Semiconductor Devices and Materials Wide Bandgap Semiconductors in Power Conversion Advanced Power Devices and Power Switching High-Frequency Power Electronics and Devices Power Electronics for High-Voltage Applications Emerging Materials for Power Electronics *Track 6: Power Electronics in Smart Grids Smart Grid Technologies and Power Conversion Power Distribution and Grid Management Power Quality and Grid Synchronization Microgrids and Distributed Energy Resources Energy Management Systems for Smart Grids *Track 7: Reliability, Fault Diagnosis, and Protection Fault Diagnosis and Prognostics in Power Systems Reliability Analysis and Fault-Tolerant Systems Protection and Safety in Power Conversion Systems Cybersecurity in Power Electronics and Control Predictive Maintenance in Power Systems *Track 8: Emerging Applications and Technologies Power Electronics for Electric Aircraft and Marine Systems Advanced Power Electronics for Data Centers High-Efficiency Power Conversion in Consumer Electronics Power Electronics for Robotics and Automation Quantum Computing and AI in Power System Control ★=CONTACT US= Conference Secretary: Emily Tan Tel.: +86-17711589302 Email: pcce_conf@vip.163.com Wechat:iconf-ee-1 Website: http://icpcce.org/</text:p>
          </table:table-cell>
          <table:table-cell table:number-columns-repeated="1013"/>
        </table:table-row>
        <table:table-row table:style-name="ro1">
          <table:table-cell table:style-name="ce2" office:value-type="string" calcext:value-type="string">
            <text:p>IEEE ICPEA 2026</text:p>
          </table:table-cell>
          <table:table-cell table:style-name="ce2" office:value-type="string" calcext:value-type="string">
            <text:p>IEEE--2026 The 9th International Conference on Power and Energy Applications (ICPEA 2026)</text:p>
          </table:table-cell>
          <table:table-cell table:style-name="ce2" office:value-type="float" office:value="62" calcext:value-type="float">
            <text:p>62</text:p>
          </table:table-cell>
          <table:table-cell table:style-name="ce2" office:value-type="float" office:value="30" calcext:value-type="float">
            <text:p>30</text:p>
          </table:table-cell>
          <table:table-cell table:style-name="ce3" office:value-type="date" office:date-value="2026-08-01" calcext:value-type="date">
            <text:p>2026-08-01</text:p>
          </table:table-cell>
          <table:table-cell table:number-columns-repeated="2"/>
          <table:table-cell table:style-name="ce2" office:value-type="string" calcext:value-type="string">
            <text:p>Anhui University, Hefei, China</text:p>
          </table:table-cell>
          <table:table-cell table:style-name="ce2" office:value-type="string" calcext:value-type="string">
            <text:p>Oct 23, 2026 - Oct 26, 2026</text:p>
          </table:table-cell>
          <table:table-cell table:style-name="ce4" office:value-type="string" calcext:value-type="string">
            <text:p><text:a xlink:href="https://icpea.org/" xlink:type="simple">https://icpea.org/</text:a></text:p>
          </table:table-cell>
          <table:table-cell table:style-name="ce2" office:value-type="string" calcext:value-type="string">
            <text:p>※Power and Energy Applications &amp; Organized by IEEE, IEEE PES, IEEE PCCC, Anhui University, Hefei University of Technology, University of Science and Technology of China--ICPEA2026--EI Compendex and Scopus※ Full Name: 2026 The 9th International Conference on Power and Energy Applications Abbreviation: ICPEA 2026 ★Place: Anhui University, China *Time: October 23-26, 2026 *Website: https://icpea.org/ ★=Sponsored by= Anhui University IEEE PES (Power &amp; Energy Society) IEEE PCCC Hefei University of Technology University of Science and Technology of China ★=Awards= Young Scientist Award Best Paper Award Best Student Paper Award Best Poster Award Best Reviewer Award Best Presentation Award Best Organization Award Outstanding Contribution Award ★=Publication= Accepted papers after double blind-peer review with proper registration and presentation, will be collected in the conference proceedings, included in IEEE Xplore and indexed by EI Compendex and Scopus, etc. **ICPEA 2026 has entered IEEE Official List ★=Conference History= ICPEA 2025 | October 23-25, 2025 | Shanghai, China | IEEE: 979-8-3315-7393-5 | Ei Compendex &amp; Scopus Indexed ICPEA 2024 | October 19-21, 2024 | Taiyuan, China | IEEE: 979-8-3503-5611-3 | Ei Compendex &amp; Scopus Indexed ICPEA 2023 | November 24-26, 2023 | Weihai, China | IEEE: 979-8-3503-5905-3 | Ei Compendex &amp; Scopus Indexed ICPEA 2022 |November 18-20, 2022 | Guangzhou, China | IEEE: 978-1-6654-8761-0 | Ei Compendex &amp; Scopus Indexed ICPEA 2021 | October 9-11, 2021 |Busan, South Korea | IEEE: 978-1-6654-1394-7 | Ei Compendex &amp; Scopus Indexed ICPEA 2020 | October 9-11, 2020 |Busan, South Korea | IEEE: 978-1-7281-9028-0 | Ei Compendex &amp; Scopus Indexed ICPEA 2019 | April 27-30, 2019 | Singapore | IEEE: 978-1-7281-1595-5 | Ei Compendex &amp; Scopus Indexed More information, please view: https://icpea.org/index.html ★=Topics= 1. Power electronics and converters Power Converters Topologies and Design Advanced power converter topologies Devices, Packaging and System Integration Passive components Active components Power Electronics Devices and Converters High voltage DC power supplies Low voltage DC power supplies Power converters for electric vehicles Contactless power supply 2. Renewable energy systems Wind energy systems Solar energy systems Advanced renewable energy systems Renewable Energy Power Systems 3. Electrical machines and drives Electrical Machines and Drive Systems Motion control, robotics, special drives Electric propulsion systems for electric vehicles Electrical Machines 4. Power electronics applications Power electronics in automotive applications Power electronics in aircraft and spacecraft applications Power electronics in railway applications Power electronics in renewable energy systems Power electronics in grid-connected systems Power electronics in off-grid and standalone systems Power electronics in energy storage systems Power electronics in smart homes and buildings Power electronics in industrial applications Electronic ballasts and solid-state lighting 5. Control and management Application of control methods to electrical systems Estimation and identification methods Measurements techniques Measurement and Control Fault coordination and protection of DC grids Power factor correction techniques Power quality issues More information, please click： https://icpea.org/topics.html ★=Paper Submission= 1, Email: icpea-contact@academic.net 2, Electronic submission system: https://easychair.org/conferences/?conf=icpea2026 3, Word Template: https://icpea.org/files/conference-template-letter.docx 4, Latex Template: https://icpea.org/files/conference-latex-template_10-17-19.zip ★=CONTACT US= Lucia Xu E-mail: icpea-contact@academic.net Tel.: 191-3627-5767 Wechat ID: Iconf-ee-1 Website:https://icpea.org/</text:p>
          </table:table-cell>
          <table:table-cell table:number-columns-repeated="1013"/>
        </table:table-row>
        <table:table-row table:style-name="ro1">
          <table:table-cell table:style-name="ce2" office:value-type="string" calcext:value-type="string">
            <text:p>ICLESD 2026</text:p>
          </table:table-cell>
          <table:table-cell table:style-name="ce2" office:value-type="string" calcext:value-type="string">
            <text:p>2026 International Conference on Low-Carbon Economy and Sustainable Development</text:p>
          </table:table-cell>
          <table:table-cell table:style-name="ce2" office:value-type="float" office:value="90" calcext:value-type="float">
            <text:p>90</text:p>
          </table:table-cell>
          <table:table-cell table:style-name="ce2" office:value-type="float" office:value="30" calcext:value-type="float">
            <text:p>30</text:p>
          </table:table-cell>
          <table:table-cell table:style-name="ce3" office:value-type="date" office:date-value="2026-08-01" calcext:value-type="date">
            <text:p>2026-08-01</text:p>
          </table:table-cell>
          <table:table-cell/>
          <table:table-cell table:style-name="ce3" office:value-type="date" office:date-value="2026-09-30" calcext:value-type="date">
            <text:p>2026-09-30</text:p>
          </table:table-cell>
          <table:table-cell table:style-name="ce2" office:value-type="string" calcext:value-type="string">
            <text:p>Johor Bahru, Malaysia</text:p>
          </table:table-cell>
          <table:table-cell table:style-name="ce2" office:value-type="string" calcext:value-type="string">
            <text:p>Oct 30, 2026 - Nov 1, 2026</text:p>
          </table:table-cell>
          <table:table-cell table:style-name="ce4" office:value-type="string" calcext:value-type="string">
            <text:p><text:a xlink:href="https://www.aischolar.com/conference/lesd2026?invite=wiki" xlink:type="simple">https://www.aischolar.com/conference/lesd2026?invite=wiki</text:a></text:p>
          </table:table-cell>
          <table:table-cell table:style-name="ce2" office:value-type="string" calcext:value-type="string">
            <text:p>2026 International Conference on Low-Carbon Economy and Sustainable Development (ICLESD 2026) will be held from October 30 to November 1, 2026, which will be hosted by Universiti Teknologi Malaysia (UTM) in Johor Bahru, Malaysia. 𝗖𝗼𝗻𝗳𝗲𝗿𝗲𝗻𝗰𝗲 𝗪𝗲𝗯𝘀𝗶𝘁𝗲: https://www.aischolar.com/conference/lesd2026?invite=wiki ---𝗖𝗮𝗹𝗹 𝗳𝗼𝗿 𝗽𝗮𝗽𝗲𝗿𝘀--- The topics of interest include, but are not limited to: Track 1. Low-carbon and Clean Energy Technologies Biomass and Bioenergy Clean Energy Development and Utilization Renewable Energy Technologies Solar and Wind Energy Applications Hydrogen Energy and Low-carbon Fuels Energy Storage and Utilization Energy Efficiency and Energy-saving Technologies Low-carbon Energy Systems and Sustainable Development Track 2. Environmental Engineering and Sustainable Technologies Environmental Monitoring and Assessment Water Pollution Control Technologies Air Pollution Control Solid Waste Treatment and Resource Utilization Ecological Restoration and Environmental Protection Sustainable Utilization of Water Resources Green Environmental Protection Technologies Environmental Data Analysis and Intelligent Monitoring Track 3. Smart Cities and Low-carbon Sustainable Development Smart Cities and Digital Governance Intelligent Transportation and Green Mobility Green Buildings and Infrastructure Carbon Emission Assessment and Management ESG and Green Development Climate Change and Low-carbon Policies Artificial Intelligence and Sustainable Development Applications ---𝗣𝘂𝗯𝗹𝗶𝗰𝗮𝘁𝗶𝗼𝗻--- All papers submitted to ICLESD 2026 will be peer-reviewed by two or three expert reviewers from the conference committees. After a careful reviewing process, accepted papers will be published in conference proceedings, and submitted to Scopus and CNKI for indexing. ---𝗜𝗺𝗽𝗼𝗿𝘁𝗮𝗻𝘁 𝗗𝗮𝘁𝗲𝘀--- Full Paper Submission Date: August 1, 2026 Notification Date: September 15, 2026 Registration Deadline: September 30, 2026 Final Paper Submission Date: September 30, 2026 Conference Dates: October 30-November 1, 2026 --- 𝗣𝗮𝗽𝗲𝗿 𝗦𝘂𝗯𝗺𝗶𝘀𝘀𝗶𝗼𝗻--- Please send the full paper(word+pdf) to Submission System: https://www.aischolar.com/conference/lesd2026/submission?invite=wiki</text:p>
          </table:table-cell>
          <table:table-cell table:number-columns-repeated="1013"/>
        </table:table-row>
        <table:table-row table:style-name="ro1">
          <table:table-cell table:style-name="ce2" office:value-type="string" calcext:value-type="string">
            <text:p>ICPEE--EI 2026</text:p>
          </table:table-cell>
          <table:table-cell table:style-name="ce2" office:value-type="string" calcext:value-type="string">
            <text:p>2026 The 7th International Conference on Power and Electrical Engineering (ICPEE 2026)</text:p>
          </table:table-cell>
          <table:table-cell table:style-name="ce2" office:value-type="float" office:value="68" calcext:value-type="float">
            <text:p>68</text:p>
          </table:table-cell>
          <table:table-cell table:style-name="ce2" office:value-type="float" office:value="30" calcext:value-type="float">
            <text:p>30</text:p>
          </table:table-cell>
          <table:table-cell table:style-name="ce3" office:value-type="date" office:date-value="2026-08-05" calcext:value-type="date">
            <text:p>2026-08-05</text:p>
          </table:table-cell>
          <table:table-cell table:number-columns-repeated="2"/>
          <table:table-cell table:style-name="ce2" office:value-type="string" calcext:value-type="string">
            <text:p>Singapore</text:p>
          </table:table-cell>
          <table:table-cell table:style-name="ce2" office:value-type="string" calcext:value-type="string">
            <text:p>Nov 13, 2026 - Nov 15, 2026</text:p>
          </table:table-cell>
          <table:table-cell table:style-name="ce4" office:value-type="string" calcext:value-type="string">
            <text:p><text:a xlink:href="http://www.icpee.net" xlink:type="simple">http://www.icpee.net</text:a></text:p>
          </table:table-cell>
          <table:table-cell table:style-name="ce2" office:value-type="string" calcext:value-type="string">
            <text:p>Full Name: 2026 The 7th International Conference on Power and Electrical Engineering Abbreviation: ICPEE 2026 2026 The 7th International Conference on Power and Electrical Engineering (ICPEE 2026) - 【Index: Ei&amp;Scopus】【Special Issue: Energy Engineering, Ei Index】 Dates: November 13-15, 2026 Venue: Singapore Website: www.icpee.net On behalf of conference committee, I'm glad to announced that 2026 The 7th International Conference on Power and Electrical Engineering (ICPEE 2026) will be held in Singapore during November 13-15, 2026. ICPEE 2026 warmly welcomes scholars from all over the world to meet in person and discuss recent development and their achievements in the area of power and electrical engineering, etc! Hope all of you enjoy the journey of Singapore ! ***Publication*** -【Index-Ei Compendex &amp; Scopus】 The registered and presented papers will be published into Lecture Notes in Electrical Engineering, which will be submitted into Ei Compendex, Scopus institution for index. **Special Issue (Ei Journal)** After the conference, selected registered papers with proper extension will be recommended to the special issue of 【Energy Engineering】 for publication, which will be indexed by 【Ei Compendex/Engineering Village (Elsevier); Scopus (Elsevier);】 WorldCat (OCLC); Google Scholar; ResearchGate, etc. ***Publication History*** ICPEE 2025 | Singapore - Will be published into Lecture Notes in Electrical Engineering - Under Publication ICPEE 2024 | Singapore - Published into Lecture Notes in Electrical Engineering. Indexed by Ei Compendex, Scopus ICPEE 2023 | Singapore - Published into Lecture Notes in Electrical Engineering. Indexed by Ei Compendex, Scopus ICPEE 2022 | Singapore&amp;Online - Published as a book volume(Volume 9, Supplement 10) in Energy Reports! ***Topics of interest for submission***(Include, but are not limited to) Power Engineering Power Plants, Renewable &amp; Distributed Energy Systems Power System Risk Assessment &amp; Management Smart Grids Power Converters &amp; Control Equipment for Smart Grids Electrical Machines &amp; Adjustable Speed Drives Electric Vehicles Environment, Renewable Energy &amp; Energy Efficiency Power Plant Heat Rate Performance Transmission &amp; Distribution Energy Storage Technology Power Electronics Applications and Control More topics, please visit: https://www.icpee.net/callforpapers.html ***Submission Guide*** 2. Submission Type: Full Paper (no less than 8 pages, 10 pages preferred, 15 pages maximum, including all figures, tables, and references) Abstract (Presentation Only) Note: Full paper is for publication and oral presentation. Abstract is for oral presentation only. English is required. 3. Submission Method: Please send your paper or abstract to Electronic System: https://confsys.iconf.org/submission/icpee2026 Or you can directly send it to ICPEE mail box: icpee_net@126.com More info, please visit: https://www.icpee.net/submission.html ***Keynote Speakers*** ***ICPEE 2026 Speakers: Coming soon........... ***ICPEE 2025 Speakers: Teck Kheng Lee, Launchxtec, Singapore &amp; Nanyang Technological University, Singapore Christopher H. T. Lee, Nanyang Technological University, Singapore Chiang Liang Kok, University of Newcastle, Australia &amp; Newcastle Australia Institute of Higher Education, Singapore More detailed info, please visit: https://www.icpee.net/speaker.html ***Conference Schedule*** November 13, 2026 | Friday--- Reception &amp; Materials Collection November 14, 2026 | Saturday---Opening Remarks, Keynote&amp;Invited Speeches and Parallel Sessions November 15, 2026 | Sunday---Invited Speeches&amp;Parallel Sessions ***Conference Venue*** Nanyang Technological University Address: 50 Nanyang Ave, Singapore 639798 Contact Us --------------------_x007f_ Secretary: Ms. Jane Li E-mail: icpee_net@126.com Working Time: Monday - Friday 10:00-18:00 (UTC/GMT+08:00) Wechat: Iconf-ee-1 Linked-in: https://www.linkedin.com/in/cms-conference/</text:p>
          </table:table-cell>
          <table:table-cell table:number-columns-repeated="1013"/>
        </table:table-row>
        <table:table-row table:style-name="ro1">
          <table:table-cell table:style-name="ce2" office:value-type="string" calcext:value-type="string">
            <text:p>AISS 2026</text:p>
          </table:table-cell>
          <table:table-cell table:style-name="ce2" office:value-type="string" calcext:value-type="string">
            <text:p>Springer--2026 Second International Conference on Artificial Intelligence for Sustainable Society (AISS 2026)</text:p>
          </table:table-cell>
          <table:table-cell table:style-name="ce2" office:value-type="float" office:value="95" calcext:value-type="float">
            <text:p>95</text:p>
          </table:table-cell>
          <table:table-cell table:style-name="ce2" office:value-type="float" office:value="25" calcext:value-type="float">
            <text:p>25</text:p>
          </table:table-cell>
          <table:table-cell table:style-name="ce3" office:value-type="date" office:date-value="2026-08-05" calcext:value-type="date">
            <text:p>2026-08-05</text:p>
          </table:table-cell>
          <table:table-cell table:number-columns-repeated="2"/>
          <table:table-cell table:style-name="ce2" office:value-type="string" calcext:value-type="string">
            <text:p>Osaka, Japan</text:p>
          </table:table-cell>
          <table:table-cell table:style-name="ce2" office:value-type="string" calcext:value-type="string">
            <text:p>Oct 23, 2026 - Oct 25, 2026</text:p>
          </table:table-cell>
          <table:table-cell table:style-name="ce4" office:value-type="string" calcext:value-type="string">
            <text:p><text:a xlink:href="http://www.icaiss.net/" xlink:type="simple">http://www.icaiss.net/</text:a></text:p>
          </table:table-cell>
          <table:table-cell table:style-name="ce2" office:value-type="string" calcext:value-type="string">
            <text:p>★Full Name: 2026 Second International Conference on Artificial Intelligence for Sustainable Society ★Abbreviation: AISS 2026 ★Website: http://www.icaiss.net/ ★Date: October 23-25, 2026 ★Place: Osaka, Japan ★Co-Sponsored by: University of Hyogo, Japan; Ritsumeikan University, Japan ★Call for paper★ AI Computing and Control for SS Evolutionary Computation Machine Learning Knowledge-based Intelligent Systems Hybrid Learning System Remote Sensing Other AI Technologies for SS Searching Planning Reasoning Knowledge Representation Natural Language Processing Energy, Environment, Sustainable Society Energy Savings Digitization Recycling Renewable Water Resource Zero-carbon Energy Systems AI Technology aided Sustainable Development AI Technologies for Environment Engineering AI Control for Energy Saving AI Technologies for Green House Gas Emission Intelligent Risk Management for Sustainable Development Efficient Utilization of Natural Energy For details about topics, please visit at http://www.icaiss.net/cfp.html ★ Publication All accepted papers will appear in the conference proceedings published by Springer-Verlag in One volume of Springer Book Series Smart Innovation, System and Technologies (SIST).The book series is indexed by SCOPUS, EI Compendex, INSPEC, WTI Frankfurt eG, zbMATH, Japanese Science and Technology Agency (JST), SCImago, DBLP. All books published in the series are submitted for consideration in Web of Science. ★Submission★ 1. Full paper(publication and presentation) 2. Abstract (presentation only) For full paper, please upload it to the AISS 2026 conference management system https://www.zmeeting.org/submission/aiss2026 For abstract, please send it to aiss@chairmen.org More detail about submission, please visit at http://www.icaiss.net/sub.html ★★Conference Schedule★★ Friday - October 23, 2026 | 10:00 - 17:00 | Pre-conference Registration of Off-line Event; Pre-test of Online Sessions Saturday - October 24, 2026 | 08:30 - 12:10 | Walk-in Registration &amp; Information Booth &amp; Keynote Speech &amp; Group photo taking Saturday - October 24, 2026 | 15:30 - 20:00 | Concurrent Sessions &amp; Dinner Sunday - October 25, 2026 | 09:00 - 17:00 | Excursion or Technical Visit ★★Contact: Ms. Bailey Zhou (Conference Secretary) Email: aiss@chairmen.org Tel: +86-18702848313 (10:00am-12:00pm; 13:30pm-17:00pm; GMT+9)</text:p>
          </table:table-cell>
          <table:table-cell table:number-columns-repeated="1013"/>
        </table:table-row>
        <table:table-row table:style-name="ro1">
          <table:table-cell table:style-name="ce2" office:value-type="string" calcext:value-type="string">
            <text:p>IEEE PESA 2026</text:p>
          </table:table-cell>
          <table:table-cell table:style-name="ce2" office:value-type="string" calcext:value-type="string">
            <text:p>IEEE--2026 11th International Conference on Power Electronics Systems and Applications (PESA 2026)--SCI</text:p>
          </table:table-cell>
          <table:table-cell table:style-name="ce2" office:value-type="float" office:value="35" calcext:value-type="float">
            <text:p>35</text:p>
          </table:table-cell>
          <table:table-cell table:style-name="ce2" office:value-type="float" office:value="25" calcext:value-type="float">
            <text:p>25</text:p>
          </table:table-cell>
          <table:table-cell table:style-name="ce3" office:value-type="date" office:date-value="2026-08-05" calcext:value-type="date">
            <text:p>2026-08-05</text:p>
          </table:table-cell>
          <table:table-cell table:number-columns-repeated="2"/>
          <table:table-cell table:style-name="ce2" office:value-type="string" calcext:value-type="string">
            <text:p>Singapore</text:p>
          </table:table-cell>
          <table:table-cell table:style-name="ce2" office:value-type="string" calcext:value-type="string">
            <text:p>Nov 13, 2026 - Nov 15, 2026</text:p>
          </table:table-cell>
          <table:table-cell table:style-name="ce4" office:value-type="string" calcext:value-type="string">
            <text:p><text:a xlink:href="http://www.icpesa.net/" xlink:type="simple">http://www.icpesa.net/</text:a></text:p>
          </table:table-cell>
          <table:table-cell table:style-name="ce2" office:value-type="string" calcext:value-type="string">
            <text:p>* Full Name: 2026 11th International Conference on Power Electronics Systems and Applications * Abbreviation: PESA 2026 * Conference Venue: Singapore * Conference Date: November 13-15, 2026 * Conference Website: www.icpesa.net * Sponsored By: Nanyang Technological University, Singapore &amp; IEEE * Patrons: Singapore Institute of Technology, Singapore, National University of Singapore, Singapore, Singapore University of Technology and Design, Singapore, Center of Power Engineering (Nanyang Technological University) * Media Partner: China Electrotechnical Society * Organizing Committee Honorary Chairs Eric Ka-Wai Cheng, University of California, Merced, USA (IEEE Fellow) Siew Hwa Chan, Nanyang Technological University, Singapore General Chair Yun Yang, Nanyang Technological University, Singapore (IEEE Senior Member &amp; IEEE PELS Member) General Co-Chairs Chaoqiang Jiang, City University of Hong Kong, Hong Kong (IEEE Senior Member &amp; IEEE PES Member) Ching-Ming Lai, National Chung Hsing University, Taiwan (IEEE IAS Member) Kris Kaiwen Chen, Ningbo University, China (IEEE/PELS/VTS/IES Member) Program Chair King-Jet Tseng, Singapore Institute of Technology, Singapore (IEEE Fellow &amp; IEEE PES/IAS/PELS Member) Program Co-Chairs Aaron Cai, Molex, Singapore Christopher Lee, Nanyang Technological University, Singapore (IEEE/PELS/IAS Member) Yan Xu, Nanyang Technological University, Singapore (IEEE PES Member) Yi Tang, Nanyang Technological University, Singapore (IEEE/PES/IAS Member) Yuanmao Ye, Guangdong University of Technology, China More information: https://www.icpesa.net/organizing-committee.html * Keynote Speakers: C. K. Michael Tse, City University of Hong Kong, Hong Kong Akshay Kumar Rathore, National University of Singapore, Singapore Hoay Beng GOOI, Nanyang Technological University, Singapore Kwok Wai Ma, Infineon, Singapore Sanjib Kumar Panda, National University of Singapore, Singapore * Invited Speakers: Kerui Li, City University of Hong Kong, Hong Kong Yang Wu, Nanyang Technological University, Singapore Shuang Zhao, Hefei University of Technology, China Zhong Chen, University of Arkansas, USA * Publication: All submitted manuscripts will be carefully reviewed. Accepted papers, upon proper registration and presentation, will be published in the PESA 2026 conference proceedings, which will be included in IEEE Xplore and submitted for indexing in Scopus and Ei Compendex. **PESA 2026 is included in IEEE event list. **All past PESA proceedings are archived in IEEE Xplore and indexed by Ei Compendex and Scopus. * SCI Journal Up to 20% of the outstanding PESA 2026 papers will be selected and recommended for review and potential publication in IAS Transactions and IAS Magazines (JCR-Q2). *Publication History: 10th PESA | IEEE | ISBN: 979-8-3503-6580-1 | Ei Compendex &amp; Scopus 9th PESA | IEEE | ISBN: 978-1-6654-8668-2 | Ei Compendex &amp; Scopus 8th PESA | IEEE | ISBN: 978-1-7281-8890-4 | Ei Compendex &amp; Scopus 7th PESA | IEEE | ISBN: 978-1-5386-1387-0 | Ei Compendex &amp; Scopus 6th PESA | IEEE | ISBN: 978-1-5090-0063-0 | Ei Compendex &amp; Scopus 5th PESA | IEEE | ISBN: 978-1-4799-3491-1 | Ei Compendex &amp; Scopus ...... More Publication history: http://www.icpesa.net/history.html * Call for Papers We welcome contributions on a wide range of topics, including (but not limited to): Track 1: Power Semiconductor Devices and Materials Track 2: Power Converter Topologies and Control Track 3: Renewable Energy Integration Track 4: Energy Storage Systems Track 5: Electric Vehicle (EV) and Transportation Track 6: Industrial Automation and Motor Drives Track 7: Smart Grids and Power Systems Track 8: AI and Machine Learning in Power Electronics Track 9: High-Frequency Power Conversion Track 10: Hydrogen and Sustainable Energy Track 11: Thermal Management and System Integration Track 12: Emerging Applications and Interdisciplinary Frontiers ...... Click to see more: http://www.icpesa.net/cfp.html * Submission Methods: Full paper should be no less than 4 pages in full and must be written in English Abstract length should not have more than 600 words and must be written in English System Submission: https://easychair.org/conferences/?conf=pesa2026 Email Submission: pesa_secretariat@bmail.org For more details, you can learn through: http://www.icpesa.net/submit.html * Contact Us: Conference Secretary: Lynn S.L. Gong Email: pesa_secretariat@bmail.org</text:p>
          </table:table-cell>
          <table:table-cell table:number-columns-repeated="1013"/>
        </table:table-row>
        <table:table-row table:style-name="ro1">
          <table:table-cell table:style-name="ce2" office:value-type="string" calcext:value-type="string">
            <text:p>REPE 2026</text:p>
          </table:table-cell>
          <table:table-cell table:style-name="ce2" office:value-type="string" calcext:value-type="string">
            <text:p>2026 9th International Conference on Renewable Energy and Power Engineering (REPE 2026)</text:p>
          </table:table-cell>
          <table:table-cell table:style-name="ce2" office:value-type="float" office:value="78" calcext:value-type="float">
            <text:p>78</text:p>
          </table:table-cell>
          <table:table-cell table:style-name="ce2" office:value-type="float" office:value="30" calcext:value-type="float">
            <text:p>30</text:p>
          </table:table-cell>
          <table:table-cell table:style-name="ce3" office:value-type="date" office:date-value="2026-08-05" calcext:value-type="date">
            <text:p>2026-08-05</text:p>
          </table:table-cell>
          <table:table-cell table:number-columns-repeated="2"/>
          <table:table-cell table:style-name="ce2" office:value-type="string" calcext:value-type="string">
            <text:p>Beijing, China</text:p>
          </table:table-cell>
          <table:table-cell table:style-name="ce2" office:value-type="string" calcext:value-type="string">
            <text:p>Sep 26, 2026 - Sep 28, 2026</text:p>
          </table:table-cell>
          <table:table-cell table:style-name="ce4" office:value-type="string" calcext:value-type="string">
            <text:p><text:a xlink:href="http://www.repe.net" xlink:type="simple">http://www.repe.net</text:a></text:p>
          </table:table-cell>
          <table:table-cell table:style-name="ce2" office:value-type="string" calcext:value-type="string">
            <text:p>Abbreviation: REPE 2026 Full Name: 2026 9th International Conference on Renewable Energy and Power Engineering (REPE 2026) Location: Beijing, China Conference Date: September 26-28, 2026 Website: http://www.repe.net Publication: Accepted papers will be published into REPE conference proceedings, and submitted for Ei Compendex and Scopus index, etc, as same as previous years. Call for Paper: Renewable Energy Photovoltaic Systems and Solar Energy Engineering Wind Energy Systems Renewable Energy Utilizations and Applications Energy-Saving Technology New Energy Materials and Devices Power Engineering Electricity Networks of the Future Energy Storage Technologies and Devices Power and Energy Generation, Transmission, and Distribution Power Systems and Automation Fault Monitoring, Predictive Maintenance, and Diagnostics Power Electronics and Power System Technology Electrical Machinery and Control Engineering Electrical Measurement Engineering and Instrumentation High Voltage Engineering New Energy Technology and Innovation More topics via: http://www.repe.net/cfp.html Agenda Overview： September 26, 2026 Sign-in and Materials Collection September 27, 2026 Opening Ceremony+Keynote speeches in the morning September 27, 2026 Parallel Offline Sessions in the afternoon September 28, 2026 Parallel Online Sessions Submission Methods: Full Paper (publication and oral presentation) Abstract (oral presentation only) Electronic Submission System (.pdf) http://www.easychair.org/conferences/?conf=repe2026 or submit it via email: repe_conf@126.com. Contacts: Ms. Teri Zhang E-mail: repe_conf@126.com</text:p>
          </table:table-cell>
          <table:table-cell table:number-columns-repeated="1013"/>
        </table:table-row>
        <table:table-row table:style-name="ro1">
          <table:table-cell table:style-name="ce2" office:value-type="string" calcext:value-type="string">
            <text:p>ICREE 2026</text:p>
          </table:table-cell>
          <table:table-cell table:style-name="ce2" office:value-type="string" calcext:value-type="string">
            <text:p>2026 10th International Conference on Renewable Energy and Environment (ICREE 2026)</text:p>
          </table:table-cell>
          <table:table-cell table:style-name="ce2" office:value-type="float" office:value="68" calcext:value-type="float">
            <text:p>68</text:p>
          </table:table-cell>
          <table:table-cell table:style-name="ce2" office:value-type="float" office:value="30" calcext:value-type="float">
            <text:p>30</text:p>
          </table:table-cell>
          <table:table-cell table:style-name="ce3" office:value-type="date" office:date-value="2026-08-05" calcext:value-type="date">
            <text:p>2026-08-05</text:p>
          </table:table-cell>
          <table:table-cell table:number-columns-repeated="2"/>
          <table:table-cell table:style-name="ce2" office:value-type="string" calcext:value-type="string">
            <text:p>Brisbane, Australia</text:p>
          </table:table-cell>
          <table:table-cell table:style-name="ce2" office:value-type="string" calcext:value-type="string">
            <text:p>Nov 28, 2026 - Nov 30, 2026</text:p>
          </table:table-cell>
          <table:table-cell table:style-name="ce4" office:value-type="string" calcext:value-type="string">
            <text:p><text:a xlink:href="https://www.icree.org" xlink:type="simple">https://www.icree.org</text:a></text:p>
          </table:table-cell>
          <table:table-cell table:style-name="ce2" office:value-type="string" calcext:value-type="string">
            <text:p>★ICREE 2026-EI Compendex &amp; Scopus indexed★ ★Abbreviation: ICREE 2026 ★Full name: 2026 10th International Conference on Renewable Energy and Environment (ICREE 2026) ★Venue: Brisbane, Australia ★Time: November 28-30, 2026 ★Website: https://www.icree.org/ ★Co-sponsored By: Griffith University, Australia ★Technically Supported by: The University of Queensland, Australia ★★Publication All submitted papers will be reviewed by technical program committees and accepted full papers will be published into conference proceedings which will be submitted to be indexed by EI compendex, Scopus, SCImago, etc. ★Call for General Papers★ Topics related to: Wind Energy Applications, Wind Resources Environmental Impact, Hydropower Applications, Construction and Design Issues, Environmental Impact Assessment, Solar Cell Technology, PV for Rural Development, Solar Thermal Electricity,Geothermal Applications, Environmental Impacts and Sustainability, Technology and System Aspects, Machines and Wind Farms, Turbines and Generators, Small and Micro Scale hydropower, Photovoltaic Technology, PV Manufacture, Testing and Certification, Solar Thermal Applications, Solar Heating and Cooling Systems, Geothermal Heating and Heat Pumps... For details about topics, please visit https://www.icree.org/cfp.html ★Submission★ 1. Full paper(publication and presentation) 2. Abstract (presentation only) Submission Methods: https://confsys.iconf.org/submission/icree2026 E-mail: icree@chairmen.org More details about submission, please visit https://www.icree.org/sub.html ★★Conference Schedule★★ November 28, 2026---Conference Sign-in and Materials Collection November 29, 2026(Morning)----Opening Remarks &amp; Keynote Speeches&amp;Group Photo &amp; Coffee Break November 29, 2026(Afternoon)----Invited Speeches &amp; Parallel Sessions for Oral Presentations November 30, 2026----Invited Speeches &amp; Parallel Sessions for Oral Presentations ★★Contact: Ms. Iris Tang Website: https://www.icree.org Email: icree@chairmen.org Contact Number: +86-18117808141</text:p>
          </table:table-cell>
          <table:table-cell table:number-columns-repeated="1013"/>
        </table:table-row>
        <table:table-row table:style-name="ro1">
          <table:table-cell table:style-name="ce2" office:value-type="string" calcext:value-type="string">
            <text:p>ICMIE 2026</text:p>
          </table:table-cell>
          <table:table-cell table:style-name="ce2" office:value-type="string" calcext:value-type="string">
            <text:p>2026 9th International Conference on Measurement, Instrumentation, and Electronics (ICMIE 2026)</text:p>
          </table:table-cell>
          <table:table-cell table:style-name="ce2" office:value-type="float" office:value="55" calcext:value-type="float">
            <text:p>55</text:p>
          </table:table-cell>
          <table:table-cell table:style-name="ce2" office:value-type="float" office:value="25" calcext:value-type="float">
            <text:p>25</text:p>
          </table:table-cell>
          <table:table-cell table:style-name="ce3" office:value-type="date" office:date-value="2026-08-10" calcext:value-type="date">
            <text:p>2026-08-10</text:p>
          </table:table-cell>
          <table:table-cell table:number-columns-repeated="2"/>
          <table:table-cell table:style-name="ce2" office:value-type="string" calcext:value-type="string">
            <text:p>Hangzhou, China</text:p>
          </table:table-cell>
          <table:table-cell table:style-name="ce2" office:value-type="string" calcext:value-type="string">
            <text:p>Nov 20, 2026 - Nov 22, 2026</text:p>
          </table:table-cell>
          <table:table-cell table:style-name="ce4" office:value-type="string" calcext:value-type="string">
            <text:p><text:a xlink:href="https://www.icmie.org/" xlink:type="simple">https://www.icmie.org/</text:a></text:p>
          </table:table-cell>
          <table:table-cell table:style-name="ce2" office:value-type="string" calcext:value-type="string">
            <text:p>★ICMIE 2026★ ★Full name: 2026 9th International Conference on Measurement, Instrumentation, and Electronics (ICMIE 2026) ★Abbreviation: ICMIE 2026 ★Time：November 20-22, 2026 ★Place：Hangzhou, China ★Website：https://www.icmie.org/ 2026 9th International Conference on Measurement, Instrumentation, and Electronics (ICMIE 2026) will be held from November 20-22, 2026, in Hangzhou, China. The conference is sponsored by Zhejiang University, hosted by School of Energy Engineering, Zhejiang University, China. As an annual event, ICMIE aims to bring together scholars, academicians, and industry practitioners from around the world. The conference serves as a platform for presenting cutting-edge research, exploring emerging trends, and collaboratively addressing challenges in the field of Measurement, Instrumentation, and Electronics (MIE). In addition to technical sessions, ICMIE 2026 will feature plenary sessions, keynote addresses, and panel discussions, promoting interdisciplinary dialogue and the exchange of innovative ideas. ★Call for Paper★ Topics of interest for submission include, but are not limited to: I. Instrumentation and Measurement Systems Electronic instruments and measurement systems Precision instruments and measurement systems Testability and built-in-test Virtual instruments VLSI testing and fault diagnosis II. Data Acquisition and Analysis Internet of Things (IoT) Measurement error theory Networks in test and measurement Reconfigurable computing and sensor fusion Signal analysis and processing III. Electronics and Applications Avionics Engineering Control theory and applications Electronics instrumentation High voltage techniques and microwave Optoelectronics For details about topics, please visit at https://www.icmie.org/cfp.html ★Publication★ All submitted papers must be written in English. After several peer review processes, accepted papers will be published into ICMIE 2026 Conference Proceedings, which will be indexed by EI Compendex, Scopus, and other indexing services. ★Submission Methods★ 1.Full Paper(publication and Presentation)-https://www.zmeeting.org/submission/icmie2026 2.Abstract(Presentation Only)-icmie@academic.net Note: Only Full paper submission will be published in conference proceedings if accepted. More detail about submission, please visit at https://www.icmie.org/sub.html ★★Conference Schedule★★ November 20, 2026 | Registration &amp; Material Collecting November 21, 2026 | Opening Remarks &amp; Keynote Speech &amp; Special Sessions November 22, 2026 | Invited Speeches &amp; Parallel Sessions ★Contact Us★ Conference Secretary: Ms. Elvira Liu E-mail: icmie@academic.net Tel: +86-15902806624 (office time 10:00 - 18:00, Time zone: GMT+8 | Monday to Friday)</text:p>
          </table:table-cell>
          <table:table-cell table:number-columns-repeated="1013"/>
        </table:table-row>
        <table:table-row table:style-name="ro1">
          <table:table-cell table:style-name="ce2" office:value-type="string" calcext:value-type="string">
            <text:p>ICSEE 2027</text:p>
          </table:table-cell>
          <table:table-cell table:style-name="ce2" office:value-type="string" calcext:value-type="string">
            <text:p>Springer--2027 11th International Conference on Sustainable Energy Engineering (ICSEE 2027)</text:p>
          </table:table-cell>
          <table:table-cell table:style-name="ce2" office:value-type="float" office:value="82" calcext:value-type="float">
            <text:p>82</text:p>
          </table:table-cell>
          <table:table-cell table:style-name="ce2" office:value-type="float" office:value="25" calcext:value-type="float">
            <text:p>25</text:p>
          </table:table-cell>
          <table:table-cell table:style-name="ce3" office:value-type="date" office:date-value="2026-08-15" calcext:value-type="date">
            <text:p>2026-08-15</text:p>
          </table:table-cell>
          <table:table-cell table:number-columns-repeated="2"/>
          <table:table-cell table:style-name="ce2" office:value-type="string" calcext:value-type="string">
            <text:p>Adelaide, Australia</text:p>
          </table:table-cell>
          <table:table-cell table:style-name="ce2" office:value-type="string" calcext:value-type="string">
            <text:p>Jan 14, 2027 - Jan 16, 2027</text:p>
          </table:table-cell>
          <table:table-cell table:style-name="ce4" office:value-type="string" calcext:value-type="string">
            <text:p><text:a xlink:href="http://www.icsee.org/" xlink:type="simple">http://www.icsee.org/</text:a></text:p>
          </table:table-cell>
          <table:table-cell table:style-name="ce2" office:value-type="string" calcext:value-type="string">
            <text:p>★ICSEE 2027-Ei Compendex and Scopus★ ★Abbreviation: ICSEE 2027 ★Full Name: Springer--2027 11th International Conference on Sustainable Energy Engineering (ICSEE 2027) ★Venue: Adelaide, Australia ★Time: January 14-16, 2027 ★Co-sponsored: Adelaide University, Australia and University of Tasmania, Australia ★Web: http://www.icsee.org/ ★Call for papers★ Distributed power generation Real-time monitoring of the power grid Electric Power Generation, Transmission and Distribution Smart Grid and Renewable Energy Integration Energy storage and cyber security for smart grids Next generation energy management systems Carbon and Methane capture, storage and utilization Bioenergy supply management strategies Green energy and energy access Green Energy Education and Training For details about topics, please visit: https://www.icsee.org/cfp.html ★★Publication All papers submitted to the conference will be subjected to the rigorous peer-review process. ICSEE 2027 all accepted papers will be published into Springer Book Series-Green Energy and Technology, which submitted for *Ei Compendex*, and *Scopus* and are expected to be widely read and cited. ☆ International Journal of Sustainable Energy. It is abstracted and indexed in ESCI, Scopus (Citescore 2021: 4.5), EBSCO, and so on. ★Submission★ 1. Full paper(publication and presentation) 2. Abstract (presentation) For full paper, please upload it to the Electronic Submission System (.pdf) https://confsys.iconf.org/submission/icsee2027 For abstract, please send it to icsee@chairmen.org More detail about submission, please visit: https://www.icsee.org/sub.html ★Conference Schedule★ January 14, 2027---Participants check-in &amp; Materials Collection January 15, 2027(Morning)----Opening Remarks &amp; Keynote Speeches January 15, 2027(Afternoon)----Author Presentation January 16, 2027----Academic Visiting &amp; One day tour (pending) ★Conference Venue★ Adelaide University, Australia Address: North Terrace, Adelaide, South Australia, 5001, Australia ★★Contact: Ms. Veronica Reed Website: http://www.icsee.org/ Email: icsee@chairmen.org Tel: +86-137-3111-1131</text:p>
          </table:table-cell>
          <table:table-cell table:number-columns-repeated="1013"/>
        </table:table-row>
        <table:table-row table:style-name="ro1">
          <table:table-cell table:style-name="ce2" office:value-type="string" calcext:value-type="string">
            <text:p>IEEE-ACFPE 2026</text:p>
          </table:table-cell>
          <table:table-cell table:style-name="ce2" office:value-type="string" calcext:value-type="string">
            <text:p>2026 5th Asian Conference on Frontiers of Power and Energy (ACFPE 2026)</text:p>
          </table:table-cell>
          <table:table-cell table:style-name="ce2" office:value-type="float" office:value="82" calcext:value-type="float">
            <text:p>82</text:p>
          </table:table-cell>
          <table:table-cell table:style-name="ce2" office:value-type="float" office:value="28" calcext:value-type="float">
            <text:p>28</text:p>
          </table:table-cell>
          <table:table-cell table:style-name="ce3" office:value-type="date" office:date-value="2026-08-15" calcext:value-type="date">
            <text:p>2026-08-15</text:p>
          </table:table-cell>
          <table:table-cell table:number-columns-repeated="2"/>
          <table:table-cell table:style-name="ce2" office:value-type="string" calcext:value-type="string">
            <text:p>Chengdu, China</text:p>
          </table:table-cell>
          <table:table-cell table:style-name="ce2" office:value-type="string" calcext:value-type="string">
            <text:p>Oct 22, 2026 - Oct 24, 2026</text:p>
          </table:table-cell>
          <table:table-cell table:style-name="ce4" office:value-type="string" calcext:value-type="string">
            <text:p><text:a xlink:href="https://acfpe.org/" xlink:type="simple">https://acfpe.org/</text:a></text:p>
          </table:table-cell>
          <table:table-cell table:style-name="ce2" office:value-type="string" calcext:value-type="string">
            <text:p>2026 5th Asian Conference on Frontiers of Power and Energy (ACFPE 2026) Chengdu, China | Oct. 22 to 24, 2026 https://acfpe.org/ 2026 5th Asian Conference on Frontiers of Power and Energy(ACFPE 2026) will be hosted in Chengdu, China from Oct. 22 to 24, 2026, which is co-organized by Sichuan University and Sichuan Society for Electrical Engineering, supported by Hong Kong Society of Mechanical Engineers(HKSME), Global Energy Interconnection and Global Chinese Power &amp; Energy Society, media supported by Proceedings of the CSEE, CSEE Journal of Power and Energy Systems(CSEE JPES), Automation of Electric Power Systems, Power System Protection and Control, Journal of Modern Power Systems and Clean Energy (MPCE), Protection and Control of Modern Power Systems, Power System Technology, Journal of Electrical Engineering, New Type Power Systems, High Voltage Engineering, High Voltage, Electric Power Information, Communication Technology, Cyber-Physical Energy Systems, Electric Power Automation Equipment, Chinese Journal of Electrical Engineering, Power Generation Technology, Electrical Power Engineering Technology, Electric Machines, Control Applications, Sichuan Electric Power Technology, electronics, Southern Power System Technology, Neimenggu Dianli Jianshe, Nanfang Nengyuan jishu, Smart Power &amp; Energy Security, ÉLECTRIC POWER, Electrical Measurement &amp; Instrumentation, ADVANCED ENGINEERING SCIENCES, Integrated Intelligent Energy, Relay Protection and Excitation Technical Committee of CSHE and Distributed Energy. The theme of ACFPE 2026 is "AI-Empowered Technologies Innovation for Future Smart Grid". ACFPE 2026 is a conference which aims at bringing together participants from academia, industry, engineering, and administrative organizations around the world to exchange novel ideas, discuss innovative designs, explore enabling technologies and open problems, and share field trial experiences in power and energy areas. We warmly welcome prospective authors to submit your research papers to ACFPE 2026, and share your latest research results and valuable experiences with other top-scientists, engineers and scholars from all over the world. ●Speakers Prof. Dipti Srinivasan (Keynote Speaker),IEEE Fellow, National University of Singapore, Singapore Prof. Zhao Xu (Keynote Speaker), The Hong Kong Polytechnic University, China Prof. Hazlie Mokhlis (Keynote Speaker), University of Malaysia, Malaysia Prof. SHADIKE Zulipiya (Keynote Speaker), Shanghai Jiao Tong University, China Prof. Rufeng Zhang (Keynote Speaker), Northeast Electric Power University, China ●Publication &amp; Indexing 1) All the accepted and presented papers will be submitted for inclusion into IEEE Xplore subject to meeting IEEE Xplore’s scope and quality requirements. The publisher will submit articles to Engineering Village, Scopus, Web of Science and other databases for review and indexing after publication. 2) Selected papers(accepted and presented) with high quality, which are presented on conference, will be recommended to publish in Cyber-Physical Energy Systems（ ISSN: 3050-7448). 3) Selected papers(accepted and presented) with high quality, which are presented on conference, will be recommended to publish in Energy Engineering. 4) Selected papers (accepted and presented) with high quality, which are presented on conference, will be recommended to publish in Electronics. ●Special Session Call for Papers Special Session I: AI-Enabled Stability Mechanism Analysis and Adaptive Control Technologies for New-Type Power Systems Session Chair: Yuhong Wang, Sichuan University, China Session Vice-Chair 1 : Zongsheng Zheng, Sichuan University, China Session Vice-Chair 2 : Shilin Gao, Sichuan University, China Special Session II: AI-Enabled Power Quality Analysis and Mitigation in New-Type Power Systems Session Chair: Yi Zhang, Fuzhou University, China Special Session III: Aggregated flexible resources for hierarchical coordinated operation and control in new distribution networks Session Chair: Yiyao Zhou, Xihua University, China Session Vice-Chair 1 : Xuefei Zhang, Xihua University, China Session Vice-Chair 2 : Jian Wang, Hohai University, China ●Call for Papers-topics Track 1: Advanced Energy Conversion Chair: Chew Kuew Wai, Universiti Tunku Abdul Rahman, Malaysia Track 2: AI and Data-driven Applications in Smart Grid Chair: Zhao Bochao, Tianjin University, China Vice Chair: Zhao Zhen, Shanghai Artificial Intelligence Laboratory, China Track 3: DER Based Grid-edge Awareness and Control Track 4: Energy Storage Applications and Hydrogen Track 5: Large-scale Renewable Energy Integration Track 6: Low-carbon Technologies on Power Systems Track 7: Multi-energy Systems Operation and Planning Track 8: Power Market and Economy Chair: Zhifang Yang, Chongqing University, China Track 9: Smart Grid Operation and Control Chair: Gao Qiu, Sichuan University, China more: https://acfpe.org/CFP.html ●Submission Method Please submit your paper through submission system https://cmt3.research.microsoft.com/ACFPE2026 If you have any question about submission: acfpe@vip.163.com ●Submission Note 1) Manuscripts must be written in English; 2) The manuscript should be written in accordance with the standard of template; 3) The paper should be no less than 5 pages and no longer than 10 pages; 4) Plagiarism is prohibited; 5) Duplicate submission is prohibited. ● Join Us Besides full paper presenters, you can also join us as: Abstract Presenter: Submit your abstract and title if you want to present without publication; Listener: Attend the event; complete listener registration before the deadline; Reviewer: Professors and experts in related areas are welcome to serve as reviewers; Media Partner: Enterprises and journals related to the conference themes are welcome as media partners; Sponsors: Provide sponsorship to gain exceptional promotion and networking opportunities; HKSME Member: If interested in joining HKSME free of charge, please send the Member Application Form and your resume to member@smehk.org ●Contact Conference Secretary: Ms. Amber Cao Tel: +852-30506862（Hong Kong） Phone: 19150956004 E-mail: acfpe@vip.163.com WeChat: 19102818126 Website: https://acfpe.org/</text:p>
          </table:table-cell>
          <table:table-cell table:number-columns-repeated="1013"/>
        </table:table-row>
        <table:table-row table:style-name="ro1">
          <table:table-cell table:style-name="ce2" office:value-type="string" calcext:value-type="string">
            <text:p>Chengdu, China-ACFPE 2026</text:p>
          </table:table-cell>
          <table:table-cell table:style-name="ce2" office:value-type="string" calcext:value-type="string">
            <text:p>2026 5th Asian Conference on Frontiers of Power and Energy (ACFPE 2026)</text:p>
          </table:table-cell>
          <table:table-cell table:style-name="ce2" office:value-type="float" office:value="72" calcext:value-type="float">
            <text:p>72</text:p>
          </table:table-cell>
          <table:table-cell table:style-name="ce2" office:value-type="float" office:value="35" calcext:value-type="float">
            <text:p>35</text:p>
          </table:table-cell>
          <table:table-cell table:style-name="ce3" office:value-type="date" office:date-value="2026-08-20" calcext:value-type="date">
            <text:p>2026-08-20</text:p>
          </table:table-cell>
          <table:table-cell table:number-columns-repeated="2"/>
          <table:table-cell table:style-name="ce2" office:value-type="string" calcext:value-type="string">
            <text:p>Chengdu, China</text:p>
          </table:table-cell>
          <table:table-cell table:style-name="ce2" office:value-type="string" calcext:value-type="string">
            <text:p>Oct 22, 2026 - Oct 24, 2026</text:p>
          </table:table-cell>
          <table:table-cell table:style-name="ce4" office:value-type="string" calcext:value-type="string">
            <text:p><text:a xlink:href="https://acfpe.org/" xlink:type="simple">https://acfpe.org/</text:a></text:p>
          </table:table-cell>
          <table:table-cell table:style-name="ce2" office:value-type="string" calcext:value-type="string">
            <text:p>2026 5th Asian Conference on Frontiers of Power and Energy (ACFPE 2026) Chengdu, China | Oct. 22 to 24, 2026 https://acfpe.org/ 2026 5th Asian Conference on Frontiers of Power and Energy(ACFPE 2026) will be hosted in Chengdu, China from Oct. 22 to 24, 2026, which is co-organized by Sichuan University and Sichuan Society for Electrical Engineering , supported by Hong Kong Society of Mechanical Engineers(HKSME), Global Energy Interconnection and Global Chinese Power &amp; Energy Society, media supported by Proceedings of the CSEE, CSEE Journal of Power and Energy Systems(CSEE JPES), Automation of Electric Power Systems, Power System Protection and Control, Journal of Modern Power Systems and Clean Energy (MPCE), Protection and Control of Modern Power Systems, Power System Technology, Journal of Electrical Engineering, New Type Power Systems, High Voltage Engineering, High Voltage, Electric Power Information, Communication Technology, Cyber-Physical Energy Systems, Electric Power Automation Equipment, Chinese Journal of Electrical Engineering, Power Generation Technology, Electrical Power Engineering Technology, Electric Machines, Control Applications, Sichuan Electric Power Technology, electronics, Southern Power System Technology, Neimenggu Dianli Jianshe, Nanfang Nengyuan jishu, Smart Power &amp; Energy Security, ÉLECTRIC POWER, Electrical Measurement &amp; Instrumentation, ADVANCED ENGINEERING SCIENCES, Integrated Intelligent Energy, Relay Protection and Excitation Technical Committee of CSHE and Distributed Energy. The theme of ACFPE 2026 is "AI-Empowered Technologies Innovation for Future Smart Grid". ACFPE 2026 is a conference which aims at bringing together participants from academia, industry, engineering, and administrative organizations around the world to exchange novel ideas, discuss innovative designs, explore enabling technologies and open problems, and share field trial experiences in power and energy areas. We warmly welcome prospective authors to submit your research papers to ACFPE 2026, and share your latest research results and valuable experiences with other top-scientists, engineers and scholars from all over the world. ●Publication &amp; Indexing Prof. Dipti Srinivasan (Keynote Speaker),IEEE Fellow, National University of Singapore, Singapore Prof. Zhao Xu (Keynote Speaker), The Hong Kong Polytechnic University, China Prof. Hazlie Mokhlis (Keynote Speaker), University of Malaysia, Malaysia Prof. SHADIKE Zulipiya (Keynote Speaker), Shanghai Jiao Tong University, China Prof. Rufeng Zhang (Keynote Speaker), Northeast Electric Power University, China ●Publication &amp; Indexing 1) All the accepted and presented papers will be submitted for inclusion into IEEE Xplore subject to meeting IEEE Xplore’s scope and quality requirements. The publisher will submit articles to Engineering Village, Scopus, Web of Science and other databases for review and indexing after publication. 2) Selected papers(accepted and presented) with high quality, which are presented on conference, will be recommended to publish in Cyber-Physical Energy Systems（ ISSN: 3050-7448). 3) Selected papers(accepted and presented) with high quality, which are presented on conference, will be recommended to publish in Energy Engineering. 4) Selected papers (accepted and presented) with high quality, which are presented on conference, will be recommended to publish in Electronics. ●Special Session Call for Papers Special Session I: AI-Enabled Stability Mechanism Analysis and Adaptive Control Technologies for New-Type Power Systems Session Chair: Yuhong Wang, Sichuan University, China Session Vice-Chair 1 : Zongsheng Zheng, Sichuan University, China Session Vice-Chair 2 : Shilin Gao, Sichuan University, China Special Session II: AI-Enabled Power Quality Analysis and Mitigation in New-Type Power Systems Session Chair: Yi Zhang, Fuzhou University, China Special Session III: Aggregated flexible resources for hierarchical coordinated operation and control in new distribution networks Session Chair: Yiyao Zhou, Xihua University, China Session Vice-Chair 1 : Xuefei Zhang, Xihua University, China Session Vice-Chair 2 : Jian Wang, Hohai University, China ●Call for Papers-topics Track 1: Advanced Energy Conversion Chair: Chew Kuew Wai, Universiti Tunku Abdul Rahman, Malaysia Track 2: AI and Data-driven Applications in Smart Grid Chair: Zhao Bochao, Tianjin University, China Vice Chair: Zhao Zhen, Shanghai Artificial Intelligence Laboratory, China Track 3: DER Based Grid-edge Awareness and Control Track 4: Energy Storage Applications and Hydrogen Track 5: Large-scale Renewable Energy Integration Track 6: Low-carbon Technologies on Power Systems Track 7: Multi-energy Systems Operation and Planning Track 8: Power Market and Economy Chair: Zhifang Yang, Chongqing University, China Track 9: Smart Grid Operation and Control Chair: Gao Qiu, Sichuan University, China more: https://acfpe.org/CFP.html ●Submission Method Please submit your paper through submission system https://cmt3.research.microsoft.com/ACFPE2026 If you have any question about submission: acfpe@vip.163.com ●Submission Note 1) Manuscripts must be written in English; 2) The manuscript should be written in accordance with the standard of template; 3) The paper should be no less than 5 pages and no longer than 10 pages; 4) Plagiarism is prohibited; 5) Duplicate submission is prohibited. ●Contact Conference Secretary: Ms. Amber Cao Tel: +852-30506862（Hong Kong） Phone: 19150956004 E-mail: acfpe@vip.163.com WeChat: 19102818126 Website: https://acfpe.org/</text:p>
          </table:table-cell>
          <table:table-cell table:number-columns-repeated="1013"/>
        </table:table-row>
        <table:table-row table:style-name="ro1">
          <table:table-cell table:style-name="ce2" office:value-type="string" calcext:value-type="string">
            <text:p>IEEE PES ISGT Asia 2026</text:p>
          </table:table-cell>
          <table:table-cell table:style-name="ce2" office:value-type="string" calcext:value-type="string">
            <text:p>2026 IEEE PES Innovative Smart Grid Technologies Asia (IEEE PES ISGT Asia 2026)</text:p>
          </table:table-cell>
          <table:table-cell table:style-name="ce2" office:value-type="float" office:value="78" calcext:value-type="float">
            <text:p>78</text:p>
          </table:table-cell>
          <table:table-cell table:style-name="ce2" office:value-type="float" office:value="25" calcext:value-type="float">
            <text:p>25</text:p>
          </table:table-cell>
          <table:table-cell table:style-name="ce3" office:value-type="date" office:date-value="2026-08-20" calcext:value-type="date">
            <text:p>2026-08-20</text:p>
          </table:table-cell>
          <table:table-cell table:number-columns-repeated="2"/>
          <table:table-cell table:style-name="ce2" office:value-type="string" calcext:value-type="string">
            <text:p>Wuhan, China</text:p>
          </table:table-cell>
          <table:table-cell table:style-name="ce2" office:value-type="string" calcext:value-type="string">
            <text:p>Oct 30, 2026 - Nov 1, 2026</text:p>
          </table:table-cell>
          <table:table-cell table:style-name="ce4" office:value-type="string" calcext:value-type="string">
            <text:p><text:a xlink:href="https://attend.ieee.org/isgt-asia-2026" xlink:type="simple">https://attend.ieee.org/isgt-asia-2026</text:a></text:p>
          </table:table-cell>
          <table:table-cell table:style-name="ce2" office:value-type="string" calcext:value-type="string">
            <text:p>2026 IEEE PES Innovative Smart Grid Technologies Asia (IEEE PES ISGT Asia 2026) Venue: Wuhan, China Date: October 30 - November 1, 2026 Website: https://attend.ieee.org/isgt-asia-2026 1. About Conference The 2026 IEEE PES Innovative Smart Grid Technologies Asia (IEEE PES ISGT Asia 2026) is a world-class academic and industrial conference jointly hosted by IEEE PES, organized by Wuhan University and co-organized by IEEE Wuhan Chapter and State Key Laboratory of Power Grid Environmental Protection. With authoritative keynote speeches, cutting-edge forums and interactive exhibitions, the conference will demonstrate the latest smart grid technological breakthroughs, applications and trends. The organizing committee invites global smart grid scholars, engineers, researchers and industry partners to exchange ideas, share experience, explore cooperation and witness this grand event. This year's edition will take place in Wuhan, China, from October 30 - November 1, 2026. 2. Conference Topics The IEEE PES ISGT Asia 2026, with the theme "New Energy and Power Technologies Toward Carbon Neutrality", will explore innovative solutions and advancements in renewable energy integration, energy storage, and low-carbon power systems. The Organizing Committee invites researchers and professionals to submit papers to the following conference tracks: 1) Tracks ◆ Electricity-Computing Collaboration: Data Centers as Flexible Resources in Low-Carbon Grids ◆ Offshore Wind Power Technologies and Grid Integration for Low-Carbon Systems ◆ Desert-Gobi-Wasteland Renewable Base Development and Multi-Energy Complementarity ◆ Coordinated Operation and Optimization of Hydro-Wind-Solar Hybrid Systems ◆ Electric Vehicle-Grid Integration and Smart Charging for Carbon Neutrality ◆ Advanced HVDC and Flexible DC Transmission Technologies for Bulk Renewable Delivery ◆ Power Quality Challenges and Mitigation in High-Renewable Penetration Systems ◆ Green Hydrogen Production, Storage, and Multi-Energy Coupling Systems ◆ Virtual Power Plants: Aggregation, Optimization, and Market Participation ◆ Low-Carbon Electricity Market Design: Carbon-Electricity Coupling and Prosumer Transactions ◆ Transportation Electrification: Integration with Power Systems and Low-Carbon Transition ◆ Other Topics 2) Special Sessions ◆ Coordinated Dispatch and Control of Transmission-Distribution-Microgrid Systems ◆ Power System Simulation in the Age of Artificial Intelligence ◆ Intelligent Microgrid and Energy Storage Technology Solutions Adapted to Local Scenarios in Iraq ◆ Low-Carbon and High-Reliability Urban Power Distribution ◆ Rural Distributed Smart Energy System ◆ Electro-Computational Coordination and High-Proportion New Energy Power Supply for Computation Infrastructure ◆ New Artificial Intelligence Technologies and Their Applications in Power Systems 3. Contribution Submission 1) Submission Guideline ◆ All submissions should be written in English. ◆ The paper must be an original, published scientific research result for the first time, and the content should meet the scope of the call for papers, or belong to the field of power system and related interdisciplinary disciplines. ◆ The papers will be reviewed by the review committee, and the review committee will notify the authors to make an oral presentation or poster presentation at the conference according to the review results. ◆ The initial submission should be a single PDF file in A4 format, strictly complying with the provided paper template. The templates are available on the conference website: https://attend.ieee.org/isgt-asia-2026/submission/ 2) Submission Link Submit your paper through the following link: https://easychair.org/conferences/?conf=isgtasia2026 4. Contact Us Ms. Lorna Ren +86-19182240053 isgta2026@youngac.cn</text:p>
          </table:table-cell>
          <table:table-cell table:number-columns-repeated="1013"/>
        </table:table-row>
        <table:table-row table:style-name="ro1">
          <table:table-cell table:style-name="ce2" office:value-type="string" calcext:value-type="string">
            <text:p>IEEE PEEE 2027</text:p>
          </table:table-cell>
          <table:table-cell table:style-name="ce2" office:value-type="string" calcext:value-type="string">
            <text:p>IEEE--2027 7th International Conference on Power, Energy and Electrical Engineering (PEEE 2027)</text:p>
          </table:table-cell>
          <table:table-cell table:style-name="ce2" office:value-type="float" office:value="72" calcext:value-type="float">
            <text:p>72</text:p>
          </table:table-cell>
          <table:table-cell table:style-name="ce2" office:value-type="float" office:value="28" calcext:value-type="float">
            <text:p>28</text:p>
          </table:table-cell>
          <table:table-cell table:style-name="ce3" office:value-type="date" office:date-value="2026-08-25" calcext:value-type="date">
            <text:p>2026-08-25</text:p>
          </table:table-cell>
          <table:table-cell table:number-columns-repeated="2"/>
          <table:table-cell table:style-name="ce2" office:value-type="string" calcext:value-type="string">
            <text:p>Milan, Italy</text:p>
          </table:table-cell>
          <table:table-cell table:style-name="ce2" office:value-type="string" calcext:value-type="string">
            <text:p>Jan 18, 2027 - Jan 21, 2027</text:p>
          </table:table-cell>
          <table:table-cell table:style-name="ce4" office:value-type="string" calcext:value-type="string">
            <text:p><text:a xlink:href="https://peee.org/" xlink:type="simple">https://peee.org/</text:a></text:p>
          </table:table-cell>
          <table:table-cell table:style-name="ce2" office:value-type="string" calcext:value-type="string">
            <text:p>Full name: IEEE--2027 7th International Conference on Power, Energy and Electrical Engineering (PEEE 2027) Abbreviation: PEEE 2027 https://peee.org/ ⭐2027 7th International Conference on Power, Energy and Electrical Engineering (PEEE 2027), which will be held in Milan, Italy during January 18-21, 2027. PEEE aims to provide a premier international platform for researchers, engineers, academicians, and industry professionals to present and exchange the latest innovations, trends, and challenges in the rapidly evolving fields of power and energy systems. ⭐Publication and Indexing: Submissions will be peer-reviewed and evaluated based on originality, relevance to conference, contributions, and presentation. Accepted full papers will be collected in PEEE 2027 to be published in IEEE Conference Proceedings, indexed by EI Compendex, SCOPUS, etc. ⭐Submission Methods: Option 1. ABSTRACTS (Presentation Only) All submitted abstracts will be peer-reviewed by our committees, and accepted one will be included in the conference program only, provided at the conference. Option 2. Full Paper (Paper Publication) All submitted papers will be reviewed by our committees, and accepted one will be published in conference proceedings. You can submit your paper through the online submission system: https://www.zmeeting.org/submission/peee2027 or by email: peee@sciei.org ⭐Conference Scope: Topics of interest for submission include, but are not limited to: Track 1. Power Systems and Electrical Engineering Track 2. Renewable Energy and Sustainable Energy Systems Track 3. Smart Grid and Energy Internet Track 4. Energy Storage and Emerging Technologies Track 5. Artificial Intelligence and Data-Driven Energy Systems Track 6. Electrification and Emerging Applications Track 7. Communication, IoT, and Cybersecurity in Energy Systems Track 8. Advanced Grid Technologies and Future Trends Please Visit: https://peee.org/cfp.html for more details ⭐Call for Special Session PEEE 2027 proposals for special sessions within the technical scope of the conference. Submissions special session proposals should be e-mailed to peee@sciei.org. Proposals should include the following information:1. Special session title and brief introduction; 2. General information of organizers (mail address of main contact person, biodata)3. Potential participants ⭐Award Young Scientist Awards Outstanding Contribution Award Outstanding Organizing Award Outstanding Reviewer Award Best Paper Award Best Student Paper Award Best Oral Presentation Award Best Poster Award ⭐Contact: Dr. Maggie Flores E-mail: peee@sciei.org Tel: +1-562-606-1057 (USA) +852-35000137 (Hong Kong) +86 18207777775 (China)</text:p>
          </table:table-cell>
          <table:table-cell table:number-columns-repeated="1013"/>
        </table:table-row>
        <table:table-row table:style-name="ro1">
          <table:table-cell table:style-name="ce2" office:value-type="string" calcext:value-type="string">
            <text:p>Cairo, Egypt-PEPSC 2026</text:p>
          </table:table-cell>
          <table:table-cell table:style-name="ce2" office:value-type="string" calcext:value-type="string">
            <text:p>2026 4th Power Electronics and Power System Conference (PEPSC 2026)</text:p>
          </table:table-cell>
          <table:table-cell table:style-name="ce2" office:value-type="float" office:value="70" calcext:value-type="float">
            <text:p>70</text:p>
          </table:table-cell>
          <table:table-cell table:style-name="ce2" office:value-type="float" office:value="25" calcext:value-type="float">
            <text:p>25</text:p>
          </table:table-cell>
          <table:table-cell table:style-name="ce3" office:value-type="date" office:date-value="2026-09-05" calcext:value-type="date">
            <text:p>2026-09-05</text:p>
          </table:table-cell>
          <table:table-cell table:number-columns-repeated="2"/>
          <table:table-cell table:style-name="ce2" office:value-type="string" calcext:value-type="string">
            <text:p>Cairo, Egypt</text:p>
          </table:table-cell>
          <table:table-cell table:style-name="ce2" office:value-type="string" calcext:value-type="string">
            <text:p>Nov 2, 2026 - Nov 6, 2026</text:p>
          </table:table-cell>
          <table:table-cell table:style-name="ce4" office:value-type="string" calcext:value-type="string">
            <text:p><text:a xlink:href="https://www.pepsc.org/" xlink:type="simple">https://www.pepsc.org/</text:a></text:p>
          </table:table-cell>
          <table:table-cell table:style-name="ce2" office:value-type="string" calcext:value-type="string">
            <text:p>2026 4th Power Electronics and Power System Conference (PEPSC 2026) Cario, Egypt | Nov. 2 to 6, 2026 https://www.pepsc.org/ 2026 4th Power Electronics and Power System Conference (PEPSC 2026) is co-organized by South China University of Technology and Hong Kong Society of Mechanical Engineers(HKSME), supported by Universiti Tunku Abdul Rahman, University of Electronic Science and Technology, Shanghai Jiao Tong University, Hangzhou Dianzi University, Center for Power Engineering (CPE), Nanyang Technological University, Chongqing University and Global Chinese Power &amp; Energy Society, media supported by Proceedings of the CSEE, Automation of Electric Power Systems, Power system Technology, High Voltage Engineering, Electric Power Information and Communication Technology, New Type Power Systems, CSEE Journal of Power and Energy Systems(CSEE JPES), Protection and Control of Modern Power Systems, High Voltage, Energy Internet, Power System Protection and Control, Electric Machines and Control, Electrical Power Engineering Technology, Cyber-Physical Energy Systems, Electric Power Automation Equipment, Power Generation Technology, CPSS Transactions on Power Electronics and Applications(CPSS TPEA), Journal of Power Supply, Nanfang Nengyuan Jianshe, Neimenggu Dianli Jishu, Smart Power &amp; Energy Security, Electric Power, Southern Power System Technology, Global Energy Interconnection, ÉLECTRIC POWER, Electrical Measurement &amp; Instrumentation, Integrated Intelligent Energy, Smart Power Research Group, SPRG, bjx.com.cn and Distributed Energy, which will be held in Cairo, Egypt from Nov. 2 to 6, 2026. The theme of PEPSC 2026 is "Empowering the Future with Smart, Sustainable Energy: Bridging Ancient Wisdom with Modern Innovation". We would like to invite you to join us in this important event and share your recent advanced development and research findings in Power Electronics and Power System to all attendees. Besides, it is also a good opportunity for you and your family to enjoy the culture and view in Cario, Egypt. We are looking forward to seeing you in PEPSC 2026. ●Publication &amp; Indexing 1) All the accepted and presented papers will be submitted for inclusion into conference proceeding subject to meeting the publisher’s scope and quality requirements. The publisher will submit articles to Engineering Village, Scopus, Web of Science and other databases for review and indexing after publication. 2) Selected papers(accepted and presented) with high quality, which are presented on conference, will be recommended to publish in Cyber-Physical Energy Systems（ ISSN: 3050-7448). ●Call for Papers-topics 1. Power Electronics Topology and Control 2. Wind and Solar Storage Power Electronics 3. Power Electronics for Power Transmission and Distribution 4. Transportation Electrification Power Electronics 5. Data Center Power Electronics 6. Power Electronic Devices 7. Control, Modeling, Simulation 8. System Stability and Reliability 9. Renewable Energy Conversion Technology and New Energy Storage 10. New Power System 11. Smart Grid and Energy 12. Microgrids more: https://www.pepsc.org/cfp.html ●Submission Method Please submit your paper through submission system https://cmt3.research.microsoft.com/PEPSC2026 If you have any question about submission: info@pepsc.org ●Submission Note 1) Manuscripts must be written in English; 2) The manuscript should be written in accordance with the standard of template; 3) The paper should be no less than 5 pages and no longer than 10 pages; 4) Plagiarism is prohibited; 5) Duplicate submission is prohibited. ●Contact Conference Secretary：Ms. Joy Mou General：+852-30506862（Hong Kong） Phone：19983106382 E-mail：info@pepsc.org WeChat：19983106382 Website：https://www.pepsc.org/</text:p>
          </table:table-cell>
          <table:table-cell table:number-columns-repeated="1013"/>
        </table:table-row>
        <table:table-row table:style-name="ro1">
          <table:table-cell table:style-name="ce2" office:value-type="string" calcext:value-type="string">
            <text:p>ICAEM 2027</text:p>
          </table:table-cell>
          <table:table-cell table:style-name="ce2" office:value-type="string" calcext:value-type="string">
            <text:p>2027 The 10th International Conference on Advanced Energy Materials (ICAEM 2027)</text:p>
          </table:table-cell>
          <table:table-cell table:style-name="ce2" office:value-type="float" office:value="28" calcext:value-type="float">
            <text:p>28</text:p>
          </table:table-cell>
          <table:table-cell table:style-name="ce2" office:value-type="float" office:value="25" calcext:value-type="float">
            <text:p>25</text:p>
          </table:table-cell>
          <table:table-cell table:style-name="ce3" office:value-type="date" office:date-value="2026-09-05" calcext:value-type="date">
            <text:p>2026-09-05</text:p>
          </table:table-cell>
          <table:table-cell table:number-columns-repeated="2"/>
          <table:table-cell table:style-name="ce2" office:value-type="string" calcext:value-type="string">
            <text:p>Phuket, Thailand</text:p>
          </table:table-cell>
          <table:table-cell table:style-name="ce2" office:value-type="string" calcext:value-type="string">
            <text:p>Jan 23, 2027 - Jan 25, 2027</text:p>
          </table:table-cell>
          <table:table-cell table:style-name="ce4" office:value-type="string" calcext:value-type="string">
            <text:p><text:a xlink:href="http://www.icaem.org" xlink:type="simple">http://www.icaem.org</text:a></text:p>
          </table:table-cell>
          <table:table-cell table:style-name="ce2" office:value-type="string" calcext:value-type="string">
            <text:p>Full Name: 2027 The 10th International Conference on Advanced Energy Materials (ICAEM 2027) Abbreviation: ICAEM 2027 Phuket, Thailand, January 23-25, 2027 2027 The 10th International Conference on Advanced Energy Materials (ICAEM 2027) will be held in Phuket, Thailand, during 【 January 23-25, 2027 】. Conference official website: http://www.icaem.org ICAEM 2027 conference proceedings will be published by : Scientific.Net collection, indexed by SCOPUS, SCImago Journal &amp; Country Rank (SJR), etc. →Previous ICAEMs All ICAEM proceedings have been successfully published, and have been indexed by EI, SCOPUS, etc. →Submit Way Submit via system: https://www.zmeeting.org/submission/icaem2027 If you plan to do presentation only, you could submit abstract. For any inquiries, please be free to contact email: icaem@sciei.org →Call for Special Session Welcome you to propose topic to organize special session, please don't hesitate to contact us if you are with interest. →Call for Paper (Scopes) included but not limited to Non ferrous metal material Iron and steel High strength alloys Materials processing and handling Composites Micro/Nano materials Ceramic Optical, Electronic, Magnetic materials Carbon based materials https://icaem.org/cfp.html →Program January 23--Registration, collecting conference materials; January 24--Keynote Speeches &amp; Plenary Speeches, Parallel Sessions; January 25--Parallel Sessions; →Contact: Secretary: Ms. Celine. Xi Email: icaem@sciei.org Tel： +1-562-606-1057/+861-820-7777775 Website: www.icaem.org</text:p>
          </table:table-cell>
          <table:table-cell table:number-columns-repeated="1013"/>
        </table:table-row>
        <table:table-row table:style-name="ro1">
          <table:table-cell table:style-name="ce2" office:value-type="string" calcext:value-type="string">
            <text:p>CPEEE 2027</text:p>
          </table:table-cell>
          <table:table-cell table:style-name="ce2" office:value-type="string" calcext:value-type="string">
            <text:p>2027 17th International Conference on Power, Energy, and Electrical Engineering (CPEEE 2027)</text:p>
          </table:table-cell>
          <table:table-cell table:style-name="ce2" office:value-type="float" office:value="72" calcext:value-type="float">
            <text:p>72</text:p>
          </table:table-cell>
          <table:table-cell table:style-name="ce2" office:value-type="float" office:value="32" calcext:value-type="float">
            <text:p>32</text:p>
          </table:table-cell>
          <table:table-cell table:style-name="ce3" office:value-type="date" office:date-value="2026-09-15" calcext:value-type="date">
            <text:p>2026-09-15</text:p>
          </table:table-cell>
          <table:table-cell table:number-columns-repeated="2"/>
          <table:table-cell table:style-name="ce2" office:value-type="string" calcext:value-type="string">
            <text:p>Yokohama, Japan</text:p>
          </table:table-cell>
          <table:table-cell table:style-name="ce2" office:value-type="string" calcext:value-type="string">
            <text:p>Mar 5, 2027 - Mar 7, 2027</text:p>
          </table:table-cell>
          <table:table-cell table:style-name="ce4" office:value-type="string" calcext:value-type="string">
            <text:p><text:a xlink:href="http://www.cpeee.net/" xlink:type="simple">http://www.cpeee.net/</text:a></text:p>
          </table:table-cell>
          <table:table-cell table:style-name="ce2" office:value-type="string" calcext:value-type="string">
            <text:p>Abbreviation：CPEEE 2027 Full Name: 2027 17th International Conference on Power, Energy, and Electrical Engineering (CPEEE 2027) Yokohama, Japan March 5-7, 2027 http://www.cpeee.net/ Publication: Accepted papers after proper registration and presentation will be published into CPEEE Conference Proceedings, which will be submitted for Ei Compendex and Scopus. Call For Papers: ★Power Electronics and Key Technologies Advanced Power Semiconductors Semiconductor Technology Diagnosis And Sensing Systems Power Distribution Power Electronics and Power Drives Power Market and Power System Economics Power System and Its Automation Electromagnetic Transients Programs ★Electrical Engineering and Automation Converters and Inverters Electric Drivers And Application Electrical Machinery And Electrical Apparatus Electrical Materials And Process Materials For Electrotechnics Computation Intelligence In Electrical Engineering ★Energy Utilization and Development Distributed Generation, Fuel Cells And Renewable Power Flow Analysis Energy Systems Energy Conservation Power Systems and Energy Wind, Solar and Renewable Energy More Topics: http://www.cpeee.net/cfp.html Submission Methods: Full Paper(publication and oral presentation) Abstract(oral presentation only) Please log in the Electronic Submission System to submit your paper. --Electronic Submission System: http://www.easychair.org/conferences/?conf=cpeee2027 --By email: cpeee_conf@126.com Contacts: Ms. Chiko E-mail: cpeee_conf@126.com</text:p>
          </table:table-cell>
          <table:table-cell table:number-columns-repeated="1013"/>
        </table:table-row>
        <table:table-row table:style-name="ro1">
          <table:table-cell table:style-name="ce2" office:value-type="string" calcext:value-type="string">
            <text:p>Springer ICRCE 2027</text:p>
          </table:table-cell>
          <table:table-cell table:style-name="ce2" office:value-type="string" calcext:value-type="string">
            <text:p>Springer--2027 17th International Conference on Renewable and Clean Energy (ICRCE 2027)</text:p>
          </table:table-cell>
          <table:table-cell table:style-name="ce2" office:value-type="float" office:value="82" calcext:value-type="float">
            <text:p>82</text:p>
          </table:table-cell>
          <table:table-cell table:style-name="ce2" office:value-type="float" office:value="30" calcext:value-type="float">
            <text:p>30</text:p>
          </table:table-cell>
          <table:table-cell table:style-name="ce3" office:value-type="date" office:date-value="2026-09-15" calcext:value-type="date">
            <text:p>2026-09-15</text:p>
          </table:table-cell>
          <table:table-cell table:number-columns-repeated="2"/>
          <table:table-cell table:style-name="ce2" office:value-type="string" calcext:value-type="string">
            <text:p>Yokohama, Japan</text:p>
          </table:table-cell>
          <table:table-cell table:style-name="ce2" office:value-type="string" calcext:value-type="string">
            <text:p>Mar 5, 2027 - Mar 7, 2027</text:p>
          </table:table-cell>
          <table:table-cell table:style-name="ce4" office:value-type="string" calcext:value-type="string">
            <text:p><text:a xlink:href="http://www.icrce.org/" xlink:type="simple">http://www.icrce.org/</text:a></text:p>
          </table:table-cell>
          <table:table-cell table:style-name="ce2" office:value-type="string" calcext:value-type="string">
            <text:p>Abbreviation: ICRCE 2027 Full Name: Springer--2027 17th International Conference on Renewable and Clean Energy (ICRCE 2027) Yokohama, Japan March 5-7, 2027 http://www.icrce.org/ Call for Papers (include, but are not limited to): Renewable (Green) Energy Systems and Sources (RESSs) as Wind Power, Hydropower, Solar Energy, Biomass, Biofuel, Geothermal Energy, Wave Energy, Tidal energy, Hydrogen &amp; Fuel Cells, Energy Storage New Trends and Technologies for RESSs Policies and Strategies for RESSs Energy Transformation from Renewable Energy System (RES) to Grid Novel Energy Conversion Studies for RESs Power Devices and Driving Circuits for RESs Control Techniques for RESs Grid Interactive Systems Used in Hybrid RESs Performance Analysis of RESs Hybrid RESSs Decision Support Systems for RESSs Renewable Energy Research and Applications for Industries RESSs for Electrical Vehicles and Components Artificial Intelligence and Machine Learning Studies for RESs and Applications Computational Methods for RESSs Energy Savings for Vehicular Technology, Power Electronics, Electric Machinery and Control, etc. New Approaches in Lightings Public Awareness and Education for Renewable Energy and Systems Reliability and Maintenance in RESSs Smart grids and RESSs Safety and Security of RESSs Renewable Energy Systems in Smart Cities Future Challenges and Directions for RESS More topics: https://icrce.org/cfp.html Publication: Accepted and selected papers will be recommended to be published into Springer Book Series-Lecture Notes in Electrical Engineering, which will be submitted for EI Compendex and Scopus databases. Submission Methods: Full Paper(publication and oral presentation) Abstract(oral presentation only) Electronic Submission System (.pdf) http://confsys.iconf.org/submission/icrce2027 Email Submission: icrceconf@126.com Contacts: Ms. Rachel Cao Tel: +86-132-9000-0003 E-mail: icrceconf@126.com</text:p>
          </table:table-cell>
          <table:table-cell table:number-columns-repeated="1013"/>
        </table:table-row>
        <table:table-row table:style-name="ro1">
          <table:table-cell table:style-name="ce2" office:value-type="string" calcext:value-type="string">
            <text:p>IEEE-AIBDCC 2026</text:p>
          </table:table-cell>
          <table:table-cell table:style-name="ce2" office:value-type="string" calcext:value-type="string">
            <text:p>2026 IEEE International Conference on Artificial Intelligence, Big Data and Cloud Computing (AIBDCC 2026)</text:p>
          </table:table-cell>
          <table:table-cell table:style-name="ce2" office:value-type="float" office:value="82" calcext:value-type="float">
            <text:p>82</text:p>
          </table:table-cell>
          <table:table-cell table:style-name="ce2" office:value-type="float" office:value="30" calcext:value-type="float">
            <text:p>30</text:p>
          </table:table-cell>
          <table:table-cell table:style-name="ce3" office:value-type="date" office:date-value="2026-09-30" calcext:value-type="date">
            <text:p>2026-09-30</text:p>
          </table:table-cell>
          <table:table-cell table:number-columns-repeated="2"/>
          <table:table-cell table:style-name="ce2" office:value-type="string" calcext:value-type="string">
            <text:p>Cchengdu, China</text:p>
          </table:table-cell>
          <table:table-cell table:style-name="ce2" office:value-type="string" calcext:value-type="string">
            <text:p>Oct 30, 2026 - Oct 31, 2026</text:p>
          </table:table-cell>
          <table:table-cell table:style-name="ce4" office:value-type="string" calcext:value-type="string">
            <text:p><text:a xlink:href="https://www.aibdcc.net/" xlink:type="simple">https://www.aibdcc.net/</text:a></text:p>
          </table:table-cell>
          <table:table-cell table:style-name="ce2" office:value-type="string" calcext:value-type="string">
            <text:p>【IEEE Conference--Call for Papers】 2026 IEEE International Conference on Artificial Intelligence, Big Data and Cloud Computing (AIBDCC 2026) *【Important Information】: Website: https://www.aibdcc.net/ Venue: Chengdu, China (both online and in-person) Conference Date: Oct. 30-31, 2026 *【Conference Introduction】: AIBDCC 2026 has been officially listed on IEEE Conference List: https://conferences.ieee.org/conferences_events/conferences/conferencedetails/72041 2026 IEEE International Conference on Artificial Intelligence, Big Data and Cloud Computing (AIBDCC 2026) will be held in Chengdu, China during Oct. 30-31, 2026. It is organized by School of Computer Science, Chengdu University, China; sponsored by IEEE, IEEE Chengdu Section. AIBDCC 2026 will be held in Chengdu University, China. During the upcoming conference, the invited renowned professors will share with us the recent innovations in the fields of Artificial Intelligence, Big Data and Cloud Computing. The conference will mainly feature on keynote speeches as well as peer-reviewed paper presentations. In addition, social program or academic visit will be arranged to encourage communication, discussion or cooperation among the researchers in these fields. We invite submissions of papers presenting an original high-quality research and development for the conference. All papers must be written in English and will be peer-reviewed by technical committees of the Conference and all accepted papers will be published in the conference proceedings. *【Publication and Indexing】: ★All accepted papers will be included in AIBDCC 2026 Conference Proceedings and published by IEEE, and indexed by Ei Compendex, Scopus and CPCI-S. *【Journal Recommendation】: ★You may choose to publish your paper in AIBDCC 2026 proceedings, or extend it for free publication in the following journals: ①Journal of Machine Learning Advances Frequency: Quarterly Submission to First Decision: 2 days Submission to Acceptance: 20 days Accept to Publish: 30 days Journal website: https://ojs.weavecorepress.com/index.php/JMLA ② Journal of Algorithms in Complex Systems Frequency: Quarterly Submission to First Decision: 2 days Submission to Acceptance: 20 days Accept to Publish: 30 days Journal website: https://ojs.weavecorepress.com/index.php/JACS *【Submission Methods】: 1. Online Submission System: https://cmt3.research.microsoft.com/AIBDCC2026 2. Submission Email: aibdcc@126.com Submission guidelines: https://www.aibdcc.net/Submission%20Guidelines.html *【Contact us】: Website: https://www.aibdcc.net/ Email: aibdcc@126.com Tel: +8613502461341(Wechat) QQ: 2056773349 *【Conference Speakers】: Keynote Speaker I: Prof. Irwin King, The Chinese University of Hong Kong, Hong Kong (IEEE Fellow) Keynote Speaker II: Prof. Zheng Yan, Xidian University, China (IEEE Fellow) Keynote Speaker III: Prof. Philippe Fournier-Viger, Shenzhen University, China Keynote Speaker IV: Prof. Yoshifumi Manabe, Kogakuin University, Japan *【Call for papers】: Track 1: Foundations of Artificial Intelligence Track 2: Big Data Technologies and Analytics Track 3: Cloud Computing and Infrastructure Track 4: AI, Big Data, and Cloud Convergence Track 5: Security, Privacy, and Trust Track 6: Applications and Interdisciplinary Research (for more topics: https://www.aibdcc.net/Call%20for%20Papers.html ) *【Guidelines for submission】: 1. The papers should be written in English and clearly state the title, objective, method, results, and conclusion with major keywords. 2. Papers prepared in the prescribed format are to be submitted. 3. The number of pages of the paper should be no less than 5 pages with double columns. 4. The review period is about 3-4 weeks. 5. The paper should be original work of the author(s), and no portion of the paper (including, but not limited to, graphics and figures) has been previously published. The paper is not currently under consideration for publication elsewhere. 6. Download the paper template from the official website. 7. The results will be available within 3-4 weeks after submission. If the review is fast, the results will be available within 1-2 weeks. The earlier the submission, the earlier the review and the earlier the acceptance notice. *【Types of Participation】: 1. Participation as an Author: For each accepted paper, one author is permitted to give a presentation; all co-authors can attend the conference free of charge. 2. Keynote Speaker: Applicants can apply to deliver a keynote speech, which will be subject to review by the organizing committee. 3. Oral Presentation: Each oral presenter will have 10-15 minutes for their presentation. 4. Poster Presentation: Poster presenters should prepare their posters in accordance with the poster template provided on the official website. 5. Listener: Participants who do not submit papers but only attend the conference can take part in Q&amp;A session, and are also eligible to give oral speeches or make poster presentations.</text:p>
          </table:table-cell>
          <table:table-cell table:number-columns-repeated="1013"/>
        </table:table-row>
        <table:table-row table:style-name="ro1">
          <table:table-cell table:style-name="ce2" office:value-type="string" calcext:value-type="string">
            <text:p>IEEA 2027</text:p>
          </table:table-cell>
          <table:table-cell table:style-name="ce2" office:value-type="string" calcext:value-type="string">
            <text:p>2027 The 16th International Conference on Informatics, Environment, Energy and Applications (IEEA 2027)</text:p>
          </table:table-cell>
          <table:table-cell table:style-name="ce2" office:value-type="float" office:value="90" calcext:value-type="float">
            <text:p>90</text:p>
          </table:table-cell>
          <table:table-cell table:style-name="ce2" office:value-type="float" office:value="30" calcext:value-type="float">
            <text:p>30</text:p>
          </table:table-cell>
          <table:table-cell table:style-name="ce3" office:value-type="date" office:date-value="2026-09-30" calcext:value-type="date">
            <text:p>2026-09-30</text:p>
          </table:table-cell>
          <table:table-cell table:number-columns-repeated="2"/>
          <table:table-cell table:style-name="ce2" office:value-type="string" calcext:value-type="string">
            <text:p>Tokyo, Japan</text:p>
          </table:table-cell>
          <table:table-cell table:style-name="ce2" office:value-type="string" calcext:value-type="string">
            <text:p>Feb 24, 2027 - Feb 26, 2027</text:p>
          </table:table-cell>
          <table:table-cell table:style-name="ce4" office:value-type="string" calcext:value-type="string">
            <text:p><text:a xlink:href="http://ieea.org/" xlink:type="simple">http://ieea.org/</text:a></text:p>
          </table:table-cell>
          <table:table-cell table:style-name="ce2" office:value-type="string" calcext:value-type="string">
            <text:p>Full name: 2027 The 16th International Conference on Informatics, Environment, Energy and Applications (IEEA 2027) Abbreviation: IEEA 2027 http://ieea.org/ The 16th International Conference on Informatics, Environment, Energy and Applications (IEEA 2027) will be held in Tokyo, Japan, during February 24-26, 2027. IEEA conference is initiated by Science and Engineering Institute, USA and assisted by National University of Ireland Galway, Ireland, University of Wollongong, Australia, Tokai University, Japan, Agriculture University, China, Chulalongkorn University, Thailand and German University in Cairo, Egypt This is an annual conference started in Singapore, 2012. Then, it was successfully held in major cities, such as Bali, Shanghai, Pattaya, Hong Kong, Jeju Island, Beijing, Osaka, Amsterdam, Tokyo. It has been attended by more than 500 participants from 20 countries. On behalf of the Organizing Committee, we warmly invite you, informatics, environment, energy and applications scientist, engineer or technician, graduate student, or simply interested by the technique, to take part in this unique and innovative conference with your enthusiasm to develop, your desire to apply and your willingness to mature the informatics, environment, energy and applications. Publication and Indexing: Accepted and Registered papers can be published by conference proceedings, which will be indexed by Ei Compendex, Scopus, etc main database. IEEA conference proceedings for last 15 years are all indexed successfully by EI Compendex and SCOPUS in three months after online. IEEA 2026, ACM proceeding (ISBN:979-8-4007-2209-7), Online | EI Compendex | SCOPUS IEEA 2025, Springer proceeding (Electronic ISSN: 1876-1119; Print ISSN: 1876-1100), Online | EI Compendex | SCOPUS IEEA 2024, ACM proceeding (ISBN:979-8-4007-1642-3), Online | EI Compendex | SCOPUS IEEA 2023, ACM proceeding (ISBN:979-8-4007-0012-5), Online | EI Compendex | SCOPUS IEEA 2022, ACM proceeding (ISBN:978-1-4503-9583-0), Online | EI Compendex | SCOPUS IEEA 2021, ACM proceeding (ISBN:978-1-4503-8902-0), Online | EI Compendex | SCOPUS ........ Submission ways: Submission is available now: https://www.zmeeting.org/submission/ieea2027 An account is need. If you have any questions, feel free to contact conference secretary ieea@sciei.org. Call for Papers: Informatics and Applications Environmental Informatics Energy Informatics For more topics, please visit: http://ieea.org/cfp.html Submission Types below: *Submitting an Abstract: Presentation Only *Submitting a full Paper: Publication and Presentation Call for Special Session: IEEA proposals for special sessions within the technical scope of the conference. Special-session proposals should be submitted by the prospective organizer(s) who will commit to promoting and handling the review process of special session as Chair or Co-Chair of the event. Accepted papers will be published by conference proceedings, inclusion to indexing databases. *Proposals should include the following information: *Title *Brief description of the session *Related topics *Name, brief biodata and photo of organizer *E-mail address of main contact person *Please send these information to mail address ieea@sciei.org Program February 24, 2027--Registration,collecting conference materials February 25, 2027--Keynote Speech &amp; Presentation Day February 26, 2027--Presentation Day (Pending) Contact Us: Mail Us: Ms. Amber Lin; ieea@sciei.org Call Us: +1-562-606-1057 (English); +86 18207777775 (English&amp;Chinese)</text:p>
          </table:table-cell>
          <table:table-cell table:number-columns-repeated="1013"/>
        </table:table-row>
        <table:table-row table:style-name="ro1">
          <table:table-cell table:style-name="ce2" office:value-type="string" calcext:value-type="string">
            <text:p>AIPE 2027</text:p>
          </table:table-cell>
          <table:table-cell table:style-name="ce2" office:value-type="string" calcext:value-type="string">
            <text:p>IEEE--2027 the 4th International Conference on Artificial Intelligence and Power Engineering (AIPE 2027)</text:p>
          </table:table-cell>
          <table:table-cell table:style-name="ce2" office:value-type="float" office:value="90" calcext:value-type="float">
            <text:p>90</text:p>
          </table:table-cell>
          <table:table-cell table:style-name="ce2" office:value-type="float" office:value="28" calcext:value-type="float">
            <text:p>28</text:p>
          </table:table-cell>
          <table:table-cell table:style-name="ce3" office:value-type="date" office:date-value="2026-10-10" calcext:value-type="date">
            <text:p>2026-10-10</text:p>
          </table:table-cell>
          <table:table-cell table:number-columns-repeated="2"/>
          <table:table-cell table:style-name="ce2" office:value-type="string" calcext:value-type="string">
            <text:p>Nanjing, China</text:p>
          </table:table-cell>
          <table:table-cell table:style-name="ce2" office:value-type="string" calcext:value-type="string">
            <text:p>Feb 26, 2027 - Feb 28, 2027</text:p>
          </table:table-cell>
          <table:table-cell table:style-name="ce4" office:value-type="string" calcext:value-type="string">
            <text:p><text:a xlink:href="https://www.aipe.org/" xlink:type="simple">https://www.aipe.org/</text:a></text:p>
          </table:table-cell>
          <table:table-cell table:style-name="ce2" office:value-type="string" calcext:value-type="string">
            <text:p>Full Name: IEEE--2027 the 4th International Conference on Artificial Intelligence and Power Engineering (AIPE 2027) Abbreviation: AIPE 2027 Nanjing, China | February 26 - 28, 2027 https://www.aipe.org/ **Sponsored by Nanjing Tech University, China **Proceedings The registered and presented papers will be published into AIPE 2027 Conference Proceedings, and reviewed by the IEEE Conference Publication Program for IEEE Xplore, Ei Compendex and Scopus. AIPE2025 | IEEE | ISBN: 979-8-3315-6507-7 - IEEE Xplore | Ei Compendex &amp; Scopus AIPE2024 | IEEE | ISBN: 979-8-3503-8824-4 - IEEE Xplore | Ei Compendex &amp; Scopus AIPE2023 | IEEE | ISBN: 979-8-3503-1078-8 - IEEE Xplore | Ei Compendex &amp; Scopus **Conference Committees *Advisory Chairs Tek-Tjing Lie, Auckland University of Technology, New Zealand Kenji Ushimaru, Infra Innovations, Inc., USA *Conference Chair Ciwei Gao, Southeast University, China *Conference Co-chairs Meng Song, Southeast University, China A. R. Al-Ali, American University of Sharjah, UAE *Conference Program Chairs Francesco Zirilli, Universita di Roma La Sapienza, Italy Masayuki Morimoto, Tokai University, Japan Marek R Ogiela, AGH University of Science and Technology, Poland **Call for Papers We invite authors to submit papers on topics of artificial intelligence and power engineering, including but not limited to: 1. Artificial Intelligence (AI) Core Methods &amp; Technologies Frontier Applications &amp; Interdisciplinary Areas 2. Power &amp; Energy Engineering Core &amp; Traditional Technologies Renewable Energy &amp; Modern Systems Operations, Markets &amp; Digitalization **Submission AIPE 2027 is now accepting manuscript submissions. Please submit your full paper to us: aipeconference@vip.163.com Submission guideline: https://www.aipe.org/submission.html **Contact us Ms. Xin Zhang Email: aipeconference@vip.163.com WeChat: Iconf-ee-1</text:p>
          </table:table-cell>
          <table:table-cell table:number-columns-repeated="1013"/>
        </table:table-row>
        <table:table-row table:style-name="ro1">
          <table:table-cell table:style-name="ce2" office:value-type="string" calcext:value-type="string">
            <text:p>IEEE-PSETC 2026</text:p>
          </table:table-cell>
          <table:table-cell table:style-name="ce2" office:value-type="string" calcext:value-type="string">
            <text:p>2026 2nd IEEE International Power and Sustainable Energy Technologies Conference</text:p>
          </table:table-cell>
          <table:table-cell table:style-name="ce2" office:value-type="float" office:value="72" calcext:value-type="float">
            <text:p>72</text:p>
          </table:table-cell>
          <table:table-cell table:style-name="ce2" office:value-type="float" office:value="35" calcext:value-type="float">
            <text:p>35</text:p>
          </table:table-cell>
          <table:table-cell table:style-name="ce3" office:value-type="date" office:date-value="2026-10-20" calcext:value-type="date">
            <text:p>2026-10-20</text:p>
          </table:table-cell>
          <table:table-cell table:number-columns-repeated="2"/>
          <table:table-cell table:style-name="ce2" office:value-type="string" calcext:value-type="string">
            <text:p>Singapore</text:p>
          </table:table-cell>
          <table:table-cell table:style-name="ce2" office:value-type="string" calcext:value-type="string">
            <text:p>Nov 13, 2026 - Nov 15, 2026</text:p>
          </table:table-cell>
          <table:table-cell table:style-name="ce4" office:value-type="string" calcext:value-type="string">
            <text:p><text:a xlink:href="https://www.psetc.net/" xlink:type="simple">https://www.psetc.net/</text:a></text:p>
          </table:table-cell>
          <table:table-cell table:style-name="ce2" office:value-type="string" calcext:value-type="string">
            <text:p>【IEEE Conference--Call for Papers】 2026 2nd International Power and Sustainable Energy Technologies Conference (PSETC 2026) *【Important Information】: Website: https://www.psetc.net/ Venue: Singapore (both online and in-person) Conference Date: November 13-15, 2026 *【Conference Introduction】: 2026 2nd International Power and Sustainable Energy Technologies Conference (PSETC 2026) will be held in Singapore during November 13-15, 2026. It is jointly organized by Newcastle University in Singapore, National University of Singapore (NUS), Nanyang Technological University (NTU), and Singapore Institute of Technology (SIT); Sponsored by IEEE, and IEEE PES Singapore. PSETC 2026 will be held at NTU Alumni House. During the upcoming conference, the invited renowned professors will share with us the recent innovations in the fields of Power and Sustainable Energy Technologies. The conference will mainly feature on keynote speeches as well as peer-reviewed paper presentations. In addition, social program or academic visit will be arranged to encourage communication, discussion or cooperation among the researchers in this field. We invite submissions of papers presenting an original high-quality research and development for the conference. All papers must be written in English and will be peer-reviewed by technical committees of the Conference and all accepted papers will be published in the conference proceedings. *【Publication and Indexing】: ★All accepted papers will be included in PSETC 2026 Conference Proceedings and published by IEEE, which will be archived in IEEE Xplore, and indexed by Ei Compendex, Scopus and CPCI (ISTP). ★PSETC 2025 Proceedings: published by IEEE (ISBN: 979-8-3315-3475-2), indexed by EI Compendex, Scopus, and CPCI (ISTP). *【Submission Methods】: 1. Online Submission System: https://cmt3.research.microsoft.com/PSETC2026 2. Submission Email: psetc2025@163.com Submission guidelines: https://www.psetc.net/Guide%20For%20Submissions.html *【Contact us】: Website: https://www.psetc.net/ Email: psetc2025@163.com Tel: +8613502461341(Wechat) QQ: 2056773349 *【Conference Speakers】: Keynote Speaker I: Prof. Mohamed Benbouzid, University of Brest, France (IEEE Fellow, IEEE PES) Keynote Speaker II: Prof. Fushuan Wen, Zhejiang University, China (IEEE Fellow, IEEE PES) Keynote Speaker III: Prof. Alessandro Romagnoli, Nanyang Technological University of Singapore, Singapore Keynote Speaker IV: Prof. Henry Hu, University of Windsor, Canada Keynote Speaker V: Assoc. Prof. Jimmy Chih-Hsien PENG, National University of Singapore, Singapore (IEEE Senior Member / IEEE PES Singapore, Excom member) Keynote Speaker VI: Assist. Prof. Dhivya Sampath Kumar, Singapore Institute of Technology, Singapore (IEEE PES Singapore, Excom member) *【Call for papers】: Track 1: Power Engineering Power and Energy Generation, Transmission, and Distribution Fault Monitoring, Predictive Maintenance, and Diagnostic Power Electronics and Power System Technology Electrical Machinery and Control Engineering Electrical Measurement Engineering and Instrumentation Electricity Networks of the Future Track 2: Sustainable Energy Technologies Solar Energy Biomass Energy Wind Energy Geothermal Energy Renewable Energy Utilizations and Applications Green Energy Systems (for more topics: https://www.psetc.net/Call%20For%20Papers.html) *【Guidelines for submission】: 1. The papers should be written in English and clearly state the title, objective, method, results, and conclusion with major keywords. 2. Papers prepared in the prescribed format are to be submitted. 3. The number of pages of the paper should be no less than 5 pages with double columns. 4. The review period is about 3-4 weeks. 5. The paper should be original work of the author(s), and no portion of the paper (including, but not limited to, graphics and figures) has been previously published. The paper is not currently under consideration for publication elsewhere. 6. Download the paper template from the official website. 7. The results will be available within 3-4 weeks after submission. If the review is fast, the results will be available within 1-2 weeks. The earlier the submission, the earlier the review and the earlier the acceptance notice. *【Types of Participation】: 1. Participation as an Author: For each accepted paper, one author is permitted to give a presentation; all co-authors can attend the conference free of charge. 2. Keynote Speaker: Applicants can apply to deliver a keynote speech, which will be subject to review by the organizing committee. 3. Oral Presentation: Each oral presenter will have 10-15 minutes for their presentation. 4. Poster Presentation: Poster presenters should prepare their posters in accordance with the poster template provided on the official website. 5. Listener: Participants who do not submit papers but only attend the conference can take part in Q&amp;A session, and are also eligible to give oral speeches or make poster presentations.</text:p>
          </table:table-cell>
          <table:table-cell table:number-columns-repeated="1013"/>
        </table:table-row>
        <table:table-row table:style-name="ro1">
          <table:table-cell table:style-name="ce2" office:value-type="string" calcext:value-type="string">
            <text:p>ICERE 2027</text:p>
          </table:table-cell>
          <table:table-cell table:style-name="ce2" office:value-type="string" calcext:value-type="string">
            <text:p>2027 13th International Conference on Environment and Renewable Energy (ICERE 2027)</text:p>
          </table:table-cell>
          <table:table-cell table:style-name="ce2" office:value-type="float" office:value="90" calcext:value-type="float">
            <text:p>90</text:p>
          </table:table-cell>
          <table:table-cell table:style-name="ce2" office:value-type="float" office:value="28" calcext:value-type="float">
            <text:p>28</text:p>
          </table:table-cell>
          <table:table-cell table:style-name="ce3" office:value-type="date" office:date-value="2026-10-20" calcext:value-type="date">
            <text:p>2026-10-20</text:p>
          </table:table-cell>
          <table:table-cell table:number-columns-repeated="2"/>
          <table:table-cell table:style-name="ce2" office:value-type="string" calcext:value-type="string">
            <text:p>Da Nang, Vietnam</text:p>
          </table:table-cell>
          <table:table-cell table:style-name="ce2" office:value-type="string" calcext:value-type="string">
            <text:p>Mar 1, 2027 - Mar 4, 2027</text:p>
          </table:table-cell>
          <table:table-cell table:style-name="ce4" office:value-type="string" calcext:value-type="string">
            <text:p><text:a xlink:href="https://icere.org/" xlink:type="simple">https://icere.org/</text:a></text:p>
          </table:table-cell>
          <table:table-cell table:style-name="ce2" office:value-type="string" calcext:value-type="string">
            <text:p>Full name：2027 13th International Conference on Environment and Renewable Energy (ICERE 2027) Abbreviation：ICERE 2027 The 2027 13th International Conference on Environment and Renewable Energy (ICERE 2027) will be held during March 1-4, 2027 in Da Nang, Vietnam. Conference Website: https://icere.org/ ICERE 2027 Shining Points: 1. Papers submitted to ICERE 2027 will go through peer reviewing process by international experts. Only accepted papers will be published into conference proceedings sent to Scopus and other databases for abstracting and indexing. 2. ICERE 2026 was held successfully in Nha Trang, Vietnam. 3. All papers published in ICERE from 2015 to 2025 have been successfully published and indexed. Accepted papers of ICERE 2026 have been published in E3S Web of Conferences (Open Access proceedings in Environment, Energy and Earth Sciences) and to be indexed by Scopus soon. 4. ICERE 2027 is sponsored by Duy Tan University. 5.There are three outstanding professors who will join the conference as keynote speakers. Prof. Puthenkalam John Joseph, Sophia University, Japan；Prof. Ildoo-Chung, Pusan National University, Busan, Korea；Prof. Irene M. C. LO, Hong Kong University of Science and Technology, China Paper Publishing Papers submitted to ICERE 2027 will go through peer reviewing process by international experts. Only accepted papers will be published into conference proceedings sent to Scopus and other databases for abstracting and indexing. Call for Papers Topics of interest for submission include, but are not limited to: Track 1: Clean Energy Transition and Advanced Renewable Technologies Solar and Photovoltaic Innovations Wind and Hybrid Systems Hydrogen and Power-to-X Next-Generation Energy Storage Small Modular Reactors (SMRs) &amp; Advanced Nuclear Track 2: AI-Powered Energy Systems, Grid Modernization, and Smart Infrastructure AI and Big Data in Energy Forecasting Grid-Forming Inverters and System Stability Smart Grids and Virtual Power Plants (VPPs) Cybersecurity in Decentralized Energy Networks Digital Twins for Renewable Assets Track 3: Climate Change Mitigation, Carbon Management, and Environmental Resilience Carbon Capture, Utilization, and Storage (CCUS) Climate-Resilient Energy Infrastructure Greenhouse Gas Accounting and Life Cycle Assessment (LCA) Air Quality and Pollution Control Ozone Layer Protection and Global Warming Mitigation Track 4: Circular Economy, Sustainable Resources, and Waste Valorization Waste-to-Energy and Bioeconomy Water Reclamation and Resource Recovery E-Waste and Critical Mineral Recycling Sustainable Materials for Environmental Remediation Ecosystem Restoration Engineering Track 5: Sustainable Urbanization and Policy Frameworks for Net-Zero Net-Zero Buildings and Passive Design Electrification of Transportation Environmental Policy and Carbon Markets Green Finance and Just Transition Remote Sensing and Geospatial Analysis General &amp; Cross-cutting Topics Education, Public Engagement, and Capacity Building in Renewable Energy /Environmental and Energy Justice Data Management, FAIR Principles, and Open Science in Energy Research Techno-Economic Analysis (TEA) and Business Model Innovation International Collaboration and Global South Perspectives Electromagnetic Environment and Energy Infrastructure Compatibility Resilience During Crises and Extreme Events Metrology and Advanced Instrumentation Conference Program March 1 (Monday), 2027：Participants Registration &amp; Conference Materials Collection；Keynote speeches &amp; authors' oral presentations March 2 (Tuesday), 2027：Keynote speeches &amp; authors' oral presentations March 3-4 (Wednesday-Thursday), 2027：Academic Events Conference Committee Conference Chairs Zoltán Pásztory, University of Sopron, Hungary Nguyen Quang Liem, Vietnam Academy of Science and Technology, Hanoi, Vietnam Local Organizing Chair Vu Dinh Tuan, Nha Trang University, Vietnam Program Chairs Woongchul Choi, Kookmin University, Korea Puthenkalam John Joseph, Sophia University, Japan Ildoo Chung, Pusan National University, Busan, Korea Hirohito Yamada, Tohoku University, Japan Program Co-Chairs Haliza Abdul Rahman, Universiti Putra Malaysia, Malaysia Doan Pham Minh, Centre Rapsodee, IMT Mines Albi, France Publication Chair Pen-Chi Chiang, National Taiwan University, Taiwan Conference Venue Duy Tan University, Da Nang, Vietnam Submission and Contact Methods Submission Methods: Electronic Submission System: https://confsys.iconf.org/submission/icere2027 E-mail: icere@ieet.ac.cn Tel: +86-18148151445 Conference Specialist: Ms. Alice Lin ICERE 2027 can provide a platform for academic communication in Environment and Renewable Energy. For more conference information, please visit the conference website:https://icere.org/index.html</text:p>
          </table:table-cell>
          <table:table-cell table:number-columns-repeated="1013"/>
        </table:table-row>
        <table:table-row table:style-name="ro1">
          <table:table-cell table:style-name="ce2" office:value-type="string" calcext:value-type="string">
            <text:p>JCCME 2026</text:p>
          </table:table-cell>
          <table:table-cell table:style-name="ce2" office:value-type="string" calcext:value-type="string">
            <text:p>2026 5th International Joint Conference on Civil and Marine Engineering (JCCME 2026)</text:p>
          </table:table-cell>
          <table:table-cell table:style-name="ce2" office:value-type="float" office:value="15" calcext:value-type="float">
            <text:p>15</text:p>
          </table:table-cell>
          <table:table-cell table:style-name="ce2" office:value-type="float" office:value="30" calcext:value-type="float">
            <text:p>30</text:p>
          </table:table-cell>
          <table:table-cell table:style-name="ce3" office:value-type="date" office:date-value="2026-10-22" calcext:value-type="date">
            <text:p>2026-10-22</text:p>
          </table:table-cell>
          <table:table-cell table:number-columns-repeated="2"/>
          <table:table-cell table:style-name="ce2" office:value-type="string" calcext:value-type="string">
            <text:p>Dalian, China</text:p>
          </table:table-cell>
          <table:table-cell table:style-name="ce2" office:value-type="string" calcext:value-type="string">
            <text:p>Nov 20, 2026 - Nov 22, 2026</text:p>
          </table:table-cell>
          <table:table-cell table:style-name="ce4" office:value-type="string" calcext:value-type="string">
            <text:p><text:a xlink:href="https://www.jccme.org/" xlink:type="simple">https://www.jccme.org/</text:a></text:p>
          </table:table-cell>
          <table:table-cell table:style-name="ce2" office:value-type="string" calcext:value-type="string">
            <text:p>⭐CONTACT US Website: https://www.jccme.org/ Date：November 20-22, 2026 Venue：Dalian, China Email: email@jccme.org Tel: +86 28 85027305 (International) Monday-Friday, 9:30am-12:00pm and 13:30pm-18:00pm ⭐Welcome to JCCME 2026 Welcome to the 2026 5th International Joint Conference on Civil and Marine Engineering (JCCME 2026), which is organized by Dalian University of Technology, and State Key Laboratory of Coastal and Offshore Engineering, and co-organized by Dalian Maritime University, and is scheduled to be held in Dalian, China on November 20-22, 2026. JCCME combines Academia with Industry to adapt scientific achievements into practical applications in the field of Civil and Marine Engineering. ⭐ Publication Information Registered and presented full papers will be included in the JCCME 2026 digital conference proceedings and submitted to major citation databases (including, but not limited to Ei Compendex and Scopus) for review and indexing. Accepted and selected extended papers can be recommended to publish in the following journal: "International Journal of Vehicle Systems Modelling and Testing" (ISSN: 1745-6444). ⭐Call for papers （https://www.jccme.org/cfp.html） Topics of Interest include but not limited to: 1. Maritime Sensor and Sensing Technologies Sensors Actuators and Networks Instrumentation and Control Pattern Recognition and Image Processing Structural Liability Durability and Health Monitoring 2. Coastal and Offshore Mechanics Aerodynamics Breakwaters and Coastal Protection Computational Fluid Dynamics Fluid-structure interactions Vortex Shedding &amp; VIV Hydroelasticity Structural Mechanics 3. Mechatronic Components and Systems Under Ocean or Subsea Environment Applications in Systems and Engineering Automation Engineering Structure Safety and Disaster Prevention Fault detection and Diagnosis in Mechatronics Systems Human-Machine Interface Industrial Tribology Internal Combustion Engines 4. Maritime Related Strategy and Planning Intelligent Maritime Structures Maritime rescue and salvage technologies Ocean energy extraction Polar region technologies Extreme Event Analyses</text:p>
          </table:table-cell>
          <table:table-cell table:number-columns-repeated="1013"/>
        </table:table-row>
        <table:table-row table:style-name="ro1">
          <table:table-cell table:style-name="ce2" office:value-type="string" calcext:value-type="string">
            <text:p>IEEE AEEES 2027</text:p>
          </table:table-cell>
          <table:table-cell table:style-name="ce2" office:value-type="string" calcext:value-type="string">
            <text:p>IEEE--2027 The 9th Asia Energy and Electrical Engineering Symposium (AEEES 2027)</text:p>
          </table:table-cell>
          <table:table-cell table:style-name="ce2" office:value-type="float" office:value="78" calcext:value-type="float">
            <text:p>78</text:p>
          </table:table-cell>
          <table:table-cell table:style-name="ce2" office:value-type="float" office:value="32" calcext:value-type="float">
            <text:p>32</text:p>
          </table:table-cell>
          <table:table-cell table:style-name="ce3" office:value-type="date" office:date-value="2026-10-30" calcext:value-type="date">
            <text:p>2026-10-30</text:p>
          </table:table-cell>
          <table:table-cell table:number-columns-repeated="2"/>
          <table:table-cell table:style-name="ce2" office:value-type="string" calcext:value-type="string">
            <text:p>Chengdu, China</text:p>
          </table:table-cell>
          <table:table-cell table:style-name="ce2" office:value-type="string" calcext:value-type="string">
            <text:p>Mar 19, 2027 - Mar 22, 2027</text:p>
          </table:table-cell>
          <table:table-cell table:style-name="ce4" office:value-type="string" calcext:value-type="string">
            <text:p><text:a xlink:href="http://www.aeees.org/" xlink:type="simple">http://www.aeees.org/</text:a></text:p>
          </table:table-cell>
          <table:table-cell table:style-name="ce2" office:value-type="string" calcext:value-type="string">
            <text:p>Full name: IEEE--2027 The 9th Asia Energy and Electrical Engineering Symposium (AEEES 2027) Abbreviation: AEEES 2027 ⭐2027 The 9th Asia Energy and Electrical Engineering Symposium will take place in from . (www.aeees.org). AEEES 2027 is Co-sponsored by IEEE, PES, University of Electronic Science and Technology of China (UESTC), Chengdu University of Technology, organized by School of Mechanical and Electrical Engineering, UESTC, technically supported by Aalborg University (Denmark), University of Calgary (Canada), The University of New South Wales (Australia), Wuhan University (China),Southwest University of Science and Technology, Southwest Petroleum University, etc. ⭐Publication and Indexing: Accepted papers can be published in *AEEES Conference proceedings*, which will be included in IEEE Xplore, and submitted to* EI Compendex, Scopus*. *AEEES Publication History * * AEEES 2025 | IEEE Proceedings | ISBN: 979-8-3315-1753-3 | Online within 1 months | Successful EI Compendex and Scopus * AEEES 2024 | IEEE Proceedings | ISBN: 979-8-3503-7346-2 | Online within 1 months | Successful EI Compendex and Scopus * AEEES 2023 | IEEE Proceedings | ISBN: 978-1-6654-9053-5 | Online within 2 months | Successful EI Compendex and Scopus * AEEES 2022 | IEEE Proceedings | ISBN: 978-1-6654-7913-4 | Online within 1 month | Successful EI Compendex and Scopus * AEEES 2021 | IEEE Proceedings | ISBN: 978-1-6654-2550-6 | Online within 3 month | Successful EI Compendex and Scopus * AEEES 2020 | IEEE Proceedings | ISBN: 978-1-7281-6781-7 | Online within 2 month | Successful EI Compendex and Scopus ⭐Submission Methods: Option 1. ABSTRACTS (Presentation Only) All submitted abstracts will be peer-reviewed by our committees, and accepted one will be included in the conference program only, provided at the conference. Option 2. Full Paper (Paper Publication) All submitted papers will be reviewed by our committees, and accepted one will be published in conference proceedings. You can submit your paper through the online submission system: http://www.easychair.org/conferences/?conf=aeees2027 or by email: aeees_conference@163.com ⭐Conference Scope: Topics of interest for submission include, but are not limited to: Energy Conservation Energy Conversion Fuel Cell Technology Plasma Technology Renewable Energy Sources Solar Energy Water Energy Wind Energy Converters and Inverters Fault Diagnosis Grounding and Protection Systems HV Power Lines Network Harmonics Nuclear Energy Power Distribution Power Flow Analysis Power Quality Power System Design Power System Operation Power System Planning Power System Stability and Control Reliability and Security Power system planning, Power management, Power engineering, and Education Breakdown Impacts Please Visit: http://www.aeees.org/cfp.html for more details ⭐Call for Special Session AEEES 2027 proposals for special sessions within the technical scope of the conference. Submissions special session proposals should be e-mailed to aeees_conference@163.com before January 20, 2027. Proposals should include the following information:1. Special session title and brief introduction; 2. General information of organizers (mail address of main contact person, biodata)3. Potential participants ⭐Awards Young Scientist Awards Outstanding Contribution Award Outstanding Organizing Award Outstanding Reviewer Award Best Paper Award Best Student Paper Award Best Oral Presentation Award Best Poster Award ⭐Contact: Ms. Ashily X.W Qi E-mail: aeees_conference@163.com Tel: +86 13709044764 Wechat: science-engineering/18207777775</text:p>
          </table:table-cell>
          <table:table-cell table:number-columns-repeated="1013"/>
        </table:table-row>
        <table:table-row table:style-name="ro1">
          <table:table-cell table:style-name="ce2" office:value-type="string" calcext:value-type="string">
            <text:p>ICFEE 2027</text:p>
          </table:table-cell>
          <table:table-cell table:style-name="ce2" office:value-type="string" calcext:value-type="string">
            <text:p>2027 17th International Conference on Future Environment and Energy (ICFEE 2027)</text:p>
          </table:table-cell>
          <table:table-cell table:style-name="ce2" office:value-type="float" office:value="83" calcext:value-type="float">
            <text:p>83</text:p>
          </table:table-cell>
          <table:table-cell table:style-name="ce2" office:value-type="float" office:value="25" calcext:value-type="float">
            <text:p>25</text:p>
          </table:table-cell>
          <table:table-cell table:style-name="ce3" office:value-type="date" office:date-value="2026-11-05" calcext:value-type="date">
            <text:p>2026-11-05</text:p>
          </table:table-cell>
          <table:table-cell table:number-columns-repeated="2"/>
          <table:table-cell table:style-name="ce2" office:value-type="string" calcext:value-type="string">
            <text:p>Kyoto, Japan</text:p>
          </table:table-cell>
          <table:table-cell table:style-name="ce2" office:value-type="string" calcext:value-type="string">
            <text:p>Mar 26, 2027 - Mar 29, 2027</text:p>
          </table:table-cell>
          <table:table-cell table:style-name="ce4" office:value-type="string" calcext:value-type="string">
            <text:p><text:a xlink:href="https://www.icfee.org" xlink:type="simple">https://www.icfee.org</text:a></text:p>
          </table:table-cell>
          <table:table-cell table:style-name="ce2" office:value-type="string" calcext:value-type="string">
            <text:p>Full name: 2027 17th International Conference on Future Environment and Energy (ICFEE 2027) Abbreviation: ICFEE 2027 2027 17th International Conference on Future Environment and Energy (ICFEE 2027) will be held in Kyoto, Japan during 26-29 March, 2027 Conference Website: https://www.icfee.org ICFEE 2027 Shining Points: 1. ICFEE 2027 presented and registered full papers will be included in digital conference proceedings, which will be sent to Scopus, CAS, Thomson Reuters, DOAJ, EBSCO, ProQuest and other major databases for indexing. 2. ICFEE 2026 was successfully held during 6-8 March, 2026 in Fukuoka, Japan 4. ICFEE 2026 accepted papers will be published into E3S Web of Conferences (Open Access proceedings in Environment, Energy and Earth Sciences). Previous ICFEE papers have been successfully published and indexed. Call for Papers Water Resources Management and Water Pollution Control Hydrology Physical oceanography Ground water remediation Water resources and river basin management Regulatory practice, water quality objectives standard setting, water quality classification Ground water management Atmospheric science and air pollution control Atmospheric physics Meteorology Climate and climatic changes Global warming Ozone layer depletion Carbon capture and storage Biofuels Air pollution and control Emission sources Solid Waste Pollution Control and Resource Utilization Solid waste management Waste minimization Optimization of collection systems Recycling and reuse Waste valorization Resource management Technical aspects of treatment and disposal methods (landfilling, thermal treatment etc) Leachate treatment Submission https://confsys.iconf.org/submission/icfee2027 Contact Methods E-mail: icfee@academic.net Contact number:+86-18117805914 Monday- Friday 9:30-18:00 (UTC/GMT+08:00) Conference Specialist: Ms.Echo ICFEE 2027 can provide a platform for academic communication in Future Environment and Energy. For more conference information, please visit the conference website: https://www.icfee.org</text:p>
          </table:table-cell>
          <table:table-cell table:number-columns-repeated="1013"/>
        </table:table-row>
        <table:table-row table:style-name="ro1">
          <table:table-cell table:style-name="ce2" office:value-type="string" calcext:value-type="string">
            <text:p>ICACER 2027</text:p>
          </table:table-cell>
          <table:table-cell table:style-name="ce2" office:value-type="string" calcext:value-type="string">
            <text:p>Springer--2027 12th International Conference on Advances on Clean Energy Research (ICACER 2027)</text:p>
          </table:table-cell>
          <table:table-cell table:style-name="ce2" office:value-type="float" office:value="82" calcext:value-type="float">
            <text:p>82</text:p>
          </table:table-cell>
          <table:table-cell table:style-name="ce2" office:value-type="float" office:value="30" calcext:value-type="float">
            <text:p>30</text:p>
          </table:table-cell>
          <table:table-cell table:style-name="ce3" office:value-type="date" office:date-value="2026-11-10" calcext:value-type="date">
            <text:p>2026-11-10</text:p>
          </table:table-cell>
          <table:table-cell table:number-columns-repeated="2"/>
          <table:table-cell table:style-name="ce2" office:value-type="string" calcext:value-type="string">
            <text:p>Porto, Portugal</text:p>
          </table:table-cell>
          <table:table-cell table:style-name="ce2" office:value-type="string" calcext:value-type="string">
            <text:p>Apr 9, 2027 - Apr 11, 2027</text:p>
          </table:table-cell>
          <table:table-cell table:style-name="ce4" office:value-type="string" calcext:value-type="string">
            <text:p><text:a xlink:href="http://www.icacer.com/" xlink:type="simple">http://www.icacer.com/</text:a></text:p>
          </table:table-cell>
          <table:table-cell table:style-name="ce2" office:value-type="string" calcext:value-type="string">
            <text:p>Abbreviation: ICACER 2027 Full Name: Springer--2027 12th International Conference on Advances on Clean Energy Research (ICACER 2027) Porto, Portugal April 9-11, 2027 http://www.icacer.com/ Publication: After a careful reviewing process, accepted, registered and presented papers will be published in Springer Book Series-Green Energy and Technology, which will be submitted for Ei Compendex, Scopus, et al. Call for Papers: Wind, solar, biomass and geothermal energies Ocean energy harvesting CO2 capture and storage Underground and gas-network storages Future battery technologies Green fuel/energy for mobility Sector coupling at the consumer side Network stability before/after energy transition More topics: https://icacer.com/cfp.html Agenda Overview: April 9, 2027 Registration April 10, 2027 Opening Remarks &amp; Keynote speeches (Morning) April 10, 2027 Parallel Sessions (Afternoon) April 11, 2027 One-day Tour and Online Parallel Sessions Submission Methods: Full Paper (publication and oral presentation) Abstract (oral presentation only) Electronic Submission System (.pdf) http://confsys.iconf.org/submission/icacer2027 Email: icacer@zhconf.ac.cn Contacts: Ms. Rachel Cao Email: icacer@zhconf.ac.cn Tel: +86-13880104217</text:p>
          </table:table-cell>
          <table:table-cell table:number-columns-repeated="1013"/>
        </table:table-row>
        <table:table-row table:style-name="ro1">
          <table:table-cell table:style-name="ce2" office:value-type="string" calcext:value-type="string">
            <text:p>ICEEEP 2027</text:p>
          </table:table-cell>
          <table:table-cell table:style-name="ce2" office:value-type="string" calcext:value-type="string">
            <text:p>2027 11th International Conference on Energy Economics and Energy Policy (ICEEEP 2027)</text:p>
          </table:table-cell>
          <table:table-cell table:style-name="ce2" office:value-type="float" office:value="82" calcext:value-type="float">
            <text:p>82</text:p>
          </table:table-cell>
          <table:table-cell table:style-name="ce2" office:value-type="float" office:value="30" calcext:value-type="float">
            <text:p>30</text:p>
          </table:table-cell>
          <table:table-cell table:style-name="ce3" office:value-type="date" office:date-value="2026-11-10" calcext:value-type="date">
            <text:p>2026-11-10</text:p>
          </table:table-cell>
          <table:table-cell table:number-columns-repeated="2"/>
          <table:table-cell table:style-name="ce2" office:value-type="string" calcext:value-type="string">
            <text:p>Porto, Portugal</text:p>
          </table:table-cell>
          <table:table-cell table:style-name="ce2" office:value-type="string" calcext:value-type="string">
            <text:p>Apr 9, 2027 - Apr 11, 2027</text:p>
          </table:table-cell>
          <table:table-cell table:style-name="ce4" office:value-type="string" calcext:value-type="string">
            <text:p><text:a xlink:href="https://www.iceeep.com/" xlink:type="simple">https://www.iceeep.com/</text:a></text:p>
          </table:table-cell>
          <table:table-cell table:style-name="ce2" office:value-type="string" calcext:value-type="string">
            <text:p>Abbreviation： ICEEEP 2027 Full Name: 2027 11th International Conference on Energy Economics and Energy Policy (ICEEEP 2027) Porto, Portugal April 9-11, 2027 https://www.iceeep.com/ Publication: As workshop of "ICACER 2027", all accepted papers after presentation will be published in the Special Chapter of ICACER Conference Proceedings, which submitted for Ei Compendex, Scopus, et al. Call for Papers: EU, US and Chinese agendas for green energy Trans-national and trans-continental energy cooperation National regulations for wind, solar, biomass and geothermal power stations Governmental incentives for green energy transitions Air pollution and transition to green energies Reserve markets and demand side flexibility Air pollution and green mobility Impact of green mobility on industry and society Political regulations of energy market(s) Energy stock-exchanges Fast online energy-trade Energy supply/demand modeling/simulation/forecasting Digitization of supply and demand sides Digitization of energy economy Influence of digitization of society on energy demand Cyber-security of national energy systems Country-vulnerability because of energy prices Inexpensive green energy for developing countries Energy behavior and demand side management Demand response and demand-side management Venue: Porto, Portugal Agenda Overview: Day 1, April 9, 2027 10:00 am--5:00 pm | Conference Check In and Materials Collection Day 2, April 10, 2027 9:00 am--12:10 pm | Opening Remarks by Conference Chair &amp; Keynote Speeches 12:10 pm--13:30 pm | Lunch and Break Time 13:30 pm--18:00 pm | 4 Parallel Sessions for Oral/Poster Presentations and coffee break Day 3, April 11, 2027 9:00 am--6:00 pm | One day tour in Porto for onsite attendees (But participants need to make the registration by email before March 10, 2027) 9:30 am--5:30 pm | Online Parallel Sessions Submission Methods: Full Paper.pdf (publication and oral presentation) Abstract.pdf (oral presentation only) Electronic Submission System (.pdf) http://confsys.iconf.org/submission/iceeep2027 Or you could submit your paper by email directly via iceeep@zhconf.ac.cn Contacts: Ms. Eulie Feng Email: iceeep@zhconf.ac.cn Tel: +86-18208340866</text:p>
          </table:table-cell>
          <table:table-cell table:number-columns-repeated="1013"/>
        </table:table-row>
        <table:table-row table:style-name="ro1">
          <table:table-cell table:style-name="ce2" office:value-type="string" calcext:value-type="string">
            <text:p>IEEE-CEECT 2026</text:p>
          </table:table-cell>
          <table:table-cell table:style-name="ce2" office:value-type="string" calcext:value-type="string">
            <text:p>2026 8th International Conference on Electrical Engineering and Control Technologies (CEECT 2026)</text:p>
          </table:table-cell>
          <table:table-cell table:style-name="ce2" office:value-type="float" office:value="72" calcext:value-type="float">
            <text:p>72</text:p>
          </table:table-cell>
          <table:table-cell table:style-name="ce2" office:value-type="float" office:value="30" calcext:value-type="float">
            <text:p>30</text:p>
          </table:table-cell>
          <table:table-cell table:style-name="ce3" office:value-type="date" office:date-value="2026-11-15" calcext:value-type="date">
            <text:p>2026-11-15</text:p>
          </table:table-cell>
          <table:table-cell table:number-columns-repeated="2"/>
          <table:table-cell table:style-name="ce2" office:value-type="string" calcext:value-type="string">
            <text:p>Bangkok, Thailand</text:p>
          </table:table-cell>
          <table:table-cell table:style-name="ce2" office:value-type="string" calcext:value-type="string">
            <text:p>Dec 17, 2026 - Dec 20, 2026</text:p>
          </table:table-cell>
          <table:table-cell table:style-name="ce4" office:value-type="string" calcext:value-type="string">
            <text:p><text:a xlink:href="http://www.ceect.org" xlink:type="simple">http://www.ceect.org</text:a></text:p>
          </table:table-cell>
          <table:table-cell table:style-name="ce2" office:value-type="string" calcext:value-type="string">
            <text:p>2026 8th International Conference on Electrical Engineering and Control Technologies (CEECT 2026) Bangkok, Thailand | Dec. 17–20, 2026 www.ceect.org 2026 8th International Conference on Electrical Engineering and Control Technologies (CEECT 2026) will be held in Bangkok, Thailand from Dec. 17 to 20, 2026. CEECT 2026 is organized by King Mongkut's University of Technology Thonburi (KMUTT), technically sponsored by Auckland University of Technology (AUT), South China University of Technology, Asia Pacific Institute of Science and Engineering(APISE) and IEEE AP/MTT Thailand Joint Chapter, and supported by Chongqing University, Shanghai University of Electric Power, Global Chinese Power &amp; Energy Society, and media supported by Bjx.com.cn, JOURNAL OF XI'AN JIAOTONG UNIVERSITY and MDPI-engergies. We warmly welcome prospective authors to submit their new research or technological contributions to CEECT 2026, for sharing valuable experiences with scientists and students from around the world. The conference provides an international platform for scholars and professionals to present new research findings, share valuable experiences, and discuss emerging trends and challenges in the fields of electrical engineering, control technologies, and related areas. Authors from around the world are warmly invited to submit their original research and technological contributions. ● Publication 1)All accepted and presented papers will be submitted for inclusion into the conference proceedings, subject to meeting the publisher’s scope and quality requirements. 2) Selected papers with great extension will be recommended to publish in international journals. Past Publication &amp; Indexing Record FOR MORE: https://ceect.org/pub.html CEECT 2025 (ISBN: 979-8-3315-5099-8) | IEEE Xplore online | EI compendex &amp; Scopus Indexed soon CEECT 2024 (ISBN: 979-8-3315-2809-6) | IEEE Xplore online | EI compendex &amp; Scopus Indexed CEECT 2023 (ISBN: 979-8-3503-4225-3)| IEEE Xplore online | EI compendex &amp; Scopus Indexed CEECT 2022 (ISBN: 978-1-6654-9899-9)| IEEE Xplore online | EI compendex &amp; Scopus Indexed CEECT 2021 (ISBN 978-1-6654-4041-7)| IEEE Xplore online | EI compendex &amp; Scopus Indexed CEECT 2020 (ISBN 978-1-7281-9797-5 ) | IEEE Xplore online |EI compendex &amp; Scopus Indexed CEECT 2019 (ISSN: 1757-899X)| IOP Conference Series: Materials Science and Engineering online ● Call for Papers Topics of interest include, but are not limited to: Electrical Engineering • AI Applications in Power Systems • Clean Energy Market • Energy Transformation from New Energy Systems to Power Grid • New Energy Strategy, Technology, Trends and Industrial Applications • Power Generation, Transmission and Distribution • Power Electronics, Systems, Telecommunication and Applications • Power Market Economy and Market-oriented Transactions • Reliability, Maintenance and Safety of New Energy Systems Control Technologies • Adaptive Control • Applications of PLC Technologies • Automated Guided Vehicles • Control Applications • Control of Distributed Generation Systems • Control of Smart Power Delivery Systems • Electrical Control Technology • Database and Information Systems More topics can be found at: https://ceect.org ● Submission Authors are invited to submit manuscripts through the Electronic Submission System: https://cmt3.research.microsoft.com/ICEECT2026 For submission inquiries, please contact: ceectatapise.org ● Important Dates First Round Full Paper Submission Deadline: June 15, 2026 Notification of Acceptance: July 15, 2026 Registration Deadline: Aug. 15, 2026 ● Notice Manuscripts must be written in English; The manuscript should follow the standard template; The topics of the paper should be relevant to the conference topics; Plagiarism and duplicate submission are prohibited; Innovation and scientific value are required. ● Contact Conference Secretary Ms. Aileen Zhao Tel: +86-19102815802 (Mainland China) E-mail: ceectatapise.org Website: www.ceect.org</text:p>
          </table:table-cell>
          <table:table-cell table:number-columns-repeated="1013"/>
        </table:table-row>
        <table:table-row table:style-name="ro1">
          <table:table-cell table:style-name="ce2" office:value-type="string" calcext:value-type="string">
            <text:p>IEEE-CEECT 2026</text:p>
          </table:table-cell>
          <table:table-cell table:style-name="ce2" office:value-type="string" calcext:value-type="string">
            <text:p>2026 8th International Conference on Electrical Engineering and Control Technologies (CEECT 2026)</text:p>
          </table:table-cell>
          <table:table-cell table:style-name="ce2" office:value-type="float" office:value="70" calcext:value-type="float">
            <text:p>70</text:p>
          </table:table-cell>
          <table:table-cell table:style-name="ce2" office:value-type="float" office:value="28" calcext:value-type="float">
            <text:p>28</text:p>
          </table:table-cell>
          <table:table-cell table:style-name="ce3" office:value-type="date" office:date-value="2026-11-15" calcext:value-type="date">
            <text:p>2026-11-15</text:p>
          </table:table-cell>
          <table:table-cell table:number-columns-repeated="2"/>
          <table:table-cell table:style-name="ce2" office:value-type="string" calcext:value-type="string">
            <text:p>Bangkok, Thailand</text:p>
          </table:table-cell>
          <table:table-cell table:style-name="ce2" office:value-type="string" calcext:value-type="string">
            <text:p>Dec 17, 2026 - Dec 20, 2026</text:p>
          </table:table-cell>
          <table:table-cell table:style-name="ce4" office:value-type="string" calcext:value-type="string">
            <text:p><text:a xlink:href="http://www.ceect.org" xlink:type="simple">http://www.ceect.org</text:a></text:p>
          </table:table-cell>
          <table:table-cell table:style-name="ce2" office:value-type="string" calcext:value-type="string">
            <text:p>2026 8th International Conference on Electrical Engineering and Control Technologies (CEECT 2026) Bangkok, Thailand | Dec. 17–20, 2026 www.ceect.org 2026 8th International Conference on Electrical Engineering and Control Technologies (CEECT 2026) will be held in Bangkok, Thailand from Dec. 17 to 20, 2026. CEECT 2026 is organized by King Mongkut's University of Technology Thonburi (KMUTT), technically sponsored by Auckland University of Technology (AUT), South China University of Technology, Asia Pacific Institute of Science and Engineering(APISE) and IEEE AP/MTT Thailand Joint Chapter, and supported by Chongqing University, Shanghai University of Electric Power, Global Chinese Power &amp; Energy Society, and media supported by Bjx.com.cn, JOURNAL OF XI'AN JIAOTONG UNIVERSITY and MDPI-engergies. We warmly welcome prospective authors to submit their new research or technological contributions to CEECT 2026, for sharing valuable experiences with scientists and students from around the world. The conference provides an international platform for scholars and professionals to present new research findings, share valuable experiences, and discuss emerging trends and challenges in the fields of electrical engineering, control technologies, and related areas. Authors from around the world are warmly invited to submit their original research and technological contributions. ● Publication 1)All accepted and presented papers will be submitted for inclusion into the conference proceedings, subject to meeting the publisher’s scope and quality requirements. 2) Selected papers with great extension will be recommended to publish in international journals. Past Publication &amp; Indexing Record FOR MORE: https://ceect.org/pub.html CEECT 2025 (ISBN: 979-8-3315-5099-8) | IEEE Xplore online | EI compendex &amp; Scopus Indexed soon CEECT 2024 (ISBN: 979-8-3315-2809-6) | IEEE Xplore online | EI compendex &amp; Scopus Indexed CEECT 2023 (ISBN: 979-8-3503-4225-3)| IEEE Xplore online | EI compendex &amp; Scopus Indexed CEECT 2022 (ISBN: 978-1-6654-9899-9)| IEEE Xplore online | EI compendex &amp; Scopus Indexed CEECT 2021 (ISBN 978-1-6654-4041-7)| IEEE Xplore online | EI compendex &amp; Scopus Indexed CEECT 2020 (ISBN 978-1-7281-9797-5 ) | IEEE Xplore online |EI compendex &amp; Scopus Indexed ... ● Call for Papers Topics of interest include, but are not limited to: Electrical Engineering • AI Applications in Power Systems • Clean Energy Market • Energy Transformation from New Energy Systems to Power Grid • New Energy Strategy, Technology, Trends and Industrial Applications • Power Generation, Transmission and Distribution • Power Electronics, Systems, Telecommunication and Applications • Power Market Economy and Market-oriented Transactions • Reliability, Maintenance and Safety of New Energy Systems Control Technologies • Adaptive Control • Applications of PLC Technologies • Automated Guided Vehicles • Control Applications • Control of Distributed Generation Systems • Control of Smart Power Delivery Systems • Electrical Control Technology • Database and Information Systems More topics can be found at: https://ceect.org ● Submission Authors are invited to submit manuscripts through the Electronic Submission System: https://cmt3.research.microsoft.com/ICEECT2026 For submission inquiries, please contact: ceectatapise.org ● Important Dates First Round Full Paper Submission Deadline: June 15, 2026 Notification of Acceptance: July 15, 2026 Registration Deadline: Aug. 15, 2026 ● Notice Manuscripts must be written in English; The manuscript should follow the standard template; The topics of the paper should be relevant to the conference topics; Plagiarism and duplicate submission are prohibited; Innovation and scientific value are required. ● Contact Conference Secretary Ms. Aileen Zhao Tel: +86-19102815802 (Mainland China) E-mail: ceectatapise.org Website: www.ceect.org</text:p>
          </table:table-cell>
          <table:table-cell table:number-columns-repeated="1013"/>
        </table:table-row>
        <table:table-row table:style-name="ro1">
          <table:table-cell table:style-name="ce2" office:value-type="string" calcext:value-type="string">
            <text:p>AMEE 2027</text:p>
          </table:table-cell>
          <table:table-cell table:style-name="ce2" office:value-type="string" calcext:value-type="string">
            <text:p>2027 9th International Conference on Advanced Mechanical and Electrical Engineering (AMEE 2027)</text:p>
          </table:table-cell>
          <table:table-cell table:style-name="ce2" office:value-type="float" office:value="72" calcext:value-type="float">
            <text:p>72</text:p>
          </table:table-cell>
          <table:table-cell table:style-name="ce2" office:value-type="float" office:value="30" calcext:value-type="float">
            <text:p>30</text:p>
          </table:table-cell>
          <table:table-cell table:style-name="ce3" office:value-type="date" office:date-value="2026-12-10" calcext:value-type="date">
            <text:p>2026-12-10</text:p>
          </table:table-cell>
          <table:table-cell table:number-columns-repeated="2"/>
          <table:table-cell table:style-name="ce2" office:value-type="string" calcext:value-type="string">
            <text:p>Haikou, China</text:p>
          </table:table-cell>
          <table:table-cell table:style-name="ce2" office:value-type="string" calcext:value-type="string">
            <text:p>May 21, 2027 - May 23, 2027</text:p>
          </table:table-cell>
          <table:table-cell table:style-name="ce4" office:value-type="string" calcext:value-type="string">
            <text:p><text:a xlink:href="https://www.amee.net" xlink:type="simple">https://www.amee.net</text:a></text:p>
          </table:table-cell>
          <table:table-cell table:style-name="ce2" office:value-type="string" calcext:value-type="string">
            <text:p>★Full name: 2027 9th International Conference on Advanced Mechanical and Electrical Engineering (AMEE 2027) ★Abbreviation: AMEE 2027 ★Website: https://www.amee.net/ ★Date: May 21-23, 2027 ★Held in: Haikou, China ★Sponsored By: Hainan University ★Hosted By: Mechanical and Electrical Engineering College ★Publication★ Submitted papers will be Peer Reviewed (Double Blind) and the accepted ones will be collected in the conference proceedings, which submitted to indexers Ei Compendex, Scopus etc. major databases. ★Call for papers★ Topics of interest for submission include, but are not limited to: Track 1: AI-Driven Mechanical Design Track 2: Smart Manufacturing Systems Track 3: Sustainable Mechanical Engineering Track 4: Advanced Robotics &amp; Mechatronics Track 5: Power Electronics &amp; Drives Track 6: Electrical Machines &amp; Magnetic Systems Track 7: Quantum Electrical Engineering Track 8: Renewable Power Conversion Track 9: Green Energy Machinery More Topics, please visit at: https://www.amee.net/cfp.html ★Submission★ * Abstract (Presentation only) * Full paper (Presentation &amp; Publication) * Submitted papers should be written in complete English. * Submitted full papers should be prepared according to the paper template and no less than 4 full pages and no more than 10 full pages. Word Template: https://www.amee.net/template.docx LaTex Template: https://www.amee.net/latex-template.zip ★Please submit the paper by Electronic Submission System at: https://www.zmeeting.org/submission/amee2027 More details about submission, please visit at: https://www.amee.net/sub.html ★Conference History★ AMEE 2025 | October 24-26, 2025 | Xi'an, China AMEE 2024 | October 25-27, 2024 | Wuhu, China AMEE 2023 | November 3-5, 2023 | Suzhou, China AMEE 2022 | October 28-30, 2022 | Changchun, China AMEE 2021 | November 4-6, 2021 | Wuhan, China AMEE 2020 | November 5-8, 2020 | Full Virtual Style AMEE 2019 | November 16-18, 2019 | Lanzhou China AMEE 2018 | December 26-28, 2018 | Beijing, China ★Conference Schedule★ May 21, 2027 (Friday) | Onsite registration May 22, 2027 (Saturday) | Keynote speeches and parallel session for oral presentation May 23, 2027 (Sunday) | Invited Speeches and Parallel Session for Oral Presentation ★Conference Venue★ International Academic Exchange Center Hainan University Address: NO. 58 Renmin Avenue, Meilan District, Haikou, Hainan 570228 More detail information please click: https://www.amee.net/venue.html ★Contact★ Conference Secretary: Ms. Michelle Lee Email: amee_conf@yeah.net Wechat ID: asr2020217 Tel: +86-13709044746</text:p>
          </table:table-cell>
          <table:table-cell table:number-columns-repeated="1013"/>
        </table:table-row>
        <table:table-row table:style-name="ro1">
          <table:table-cell table:style-name="ce2" office:value-type="string" calcext:value-type="string">
            <text:p>A&amp;WMA ACE 2026</text:p>
          </table:table-cell>
          <table:table-cell table:style-name="ce2" office:value-type="string" calcext:value-type="string">
            <text:p>A&amp;WMA's 119th Annual Conference &amp; Exhibition: Energizing the Future</text:p>
          </table:table-cell>
          <table:table-cell table:style-name="ce2" office:value-type="float" office:value="92" calcext:value-type="float">
            <text:p>92</text:p>
          </table:table-cell>
          <table:table-cell table:style-name="ce2" office:value-type="float" office:value="40" calcext:value-type="float">
            <text:p>40</text:p>
          </table:table-cell>
          <table:table-cell table:style-name="ce3" office:value-type="date" office:date-value="2026-12-19" calcext:value-type="date">
            <text:p>2026-12-19</text:p>
          </table:table-cell>
          <table:table-cell table:style-name="ce3" office:value-type="date" office:date-value="2026-02-13" calcext:value-type="date">
            <text:p>2026-02-13</text:p>
          </table:table-cell>
          <table:table-cell table:style-name="ce3" office:value-type="date" office:date-value="2026-05-22" calcext:value-type="date">
            <text:p>2026-05-22</text:p>
          </table:table-cell>
          <table:table-cell table:style-name="ce2" office:value-type="string" calcext:value-type="string">
            <text:p>Austin, TX</text:p>
          </table:table-cell>
          <table:table-cell table:style-name="ce2" office:value-type="string" calcext:value-type="string">
            <text:p>Jun 21, 2026 - Jun 24, 2026</text:p>
          </table:table-cell>
          <table:table-cell table:style-name="ce4" office:value-type="string" calcext:value-type="string">
            <text:p><text:a xlink:href="https://www.awma.org/ACE2026authors" xlink:type="simple">https://www.awma.org/ACE2026authors</text:a></text:p>
          </table:table-cell>
          <table:table-cell table:style-name="ce2" office:value-type="string" calcext:value-type="string">
            <text:p>Present at the most comprehensive environmental conference on technology and solutions! Share your knowledge, advance the industry, and make connections. Call for Abstracts available! Submittal deadline is December 19. View the complete Call for Abstracts before you submit to review instructions and choose your topic. Submit your abstract in the appropriate category below. -Platform Presentation Abstracts -Panel Session Abstracts -Technical Poster Abstracts -Student Poster Abstracts Review the Presentation Options and Submission Formats before submitting your abstract. We're looking for the latest and greatest research, applications, ideas, and solutions in the environmental industry on topics including, but not limited to: 2026 Mini Symposium – Energizing the Future Conference Theme and Hot Topics – Energy Transition, Grid Resiliency/Reliability, Decarbonization, Plugging Abandoned/Orphaned Wells, Texas Energy Fund, Natural Disaster Preparedness, AI Applications, Data Centers Air Emissions – Stationary/Mobile Sources, Emission Inventory, Modeling, Measurements, Monitoring, Satellite Data, Control Technologies Air Quality – Measurements, Controls, Modeling, Photochemistry, Visibility, Data QA/QC Bioenergy, Biofuels, Biogas, Landfills Community-Based Monitoring and Emission Reduction Programs Environmental Change – Science, Policy, Impacts, Carbon Neutrality, CCUS, Action Planning, Mitigation and Adaptation Environmental Program Administration – Policy, Regulation and Implementation, Permitting, Public Engagement, Odor Issues, EPA Priorities, NSR Environmental Equity Health, Safety, and Environmental Effects/Exposure Indoor Air, Vapor Intrusion Oil and Gas, Industry, Power Generation, Nanotechnology PFAS and Emerging Contaminants Air and Waste Regulatory and Legal Issues Sustainability, Resource Conservation, Circular Economy, Resilience Planning, Sustainable Waste/Materials Management Transportation and Land Use Waste Treatment, Processing, Waste-to-Energy, Landfills, Site Remediation, Regulations Wildfires and Prescribed Fire Impacts Accepted presentations can be submitted in these formats: Panel Session — Requires panel chair to recruit speakers and submit a 150-word Panel Synopsis describing the panel topic/goals and listing confirmed panelists and their affiliations by April 1. Platform Presentation — Authors may submit a full-length manuscript or an extended abstract for technical review, or PowerPoint presentation slides that will receive only a content review. Technical Poster — Authors may submit a full-length manuscript or extended abstract for technical review, or poster pages that will receive only a content review. Student Poster — Authors must bring a poster display in accordance with A&amp;WMA guidelines for content and format.</text:p>
          </table:table-cell>
          <table:table-cell table:number-columns-repeated="1013"/>
        </table:table-row>
        <table:table-row table:style-name="ro1">
          <table:table-cell table:style-name="ce2" office:value-type="string" calcext:value-type="string">
            <text:p>IEEE ICPIES 2027</text:p>
          </table:table-cell>
          <table:table-cell table:style-name="ce2" office:value-type="string" calcext:value-type="string">
            <text:p>2027 IEEE 3rd International Conference on Power and Integrated Energy Systems (ICPIES 2027)</text:p>
          </table:table-cell>
          <table:table-cell table:style-name="ce2" office:value-type="float" office:value="75" calcext:value-type="float">
            <text:p>75</text:p>
          </table:table-cell>
          <table:table-cell table:style-name="ce2" office:value-type="float" office:value="30" calcext:value-type="float">
            <text:p>30</text:p>
          </table:table-cell>
          <table:table-cell table:style-name="ce3" office:value-type="date" office:date-value="2026-12-20" calcext:value-type="date">
            <text:p>2026-12-20</text:p>
          </table:table-cell>
          <table:table-cell table:number-columns-repeated="2"/>
          <table:table-cell table:style-name="ce2" office:value-type="string" calcext:value-type="string">
            <text:p>Shenzhen, China</text:p>
          </table:table-cell>
          <table:table-cell table:style-name="ce2" office:value-type="string" calcext:value-type="string">
            <text:p>Apr 16, 2027 - Apr 18, 2027</text:p>
          </table:table-cell>
          <table:table-cell table:style-name="ce4" office:value-type="string" calcext:value-type="string">
            <text:p><text:a xlink:href="https://icpies.org/" xlink:type="simple">https://icpies.org/</text:a></text:p>
          </table:table-cell>
          <table:table-cell table:style-name="ce2" office:value-type="string" calcext:value-type="string">
            <text:p>Full Name: 2027 IEEE 3rd International Conference on Power and Integrated Energy Systems (ICPIES 2027) Abbreviation: ICPIES 20267 Website: https://icpies.org/ Venue: Shenzhen, China Dates: April 16-18, 2027 2027 IEEE 3rd International Conference on Power and Integrated Energy Systems (ICPIES 2027) will be held in Shenzhen, China during April 16-18, 2027. The conference is co-sponsored by Harbin Institute of Technology, Shenzhen, The Chinese University of Hong Kong, Shenzhen, Hainan Institute of Zhejiang University. [ Proceedings ] Accepted and registered full papers will be collected in ICPIES Conference Proceedings, submitted for Ei Compendex and Scopus index. [ Special Sessions ] Special Session 1: AI+ Applications in Planning, Operation, and Control of New Power Systems Chairs: Hui Hou, Wuhan University of Technology, China Xiaohong Dong, Hebei University of Technology, China Chenhui Song, Changsha University of Science and Technology, China Special Session 2: Optimization and Scheduling of Integrated Energy Systems for Carbon Neutrality Chairs: Gaoqi Liang, Harbin Institute of Technology, Shenzhen, China Xian Zhang, Harbin Institute of Technology, Shenzhen, China Shaoyan Li, North China Electric Power University, China Chao Yang, North China Electric Power University, China Special Session 3: Survivability Enhancement Strategies for Power Systems under Extreme Events Chairs: Donglian Qi, Zhejiang University, China Li Li, China Southern Power Grid, China Yulin Chen, Hainan Institute of Zhejiang University, Sanya, China Special Session 4: Stability Analysis and Control of Modern Power Systems With Rich Renewable Energy Generation Chairs: Ping He, Zhengzhou University of Light Industry, China Tong Wang, North China Electric Power University, China Congshan Li, Zhengzhou University of Light Industry, China Special Session 5: Emerging Technologies in Modern Power Systems: Energy Storage, Virtual Power Plant, Hydrogen, Electric Vehicle and Beyond Chairs: Qin Wang, Hong Kong Polytechnic University, China Guozhong Liu, Dongguan University of Technology, China Yi Wang, The University of Hong Kong, China Special Session 6: Optimal Planning, Situation Awareness, and Coordinated Operation of Modern Power Systems Chairs: Zhenzhi Lin, Zhejiang University, China Lvbin Ma, Zhejiang Huayun Information Technology Co., Ltd., China Changming Chen, Fuzhou University, China Special Session 7: Intelligent Optimization and Sustainable Development of Integrated Energy Systems Chairs: Chengfu Wang, Shandong University, China Bo Liu, Tianjin University, China Yumin Zhang, Shandong University of Science and Technology, China Special Session 8: Flexible and Secure Operation of Multi-scenario Integrated Energy System Coupled with Electricity and Hydrogen Chairs: Xingtang He, Tianjin University, China Xiaolong Jin, Tianjin University, China Qian Jiang, Guangxi University, China Special Session 9: Key Technologies for Energy Storage And Virtual Power Plants Participating In Power System Operations Chairs: Mingze Zhang, Harbin University of Science and Technology, China Jiakai Shen, China Electric Power Research Institute, China Feixiang Peng, Anhui University, China Cuicui Jin, Electric Power Research Institute of State Grid Tianjin Electric Power Company, China Liu Liu, State Grid JiangXi Electric Power Research Institute, China Special Session 10: Advances in Demand Response and Energy Market Mechanisms for Future Integrated Energy Systems Chairs: Zhengmao Li, Aalto University, Finland Liwei Ju, North China Electric University, China Liang Feng, Shandong University of Technology, China Xiaodong Zheng, South China University of Technology, China Xiaoming Dong, Shandong University, China Special Session 11: Capacity, Flexibility, and Ancillary Service Markets for Low-Carbon Power Systems Chairs: Zou Yunyang, Nanyang Technological University, Singapore Su Yi, Xiangtan University, China Yikui Liu, Sichuan University, China Buxin She, Kansas State University, USA Xueshen Zhao, Shandong University of Technology, China Special Session 12: Advanced Energy Management, Optimization, and Resilient Control of Renewable Energy Systems under Cyber-Physical Challenges Chairs: Zhijian Hu, CNRS, France Heling Yuan, Dalian University of Technology, China Xin Zhao, Anhui University of Finance &amp; Economics, China Daogui Tang, Wuhan University of Technology, China Junyi Zhai, China University of Petroleum (East China), China Special Session 13: Empowering a Green Future: Symposium on Key Technologies for Optimal Operation and Control of Integrated Energy Systems Chairs: Yang Liu, South China University of Technology, China Jiehui Zheng, South China University of Technology, China Kaishun Xiahou, South China University of Technology, China Tong Zhang, University of Leeds, UK Tong Qian, South China University of Technology, China Special Session 14: Planning, Operation, and Resilience Enhancement of Integrated Energy Systems Chairs: Zhenzhi Lin, Zhejiang University, China Chutong Wang, North China Electric Power University, China Chao Yang, North China Electric Power University, China Hao Xu, Shanghai University of Electric Power, China Yan Zhou, Jiangsu Ocean University, China Jieyu Lei, Southwest Jiaotong University, China Ruikai Ye, Xiamen University of Technology, China Special Session 15: Decarbonization and Flexibility Advancement in Integrated Energy Systems Chairs: Zhaoyang Dong, City University of Hong Kong, China Junhua Zhao, The Chinese University of Hong Kong, Shenzhen, China Jing Qiu, The University of Sydney, Australia Jiaqi Ruan, Sichuan University, China Liang Yuan, Central South University, China Jingjie Huang, Changsha University of Science &amp; Technology, China Yuechuan Tao, City University of Hong Kong, China Shuying Lai, City University of Macau, China Xiang Luo, Electric Power Research Institute, State Grid Fujian Electric Power Co., Ltd., China Yi Yang, Electric Power Research Institute, State Grid Fujian Electric Power Co., Ltd., China Special Session 16: Synergistic Operation, Optimization, and Health Management of Source-Grid-Load-Storage Systems Chairs: Jingxuan Peng, Nanyang Technological University, Singapore Chaoxian Lv, China University of Mining and Technology, China Wenjun Zhu, Xi'an Jiaotong-Liverpool University, China Muyao Wu, Hefei University of Technology, China Hongyi Li, Iowa State University, USA Special Session 17: Innovations and Synergies in Low-Carbon Energy-Economy-Transport Integrated Systems Chairs: Yitong Shang, Hong Kong University of Science and Technology, China Zao Tang, Hangzhou Dianzi University, China Hui Hou, Wuhan University of Technology, China Xueqian Fu, China Agricultural University, China Chuanliang Xiao, Shandong University of Technology, China Special Session 18: Efficient Aggregation, Accurate Modeling, and Coordinated Operation of Demand-Side Flexibility Resources under Market Mechanisms Chairs: Hongxu Huang, Tsinghua University, China Jiaqi Ruan, Sichuan University, China Pupu Chao, Dalian University of Technology, China Yang Yang, State Key Laboratory of Internet of Things for Smart City, China Licheng Wang, The University of Queensland, Australia Special Session 19: Boosting the Economics and Resilience of Modern Power Systems: A Multi-Regional Operational Coordination Perspective Chairs: Xianbang Chen, Cornell University, USA Wenyang Deng, Guangdong University of Science and Technology, China Ping Lin, Dalian University of Technology, China Weitao Yao, Xi'an Jiaotong-Liverpool University, China Junjie Zhong, Changsha University of Science &amp; Technology, China Special Session 20: Advanced Modeling, Optimization, and Market Mechanisms for Generalized Energy Storage in Low-Carbon Power Systems Chairs: Ning Qi, Columbia University, USA Jie Chen, School of Automation and Electronic Information, China Kai Wang, Qingdao University, China Jia Liu, Hangzhou Dianzi University, China Shiwei Xie, Fuzhou University, China Special Session 21: Digitalization and Intelligence for Distribution Power Systems Chairs: Suhan Zhang, University of Sheffield, UK Shiwei Xia, North China Electric Power University, China Kecheng He, Lanzhou Jiaotong University, China Jin Tan, Shanghai University of Electric Power, China Special Session 22: Privacy-preserving Distributed Optimization Methods of Modern Power System Considering Flexible Power Resources Chairs: Xizhen Xue, Nanyang Technological University, Singapore Yumin Zhang, Shandong University of Science and Technology, China Wenlong Liao, University of Leicester, UK Xu Liu, Imperial College London, UK Feng An, The University of Queensland, Australia Special Session 23: Taming Multivariate Uncertainties: Advanced Stochastic Optimization and Control for Renewable Energy Systems Chairs: Pan Zhenning, South China University of Technology, China Xiaoshun Zhang, Foshan Graduate School of Innovation, Northeastern University, China Yizhou Zhou, Hohai University, China Zhang Congyue, Southeast University, China Yuji Zeng, City University of Hong Kong, China Special Session 24: Power Quality Analysis，Tracing, and Control in New Power Systems Chairs: Feixiong Chen, Fuzhou University, China Yan Zhang, Fuzhou University, China Chenxi Zhang, Fuzhou University, China Changming Chen, Fuzhou University, China Special Session 25: Unlocking Potentials of Flexibility Resources: Resilience-oriented Advanced Control and Market Mechanism of Low-inertia Power Systems Chairs: Sufan Jiang, Nanyang Technological University, Singapore Hui Li, Dalian University of Technology, China Jialei Su, China University of Petroleum (East China), China Ying Wang, Southeast University, China Xinyu Wang, Yanshan University, China Special Session 26: Advanced Grid-Forming Technologies for Power-Electronics Dominated Power Systems Chairs: Haobo Zhang, Cardiff University, UK Wangkun Xu, Imperial College London, UK Wei Fan, Beihang University, China Yao Zou, Chongqing Normal University, China Zekun Guo, University of Hull, UK Special Session 27：Optimization, Control, and Market Mechanisms for Future Active Distribution Networks Chairs: Changsen Feng, Tongji University, China Chao Deng, Nanjing University of Posts and Telecommunications, China Tianlei Zeng, Sichuan University, China Menglin Zhang, China University of Geosciences (Wuhan), China Zening Li, Taiyuan University of Technology, China Special Session 28：Machine Learning for Secure and Economic Power System Operations Chairs: Lijun Liu, Fuzhou University, China Zhewen Niu, Taiyuan University of Technology, China XiangLong Lian, Fuzhou University, China Xiao-Yu Zhang, Anhui University, China Linwei Sang, Southeast University, China Jiang Yunpeng, Tsinghua University, China [ Call for Papers ] "Power Systems" Power Generation, Transmission and Distribution Distributed Generation and Microgrids Power System Stability, Reliability, and Flexibility Power Electronics and Application Trends Inverter Technology Smart Grid Artificial Intelligence Applications in Power Systems Intelligent Control Systems Electric Machines and Drives Electric and Hybrid Electric Vehicles High Voltage Engineering and Technology Power Quality and Protection in Power Systems Condition Monitoring of Power System Components Power System Planning and Dispatch/Scheduling Power System Communication Hydrogen Energy Coupling in Power Systems Power System Resilience under Extreme Scenarios Quantum Computing Applications in Power Systems "Energy Systems" Multi-vector Energy System Modeling and Analysis Energy Internet Architecture and Design Artificial Intelligence for Energy Internet Combined Heat and Power (CHP) and Hybrid Energy Systems Distributed Generation and Hybrid Energy Systems Complementary Dispatch and Optimization of Multi-energy Flows Coordination of Energy, Networks, Storage, and Load Energy Control and Storage Emerging Technologies in Energy Systems Energy Exchange and Routing in Energy Internet Energy System Integration High-capacity Optical Transmission &amp; Large-scale Energy Storage Security and Reliability of Integrated Energy Systems Energy-Transportation Coupled Systems Digital Twin and Metaverse for Energy Systems Flexible Interconnection Technologies for Energy Systems Integration of Space Internet with Energy Systems more details: https://icpies.org/cfp.html [ Call for Special Sessions ] Special Sessions may address one or more Tracks, but they should be Organized under a unified theme. Special Sessions are intended to allow projects or any other group of authors to present their own work. It is not expected that open calls for papers are launched for Special Sessions, in order to attract authors or presenters. Special Sessions will be evaluated according to the following criteria: – Relevance – Timeliness – Technical content – Novelty – Overall Recommendation more details: https://icpies.org/ss.html [ Submission ] Make a submission via Easychair: https://easychair.org/conferences/?conf=icpies2027 PS: Listener is warmly welcomed to register via: https://www.zmeeting.org/register/icpies2027 more details:https://icpies.org/sub.html [ Conference Awards ] Young Scientist Award Outstanding Organization Award Excellent Doctoral Dissertation Award Outstanding Reviewer Award Best Industrial Paper Award Best Student Paper Award Best Oral Presentation Award Best Poster Presentation Award [ Contact us ] Ms. Maggie Xu E-mail: icpies-conf@outlook.com</text:p>
          </table:table-cell>
          <table:table-cell table:number-columns-repeated="1013"/>
        </table:table-row>
        <table:table-row table:style-name="ro1">
          <table:table-cell table:style-name="ce2" office:value-type="string" calcext:value-type="string">
            <text:p>PREDICTION SOLUTIONS 2026</text:p>
          </table:table-cell>
          <table:table-cell table:style-name="ce2" office:value-type="string" calcext:value-type="string">
            <text:p>International Conference on Prediction Solutions for Technical and Societal Systems</text:p>
          </table:table-cell>
          <table:table-cell table:style-name="ce2" office:value-type="float" office:value="78" calcext:value-type="float">
            <text:p>78</text:p>
          </table:table-cell>
          <table:table-cell table:style-name="ce2" office:value-type="float" office:value="30" calcext:value-type="float">
            <text:p>30</text:p>
          </table:table-cell>
          <table:table-cell table:style-name="ce3" office:value-type="date" office:date-value="2026-07-06" calcext:value-type="date">
            <text:p>2026-07-06</text:p>
          </table:table-cell>
          <table:table-cell table:style-name="ce3" office:value-type="date" office:date-value="2026-08-23" calcext:value-type="date">
            <text:p>2026-08-23</text:p>
          </table:table-cell>
          <table:table-cell table:style-name="ce3" office:value-type="date" office:date-value="2026-09-06" calcext:value-type="date">
            <text:p>2026-09-06</text:p>
          </table:table-cell>
          <table:table-cell table:style-name="ce2" office:value-type="string" calcext:value-type="string">
            <text:p>Lisbon, Portugal</text:p>
          </table:table-cell>
          <table:table-cell table:style-name="ce2" office:value-type="string" calcext:value-type="string">
            <text:p>Oct 25, 2026 - Oct 29, 2026</text:p>
          </table:table-cell>
          <table:table-cell table:style-name="ce4" office:value-type="string" calcext:value-type="string">
            <text:p><text:a xlink:href="https://www.iaria.org/conferences2026/PREDICTIONSOLUTIONS26.html" xlink:type="simple">https://www.iaria.org/conferences2026/PREDICTIONSOLUTIONS26.html</text:a></text:p>
          </table:table-cell>
          <table:table-cell table:style-name="ce2" office:value-type="string" calcext:value-type="string">
            <text:p>Please consider to contribute to and/or forward to the appropriate groups the following opportunity to submit and publish original scientific results to: - PREDICTION SOLUTIONS 2026, International Conference on Prediction Solutions for Technical and Societal Systems PREDICTION SOLUTIONS 2026 is scheduled to be October 25 - 29, 2026 in Lisbon, Portugal under the SocSys 2026 umbrella. The submission deadline is July 6, 2026. Authors of selected papers will be invited to submit extended article versions to one of the IARIA Journals: https://www.iariajournals.org All events will be held in a hybrid mode: on site, online, prerecorded videos, voiced presentation slides, pdf slides. ================= ============== PREDICTION SOLUTIONS 2026 | Call for Papers =============== CALL FOR PAPERS, TUTORIALS, PANELS PREDICTION SOLUTIONS 2026, International Conference on Prediction Solutions for Technical and Societal Systems General page: https://www.iaria.org/conferences2026/PREDICTIONSOLUTIONS26.html Submission page: https://www.iaria.org/conferences2026/SubmitPREDICTIONSOLUTIONS26.html Event schedule: October 25 - 29, 2026 Contributions: - regular papers [in the proceedings, digital library] - short papers (work in progress) [in the proceedings, digital library] - ideas: two pages [in the proceedings, digital library] - extended abstracts: two pages [in the proceedings, digital library] - posters: two pages [in the proceedings, digital library] - posters: slide only [slide-deck posted at www.iaria.org] - presentations: slide only [slide-deck posted at www.iaria.org] - demos: two pages [posted at www.iaria.org] Submission deadline: July 6, 2026 Extended versions of selected papers will be published in IARIA Journals: https://www.iariajournals.org Print proceedings will be available via Curran Associates, Inc.: https://www.proceedings.com/9769.html Articles will be archived in the free access ThinkMind Digital Library: https://www.thinkmind.org The topics suggested by the conference can be discussed in term of concepts, state of the art, research, standards, implementations, running experiments, applications, and industrial case studies. Authors are invited to submit complete unpublished papers, which are not under review in any other conference or journal in the following, but not limited to, topic areas. All tracks are open to both research and industry contributions. Before submission, please check and comply with the editorial rules: https://www.iaria.org/editorialrules.html PREDICTION SOLUTIONS 2026 Topics (for topics and submission details: see CfP on the site) Call for Papers: https://www.iaria.org/conferences2026/CfPPREDICTION SOLUTIONS26.html ============================================================ PREDICTION SOLUTIONS 2026 Tracks (topics and submission details: see CfP on the site) Prediction fundamentals Prediction process (observing, inferring, and classifying); Brain/Psycho predictions in social systems; Prediction techniques (rule-based predication, heuristic, fuzzy logic, etc.); Prediction statistical techniques (regression, bootstrapping, etc.); Agile prediction; Causality vs. Correlation relation; Negative predictive value, Sensitivity, Specificity; Formalizing brain psychological capabilities for prediction New prediction modeling approaches Modeling methodologies for repetitive predictions; Criteria for selecting a correlation type; Criteria for selecting a predictor variable for regression analyses; Predictor-based model discrimination and calibration; Experiments for building strong correlation functions; New combinations of correlation measurements; New correction matrix; Optimized correlations for a higher predictive power score; Detecting symmetric and asymmetric correlations; Identifying linear and non-linear correlations; Methods for detecting hidden patterns Approaches for correlation functions and data Solutions for correlating variables; Correlation functions with continuous and discrete variables; Guidelines for selection of correlation indicator; Modeling the data with parametric and non-parametric predictive models; Datasets and Machine Learning; Correlation functions for multimodal Big Data; Correlation through AI-based recursive forecasting; Incorporate external intelligence and/or extraneous variables; Private prediction (private ML-based scenarios, public output); Scale-up and scale-down prediction accuracy Methods/tools for prediction testing and validation Simulation via Digital Twins technology; Predictive testing tools; Parametric tests (means) and non-parametric tests (medians); Testing recursive predictions; Hypothesis tests: parametric tests (means) and non-parametric tests (medians); Guidelines for test selection vs data distribution Solutions for prevention via prediction Preventing systems failures (fault-tolerant systems, resilience, etc.); Preventing thefts (humankind, cyber-protection, etc.); Preventing social crimes (hot spot predictions, etc.); Prevent technical disruptions (predictions on supply chains, intermittent medical assistance, etc.); Prevent massive service disruptions (predictive Internet, power failure, etc.); Solutions for preventive safety (transportations, food industry, hazards, thefts, etc.); General outcome for outturns of any predictions Solutions and challenges for trending technologies Solutions for predictive maintenance; Solutions on predictive Internet; Predictive success on restorative medicine; Predictive solutions on mobile health technology in brain-related illnesses; Predictions on massive Cloud-based technology adoptions; Predictions on service availability of hybrid Cloud and Edge/For computing; Case of predicting penetration rate of intelligent automation (Industry 4/0/5.0); Prediction on privacy invasion in human-centered devices/services; Predictions on Return on Investment (RoI) for Blockchain and 5G; Prediction of adoption of Virtual Reality and Augmented Reality; Predictive trust in system resiliency; AI-based prediction of cyber-attacks Applications in selected domains Financial markets predictions (inflation, crash, boom, etc.); Predictions in real estate market (home prices, sale volumes, etc.); Prediction model in media consumption (audience, specific media, etc.); Spatial/localization prediction (any domain; see volcano vs fault lines); Natural disasters/catastrophes (forecast based on atmospheric observations); Earthquake predictions models; Predict/Forecast for climate changes (drought, rain, temperature, pollution, etc.); Predict/Forecast local/nationwide of emergency events occurrence (wildfire, flooding, travel conditions); Epidemic/Pandemic prediction models (spreading areas, contagiousness, virulence, etc.); Social predictions (political races, education, etc.) Models, solutions, applications, and lessons learned Archaeology; Astronomy; Biology; Economics; Education; Marketing; Medicine and Health Care; Musicology; Psychology; Risk Management; Social Sciences ------------------------ PREDICTION SOLUTIONS 2026 Committee: https://www.iaria.org/conferences2026/ComPREDICTIONSOLUTIONS26.html IARIA Ambassadors Steve Chan, Decision Engineering Analysis Laboratory, USA Dirceu Cavendish, Kyushu Institute of Technology, Japan Monika Maria Moehring, Study Centre for Blind and Disabled Students, Technische Hochschule Mittelhessen, Gie en Germany Carlos Becker Westphall, Federal University of Santa Catarina, Brazil Lasse Berntzen, University of South-Eastern Norway, Norway Les Sztandera, Thomas Jefferson University, Philadelphia, USA Andreas Rausch, TU Clausthal, Clausthal-Zellerfeld, Germany Timothy Phan, NASA, Jet Propulsion Laboratory, USA Manuela Vieira, CTS/ISEL/IPL, Portugal Luigi Lavazza, Universit dell'Insubria - Varese, Italy</text:p>
          </table:table-cell>
          <table:table-cell table:number-columns-repeated="1013"/>
        </table:table-row>
        <table:table-row table:style-name="ro1">
          <table:table-cell table:style-name="ce2" office:value-type="string" calcext:value-type="string">
            <text:p>COCE 2026</text:p>
          </table:table-cell>
          <table:table-cell table:style-name="ce2" office:value-type="string" calcext:value-type="string">
            <text:p>The Third International Conference on Technologies for Marine and Coastal Ecosystems</text:p>
          </table:table-cell>
          <table:table-cell table:style-name="ce2" office:value-type="float" office:value="25" calcext:value-type="float">
            <text:p>25</text:p>
          </table:table-cell>
          <table:table-cell table:style-name="ce2" office:value-type="float" office:value="30" calcext:value-type="float">
            <text:p>30</text:p>
          </table:table-cell>
          <table:table-cell table:style-name="ce3" office:value-type="date" office:date-value="2026-07-06" calcext:value-type="date">
            <text:p>2026-07-06</text:p>
          </table:table-cell>
          <table:table-cell table:style-name="ce3" office:value-type="date" office:date-value="2026-08-23" calcext:value-type="date">
            <text:p>2026-08-23</text:p>
          </table:table-cell>
          <table:table-cell table:style-name="ce3" office:value-type="date" office:date-value="2026-09-06" calcext:value-type="date">
            <text:p>2026-09-06</text:p>
          </table:table-cell>
          <table:table-cell table:style-name="ce2" office:value-type="string" calcext:value-type="string">
            <text:p>Lisbon, Portugal</text:p>
          </table:table-cell>
          <table:table-cell table:style-name="ce2" office:value-type="string" calcext:value-type="string">
            <text:p>Oct 25, 2026 - Oct 29, 2026</text:p>
          </table:table-cell>
          <table:table-cell table:style-name="ce4" office:value-type="string" calcext:value-type="string">
            <text:p><text:a xlink:href="https://www.iaria.org/conferences2026/COCE26.html" xlink:type="simple">https://www.iaria.org/conferences2026/COCE26.html</text:a></text:p>
          </table:table-cell>
          <table:table-cell table:style-name="ce2" office:value-type="string" calcext:value-type="string">
            <text:p>Please consider to contribute to and/or forward to the appropriate groups the following opportunity to submit and publish original scientific results to: - COCE 2026, The Third International Conference on Technologies for Marine and Coastal Ecosystems COCE 2026 is scheduled to be October 25 - 29, 2026 in Lisbon, Portugal under the DigitalSustainability 2026 umbrella. The submission deadline is July 6, 2026. Authors of selected papers will be invited to submit extended article versions to one of the IARIA Journals: https://www.iariajournals.org All events will be held in a hybrid mode: on site, online, prerecorded videos, voiced presentation slides, pdf slides. ================= ============== COCE 2026 | Call for Papers =============== CALL FOR PAPERS, TUTORIALS, PANELS COCE 2026, The Third International Conference on Technologies for Marine and Coastal Ecosystems General page: https://www.iaria.org/conferences2026/COCE26.html Submission page: https://www.iaria.org/conferences2026/SubmitCOCE26.html Event schedule: October 25 - 29, 2026 Contributions: - regular papers [in the proceedings, digital library] - short papers (work in progress) [in the proceedings, digital library] - ideas: two pages [in the proceedings, digital library] - extended abstracts: two pages [in the proceedings, digital library] - posters: two pages [in the proceedings, digital library] - posters: slide only [slide-deck posted at www.iaria.org] - presentations: slide only [slide-deck posted at www.iaria.org] - demos: two pages [posted at www.iaria.org] Submission deadline: July 6, 2026 Extended versions of selected papers will be published in IARIA Journals: https://www.iariajournals.org Print proceedings will be available via Curran Associates, Inc.: https://www.proceedings.com/9769.html Articles will be archived in the free access ThinkMind Digital Library: https://www.thinkmind.org The topics suggested by the conference can be discussed in term of concepts, state of the art, research, standards, implementations, running experiments, applications, and industrial case studies. Authors are invited to submit complete unpublished papers, which are not under review in any other conference or journal in the following, but not limited to, topic areas. All tracks are open to both research and industry contributions. Before submission, please check and comply with the editorial rules: https://www.iaria.org/editorialrules.html COCE 2026 Topics (for topics and submission details: see CfP on the site) Call for Papers: https://www.iaria.org/conferences2026/CfPCOCE26.html ============================================================ COCE 2026 Tracks (topics and submission details: see CfP on the site) Smart Ocean Monitoring and Data Analytics - Advanced Sensor Technologies - Data Fusion and Integration - Real-time Monitoring and Decision Support Systems - Ocean Data Visualization and Communication - Big Data Oceanography Machine Learning for Oceanographic Research - Machine Learning for Ocean Data Analysis - Predictive Modeling of Oceanic Phenomena - Anomaly Detection and Event Prediction - Species Distribution Modeling - Automated Image Analysis for Underwater Imagery - Oceanographic Data Assimilation - Optimization of Autonomous Ocean Vehicles? Smart Ocean Engineering and Infrastructure - Autonomous Underwater Vehicle (AUV) Technology - Data-driven Maintenance and Monitoring of Ocean Infrastructure - Smart Ports and Maritime Logistics Smart Coastal Monitoring and Prediction Systems - Remote Sensing Techniques for Coastal Monitoring - Real-time Decision Support Systems for Coastal Management - Smart Infrastructure for Coastal Monitoring - Intelligent Coastal Protection and Adaptation AI and Machine Learning Applications for Coastal Conservation and Restoration - Environmental Impact Assessment and Mitigation Strategies - Smart Offshore Renewable Energy Systems - Species Distribution Modeling and Habitat Suitability Assessment - Automated Monitoring of Ecological Indicators - Prediction and Mitigation of Climate Change Impacts related to Coastal Areas ------------------------ COCE 2026 Committee: https://www.iaria.org/conferences2026/ComCOCE26.html IARIA Ambassadors Steve Chan, Decision Engineering Analysis Laboratory, USA Dirceu Cavendish, Kyushu Institute of Technology, Japan Monika Maria Moehring, Study Centre for Blind and Disabled Students, Technische Hochschule Mittelhessen, Gie en Germany Carlos Becker Westphall, Federal University of Santa Catarina, Brazil Lasse Berntzen, University of South-Eastern Norway, Norway Les Sztandera, Thomas Jefferson University, Philadelphia, USA Andreas Rausch, TU Clausthal, Clausthal-Zellerfeld, Germany Timothy Phan, NASA, Jet Propulsion Laboratory, USA Manuela Vieira, CTS/ISEL/IPL, Portugal Luigi Lavazza, Universit dell'Insubria - Varese, Italy</text:p>
          </table:table-cell>
          <table:table-cell table:number-columns-repeated="1013"/>
        </table:table-row>
        <table:table-row table:style-name="ro1">
          <table:table-cell table:style-name="ce2" office:value-type="string" calcext:value-type="string">
            <text:p>CADAT 2026</text:p>
          </table:table-cell>
          <table:table-cell table:style-name="ce2" office:value-type="string" calcext:value-type="string">
            <text:p>The Third International Conference on Accessible Digital Agriculture Technologies</text:p>
          </table:table-cell>
          <table:table-cell table:style-name="ce2" office:value-type="float" office:value="25" calcext:value-type="float">
            <text:p>25</text:p>
          </table:table-cell>
          <table:table-cell table:style-name="ce2" office:value-type="float" office:value="35" calcext:value-type="float">
            <text:p>35</text:p>
          </table:table-cell>
          <table:table-cell table:style-name="ce3" office:value-type="date" office:date-value="2026-07-06" calcext:value-type="date">
            <text:p>2026-07-06</text:p>
          </table:table-cell>
          <table:table-cell table:style-name="ce3" office:value-type="date" office:date-value="2026-08-23" calcext:value-type="date">
            <text:p>2026-08-23</text:p>
          </table:table-cell>
          <table:table-cell table:style-name="ce3" office:value-type="date" office:date-value="2026-09-06" calcext:value-type="date">
            <text:p>2026-09-06</text:p>
          </table:table-cell>
          <table:table-cell table:style-name="ce2" office:value-type="string" calcext:value-type="string">
            <text:p>Lisbon, Portugal</text:p>
          </table:table-cell>
          <table:table-cell table:style-name="ce2" office:value-type="string" calcext:value-type="string">
            <text:p>Oct 25, 2026 - Oct 29, 2026</text:p>
          </table:table-cell>
          <table:table-cell table:style-name="ce4" office:value-type="string" calcext:value-type="string">
            <text:p><text:a xlink:href="https://www.iaria.org/conferences2026/CADAT26.html" xlink:type="simple">https://www.iaria.org/conferences2026/CADAT26.html</text:a></text:p>
          </table:table-cell>
          <table:table-cell table:style-name="ce2" office:value-type="string" calcext:value-type="string">
            <text:p>Please consider to contribute to and/or forward to the appropriate groups the following opportunity to submit and publish original scientific results to: - CADAT 2026, The Third International Conference on Accessible Digital Agriculture Technologies CADAT 2026 is scheduled to be October 25 - 29, 2026 in Lisbon, Portugal under the DigitalSustainability 2026 umbrella. The submission deadline is July 6, 2026. Authors of selected papers will be invited to submit extended article versions to one of the IARIA Journals: https://www.iariajournals.org All events will be held in a hybrid mode: on site, online, prerecorded videos, voiced presentation slides, pdf slides. ================= ============== CADAT 2026 | Call for Papers =============== CALL FOR PAPERS, TUTORIALS, PANELS CADAT 2026, The Third International Conference on Accessible Digital Agriculture Technologies General page: https://www.iaria.org/conferences2026/CADAT26.html Submission page: https://www.iaria.org/conferences2026/SubmitCADAT26.html Event schedule: October 25 - 29, 2026 Contributions: - regular papers [in the proceedings, digital library] - short papers (work in progress) [in the proceedings, digital library] - ideas: two pages [in the proceedings, digital library] - extended abstracts: two pages [in the proceedings, digital library] - posters: two pages [in the proceedings, digital library] - posters: slide only [slide-deck posted at www.iaria.org] - presentations: slide only [slide-deck posted at www.iaria.org] - demos: two pages [posted at www.iaria.org] Submission deadline: July 6, 2026 Extended versions of selected papers will be published in IARIA Journals: https://www.iariajournals.org Print proceedings will be available via Curran Associates, Inc.: https://www.proceedings.com/9769.html Articles will be archived in the free access ThinkMind Digital Library: https://www.thinkmind.org The topics suggested by the conference can be discussed in term of concepts, state of the art, research, standards, implementations, running experiments, applications, and industrial case studies. Authors are invited to submit complete unpublished papers, which are not under review in any other conference or journal in the following, but not limited to, topic areas. All tracks are open to both research and industry contributions. Before submission, please check and comply with the editorial rules: https://www.iaria.org/editorialrules.html CADAT 2026 Topics (for topics and submission details: see CfP on the site) Call for Papers: https://www.iaria.org/conferences2026/CfPCADAT26.html ============================================================ CADAT 2026 Tracks (topics and submission details: see CfP on the site) AI and Machine Learning in Crop Management - Crop Disease Detection - Yield Prediction and Optimization - Pest Management Strategies - Soil Health Assessment Digital Twins for Agricultural Systems - Virtual Farming Simulations - IoT-enabled Farm Monitoring - Precision Livestock Farming - Climate Adaptation Strategies Robotic Harvesting and Farm Automation - Autonomous Harvesting Machinery - Weed Control Robots - Autonomous Greenhouse Operations - Human-Robot Collaboration in Agriculture Smart Sensors and IoT Integration for Real-Time Food Monitoring - Wireless Communication Protocols in the food supply chain - Data Fusion and Integration Strategies - Cloud-Based Analytics and Predictive Maintenance AI and Machine Learning in Food Safety Analytics - Predictive Modeling for Contamination Detection - Anomaly Detection and Outlier Identification - Image Recognition and Computer Vision - Integration of Sensor Data and Environmental Factors - Explainable AI and Interpretability in Decision-Making ------------------------ CADAT 2026 Committee: https://www.iaria.org/conferences2026/ComCADAT26.html IARIA Ambassadors Steve Chan, Decision Engineering Analysis Laboratory, USA Dirceu Cavendish, Kyushu Institute of Technology, Japan Monika Maria Moehring, Study Centre for Blind and Disabled Students, Technische Hochschule Mittelhessen, Gie en Germany Carlos Becker Westphall, Federal University of Santa Catarina, Brazil Lasse Berntzen, University of South-Eastern Norway, Norway Les Sztandera, Thomas Jefferson University, Philadelphia, USA Andreas Rausch, TU Clausthal, Clausthal-Zellerfeld, Germany Timothy Phan, NASA, Jet Propulsion Laboratory, USA Manuela Vieira, CTS/ISEL/IPL, Portugal Luigi Lavazza, Universit dell'Insubria - Varese, Italy</text:p>
          </table:table-cell>
          <table:table-cell table:number-columns-repeated="1013"/>
        </table:table-row>
        <table:table-row table:style-name="ro1">
          <table:table-cell table:style-name="ce2" office:value-type="string" calcext:value-type="string">
            <text:p>IPPR 2026</text:p>
          </table:table-cell>
          <table:table-cell table:style-name="ce2" office:value-type="string" calcext:value-type="string">
            <text:p>IEEE 2026 3rd International Conference on Intelligent Perception and Pattern Recognition</text:p>
          </table:table-cell>
          <table:table-cell table:style-name="ce2" office:value-type="float" office:value="78" calcext:value-type="float">
            <text:p>78</text:p>
          </table:table-cell>
          <table:table-cell table:style-name="ce2" office:value-type="float" office:value="30" calcext:value-type="float">
            <text:p>30</text:p>
          </table:table-cell>
          <table:table-cell table:style-name="ce3" office:value-type="date" office:date-value="2026-07-07" calcext:value-type="date">
            <text:p>2026-07-07</text:p>
          </table:table-cell>
          <table:table-cell/>
          <table:table-cell table:style-name="ce3" office:value-type="date" office:date-value="2026-07-14" calcext:value-type="date">
            <text:p>2026-07-14</text:p>
          </table:table-cell>
          <table:table-cell table:style-name="ce2" office:value-type="string" calcext:value-type="string">
            <text:p>Chongqing,China</text:p>
          </table:table-cell>
          <table:table-cell table:style-name="ce2" office:value-type="string" calcext:value-type="string">
            <text:p>Aug 14, 2026 - Aug 16, 2026</text:p>
          </table:table-cell>
          <table:table-cell table:style-name="ce4" office:value-type="string" calcext:value-type="string">
            <text:p><text:a xlink:href="https://ais.cn/u/reIZza" xlink:type="simple">https://ais.cn/u/reIZza</text:a></text:p>
          </table:table-cell>
          <table:table-cell table:style-name="ce2" office:value-type="string" calcext:value-type="string">
            <text:p>IEEE 2026 3rd International Conference on Intelligent Perception and Pattern Recognition (IPPR 2026) will be held in the vibrant city of Chongqing,China from August 14 to 16, 2026. 𝗖𝗼𝗻𝗳𝗲𝗿𝗲𝗻𝗰𝗲 𝗪𝗲𝗯𝘀𝗶𝘁𝗲: https://ais.cn/u/reIZza ---𝗖𝗮𝗹𝗹 𝗙𝗼𝗿 𝗣𝗮𝗽𝗲𝗿𝘀--- The topics of interest include, but are not limited to: ◕Perception &amp; Sensor Systems ... Deep Learning for Intelligent Perception Systems Multimodal Data Fusion and Sensor-based Perception Perception Systems for Robotics and Autonomous Agents IoT and Environmental Sensing for Intelligent Systems Vision and Perception in Human-Robot Collaboration Cognitive and Perception Mechanisms for Human-Machine Interaction Edge AI for Real-Time Perception and Decision Making Robust and Safe Perception for Autonomous Systems ◕Pattern Recognition &amp; Machine Learning ... Machine Learning and Deep Learning for Perception and Decision-Making Reinforcement Learning and Control in Intelligent Systems Unsupervised and Self-supervised Learning in Complex Systems Cross-domain Pattern Recognition and Cognitive Computing Explainable AI and Interpretable Pattern Recognition Few-shot and Zero-shot Learning for Perception Self-supervised Representation Learning in Complex Systems ◕Applications &amp; Intelligent Decision-Making... Autonomous Driving Perception and Decision Systems IoT-based Intelligent Perception and Decision Making Behavior and Activity Recognition for Intelligent Surveillance Systems Cross-disciplinary Research in Perception and Intelligent Systems Explainable and Trustworthy AI in Decision Systems Swarm Intelligence and Multi-Agent Perception Systems ---𝗦𝗽𝗲𝗮𝗸𝗲𝗿𝘀--- Prof. Sam Kwong,Lingnan University (Hong Kong),IEEE Fellow Prof. Yao Zhao,Beihang University,IEEE Fellow Prof. Siwei Ma,Peking University Prof. Cheng Deng,Hohai University ---𝗣𝘂𝗯𝗹𝗶𝗰𝗮𝘁𝗶𝗼𝗻--- All papers will be reviewed by two or three expert reviewers from the conference committees. After a careful reviewing process, all accepted papers will be published in the Conference Proceedings, and submitted to IEEE Xplore, EI Compendex and Scopus for indexing. (ISBN: 979-8-3195-0714-3) All conference proceedings paper must be at least 4 pages. ---𝗜𝗺𝗽𝗼𝗿𝘁𝗮𝗻𝘁 𝗗𝗮𝘁𝗲𝘀--- Full Paper Submission Date: July 7, 2026 Registration Deadline: July 14, 2026 Final Paper Submission Date: July 14, 2026 Conference Dates: August 14-16, 2026 --- 𝗣𝗮𝗽𝗲𝗿 𝗦𝘂𝗯𝗺𝗶𝘀𝘀𝗶𝗼𝗻--- Please send the full paper(word+pdf) to Submission System: https://ais.cn/u/reIZza</text:p>
          </table:table-cell>
          <table:table-cell table:number-columns-repeated="1013"/>
        </table:table-row>
        <table:table-row table:style-name="ro1">
          <table:table-cell table:style-name="ce2" office:value-type="string" calcext:value-type="string">
            <text:p>MIWAI 2026</text:p>
          </table:table-cell>
          <table:table-cell table:style-name="ce2" office:value-type="string" calcext:value-type="string">
            <text:p>19th Multi-Disciplinary International Conference on Artificial Intelligence</text:p>
          </table:table-cell>
          <table:table-cell table:style-name="ce2" office:value-type="float" office:value="90" calcext:value-type="float">
            <text:p>90</text:p>
          </table:table-cell>
          <table:table-cell table:style-name="ce2" office:value-type="float" office:value="28" calcext:value-type="float">
            <text:p>28</text:p>
          </table:table-cell>
          <table:table-cell table:style-name="ce3" office:value-type="date" office:date-value="2026-07-08" calcext:value-type="date">
            <text:p>2026-07-08</text:p>
          </table:table-cell>
          <table:table-cell table:style-name="ce3" office:value-type="date" office:date-value="2026-08-01" calcext:value-type="date">
            <text:p>2026-08-01</text:p>
          </table:table-cell>
          <table:table-cell table:style-name="ce3" office:value-type="date" office:date-value="2026-08-14" calcext:value-type="date">
            <text:p>2026-08-14</text:p>
          </table:table-cell>
          <table:table-cell table:style-name="ce2" office:value-type="string" calcext:value-type="string">
            <text:p>Halifax, Nova Scotia, Canada</text:p>
          </table:table-cell>
          <table:table-cell table:style-name="ce2" office:value-type="string" calcext:value-type="string">
            <text:p>Oct 10, 2026 - Oct 12, 2026</text:p>
          </table:table-cell>
          <table:table-cell table:style-name="ce4" office:value-type="string" calcext:value-type="string">
            <text:p><text:a xlink:href="https://miwai26.miwai.org/" xlink:type="simple">https://miwai26.miwai.org/</text:a></text:p>
          </table:table-cell>
          <table:table-cell table:style-name="ce2" office:value-type="string" calcext:value-type="string">
            <text:p>Artificial Intelligence (AI) research has broad applications in real-world problems. Examples include control, planning and scheduling, pattern recognition, knowledge mining, software applications, strategy games and others. The ever-evolving needs in society and business both on a local and on a global scale demand better technologies for solving more and more complex problems. Such needs can be found in all industrial sectors and in any part of the world. The International Conference on Multi-disciplinary Trends in Artificial Intelligence (MIWAI), formerly called The Multi-disciplinary International Workshop on Artificial Intelligence, is a well-established scientific venue in the field of artificial Intelligence. MIWAI was established more than 18 years ago. This conference aims to be a meeting place where excellence in AI research meets the needs for solving dynamic and complex problems in the real world. The academic researchers, developers, and industrial practitioners will have extensive opportunities to present their original work, technological advances and practical problems. Artificial intelligence is a broad area of research. We encourage researchers to submit papers in the following areas but not limited to: Scope and Topics Machine Learning &amp; Deep Learning Neural networks and representation learning Reinforcement learning and decision-making Explainable AI and trustworthy ML Natural Language Processing &amp; Speech Recognition Large language models and generative AI Multimodal AI and human-AI interaction Sentiment analysis and discourse modeling Computer Vision &amp; Image Processing Object detection and scene understanding Medical imaging and biometrics AI-driven creative applications (e.g., art, design, and multimedia) Robotics &amp; Autonomous Systems AI for robotics and intelligent automation Multi-agent systems and swarm intelligence Human-robot interaction AI for Society, Ethics &amp; Applications AI for healthcare, finance, and smart cities Ethical AI, bias mitigation, and fairness AI-driven education and learning analytics AI Theory &amp; Algorithms Computational intelligence and optimization Knowledge representation and reasoning Probabilistic modeling and uncertainty in AI Agentic AI Defining agency in AI Reinforcement learning in agentic AI systems Multi-agent coordination and negotiation strategies Handling uncertainty and risk in agentic AI decision-making Large Language Model Interpretability and Explainability Alignment and Safety Multilingual &amp; Cross-Lingual Learning Agentic AI with LLM Submission Guidelines Submission link: https://www.easychair.org/conferences/?conf=miwai2026 Both research and application papers are solicited. All submitted papers will be carefully peer-reviewed on the basis of technical quality, relevance, significance, and clarity. Each paper should have no more than twelve (12) pages in the Springer-Verlag LNCS style. The authors' names and institutions should not appear in the paper. Unpublished work of the authors should not be cited. Springer-Verlag author instructions are available at: https://www.springer.com/gp/computer-science/lncs/conference-proceedings-guidelines</text:p>
          </table:table-cell>
          <table:table-cell table:number-columns-repeated="1013"/>
        </table:table-row>
        <table:table-row table:style-name="ro1">
          <table:table-cell table:style-name="ce2" office:value-type="string" calcext:value-type="string">
            <text:p>CSEE 2026</text:p>
          </table:table-cell>
          <table:table-cell table:style-name="ce2" office:value-type="string" calcext:value-type="string">
            <text:p>IEEE--2026 The 7th International Conference on Computer Science, Engineering, and Education (CSEE 2026)</text:p>
          </table:table-cell>
          <table:table-cell table:style-name="ce2" office:value-type="float" office:value="80" calcext:value-type="float">
            <text:p>80</text:p>
          </table:table-cell>
          <table:table-cell table:style-name="ce2" office:value-type="float" office:value="28" calcext:value-type="float">
            <text:p>28</text:p>
          </table:table-cell>
          <table:table-cell table:style-name="ce3" office:value-type="date" office:date-value="2026-07-10" calcext:value-type="date">
            <text:p>2026-07-10</text:p>
          </table:table-cell>
          <table:table-cell table:number-columns-repeated="2"/>
          <table:table-cell table:style-name="ce2" office:value-type="string" calcext:value-type="string">
            <text:p>Barcelona, Spain</text:p>
          </table:table-cell>
          <table:table-cell table:style-name="ce2" office:value-type="string" calcext:value-type="string">
            <text:p>Sep 16, 2026 - Sep 18, 2026</text:p>
          </table:table-cell>
          <table:table-cell table:style-name="ce4" office:value-type="string" calcext:value-type="string">
            <text:p><text:a xlink:href="https://csee.net/" xlink:type="simple">https://csee.net/</text:a></text:p>
          </table:table-cell>
          <table:table-cell table:style-name="ce2" office:value-type="string" calcext:value-type="string">
            <text:p>Full Name: The 7th International Conference on Computer Science, Engineering, and Education Abbreviation: CSEE 2026 *The 7th International Conference on Computer Science, Engineering, and Education (CSEE 2026) * Barcelona, Spain | September 16-18, 2026 Website: https://csee.net/ ◆Conference Committees Honorary Chair Jose Luis Rodriguez Illera, University of Barcelona, Spain General Chairs Qing Li (IEEE Fellow, IET Fellow), The Hong Kong Polytechnic University, Hong Kong Mario Barajas Frutos, University of Barcelona, Spain Irina Lyublinskaya, Columbia University, USA General Co-chair Jie Lu (IEEE Fellow, IFSA Fellow, Australian Laureate Fellow), University of Technology Sydney, Australia Program Chairs Cristina Galván, University of Barcelona, Spain Alexander Jesser, Heilbronn University of Applied Sciences, Germany For more committees, please visit this website: https://csee.net/Committee.html ◆Keynote Speaker Prof. Minjuan Wang Senior Member, IEEE EiC, IEEE Transactions on Learning Technologies (IEEE-TLT) The Education University of Hong Kong, Hong Kong SAR, China ◆Invited Speaker Assoc. Prof. Mohd. Elmagzoub Eltahir, Ajman University, United Arab Emirates Assoc. Prof. Manuel B. Garcia, Far Eastern University, Philippines ◆Publication Submitted papers will go through a rigorous peer review process, and finally accepted papers after registration and presentation will be published in the CSEE 2026 conference proceedings and submitted to IEEE Xplore and possible indexing by Ei Compendex and Scopus. ◆Topics (Topics of interest for submission include, but are not limited to:) Track 1: Artificial Intelligence and Machine Learning - Deep learning algorithms - Natural language processing Track 2: Software Engineering and Programming - Agile software development - Software testing and quality assurance Track 3: Computer Networks and Communications - Network protocols and architectures - Wireless and mobile networks Track 4: Human-Computer Interaction and User Experience - Big data processing frameworks - Data visualization and exploration Track 5: Educational Technology and E-Learning - Online and blended learning environments - Learning management systems Track 6: Computer Vision and Image Processing - Image and video analysis - Object detection and recognition Track 7: Computer Graphics and Visualization - Rendering techniques and algorithms - Virtual and augmented reality Track 8: Data Science and Big Data Analytics - User interface design and evaluation - Usability testing and evaluation For more topics, please visit: https://csee.net/CFP.html. ◆Submission Instructions - Submission Deadline: April 10, 2026 - English is the official language. Paper should be written and presented only in English. - If you want to make a presentation and publish your paper, submit a full paper (4-5 pages, double columns); just want to make a presentation, abstract (200-400 words) is enough. - If the length of the full paper exceeds 6 pages, extra page will be charged. - Submission: 1) By online submission system: http://confsys.iconf.org/submission/csee2026 2) By Email: csee_contact@163.com 3) Template: Please format your paper according to the template (https://csee.net/files/Template.docx) before submission. ◆General Program The detailed conference schedule is to be available online in the late August 2026. For your convenience, schedule at a glance is given below. Day 1 - September 16, 2026 -10:00-17:00 | Onsite Registration &amp; Materials Collection Day 2 - September 17, 2026 -09:00-12:00 | Opening Remark and Keynote Speeches -12:00-13:30 | Lunch -13:30-19:00 | Invited Speeches &amp; Parallel Sessions -19:00-20:30 | Awards &amp; Closing Ceremony Day 3 - September 18, 2026 -09:00-18:00 | City Tour ◆Contact us Conference secretary: Miss Adela Zhong Email: csee.net@outlook.com Tel: +86-001-518-478-2659 Website: https://csee.net/ Office Hours: 9:30--18:00, Monday to Friday</text:p>
          </table:table-cell>
          <table:table-cell table:number-columns-repeated="1013"/>
        </table:table-row>
        <table:table-row table:style-name="ro1">
          <table:table-cell table:style-name="ce2" office:value-type="string" calcext:value-type="string">
            <text:p>ELELIJ 2026</text:p>
          </table:table-cell>
          <table:table-cell table:style-name="ce2" office:value-type="string" calcext:value-type="string">
            <text:p>Electrical and Electronics Engineering: An International Journal</text:p>
          </table:table-cell>
          <table:table-cell table:style-name="ce2" office:value-type="float" office:value="72" calcext:value-type="float">
            <text:p>72</text:p>
          </table:table-cell>
          <table:table-cell table:style-name="ce2" office:value-type="float" office:value="40" calcext:value-type="float">
            <text:p>40</text:p>
          </table:table-cell>
          <table:table-cell table:style-name="ce3" office:value-type="date" office:date-value="2026-07-10" calcext:value-type="date">
            <text:p>2026-07-10</text:p>
          </table:table-cell>
          <table:table-cell table:style-name="ce3" office:value-type="date" office:date-value="2026-08-10" calcext:value-type="date">
            <text:p>2026-08-10</text:p>
          </table:table-cell>
          <table:table-cell table:style-name="ce3" office:value-type="date" office:date-value="2026-08-17" calcext:value-type="date">
            <text:p>2026-08-17</text:p>
          </table:table-cell>
          <table:table-cell table:number-columns-repeated="2"/>
          <table:table-cell table:style-name="ce4" office:value-type="string" calcext:value-type="string">
            <text:p><text:a xlink:href="http://wireilla.com/engg/eeeij/index.html" xlink:type="simple">http://wireilla.com/engg/eeeij/index.html</text:a></text:p>
          </table:table-cell>
          <table:table-cell table:style-name="ce2" office:value-type="string" calcext:value-type="string">
            <text:p>Electrical and Electronics Engineering: An International Journal (ELELIJ) Call for Papers Electrical and Electronics Engineering: An International Journal (ELELIJ) is a Quarterly peer-reviewed and refereed open access journal that publishes articles which contribute new results in all areas of the Electrical and Electronics Engineering. The journal is devoted to the publication of high quality papers on theoretical and practical aspects of Electrical and Electronics Engineering. The goal of this journal is to bring together researchers and practitioners from academia and industry to focus on Electrical and Electronics Engineering advancements, and establishing new collaborations in these areas. Original research papers, state-of-the-art reviews are invited for publication in all areas of Electrical and Electronics Engineering. Topics of Interest Advanced Power System and Control system Analog and digital circuit design Bio Informatics Biomedical Instrumentation Digital signal processing Embedded Systems and Robotics Information systems and network security Mechatronics and Avionics Non Conventional Energy Resources Optical Networks &amp; communication Optimization techniques Power Electronics &amp; Electric Drives Remote sensing and satellite communication RF and Microwave Engineering Semiconductor Devices Sensor technology &amp; Virtual Instrumentation Soft computing / Nano computing / Grid computing System Modeling &amp; Simulation VLSI technology &amp; Design Paper Submission Authors are invited to submit papers for this journal through the E-mail elelijjournal@wireilla.com or through Submission System . Submissions must be original and should not have been published previously or be under consideration for publication while being evaluated for this Journal. Important Dates Submission Deadline : July 10, 2026 Authors Notification : August 10, 2026 Final Manuscript Due : August 17, 2026 Publication Date : Determined by the Editor-in-Chief Editor in Chief Ahmed Abu Siada, Curtin University, Australia Editorial Board Members Abhijith Pappachen, VIT University, India Akhtar Kalam, School of Engineering &amp; Science Victoria University, Australia Ali Said Awad, Alazhar University, Palestine Almoataz Youssef Abdelaziz, Ain Shams University, Egypt Bechir Bouaziz M , university of Tunis, Tunis Ben Salah Chokri , Higher Institute of Applied Science and Technology,Tunisian Chandima Ekanayake, University of Queensland,Australia Dac-Nhuong Le, Hai Phong University, Vietnam Farhad Shahnia , Murdouch University, Australia Farid Boussaid, The University of Western Australia, Australia Gustavo Gonzalez-Granaddillo , Institut Mines-Telecom, France ... More</text:p>
          </table:table-cell>
          <table:table-cell table:number-columns-repeated="1013"/>
        </table:table-row>
        <table:table-row table:style-name="ro1">
          <table:table-cell table:style-name="ce2" office:value-type="string" calcext:value-type="string">
            <text:p>APAM 2026</text:p>
          </table:table-cell>
          <table:table-cell table:style-name="ce2" office:value-type="string" calcext:value-type="string">
            <text:p>2026 Asia-Pacific Conference on Artificial Intelligence and Machine Learning-EI/Scopus</text:p>
          </table:table-cell>
          <table:table-cell table:style-name="ce2" office:value-type="float" office:value="88" calcext:value-type="float">
            <text:p>88</text:p>
          </table:table-cell>
          <table:table-cell table:style-name="ce2" office:value-type="float" office:value="25" calcext:value-type="float">
            <text:p>25</text:p>
          </table:table-cell>
          <table:table-cell table:style-name="ce3" office:value-type="date" office:date-value="2026-07-10" calcext:value-type="date">
            <text:p>2026-07-10</text:p>
          </table:table-cell>
          <table:table-cell/>
          <table:table-cell table:style-name="ce3" office:value-type="date" office:date-value="2026-07-10" calcext:value-type="date">
            <text:p>2026-07-10</text:p>
          </table:table-cell>
          <table:table-cell table:style-name="ce2" office:value-type="string" calcext:value-type="string">
            <text:p>Nanchang, China</text:p>
          </table:table-cell>
          <table:table-cell table:style-name="ce2" office:value-type="string" calcext:value-type="string">
            <text:p>Jul 24, 2026 - Jul 26, 2026</text:p>
          </table:table-cell>
          <table:table-cell table:style-name="ce4" office:value-type="string" calcext:value-type="string">
            <text:p><text:a xlink:href="https://ais.cn/u/YJ77Vj" xlink:type="simple">https://ais.cn/u/YJ77Vj</text:a></text:p>
          </table:table-cell>
          <table:table-cell table:style-name="ce2" office:value-type="string" calcext:value-type="string">
            <text:p>2026 Asia-Pacific Conference on Artificial Intelligence and Machine Learning (APAM 2026) will be held in Nanchang, China, from July 24 to 26, 2026. 𝗖𝗼𝗻𝗳𝗲𝗿𝗲𝗻𝗰𝗲 𝗪𝗲𝗯𝘀𝗶𝘁𝗲: https://ais.cn/u/YJ77Vj ---𝗖𝗮𝗹𝗹 𝗙𝗼𝗿 𝗣𝗮𝗽𝗲𝗿𝘀--- The topics of interest for submission include, but are not limited to: ◕Track 1: AI &amp; Machine Learning Methods Machine Learning Methods and Applications Deep Learning and Reinforcement Learning Neural Networks Computational Learning Theory Optimization of AI/ML Methods Pattern Recognition and Classification Data Mining and Knowledge Discovery Hybrid Intelligent Systems Soft Computing Theory and Applications Experimental Evaluation of AI/ML Algorithms Distributed and Parallel AI/ML Algorithms Algorithmic Tools for AI/ML ◕Track 2: Intelligent Systems and Applied Machine Learning Computer Vision and Image Understanding Signal and Image Processing AI/ML Applications in Vision and Imaging Natural Language Processing Speech and Language Processing AI/ML Applications in NLP and Speech Multimedia Analysis and Cognitive Informatics AI-based Intelligent System Architectures Robotics and Intelligent Automation Applied Machine Learning for Intelligent Manufacturing Machine Learning Methods for Network Optimization Machine Learning for Internet of Things Security and Privacy of AI/ML Systems Experimental Evaluation and Deployment of AI/ML Applications ---𝗣𝘂𝗯𝗹𝗶𝗰𝗮𝘁𝗶𝗼𝗻--- All papers will be reviewed by two or three expert reviewers from the conference committees. After a careful reviewing process, all accepted papers will be published in the ACM International Conference Proceedings Series, and submitted to EI Compendex, Scopus for indexing. ---𝗜𝗺𝗽𝗼𝗿𝘁𝗮𝗻𝘁 𝗗𝗮𝘁𝗲𝘀--- Full Paper Submission Date: July 10, 2026 Final Paper Submission Date: July 10, 2026 Conference Dates: July 24-26, 2026 --- 𝗣𝗮𝗽𝗲𝗿 𝗦𝘂𝗯𝗺𝗶𝘀𝘀𝗶𝗼𝗻--- Please send the abstract or full paper(word+pdf) to Submission System: https://ais.cn/u/YJ77Vj</text:p>
          </table:table-cell>
          <table:table-cell table:number-columns-repeated="1013"/>
        </table:table-row>
        <table:table-row table:style-name="ro1">
          <table:table-cell table:style-name="ce2" office:value-type="string" calcext:value-type="string">
            <text:p>IJITMC 2026</text:p>
          </table:table-cell>
          <table:table-cell table:style-name="ce2" office:value-type="string" calcext:value-type="string">
            <text:p>The International Journal of Information Technology, Modeling and Computing</text:p>
          </table:table-cell>
          <table:table-cell table:style-name="ce2" office:value-type="float" office:value="88" calcext:value-type="float">
            <text:p>88</text:p>
          </table:table-cell>
          <table:table-cell table:style-name="ce2" office:value-type="float" office:value="25" calcext:value-type="float">
            <text:p>25</text:p>
          </table:table-cell>
          <table:table-cell table:style-name="ce3" office:value-type="date" office:date-value="2026-07-10" calcext:value-type="date">
            <text:p>2026-07-10</text:p>
          </table:table-cell>
          <table:table-cell table:style-name="ce3" office:value-type="date" office:date-value="2026-08-10" calcext:value-type="date">
            <text:p>2026-08-10</text:p>
          </table:table-cell>
          <table:table-cell table:style-name="ce3" office:value-type="date" office:date-value="2026-08-17" calcext:value-type="date">
            <text:p>2026-08-17</text:p>
          </table:table-cell>
          <table:table-cell table:number-columns-repeated="2"/>
          <table:table-cell table:style-name="ce4" office:value-type="string" calcext:value-type="string">
            <text:p><text:a xlink:href="https://airccse.org/journal/ijitmc/index.html" xlink:type="simple">https://airccse.org/journal/ijitmc/index.html</text:a></text:p>
          </table:table-cell>
          <table:table-cell table:style-name="ce2" office:value-type="string" calcext:value-type="string">
            <text:p>The International Journal of Information Technology, Modeling and Computing (IJITMC) Scope and Topics The International Journal of Information Technology, Modeling and Computing (IJITMC) is an open access peer-reviewed journal that publishes articles which contribute new results in all areas of Information Technology, Modeling and Computing. With the advances of Information Technology, there is an active multi-disciplinary research in the areas of IT, CSE, Modeling and Simulation with numerous applications in various fields. The International Journal of Information Technology, Modeling and Computing (IJITMC) is an abstracted and indexed international journal of high quality devoted to the publication of original research papers from IT, Modeling, CSE and Control Engineering with some emphasis on all areas and subareas of computer science, IT, scientific modeling, simulation, visualization and control systems and their broad range of applications. Topics of interest include but are not limited to, the following Advanced computing techniques Algorithm and analysis Automation Bio-informatics Bio-modeling and applications Chaos theory and contro Compression techniques Computer graphics Computer vision Control applications Control theory Cryptography and applications Data encryption Data Mining Digital image processing Digital signal processing Evolutionary algorithms Filtering Flight control and surveillance systems Fuzzy logic and control Genetic algorithms and applications Guidance control systems Image processing Industrial applications Information networking Intelligent and natural computing Intelligent systems Mathematical control theory Modeling and visualization Multimedia computing Multimedia systems Networks and Computing Neural networks Nonlinear control systems Navigation Pattern recognition Process control and instrumentation Robotics and applications Robust control Secure communication Secure systems Scientific and engineering modeling Signal processing Soft computing techniques in control Stochastic control and filtering theory System Science and Engineering System identification and modeling Systems and automation System modeling and control Paper Submission Authors are invited to submit papers for this journal through Email: ijitmc@aircconline.com or through Submission system . Submissions must be original and should not have been published previously or be under consideration for publication while being evaluated for this Journal Important Dates Submission Deadline : July 10, 2026 Authors Notification : August 10, 2026 Final Manuscript Due : August 17, 2026 Publication Date : Determined by the Editor-in-Chief Editorial Board Members Abd El-Aziz Ahmed, Anna University, India Alarcon Ramirez, Howard University, USA Amandeep Verma, Punjabi University Regional Centre Mohali, India Ankit Thakkar, Nirma University, India Chandramohan.D, Pondicherry University, India Debajyoti Pal, Camellia Institute of Technology, India Durjoy Majumder, West Bengal State University, India Fatih Korkmaz , Cankiri Karatekin University, Turkey Usha G, Anna University Chennai,India Gagan Singla, Aryabhatta College of Engineering and Technology, India Isa Maleki , Islamic Azad University, Iran Munivara Prasad K, Jawaharlal Nehru Technological University - Hyderabad, India Shantha Kumari K, Pondicherry University, India Kalavathi Alla, Vasireddy Venkatadri Institute of Technology, India ... More</text:p>
          </table:table-cell>
          <table:table-cell table:number-columns-repeated="1013"/>
        </table:table-row>
        <table:table-row table:style-name="ro1">
          <table:table-cell table:style-name="ce2" office:value-type="string" calcext:value-type="string">
            <text:p>HumSec@ESORICS 2026</text:p>
          </table:table-cell>
          <table:table-cell table:style-name="ce2" office:value-type="string" calcext:value-type="string">
            <text:p>Workshop on Human-Targeted Cyber Threats and Defenses</text:p>
          </table:table-cell>
          <table:table-cell table:style-name="ce2" office:value-type="float" office:value="25" calcext:value-type="float">
            <text:p>25</text:p>
          </table:table-cell>
          <table:table-cell table:style-name="ce2" office:value-type="float" office:value="32" calcext:value-type="float">
            <text:p>32</text:p>
          </table:table-cell>
          <table:table-cell table:style-name="ce3" office:value-type="date" office:date-value="2026-07-10" calcext:value-type="date">
            <text:p>2026-07-10</text:p>
          </table:table-cell>
          <table:table-cell table:style-name="ce3" office:value-type="date" office:date-value="2026-07-21" calcext:value-type="date">
            <text:p>2026-07-21</text:p>
          </table:table-cell>
          <table:table-cell table:style-name="ce3" office:value-type="date" office:date-value="2026-07-29" calcext:value-type="date">
            <text:p>2026-07-29</text:p>
          </table:table-cell>
          <table:table-cell table:style-name="ce2" office:value-type="string" calcext:value-type="string">
            <text:p>Rome, Italy</text:p>
          </table:table-cell>
          <table:table-cell table:style-name="ce2" office:value-type="string" calcext:value-type="string">
            <text:p>Sep 14, 2026 - Sep 18, 2026</text:p>
          </table:table-cell>
          <table:table-cell table:style-name="ce4" office:value-type="string" calcext:value-type="string">
            <text:p><text:a xlink:href="https://humsec26.github.io/" xlink:type="simple">https://humsec26.github.io/</text:a></text:p>
          </table:table-cell>
          <table:table-cell table:style-name="ce2" office:value-type="string" calcext:value-type="string">
            <text:p>HumSec 2026 will be co-located with ESORICS 2026 and held in Rome, Italy, between September 14 and 18, 2026. **Workshop Website**: https://humsec26.github.io/ HumSec aims to bring together researchers and practitioners to explore human-centric cyber threats from both attack and defense perspectives, covering technical and human aspects, with a focus on real-world settings. The workshop seeks to raise awareness of the growing impact of these threats and foster cross-disciplinary collaboration to build more robust and resilient systems in practice. We welcome submissions on phishing, scams, mis/disinformation, fraud, usable security and other research related to human-targeted threats. **---Call For Papers---** Topics of Interest (but not limited to) 1. Understanding, Measuring, and Characterizing Human-Targeted Cyber Threats - Human-subjects studies (e.g., surveys) on online fraud, scams, phishing, misinformation/disinformation, harassment and online abuse - Measurement studies that yield new insights into Human-Targeted Cyber Threats (e.g., bottlenecks) - Analysis of attack infrastructure (e.g., phishing kits ecosystems) - AI-driven generation of human-targeted attacks - Emerging human-centric threats that exploit human vulnerabilities (e.g., urgency, fear, curiosity) - Studies identifying gaps between existing defenses and real-world threats - Governance, policy, and ethical challenges in human-centric cybersecurity 2. Countermeasures to Mitigate Human-Targeted Cyber Threats - AI-powered defense mechanisms against human-targeted attacks - Machine Learning or other advanced techniques for detecting and mitigating human-targeted threats (e.g., phishing detectors) - Human factors in the design, usability and effectiveness of defense mechanisms - Security and privacy in human-centric systems - Adversarial robustness of defense mechanisms - Security education and training **---Important Dates---** - Submission deadline: June 25, 2026 11:59PM AOE - Notification: July 21, 2026 11:59PM AOE - Camera-ready deadline: July 29, 2026 11:59PM AOE **---Submission---** - Please submit your papers via EasyChair: https://easychair.org/conferences/?conf=esorics2026. - Papers must be written in English, submitted as a single PDF file, anonymized for double-blind review, and must follow the official LNCS template. - Long papers are limited to 16 pages and short papers to 8 pages, excluding references and appendices. Note that reviewers are not required to read the appendices. **---Publication &amp; Presentation---** Accepted papers will be published by Springer in the LNCS collection. At least one author of each accepted paper will be required to register for the workshop and present the work orally or as a poster.</text:p>
          </table:table-cell>
          <table:table-cell table:number-columns-repeated="1013"/>
        </table:table-row>
        <table:table-row table:style-name="ro1">
          <table:table-cell table:style-name="ce2" office:value-type="string" calcext:value-type="string">
            <text:p>IJCSITY 2026</text:p>
          </table:table-cell>
          <table:table-cell table:style-name="ce2" office:value-type="string" calcext:value-type="string">
            <text:p>International Journal of Computational Science and Information Technology</text:p>
          </table:table-cell>
          <table:table-cell table:style-name="ce2" office:value-type="float" office:value="90" calcext:value-type="float">
            <text:p>90</text:p>
          </table:table-cell>
          <table:table-cell table:style-name="ce2" office:value-type="float" office:value="30" calcext:value-type="float">
            <text:p>30</text:p>
          </table:table-cell>
          <table:table-cell table:style-name="ce3" office:value-type="date" office:date-value="2026-07-10" calcext:value-type="date">
            <text:p>2026-07-10</text:p>
          </table:table-cell>
          <table:table-cell table:style-name="ce3" office:value-type="date" office:date-value="2026-08-10" calcext:value-type="date">
            <text:p>2026-08-10</text:p>
          </table:table-cell>
          <table:table-cell table:style-name="ce3" office:value-type="date" office:date-value="2026-08-17" calcext:value-type="date">
            <text:p>2026-08-17</text:p>
          </table:table-cell>
          <table:table-cell table:number-columns-repeated="2"/>
          <table:table-cell table:style-name="ce4" office:value-type="string" calcext:value-type="string">
            <text:p><text:a xlink:href="http://airccse.org/journal/ijcsity/index.html" xlink:type="simple">http://airccse.org/journal/ijcsity/index.html</text:a></text:p>
          </table:table-cell>
          <table:table-cell table:style-name="ce2" office:value-type="string" calcext:value-type="string">
            <text:p>International Journal of Computational Science and Information Technology (IJCSITY) Scope and Topics International Journal of Computational Science and Information Technology (IJCSITY) focuses on Complex systems, information and computation using mathematics and engineering techniques. This is an open access peer-reviewed journal will act as a major forum for the presentation of innovative ideas, approaches, developments, and research projects in the area of Computation theory and applications. It will also serve to facilitate the exchange of information between researchers and industry professionals to discuss the latest issues and advancement in the area of advanced Computation and its applications. The topics suggested by this journal can be discussed in term of concepts, surveys, state of the art, research, standards, implementations, running experiments, applications, and industrial case studies. Authors are invited to submit complete unpublished papers, which are not under review in any other conference or journal. Topics of interest include but are not limited to, the following Algorithms and data structures Automata theory Computational complexity, economics, geometry Computational Physics &amp; Biology Computational Science and Applications Cryptography Information theory Machine learning Natural Language Processing Parallel and distributed computing Probabilistic computation Program semantics and verification Quantum computation Theoretical computer science and algebra Paper Submission Authors are invited to submit papers for this journal through E-mail ijcsity@aircconline.com . Submissions must be original and should not have been published previously or be under consideration for publication while being evaluated for this Journal. Important Dates Submission Deadline : July 10, 2026 Authors Notification : August 10, 2026 Final Manuscript Due : August 17, 2026 Publication Date : Determined by the Editor-in-Chief Editorial Board Members Abd El-Aziz Ahmed , Anna University, India Ajal A.J , Federal Institute of Science and Technology, India Akhilesh A . Waoo, India Akwukwuma , University of Benin, Nigeria Aman Jatain , Amity University, India Amandeep Verma , Punjabi University Regional Centre Mohali, India Ankit Chaudhary , University of Iowa, USA Ankit Thakkar , Nirma University, India Anny Leema A , B.S.Abdur Rahman University, India Asoke Nath , St. Xavier's College,India Harish B.S , S J College of Engineering, India Durjoy Majumder , West Bengal State University, India Gopal Kundu , Camellia Institute of Technology, India Govindraj B . Basaveswar Engineering College, India Japhynth J , Dr.G.U.Pope College of Engg., India ... More</text:p>
          </table:table-cell>
          <table:table-cell table:number-columns-repeated="1013"/>
        </table:table-row>
        <table:table-row table:style-name="ro1">
          <table:table-cell table:style-name="ce2" office:value-type="string" calcext:value-type="string">
            <text:p>ICHMI--EI 2026</text:p>
          </table:table-cell>
          <table:table-cell table:style-name="ce2" office:value-type="string" calcext:value-type="string">
            <text:p>2026 6th International Conference on Human-Machine Interaction (ICHMI 2026)</text:p>
          </table:table-cell>
          <table:table-cell table:style-name="ce2" office:value-type="float" office:value="20" calcext:value-type="float">
            <text:p>20</text:p>
          </table:table-cell>
          <table:table-cell table:style-name="ce2" office:value-type="float" office:value="30" calcext:value-type="float">
            <text:p>30</text:p>
          </table:table-cell>
          <table:table-cell table:style-name="ce3" office:value-type="date" office:date-value="2026-07-10" calcext:value-type="date">
            <text:p>2026-07-10</text:p>
          </table:table-cell>
          <table:table-cell table:number-columns-repeated="2"/>
          <table:table-cell table:style-name="ce2" office:value-type="string" calcext:value-type="string">
            <text:p>Hangzhou, China</text:p>
          </table:table-cell>
          <table:table-cell table:style-name="ce2" office:value-type="string" calcext:value-type="string">
            <text:p>Sep 11, 2026 - Sep 13, 2026</text:p>
          </table:table-cell>
          <table:table-cell table:style-name="ce4" office:value-type="string" calcext:value-type="string">
            <text:p><text:a xlink:href="https://www.ichmi.org/" xlink:type="simple">https://www.ichmi.org/</text:a></text:p>
          </table:table-cell>
          <table:table-cell table:style-name="ce2" office:value-type="string" calcext:value-type="string">
            <text:p>*ICHMI 2026 - Human-Machine Interaction - Ei Compendex and Scopus Full name: 2026 6th International Conference on Human-Machine Interaction (ICHMI 2026) Short name: ICHMI 2026 Website：https://www.ichmi.org/ Time：September 11-13, 2026 Place: Hangzhou, China *2026 6th International Conference on Human-Machine Interaction (ICHMI 2026) will be held in Hangzhou, China on September 11-13, 2026. The conference is co-sponsored by Hangzhou Innovation Institute, Beihang University, China. *Call for paper Track 1. AI-Powered Intelligent Interaction &amp; AI Foundations AI interface design Adaptive interaction NLP for HMI AI emotion recognition Track 2. Affective Computing &amp; User Experience Emotion feedback UX emotion analysis Affective interface Behavior recognition Track 3. Human-Robot Collaboration &amp; Social Robots HRI collaboration Social robot design Robot trust building Service robot HMI Track 4. Immersive &amp; Wearable HMI Technologies AR immersive design VR user interaction Wearable health monitoring Immersive UX Track 5. Smart HMI &amp; Data Security Smart home HMI IoT interaction design HMI data privacy Smart device interoperability Track 6. Visual &amp; Multimedia HMI Technologies Digital Communication and Multimedia Technology Intelligent Image Analysis and Processing Method Multimedia HMI interface design Image/video-based human-machine interaction For details about topics, please visit at: https://www.ichmi.org/cfp.html *Publication After a careful reviewing process, all accepted papers will be published in the Conference Proceedings and indexed by Ei Compendex and Scopus, as well as other Abstracting and Indexing (A&amp;I) databases. ICHMI 2024 - ACM - ISBN: 979-8-4007-1681-2 | Ei Compendex, Scopus ICHMI 2023 - ACM - ISBN: 979-8-4007-0008-8 | Ei Compendex, Scopus ICHMI 2022 - ACM - ISBN: 978-1-4503-9661-5 | Ei Compendex, Scopus ICHMI 2021 - ACM - ISBN: 978-1-4503-8777-4 | Ei Compendex, Scopus More history, please go to: https://www.ichmi.org/2025.html *Submission 1. Full paper(publication and presentation) 2. Abstract (presentation) Paper must be written in English. Submit paper via online system: https://www.zmeeting.org/submission/ichmi2026 Full paper template: https://www.ichmi.org/acm_template.docx (word) https://www.ichmi.org/LaTeX-Templates.zip (latex.) More detail about submission: https://www.ichmi.org/submission.html *Conference Schedule Day 1 - September 11, 2026---Sign-in and Conference Kit Collection. Online Test. Day 2 - September 12, 2026---Opening Ceremony, Keynote / Invited Speeches and Group Photo, Technical sessions Day 3 - September 13, 2026---Technical sessions Conference City — Hangzhou As a core city in the Yangtze River Delta and a hub of digital economy, Hangzhou combines profound historical heritage with strong innovation vitality. It is home to world cultural heritages including West Lake, the Grand Canal, and the Archaeological Ruins of Liangzhu City, inheriting the elegance of Jiangnan culture. Meanwhile, Hangzhou boasts a booming industrial cluster in artificial intelligence, electronic information, and intelligent manufacturing, making it an important center for scientific and technological innovation and talent exchange. By holding AIEE 2026 in Hangzhou, we aim to create a world-class academic platform that integrates technological innovation with cultural charm, promoting interdisciplinary research and industry‑academia collaboration. *Contact Ms. Gretchen Lau (Conference Secretary) E-mail: ichmi_conf@vip.163.com Mobile: +86-182-1565-4293 Wechat Account: iconf-cs-2 (Send "ICHMI 2026")</text:p>
          </table:table-cell>
          <table:table-cell table:number-columns-repeated="1013"/>
        </table:table-row>
        <table:table-row table:style-name="ro1">
          <table:table-cell table:style-name="ce2" office:value-type="string" calcext:value-type="string">
            <text:p>AMS 2026</text:p>
          </table:table-cell>
          <table:table-cell table:style-name="ce2" office:value-type="string" calcext:value-type="string">
            <text:p>Advanced Medical Sciences: An International Journal</text:p>
          </table:table-cell>
          <table:table-cell table:style-name="ce2" office:value-type="float" office:value="5" calcext:value-type="float">
            <text:p>5</text:p>
          </table:table-cell>
          <table:table-cell table:style-name="ce2" office:value-type="float" office:value="30" calcext:value-type="float">
            <text:p>30</text:p>
          </table:table-cell>
          <table:table-cell table:style-name="ce3" office:value-type="date" office:date-value="2026-07-10" calcext:value-type="date">
            <text:p>2026-07-10</text:p>
          </table:table-cell>
          <table:table-cell table:style-name="ce3" office:value-type="date" office:date-value="2026-08-10" calcext:value-type="date">
            <text:p>2026-08-10</text:p>
          </table:table-cell>
          <table:table-cell table:style-name="ce3" office:value-type="date" office:date-value="2026-08-17" calcext:value-type="date">
            <text:p>2026-08-17</text:p>
          </table:table-cell>
          <table:table-cell table:number-columns-repeated="2"/>
          <table:table-cell table:style-name="ce4" office:value-type="string" calcext:value-type="string">
            <text:p><text:a xlink:href="https://airccse.com/ams/" xlink:type="simple">https://airccse.com/ams/</text:a></text:p>
          </table:table-cell>
          <table:table-cell table:style-name="ce2" office:value-type="string" calcext:value-type="string">
            <text:p>Advanced Medical Sciences: An International Journal (AMS) Call for Papers Advanced Medical Sciences: An International Journal (AMS) is a quarterly open access peer-reviewed journal that publishes articles which contribute new results in all areas of the Medical Sciences. The goal of this journal is to bring together researchers and practitioners from academia and industry to focus on understanding advances in Medical Sciences and establishing new collaborations in these areas. Authors are solicited to contribute to the journal by submitting articles that illustrate research results, projects, surveying works and industrial experiences that describe significant advances in the areas of Medical Sciences. Topics of interest include, but are not limited to the following : Cardiovascular medicine and haematology Clinical sciences Complimentary and alternative medicine Dentistry Human movement and sports science Immunology Medical biochemistry and metabolomics Medical microbiology Medical physiology Neurosciences Nursing Nutrition and dietetics Oncology and carcinogensis Optometry and opthamology Paediatrics and reproductive medicine Pharmacology and pharmaceutical sciences Public health and health services Paper Submission Authors are invited to submit papers for this journal through E-mail ams_journal@airccse.com . Submissions must be original and should not have been published previously or be under consideration for publication while being evaluated for this Journal. Important Dates Submission Deadline : July 10, 2026 Authors Notification : August 10, 2026 Final Manuscript Due : August 17, 2026 Publication Date : Determined by the Editor-in-Chief Related Journal Pharmaceutical and Biomedical sciences: An International Journal (PBIJ) Editorial Board: Abdelmalik Taleb-Ahmed, Université de Valenciennes et du Hainaut Cambrésis, France Ali Mohsin Hasan, FICS CABS MRCS, Malaysia Amit Kumar Singh, Gold Field Institute Of Medical Sciences and Research, India Anna Poplawska-Kita, Medical University of Bialystok, Poland Ashish Kumar Sharma, Manav Bharti University, India Chraibi Abdelmjid, Medecine and Ibn Sina University Hospital, Morocco Cyrus Azimi, Tehran University of Medical Sciences, Iran ... More</text:p>
          </table:table-cell>
          <table:table-cell table:number-columns-repeated="1013"/>
        </table:table-row>
        <table:table-row table:style-name="ro1">
          <table:table-cell table:style-name="ce2" office:value-type="string" calcext:value-type="string">
            <text:p>IJSPTM 2026</text:p>
          </table:table-cell>
          <table:table-cell table:style-name="ce2" office:value-type="string" calcext:value-type="string">
            <text:p>International Journal of Security, Privacy and Trust Management</text:p>
          </table:table-cell>
          <table:table-cell table:style-name="ce2" office:value-type="float" office:value="15" calcext:value-type="float">
            <text:p>15</text:p>
          </table:table-cell>
          <table:table-cell table:style-name="ce2" office:value-type="float" office:value="25" calcext:value-type="float">
            <text:p>25</text:p>
          </table:table-cell>
          <table:table-cell table:style-name="ce3" office:value-type="date" office:date-value="2026-07-10" calcext:value-type="date">
            <text:p>2026-07-10</text:p>
          </table:table-cell>
          <table:table-cell table:style-name="ce3" office:value-type="date" office:date-value="2026-08-10" calcext:value-type="date">
            <text:p>2026-08-10</text:p>
          </table:table-cell>
          <table:table-cell table:style-name="ce3" office:value-type="date" office:date-value="2026-08-17" calcext:value-type="date">
            <text:p>2026-08-17</text:p>
          </table:table-cell>
          <table:table-cell table:number-columns-repeated="2"/>
          <table:table-cell table:style-name="ce4" office:value-type="string" calcext:value-type="string">
            <text:p><text:a xlink:href="https://airccse.org/journal/ijsptm/index.html" xlink:type="simple">https://airccse.org/journal/ijsptm/index.html</text:a></text:p>
          </table:table-cell>
          <table:table-cell table:style-name="ce2" office:value-type="string" calcext:value-type="string">
            <text:p>International Journal of Security, Privacy and Trust Management ( IJSPTM ) Scope and Topics With the simplicity of transmission of data over the web increasing, there has more prominent need for adequate security mechanisms. Trust management is essential to the security framework of any network. In most traditional networks–both wired and wireless–centralized entities play pivotal roles in trust management. The International Journal of Security, Privacy and Trust Management ( IJSPTM ) is an open access peer reviewed journal that provides a platform for exchanging ideas in new emerging trends that needs more focus and exposure and will attempt to publish proposals that strengthen our goals. Topics of interest include but are not limited to, the following px;margin-left:50px"&gt; Trust, Security, Privacy, Policy management Agent Based Trust Management Authorization, Authentication and Identity Management Pervasive Computation Trust Cloud, P2P, Clusters and Grid Computing : Security and Role of Trust Decentralized Trust Management Trust in Service-Oriented Architecture- Open Architecture and Services Social Networks &amp; Web 2.0 Trust Management Trust Management system for Wireless, mobile and sensor networks Policy of Trust in E-leaning systems Trust/risk based security frameworks Trust Management for virtual organizations Trust and Reputation Management Multimedia Content Management Paper Submission Authors are invited to Submit papers for this journal through Email: ijsptm@aircconline.com or through Submission system Submissions must be original and should not have been published previously or be under consideration for publication while being evaluated for this Journal. Important Dates Submission Deadline : July 10, 2026 Authors Notification : August 10, 2026 Final Manuscript Due : August 17, 2026 Publication Date : Determined by the Editor-in-Chief Related Journal International Journal of Mobile Network Communications &amp; Telematics ( IJMNCT) Current Issue May 2025, Volume 14, Number 1/2 Data Privacy and Digital Rights: Protecting Privacy through Law Surveillance and Consent Full Text Sijuola Atanda Lawal, Institute of Advanced Legal Studies, United Kingdom November 2024, Volume 13, Number 4 Generative AI Ethics: a Comprehensive Safety and Regulation Framework Full Text Arun kumar Thirunagalingam, Data &amp; Technical Operations, USA August 2024, Volume 13, Number 3 Optimizing Identity Management: Key Strategies for Effective Governance and Administration Full Text Nikhil Ghadge, Okta.Inc, USA Guardians of the Digital Realm: Mapping Key Stakeholders in Data Privacy and Digital Credit Universe Full Text Oluwabunmi A. Falebita 1 and Oluwafemi P. Famakinde 2 , 1 Innovation and Technology Policy Department, Nigeria 2 Nigeria Institute of Social and Economic Research (NISER), Nigeria May 2024, Volume 13, Number 1/2 Analysis of Media Discourse on Intellectual Property Rights Related to Metaverse in Korea Full Text Ye-Sol Seo 1 , Hyo-Min Kim 1 , Austin Kang 2 , 1 Hankuk University of Foreign Studies, Republic of Korea, 2 Seoul National University, Republic of Korea November 2023, Volume 12, Number 3/4 Deep Learning Meets Blockchain for Automated and Secure Access Control Full Text Asma Jodeiri Akbarfam 1 , Sina Barazandeh 2 , Deepti Gupta 3 , and Hoda Maleki 1 , 1 Augusta University, Augusta, USA, 2 Bilkent University, Turkey, 3 Texas A&amp;M University Central Texas, USA Object Capability Model for Tee: A Cheri Based Compartmentalization Approach Full Text Bala Subramanyan, Verifoxx Ltd, UK May 2023, Volume 12, Number 2 The Performance Comparison of a Brute-Force Password Cracking Algorithm using Regular Functions and Generator Functions in Python Full Text Berker Tasoluk 1 , Zuhal Tanrikulu 2 , 1 Istanbul University, Turkey, 2 Bogazici University, Turkey February 2023, Volume 12, Number 1 How Reversibility Differentiates Cyber from Kinetic Warfare: A Case Study in the Energy Sector Full Text Tom Johansmeyer, University of Kent, UK A Trust Management Framework for Vehicular Ad Hoc Networks Full Text Rezvi Shahariar and Chris Phillips, University of London, UK August 2022, Volume 11, Number 3 Technical Analysis on the Cyber Organizational Criminology of Dictatorial Military Conducts -- Experience from Human Trafficking and Coercions by Military Cyber Aggressions Yang Pachankis, Universal Life Church, USA May 2022, Volume 11, Number 1/2 Enhanced Fuzzing System for Proactive Security Gap Exposure Linlin Zhang and Ning Luo, Visual Computing Group, Intel Asia-Pacific Research &amp; Development Ltd, China May 2021, Volume 10, Number 2 GasMASk Annotation-based Code Generator as an Embedded Domain-Specific Language in Collaborative Multi-Agent Systems Orcun Oruc and Uwe Aßmann, TU Dresden, Germany February 2021, Volume 10, Number 1 Security and Privacy Perceptions among Female Online Social Media Users: A Case Study of Bangladesh Farida Chowdhury, Sadia Sultana and Mahruba Sharmin Chowdhury, Shahjalal University of Science and Technology, Bangladesh Editor in Chief Yenumula Reddy , Grambling State University, USA Editorial Board Members Ahya Slimani , Faculty of Sciences of Tunis, Tunisia Daniel A.K , M M M University Of Technology, India Dhinaharan Nagamalai , Wireilla Net Solutions PTY Ltd, Australia Fadiya Samson Oluwaseun , GIRNE AMERICAN UNIVERSITY, Turkey Gaurav Kumar Tak , Lovely Professional University, India Gaurav Ojha , Indian Institute of Information Technology and Management, India Ibrahim Sogukpinar , Gebze Institute of Technology, Turkey Isa Maleki , Islamic Azad University, Iran José Vargas-Hernández , University of Guadalajara, Mexico Kambiz Ghazinour , Kent State University, USA Madhavi Vaidya , University of Mumbai, India Mahfuzul Huda , Integral University, India ... More</text:p>
          </table:table-cell>
          <table:table-cell table:number-columns-repeated="1013"/>
        </table:table-row>
        <table:table-row table:style-name="ro1">
          <table:table-cell table:style-name="ce2" office:value-type="string" calcext:value-type="string">
            <text:p>IJBISS 2026</text:p>
          </table:table-cell>
          <table:table-cell table:style-name="ce2" office:value-type="string" calcext:value-type="string">
            <text:p>International Journal of Business Information Systems Strategies</text:p>
          </table:table-cell>
          <table:table-cell table:style-name="ce2" office:value-type="float" office:value="70" calcext:value-type="float">
            <text:p>70</text:p>
          </table:table-cell>
          <table:table-cell table:style-name="ce2" office:value-type="float" office:value="30" calcext:value-type="float">
            <text:p>30</text:p>
          </table:table-cell>
          <table:table-cell table:style-name="ce3" office:value-type="date" office:date-value="2026-07-10" calcext:value-type="date">
            <text:p>2026-07-10</text:p>
          </table:table-cell>
          <table:table-cell table:style-name="ce3" office:value-type="date" office:date-value="2026-08-10" calcext:value-type="date">
            <text:p>2026-08-10</text:p>
          </table:table-cell>
          <table:table-cell table:style-name="ce3" office:value-type="date" office:date-value="2026-08-17" calcext:value-type="date">
            <text:p>2026-08-17</text:p>
          </table:table-cell>
          <table:table-cell table:number-columns-repeated="2"/>
          <table:table-cell table:style-name="ce4" office:value-type="string" calcext:value-type="string">
            <text:p><text:a xlink:href="http://wireilla.com/management/ijbiss/index.html" xlink:type="simple">http://wireilla.com/management/ijbiss/index.html</text:a></text:p>
          </table:table-cell>
          <table:table-cell table:style-name="ce2" office:value-type="string" calcext:value-type="string">
            <text:p>International Journal of Business Information Systems Strategies (IJBISS) Scope and Topics International Journal of Business Information Systems Strategies (IJBISS) is a Quarterly peer-reviewed and refereed open access journal that publishes articles which contribute new results in all areas of the Business Information Systems Strategies. A business information system is the study of merging new information technology in the field of business management. The emphasis of implementing Business Information systems is to improve the effectiveness and efficiency of an organization. This journal publishes research and case study papers related to development of information technology based business strategies, cross-cultural issues, and global organizational systems. This journal aims to provide a platform for exchanging ideas in new emerging trends that needs more focus and exposure and will attempt to publish proposals that strengthen our goals. Topics of interest include, but are not limited to the following: Topics of interest include, but are not limited to, the following : IT/IS Management, planning and evaluation Knowledge management E-business and the Internet Strategic information systems Mobile Technology E-Business Intelligence Web and Multimedia Information Technology &amp; Globalization System Design &amp; policies IT based solution for Human computer interaction issues Intranet Applications Impact of IT in small &amp; medium scale business IT Project Management Paper Submission: Authors are invited to submit papers for this journal through the E-mail ijbissjournal@wireilla.com . Submissions must be original and should not have been published previously or be under consideration for publication while being evaluated for this Journal. Important Dates Submission Deadline : July 10, 2026 Authors Notification : August 10, 2026 Final Manuscript Due : August 17, 2026 Publication Date : Determined by the Editor-in-Chief Editorial Board Members David C. Wyld, Southeastern Louisiana University,USA Editorial Board Aboobacker Jahufer , South Eastern University of Sri Lanka,Sri Lanka Ahmed Mehrez, Qatar University, Qatar Ahmed Nada, Al-Quds University, Palestine Akif Lutfi Al-Khasawneh, AL-Balqa Applied University, Jordan Ali Kemal Celik , Ataturk University, Turkey Anton du Toit, Monash University, South Africa ...for more</text:p>
          </table:table-cell>
          <table:table-cell table:number-columns-repeated="1013"/>
        </table:table-row>
        <table:table-row table:style-name="ro1">
          <table:table-cell table:style-name="ce2" office:value-type="string" calcext:value-type="string">
            <text:p>IJSC 2026</text:p>
          </table:table-cell>
          <table:table-cell table:style-name="ce2" office:value-type="string" calcext:value-type="string">
            <text:p>International Journal on Soft Computing - H Index:26</text:p>
          </table:table-cell>
          <table:table-cell table:style-name="ce2" office:value-type="float" office:value="78" calcext:value-type="float">
            <text:p>78</text:p>
          </table:table-cell>
          <table:table-cell table:style-name="ce2" office:value-type="float" office:value="25" calcext:value-type="float">
            <text:p>25</text:p>
          </table:table-cell>
          <table:table-cell table:style-name="ce3" office:value-type="date" office:date-value="2026-07-10" calcext:value-type="date">
            <text:p>2026-07-10</text:p>
          </table:table-cell>
          <table:table-cell table:style-name="ce3" office:value-type="date" office:date-value="2026-08-10" calcext:value-type="date">
            <text:p>2026-08-10</text:p>
          </table:table-cell>
          <table:table-cell table:style-name="ce3" office:value-type="date" office:date-value="2026-08-17" calcext:value-type="date">
            <text:p>2026-08-17</text:p>
          </table:table-cell>
          <table:table-cell table:number-columns-repeated="2"/>
          <table:table-cell table:style-name="ce4" office:value-type="string" calcext:value-type="string">
            <text:p><text:a xlink:href="https://airccse.org/journal/ijsc/ijsc.html" xlink:type="simple">https://airccse.org/journal/ijsc/ijsc.html</text:a></text:p>
          </table:table-cell>
          <table:table-cell table:style-name="ce2" office:value-type="string" calcext:value-type="string">
            <text:p>International Journal on Soft Computing ( IJSC ) Citations, h-index, i10-index of IJSC Call for Papers Soft computing is likely to play an important role in science and engineering in the future. The successful applications of soft computing and the rapid growth suggest that the impact of soft computing will be felt increasingly in coming years. Soft Computing encourages the integration of soft computing techniques and tools into both everyday and advanced applications. This Open access peer-reviewed journal serves as a platform that fosters new applications for all scientists and engineers engaged in research and development in this fast growing field. Topics of interest include but are not limited to, the following Foundations of soft computing Fuzzy Systems and Fuzzy Logic Granular Computing and Uncertainty Modeling Probabilistic Reasoning and Bayesian Approaches Evolutionary Computation and Metaheuristics Swarm Intelligence and Nature Inspired Optimization Hybrid Intelligent Systems and Neuro Fuzzy Models Symbolic and Neuro Symbolic Machine Learning Quantum Inspired Soft Computing Machine learning &amp; neural computation Deep Learning Architectures and Algorithms Representation Learning and Self Supervised Learning Reinforcement Learning and Deep RL Multi Agent Reinforcement Learning and Safe RL Continual, Lifelong, and Transfer Learning Trustworthy, Robust, and Safe Machine Learning Explainable AI (XAI) and Interpretable Soft Computing Causal Inference and Causal Machine Learning Neuroscience Inspired AI and Cognitive Computing Generative &amp; foundation model based soft computing Generative Adversarial Networks (GANs) Diffusion Models and Modern Generative Architectures Large Language Models (LLMs) and Foundation Models Multimodal Generative Models (Vision Language, Audio Text, etc.) Foundation Model Enhanced Optimization and Reasoning Neuro Symbolic Reasoning with Foundation Models Evolutionary &amp; bio inspired intelligence Genetic Algorithms, Genetic Programming, Evolution Strategies Co Evolutionary and Multi Objective Optimization Bio Inspired Computing (Ant Colony, PSO, Firefly, Bee Colony, etc.) Evolutionary Deep Learning and Neural Architecture Search (NAS) Memetic Computing and Hybrid Evolutionary Systems Vision, signal &amp; multimodal intelligence Soft Computing in Image Processing and Computer Vision Deep Pattern Recognition and Visual Understanding Signal Processing with Neural, Fuzzy, and Evolutionary Methods Multimodal Learning (Vision, Audio, Text, Sensor Fusion) Biomedical Image Analysis and Biomedical Signal Processing Graph intelligence &amp; network based soft computing Graph Neural Networks (GNNs) and Graph Representation Learning Network Science and Complex Networks Soft Computing for Graph Mining and Link Prediction Spatio Temporal Graph Learning Agents, multi agent systems &amp; distributed AI Autonomous Agents and Multi Agent Learning Distributed Soft Computing and Collective Intelligence Adaptive and Decentralized AI Systems Swarm Robotics and Multi Robot Coordination Soft Computing for Cyber Physical and Embedded Systems Soft computing for data science &amp; scientific discovery Soft Computing in Big Data Analytics Data Mining, Clustering, and Feature Selection Soft Computing for High Dimensional and Complex Data Time Series Forecasting and Sequential Modeling Visual Analytics and Data Centric Explainability Soft Computing for Scientific Discovery (AI4Science) Trends in emerging soft computing Neuromorphic Computing and Spiking Neural Networks Federated Learning and Privacy Preserving Soft Computing Edge AI and Resource Efficient Soft Computing Soft Computing for Autonomous Systems and Robotics Human Centered and Cognitive Soft Computing Soft Computing for Sustainability and Environmental Modeling Applications of soft computing Biomedical Engineering and Health AI Intelligent Networks and Communication Systems Smart Manufacturing and Industry 4.0 Finance, E Commerce, and Intelligent Business Systems Environmental Modeling and Climate Intelligence Soft Computing in Advanced Materials and Micro/Nano Scale Systems Paper Submission: Authors are invited to submit papers for this journal through Email: ijsc@aircconline.com or Submission System. Submissions must be original and should not have been published previously or be under consideration for publication while being evaluated for this Journal. Important Dates Submission Deadline : July 10, 2026 Authors Notification : August 10, 2026 Final Manuscript Due : August 17, 2026 Publication Date : Determined by the Editor-in-Chief Current Issue November 2025, Volume 16, Number 2/3/4 AI-powered Models for Early Detection of CAD P. Jothi, RVS College of Arts and Science, India February 2025, Volume 16, Number 1 Dynamic Cognitive Ontology Networks: Advanced Integration of Neuromorphic Event Processing and Tropical Hyper Dimensional Representations Robert Mc Menemy, Glasgow, Scotland, United Kingdom November 2023, Volume 14, Number 4 A Review of Data Intelligence Applications Within Healthcare Sector in the United States Clement Odooh, Regina Robert and Efijemue Oghenekome Paul, Austin Peay State University, USA Analytic Approach in Accessing Trends and Impacts of Medicaid-Medicare Dual Enrollment in the United States Clement Odooh, Regina Robert and Efijemue Oghenekome Paul, Austin Peay State University, USA August 2023, Volume 14, Number 3 Cybersecurity Strategies for Safeguarding Customer’s Data and Preventing Financial Fraud in the United States Financial Sectors Efijemue Oghenekome Paul 1 , Obunadike Callistus 1 , Olisah Somtobe 1 , Taiwo Esther 1 , Kizor-Akaraiwe Somto 2 , Odooh Clement 1 and Ifunanya Ejimofor 1 , 1 Austin Peay State University, Clarksville USA, 2 University of Washington, Seattle USA Insider Threat Prevention in the US Banking System Oghenekome Efijemue 1 , Ifunanya Ejimofor 1 and Omoshola Simon Owolabi 2 , 1 Austin Peay State University, Clarksville USA, 2 Carolina University, USA May 2023, Volume 14, Number 2 Texts Classification with the usage of Neural Network based on the Word2vec’s Words Representation D. V. Iatsenko, Southern Federal University, Russia February 2023, Volume 14, Number 1 Exploring Sentiment Analysis Research: A Social Media Data Perspective Zahra Dahish 1,2 and Shah J Miah 1 , 1 University of Newcastle, Australia, 2 Jazan University, Saudi Arabia August 2022, Volume 13, Number 3 Introduction of a Novel Anomalous Sound Detection Methodology Xiao Tan and S M Yiu, University of Hong Kong, Hong Kong May 2022, Volume 13, Number 1/2 Spatio-Temporal Characterization with Wavelet Coherence: Anexus between Environment and Pandemic Iftikhar U. Sikder 1 and James J. Ribero 2 , 1 Cleveland State University, USA, 2 IBA, University of Dhaka, Bangladesh November 2021, Volume 12, Number 2/3/4 An approach to Fuzzy clustering of the iris petals by using Ac-means Analysis Nicolás Enrique Salgado Guitiérrez, Sergio Andrés Valencia Ramírez and José Soriano Méndez, District University FJDC, Colombia February 2021, Volume 12, Number 1 AI Testing: Ensuring a Good Data Split Between Data Sets (Training and Test) using K-means Clustering and Decision Tree Analysis Kishore Sugali, Chris Sprunger and Venkata N Inukollu, Purdue University, USA Editorial Board Members Martin A , Sri Manakula Vinayagar Engineering College, India Abhishek Gupta , SardarSwaran Singh National Institute of Renewable Energy, India Amit Ganatra , Charotar University of Science &amp; Technology, India Anjali Yeole ,Mumbai University , India Antonio DI NOLA ,University of Salerno, Italy Asha Gowda Karegowda , Siddaganga Institute of Technlogy , Karnataka Bharat Bhushan Agarwal , Institute of Foreign Trade and Management, University, India Carlos E. Otero , The University of Virginia's College at Wise, USA Debarati Bhunia Chakraborty , Indian Statistical Institute, India Ephzibah E.P , Vellore Institute of Technology, India Gaurang Panchal , Charotar University of Science and Technology, India ... More</text:p>
          </table:table-cell>
          <table:table-cell table:number-columns-repeated="1013"/>
        </table:table-row>
        <table:table-row table:style-name="ro1">
          <table:table-cell table:style-name="ce2" office:value-type="string" calcext:value-type="string">
            <text:p>ICAISE 2026</text:p>
          </table:table-cell>
          <table:table-cell table:style-name="ce2" office:value-type="string" calcext:value-type="string">
            <text:p>ACM--2026 5th International Conference on Artificial Intelligence and Software Engineering (ICAISE 2026)</text:p>
          </table:table-cell>
          <table:table-cell table:style-name="ce2" office:value-type="float" office:value="85" calcext:value-type="float">
            <text:p>85</text:p>
          </table:table-cell>
          <table:table-cell table:style-name="ce2" office:value-type="float" office:value="28" calcext:value-type="float">
            <text:p>28</text:p>
          </table:table-cell>
          <table:table-cell table:style-name="ce3" office:value-type="date" office:date-value="2026-07-10" calcext:value-type="date">
            <text:p>2026-07-10</text:p>
          </table:table-cell>
          <table:table-cell table:number-columns-repeated="2"/>
          <table:table-cell table:style-name="ce2" office:value-type="string" calcext:value-type="string">
            <text:p>Tokyo, Japan</text:p>
          </table:table-cell>
          <table:table-cell table:style-name="ce2" office:value-type="string" calcext:value-type="string">
            <text:p>Aug 21, 2026 - Aug 23, 2026</text:p>
          </table:table-cell>
          <table:table-cell table:style-name="ce4" office:value-type="string" calcext:value-type="string">
            <text:p><text:a xlink:href="https://icaise.org/" xlink:type="simple">https://icaise.org/</text:a></text:p>
          </table:table-cell>
          <table:table-cell table:style-name="ce2" office:value-type="string" calcext:value-type="string">
            <text:p>Full name: The 5th International Conference on Artificial Intelligence and Software Engineering Abbreviation: ICAISE 2026 The 5th International Conference on Artificial Intelligence and Software Engineering will take place in Tokyo, Japan during August 21-23, 2026. This conference provides a very good opportunity for research scientists, investors, industrial and government representatives to present the latest innovations, novel results and the-state-of-the-art ideas. Web: https://icaise.org/index.html Time: August 21-23, 2026 Venue: Tokyo, Japan ★★Paper Publication ★All submissions will be peer reviewed by 2-3 reviewers. Accepted papers of ICAISE 2026 (after registration and presentation) will be collected in the ACM Proceedings and indexed by Ei Compendex, Scopus, and CPCI (Web of Science). ★★Keynote Speakers Prof. Limei Song from Tiangong University, China will be the keynote speaker. ★★Call for Papers Topics of interest for submission include, but are not limited to: 1. AI-Driven Software Development Processes • AI for Requirements Engineering • AI-Assisted Design and Architecture • AI for Code Generation and Refactoring • AI in Continuous Integration/Continuous Deployment (CI/CD) 2. Machine Learning for Software Testing and Bug Detection • Automated Test Case Generation • Bug Detection and Prediction • AI-Powered Regression Testing • Test Coverage and Optimization 3. AI in Software Project Management and Estimation • AI for Project Estimation and Resource Allocation • Risk Management in Software Projects • AI for Task Prioritization in Agile Development • Predictive Analytics for Project Success 4. AI-Powered Code Generation and Optimization • AI-Assisted Code Writing • Code Optimization with Machine Learning • Context-Aware Code Suggestions • Automated Refactoring Using AI More details, please view: https://icaise.org/cfp.html ★★Paper Submission ★Language : English is the official language of the conference; the paper should be written and presented only in English. ★A. Full Paper (Presentation and Publication): Accepted full paper will be invited to give the oral presentation at the conference and be published in the conference proceeding. ★B. Abstract (Presentation only): Accepted abstract will be invited to give the oral presentation or poster presentation at the conference, the presentation will not be published. More information, please visit: https://icaise.org/submission.html Please submit your papers by our online submission system: https://www.zmeeting.org/submission/icaise2026 If you have any enquiry, please contact: icaise@academic.net ★★Contact ICAISE: Conference Secretary : Miss Snow Zhong Email : icaise@academic.net Tel : +86-021-59561560 Office Time 9:00-18:00, Monday to Friday (GMT+8 Time Zone) Website : https://icaise.org/index.html</text:p>
          </table:table-cell>
          <table:table-cell table:number-columns-repeated="1013"/>
        </table:table-row>
        <table:table-row table:style-name="ro1">
          <table:table-cell table:style-name="ce2" office:value-type="string" calcext:value-type="string">
            <text:p>MEIJ 2026</text:p>
          </table:table-cell>
          <table:table-cell table:style-name="ce2" office:value-type="string" calcext:value-type="string">
            <text:p>Mechanical Engineering: An International Journal</text:p>
          </table:table-cell>
          <table:table-cell table:style-name="ce2" office:value-type="float" office:value="72" calcext:value-type="float">
            <text:p>72</text:p>
          </table:table-cell>
          <table:table-cell table:style-name="ce2" office:value-type="float" office:value="30" calcext:value-type="float">
            <text:p>30</text:p>
          </table:table-cell>
          <table:table-cell table:style-name="ce3" office:value-type="date" office:date-value="2026-07-10" calcext:value-type="date">
            <text:p>2026-07-10</text:p>
          </table:table-cell>
          <table:table-cell table:style-name="ce3" office:value-type="date" office:date-value="2026-08-10" calcext:value-type="date">
            <text:p>2026-08-10</text:p>
          </table:table-cell>
          <table:table-cell table:style-name="ce3" office:value-type="date" office:date-value="2026-08-17" calcext:value-type="date">
            <text:p>2026-08-17</text:p>
          </table:table-cell>
          <table:table-cell table:number-columns-repeated="2"/>
          <table:table-cell table:style-name="ce4" office:value-type="string" calcext:value-type="string">
            <text:p><text:a xlink:href="https://airccse.com/meij/index.html" xlink:type="simple">https://airccse.com/meij/index.html</text:a></text:p>
          </table:table-cell>
          <table:table-cell table:style-name="ce2" office:value-type="string" calcext:value-type="string">
            <text:p>Mechanical Engineering: An International Journal (MEIJ) Scope and Topics Mechanical Engineering: An International Journal (MEIJ) is a peer-reviewed, open access journal that addresses the impacts and challenges of Mechanical Engineering. The journal documents practical and theoretical results which make a fundamental contribution for the development of Mechanical Engineering.This journal aims to bring together researchers and practitioners in all Mechanical Engineering aspects, including (but not limited to): Topics of interest include but are not limited to, the following Advances of Aero Space Technology Applied Artificial Intelligence Artificial Intelligence and Expert Systems Bio Micro and Nano Mechanics CAD / CAM, Automation &amp; Robotics Computational Fluid Dynamics Computer Integrated manufacturing Design Tools, Cutting Tool Material and Coatings Design for Manufacturing &amp; Assembly Energy Conservation, Renewable Energy Techniques Energy and Environment Flexible Manufacturing Fluid Dynamics, Bio-fuels, Fuel Cells Fluids Mechanics Heat and Mass transfer Hybrid systems Industrial Automation Logistics and Supply Chain Management Machinability of Materials, Composite Materials Machines &amp; Mechanisms Manufacturing Systems Manufacturing Processes Materials Engineering Mechanical Sciences Mechatronics Networking and Distribution Non-Traditional Machining processes Operations Management Quality Assurance and Engineering Rapid Prototyping Reliability and Maintenance Engineering Robotics Solid Mechanics Thermodynamics and Heat Transfer Thermodynamics Transportation Systems Tribology Paper Submission Authors are invited to submit papers for this journal through E-mail meij@airccse.com . Submissions must be original and should not have been published previously or be under consideration for publication while being evaluated for this Journal. Important Dates Submission Deadline : July 10, 2026 Authors Notification : August 10, 2026 Final Manuscript Due : August 17, 2026 Publication Date : Determined by the Editor-in-Chief Editor in Chief Rajeswari N, Velammal Engineering College, India Editorial Board Members Aaron Boudreaux, Eastern Oregon University, USA Ahmet Can Altunisik , Karadeniz Technical University, Turkey Ali Hilal-Alnaqbi, United Arab Emirates University, UAE Ameen El-Sinawi, The Petroleum Institute, United Arab Emirates Brijender Kahanwal , National College for Women, India Charalampos Londos , National and Kapodistrian University of Athens, Greece Charles C.Sorrell , University of New South Wales, Australia Chithirai Pon Selvan M, Manipal University, UAE Cho Wing Solomon To, University of Nebraska-Lincoln, USA Dainet Berman Mendoza , University of Sonora, Mexico Dan Jiang, Shanghai Jiao Tong Univesity, China Gong Liang, Shanghai Jiao Tong University, China ... More</text:p>
          </table:table-cell>
          <table:table-cell table:number-columns-repeated="1013"/>
        </table:table-row>
        <table:table-row table:style-name="ro1">
          <table:table-cell table:style-name="ce2" office:value-type="string" calcext:value-type="string">
            <text:p>DMIP 2026</text:p>
          </table:table-cell>
          <table:table-cell table:style-name="ce2" office:value-type="string" calcext:value-type="string">
            <text:p>2026 9th International Conference on Digital Medicine and Image Processing (DMIP 2026)</text:p>
          </table:table-cell>
          <table:table-cell table:style-name="ce2" office:value-type="float" office:value="30" calcext:value-type="float">
            <text:p>30</text:p>
          </table:table-cell>
          <table:table-cell table:style-name="ce2" office:value-type="float" office:value="25" calcext:value-type="float">
            <text:p>25</text:p>
          </table:table-cell>
          <table:table-cell table:style-name="ce3" office:value-type="date" office:date-value="2026-07-10" calcext:value-type="date">
            <text:p>2026-07-10</text:p>
          </table:table-cell>
          <table:table-cell table:number-columns-repeated="2"/>
          <table:table-cell table:style-name="ce2" office:value-type="string" calcext:value-type="string">
            <text:p>Hokkaido, Japan</text:p>
          </table:table-cell>
          <table:table-cell table:style-name="ce2" office:value-type="string" calcext:value-type="string">
            <text:p>Dec 25, 2026 - Dec 28, 2026</text:p>
          </table:table-cell>
          <table:table-cell table:style-name="ce4" office:value-type="string" calcext:value-type="string">
            <text:p><text:a xlink:href="http://www.dmip.org/" xlink:type="simple">http://www.dmip.org/</text:a></text:p>
          </table:table-cell>
          <table:table-cell table:style-name="ce2" office:value-type="string" calcext:value-type="string">
            <text:p>Full Name: 2026 9th International Conference on Digital Medicine and Image Processing (DMIP 2026) Abbreviation: DMIP 2026 2026 9th International Conference on Digital Medicine and Image Processing (DMIP 2026) will be held in Hokkaido, Japan during December 25-28, 2026. DMIP 2026 is supported by Ritsumeikan University, and technically supported by National Taipei University of Technology, Shanghai Key Laboratory of Multidimensional Information Processing, East China Normal University, National Dong Hwa University, and Shandong Normal University. Conference Website: http://www.dmip.org/ Paper Publishing 1. International Conference Proceedings, indexed by Ei Compendex and Scopus. 2. Journal of Image and Graphics (JOIG, ISSN: 2301-3699), which will be included in Scopus, Ulrich's Periodicals Directory, Google Scholar, Crossref, IndexCopernicus, etc. Publishing History DMIP 2025 | ACM Conference Proceedings (ISBN: 979-8-4007-2068-0, in press) DMIP 2024 | ACM Conference Proceedings (ISBN: 979-8-4007-0958-6) | indexed by Ei Compendex and Scopus DMIP 2023 | ACM Conference Proceedings (ISBN: 979-8-4007-0942-5) | indexed by Ei Compendex and Scopus DMIP 2022 | ACM Conference Proceedings (ISBN: 978-1-4503-9765-0) | indexed by Ei Compendex and Scopus DMIP 2021 | ACM Conference Proceedings (ISBN: 978-1-4503-8648-7) | indexed by Ei Compendex and Scopus DMIP 2020 | ACM Conference Proceedings (ISBN: 978-1-4503-8904-4) | indexed by Ei Compendex and Scopus DMIP 2019 | ACM Conference Proceedings (ISBN: 978-1-4503-7698-3) | indexed by Ei Compendex and Scopus DMIP 2018 | ACM Conference Proceedings (ISBN: 978-1-4503-6578-9) | indexed by Ei Compendex and Scopus Since 2018, the papers of DMIP have been published in Conference Proceedings for 8 years, indexed by Ei Compendex and Scopus. Topics 1. Digital medicine: Medical image analysis; MR image reconstruction; CT image reconstruction, radiomics; Molecular imaging; Medical big data; Segmentation and 3D visualization; Digital pathology; Bioinformatics; Computational anatomy; Application of machine learning in medicine 2. Image processing: Image segmentation; Image registration; Image reconstruction; Image matching; Feature extraction; Image detection and recognition; Shape analysis; Machine learning; Deep learning; Hardware (FPGA, DSP, IC) for image processing and machine learning More information, please visit: http://dmip.org/cfp.html Call for Invited Speakers: Research Area: Digital Medicine and Image Processing Presentation Format: 20 minutes English presentation &amp; 5 minutes Q-A Session Application Materials: Please submit your bio (within 200 words) and a photo to the conference email: dmip@cbees.net. Upon successful application, your information will be updated on the conference website. *Both submission and registration must follow the procedures for invited speakers. Upon successful application, the conference will provide partial financial support. Call for Special Sessions: 1. To complement the regular conference schedule and focus on emerging topics in the field of Biomedical Imaging, Signal Processing, DMIP 2026 welcomes proposals for special sessions from experts and scholars. Please submit your proposals to: dmip@cbees.net. The proposal should include the following content: 1). Title of Special Session 2). Brief description of Special Session 3). Related topics 4). Name, Affiliation, E-mail, Short biography of the organizers *After the organization of the Special Sessions is successful, the organizing committee will provide certain financial support. 2. Optional Topics: 1). AI-Driven Medical Image Analysis and Diagnosis 2). Multimodal Medical Data Fusion and Clinical Decision Support 3). Image-Guided Intervention and Surgical Navigation 4). Digital Pathology and Computational Histopathology Conference Venue: TKP Sapporo Station Conference Center Address: 〒060-0807 Hokkaido Sapporo Kita-ku Kita 7-jo Nishi 2-9 Bellevue Office Sapporo 2~3F Submission Methods Submission System: http://www.easychair.org/conferences/?conf=dmip2026 Submission E-mail: dmip@cbees.net Delegate registration: http://confsys.iconf.org/register/dmip2026 Contact Methods: Contact E-mail: dmip@cbees.net Tel: +852-3500-0799 (Headquarter)/+86-28-86528465 (Branch Office) Conference Secretary: Ms. Ruby He DMIP 2026 can provide a platform for academic communication in Digital Medicine and Image Processing. For more conference information, please visit the conference website http://www.dmip.org/</text:p>
          </table:table-cell>
          <table:table-cell table:number-columns-repeated="1013"/>
        </table:table-row>
        <table:table-row table:style-name="ro1">
          <table:table-cell table:style-name="ce2" office:value-type="string" calcext:value-type="string">
            <text:p>ETAIC 2026</text:p>
          </table:table-cell>
          <table:table-cell table:style-name="ce2" office:value-type="string" calcext:value-type="string">
            <text:p>2026 2nd International Conference on Educational Technology and Artificial Intelligence</text:p>
          </table:table-cell>
          <table:table-cell table:style-name="ce2" office:value-type="float" office:value="40" calcext:value-type="float">
            <text:p>40</text:p>
          </table:table-cell>
          <table:table-cell table:style-name="ce2" office:value-type="float" office:value="30" calcext:value-type="float">
            <text:p>30</text:p>
          </table:table-cell>
          <table:table-cell table:style-name="ce3" office:value-type="date" office:date-value="2026-07-10" calcext:value-type="date">
            <text:p>2026-07-10</text:p>
          </table:table-cell>
          <table:table-cell/>
          <table:table-cell table:style-name="ce3" office:value-type="date" office:date-value="2026-07-10" calcext:value-type="date">
            <text:p>2026-07-10</text:p>
          </table:table-cell>
          <table:table-cell table:style-name="ce2" office:value-type="string" calcext:value-type="string">
            <text:p>Wuhan, China</text:p>
          </table:table-cell>
          <table:table-cell table:style-name="ce2" office:value-type="string" calcext:value-type="string">
            <text:p>Jul 24, 2026 - Jul 26, 2026</text:p>
          </table:table-cell>
          <table:table-cell table:style-name="ce4" office:value-type="string" calcext:value-type="string">
            <text:p><text:a xlink:href="https://ais.cn/u/JNZ3En" xlink:type="simple">https://ais.cn/u/JNZ3En</text:a></text:p>
          </table:table-cell>
          <table:table-cell table:style-name="ce2" office:value-type="string" calcext:value-type="string">
            <text:p>2026 2nd International Conference on Educational Technology and Artificial Intelligence (ETAIC 2026)will be held on July 24-26, 2026 in Wuhan, China. 𝗖𝗼𝗻𝗳𝗲𝗿𝗲𝗻𝗰𝗲 𝗪𝗲𝗯𝘀𝗶𝘁𝗲:https://ais.cn/u/JNZ3En ---𝗖𝗮𝗹𝗹 𝗳𝗼𝗿 𝗽𝗮𝗽𝗲𝗿𝘀--- The topics of interest for submission include, but are not limited to: ◕ Information Technology Online Learning Environment Design Adaptive Learning Systems Blended Learning Models Gamified Learning Approaches Learning Assessment Tools Social Media in Educational Applications Mobile Learning Technologies Accessibility in Educational Technology Effectiveness of Instructional Videos Educational Game Design Redefining the Role of Teachers Project-Based Learning Strategies STEM Technology Integration Knowledge Sharing Platforms Programming and Robotics Education Visualization of Instructional Content Learning Management Systems (LMS) Virtual Laboratories Innovative Pedagogies and Technology Future Trends in Educational Technology Conversational AI and Natural Language Processing ◕Artificial Intelligence and Education Artificial Intelligence and Education Development of Intelligent Tutoring Systems Personalized Learning Pathways Natural Language Processing Applications Machine Learning and Learning Analytics Educational Robot Interaction AI-Enabled Educational Equity and Accessible Learning AI-Powered Tutoring Systems AI-Driven Assessment and Feedback Applications of Affective Computing in Education Learning Analytics Tools Ethics in Educational Data Intelligent Translation Tools Interdisciplinary Collaboration in Educational AI Virtual Teaching Assistant Applications AI in Special Needs Education Behavioral Prediction and Intervention Big Data-Driven Educational Decision Support Systems Educational Content Generation Human-Computer Interaction Experience Deep Learning and Educational Analytics ...... ---𝗦𝗽𝗲𝗮𝗸𝗲𝗿𝘀--- Prof. Longkai Wu,Peking University, China Prof. Longkai Wu,Central China Normal University, China Prof. Jing Gao,Yantai Institute of Science and Technology, China ---𝗣𝘂𝗯𝗹𝗶𝗰𝗮𝘁𝗶𝗼𝗻--- All papers will be reviewed by two or three expert reviewers from the conference committees. After a careful reviewing process, all accepted papers will be published in the ACM International Conference Proceedings Series( ISBN: 979-8-4007-2417-6), and submitted to EI Compendex, Scopus for indexing. ---𝗜𝗺𝗽𝗼𝗿𝘁𝗮𝗻𝘁 𝗗𝗮𝘁𝗲𝘀--- Registration Deadline: July 17, 2026 Final Paper Submission Date: July 10, 2026 Conference Dates: July 24-26, 2026 --- 𝗣𝗮𝗽𝗲𝗿 𝗦𝘂𝗯𝗺𝗶𝘀𝘀𝗶𝗼𝗻--- Please send the full paper(word+pdf) to Submission System: https://ais.cn/u/JNZ3En</text:p>
          </table:table-cell>
          <table:table-cell table:number-columns-repeated="1013"/>
        </table:table-row>
        <table:table-row table:style-name="ro1">
          <table:table-cell table:style-name="ce2" office:value-type="string" calcext:value-type="string">
            <text:p>Cyber-AI 2026</text:p>
          </table:table-cell>
          <table:table-cell table:style-name="ce2" office:value-type="string" calcext:value-type="string">
            <text:p>The 2nd IEEE 2026 International Conference on Cybersecurity and AI-Based Systems (Scopus)</text:p>
          </table:table-cell>
          <table:table-cell table:style-name="ce2" office:value-type="float" office:value="40" calcext:value-type="float">
            <text:p>40</text:p>
          </table:table-cell>
          <table:table-cell table:style-name="ce2" office:value-type="float" office:value="25" calcext:value-type="float">
            <text:p>25</text:p>
          </table:table-cell>
          <table:table-cell table:style-name="ce3" office:value-type="date" office:date-value="2026-07-10" calcext:value-type="date">
            <text:p>2026-07-10</text:p>
          </table:table-cell>
          <table:table-cell table:style-name="ce3" office:value-type="date" office:date-value="2026-07-30" calcext:value-type="date">
            <text:p>2026-07-30</text:p>
          </table:table-cell>
          <table:table-cell table:style-name="ce3" office:value-type="date" office:date-value="2026-08-15" calcext:value-type="date">
            <text:p>2026-08-15</text:p>
          </table:table-cell>
          <table:table-cell table:style-name="ce2" office:value-type="string" calcext:value-type="string">
            <text:p>Bucharest, Romania</text:p>
          </table:table-cell>
          <table:table-cell table:style-name="ce2" office:value-type="string" calcext:value-type="string">
            <text:p>Sep 22, 2026 - Sep 25, 2026</text:p>
          </table:table-cell>
          <table:table-cell table:style-name="ce4" office:value-type="string" calcext:value-type="string">
            <text:p><text:a xlink:href="https://cyber-ai.org/2026" xlink:type="simple">https://cyber-ai.org/2026</text:a></text:p>
          </table:table-cell>
          <table:table-cell table:style-name="ce2" office:value-type="string" calcext:value-type="string">
            <text:p>The Cyber-AI 2026 Conference is the premier event uniting researchers, professionals, and innovators from academia and industry to explore cutting-edge advancements in cybersecurity and AI. This four-day conference, held at the Romanian-American University in Bucharest, the picturesque capital city of Romania, focused on providing practical solutions and fostering collaborative discussions on two key themes: how AI is revolutionizing cybersecurity and how secure AI systems are being built to withstand evolving threats. Attendees will have the opportunity to engage with thought leaders, participate in interactive sessions, and network with global experts. From novel AI-driven threat detection systems to ethical challenges in AI governance, the event promises an in-depth look at the intersection of these transformative fields. We are thrilled to invite researchers, industry professionals, and innovators to the Cyber-AI 2026 Conference, the foremost event at the nexus of cybersecurity and artificial intelligence. Don't miss this unparalleled opportunity to shape the future of secure, intelligent systems with special interest in but not limited to: AI, Machine Learning, Deep Learning, Federated Learning and Creativity Innovations in AI Algorithm Development Natural Language Processing (LNP) Augmented Reality (AR), Virtual Reality (VR), and Extended reality (XR) Developing Trustworthy and Reliable AI Systems Intelligent Intrusion Detection Systems for Internet of Things (IoT) Applications Network Forensics Leveraging Intelligent Systems and Data Analytics Data Analytics Approaches for Privacy-by-Design in Smart Healthcare Systems Datasets, Benchmarks, and Open-Source Tools for Cybersecurity Applications Efficient Deep Learning Techniques for Resource-Constrained Environments Adversarial Machine Learning and Mitigation of Backdoor Attacks Blockchain Technologies for Strengthening Cybersecurity Frameworks Advanced Intelligent Solutions and Data Analytics for Enhancing Cloud and Edge Security Malware Detection and Vulnerability Assessment Using Intelligent Systems Intelligent Approaches for Detecting and Mitigating Misinformation Intelligent Systems for Detecting Cyber-Attacks Effectively Sensors Attacks Detection and Mitigations Cybersecurity for IoT Public Health Devices Cybersecurity Management in IoT Devices Cybersecurity in IoT Cloud Interfaces Cybersecurity of Web Interface in the IoT Products Cybersecurity of IoT in Education Cybersecurity of Mobile Interface to IoT device Cybersecurity Infrastructure for IoT Solutions Cybersecurity Application for IoT networks Cybersecurity in Smart Homes and Smart cities Cybersecurity in Power, Solar Chimeneas, and Nucellar units Cybersecurity for Smart Vehicles and Transportation Domains Cybersecurity in Drones and Aviation systems</text:p>
          </table:table-cell>
          <table:table-cell table:number-columns-repeated="1013"/>
        </table:table-row>
        <table:table-row table:style-name="ro1">
          <table:table-cell table:style-name="ce2" office:value-type="string" calcext:value-type="string">
            <text:p>ORAJ 2026</text:p>
          </table:table-cell>
          <table:table-cell table:style-name="ce2" office:value-type="string" calcext:value-type="string">
            <text:p>Operations Research and Applications: An International Journal</text:p>
          </table:table-cell>
          <table:table-cell table:style-name="ce2" office:value-type="float" office:value="90" calcext:value-type="float">
            <text:p>90</text:p>
          </table:table-cell>
          <table:table-cell table:style-name="ce2" office:value-type="float" office:value="25" calcext:value-type="float">
            <text:p>25</text:p>
          </table:table-cell>
          <table:table-cell table:style-name="ce3" office:value-type="date" office:date-value="2026-07-10" calcext:value-type="date">
            <text:p>2026-07-10</text:p>
          </table:table-cell>
          <table:table-cell table:style-name="ce3" office:value-type="date" office:date-value="2026-08-10" calcext:value-type="date">
            <text:p>2026-08-10</text:p>
          </table:table-cell>
          <table:table-cell table:style-name="ce3" office:value-type="date" office:date-value="2026-08-17" calcext:value-type="date">
            <text:p>2026-08-17</text:p>
          </table:table-cell>
          <table:table-cell table:number-columns-repeated="2"/>
          <table:table-cell table:style-name="ce4" office:value-type="string" calcext:value-type="string">
            <text:p><text:a xlink:href="https://airccse.com/oraj/index.html" xlink:type="simple">https://airccse.com/oraj/index.html</text:a></text:p>
          </table:table-cell>
          <table:table-cell table:style-name="ce2" office:value-type="string" calcext:value-type="string">
            <text:p>Operations Research and Applications: An International Journal (ORAJ) Scope and Topics Operations Research and Applications: An International Journal (ORAJ) is a quarterly open access peer-reviewed journal that publishes articles which contribute new results in all areas of the Operations Research and innovative Applications. The journal focuses on all technical and practical aspects of Operations Research, applications and Implementation techniques. The goal of this journal is to bring together researchers and practitioners from academia and industry to focus on understanding advances in Operations Research and establishing new collaborations in these areas. Authors are solicited to contribute to the journal by submitting articles that illustrate research results, projects, surveying works and industrial experiences that describe significant advances in the areas of Operations Research and Applications but are not limited to, the following : Topics of interest include but are not limited to, the following Combinatorial Optimisation Constraint Satisfaction Data Analytics Decision Analysis and Analytics Game Theory Inventory Theory &amp; Applications Mathematical Programming Network Optimisation Non-linear Programming Optimisation Project Management Queuing Routing Scheduling Simulation Soft System Methods Stochastic Systems Supply Chain Management System Thinking Quantitative Methods in Banking and Finance Statistics and Econometrics Educations Future technologies Paper Submission Authors are invited to submit papers for this journal through E-mail oraj@airccse.com . Submissions must be original and should not have been published previously or be under consideration for publication while being evaluated for this Journal Important Dates Submission Deadline : July 10, 2026 Authors Notification : August 10, 2026 Final Manuscript Due : August 17, 2026 Publication Date : Determined by the Editor-in-Chief Editorial Board Members Abdel Salhi , University of Essex, England Abhinandan Chowdhury , Gettysburg College, USA Acharyulu K.V.L.N , Bapatla Engineering College, India Andrew Dynneson , University of Texas at El Paso, China Ayhan Esi , Adiyaman University, Turkey Deepmala , Indian Statistical Institute, India Donal O’Regan , National University of Ireland, Galway Ekrem SAVAS , Istanbul Commerce University, Turkey Fahreddin Abdullayev , Mersin University, Turkey Gazanfer Unal , Yeditepe University, Turkey Gershon Wolansky , Technion, Inst. of Technology, Israel Gokhan Yildirim , University of Southern California, United States Haslifah Hashim , University of Essex, United Kingdom ... More</text:p>
          </table:table-cell>
          <table:table-cell table:number-columns-repeated="1013"/>
        </table:table-row>
        <table:table-row table:style-name="ro1">
          <table:table-cell table:style-name="ce2" office:value-type="string" calcext:value-type="string">
            <text:p>RCAE 2026</text:p>
          </table:table-cell>
          <table:table-cell table:style-name="ce2" office:value-type="string" calcext:value-type="string">
            <text:p>2026 The 9th International Conference on Robotics, Control and Automation Engineering (RCAE 2026)</text:p>
          </table:table-cell>
          <table:table-cell table:style-name="ce2" office:value-type="float" office:value="42" calcext:value-type="float">
            <text:p>42</text:p>
          </table:table-cell>
          <table:table-cell table:style-name="ce2" office:value-type="float" office:value="30" calcext:value-type="float">
            <text:p>30</text:p>
          </table:table-cell>
          <table:table-cell table:style-name="ce3" office:value-type="date" office:date-value="2026-07-10" calcext:value-type="date">
            <text:p>2026-07-10</text:p>
          </table:table-cell>
          <table:table-cell table:number-columns-repeated="2"/>
          <table:table-cell table:style-name="ce2" office:value-type="string" calcext:value-type="string">
            <text:p>Baoding, China</text:p>
          </table:table-cell>
          <table:table-cell table:style-name="ce2" office:value-type="string" calcext:value-type="string">
            <text:p>Oct 23, 2026 - Oct 25, 2026</text:p>
          </table:table-cell>
          <table:table-cell table:style-name="ce4" office:value-type="string" calcext:value-type="string">
            <text:p><text:a xlink:href="http://www.rcae.net/" xlink:type="simple">http://www.rcae.net/</text:a></text:p>
          </table:table-cell>
          <table:table-cell table:style-name="ce2" office:value-type="string" calcext:value-type="string">
            <text:p>★★ RCAE 2026★★ ★Full Name: 2026 The 9th International Conference on Robotics, Control and Automation Engineering (RCAE 2026) ★Abbreviation: RCAE 2026 ★Website: http://www.rcae.net/ ★Date: October 23-25, 2026 ★Venue: Baoding, China 2026 9th International Conference on Robotics, Control and Automation Engineering (RCAE 2026) will take place in Baoding, China during October 23-25, 2026. The conference is sponsored by North China Electric Power University. Researchers, engineers, practitioners, and students from industry, universities, and government agencies are invited to present their latest work and discuss research and applications for robotics, control, and automation engineering cooperation. Technical sessions, poster sessions, and technical visits will be organized. ★Call for Papers★ A. Robotics and Control Mobile robots Humanoid robots Micro robots and micro-manipulation Search, rescue and field robotics Space and underwater robots Medical robots and bio-robotics B. Autonomous Systems Intelligent autonomous systems Cognitive approach for robotics Networked control systems Machine learning Multi-agent systems C. Perception and Sensing Perception systems Robot sensing and data fusion Localization, navigation and mapping Sensor networks Neural networks D. Control Systems Adaptive control Control system modeling Robust control Optimal control Discrete event systems E. Automation and Computing Process automation Intelligent automation Home, laboratory and service automation Building energy efficiency Cloud computing ... More Topics, please visit http://www.rcae.net/cfp.html ★ Publication★ Submitted papers will be peer reviewed by conference committees. Accepted full papers will be published in RCAE 2026 Conference Proceedings, which will be archived in IEEE Xplore, and indexed by EI Compendex, Scopus, and other indexing services. ★Submission★ 1. Full Paper (Publication and Presentation) 2. Abstract (Presentation Only) ★Online Submission System: https://easychair.org/conferences/?conf=rcae2026 Any question, please contact: rcaesub@academic.net More details about submission, please visit http://rcae.net/sub.html ★★Conference Schedule★★ October 23th, 2026 | Sign in and Collect Conference Materials October 24th, 2026 | Opening Ceremony &amp; Keynote Speeches &amp; Parallel Sessions for Authors' Presentation October 25th, 2026 | Invited Speeches &amp; Parallel Sessions for Authors' Presentation ★Contact Us★ Ms. Mia Huang (Conference Secretary) Email: rcaesub@academic.net (Working hours: 10:00-18:00, Monday to Friday; Time Zone: GMT+8)</text:p>
          </table:table-cell>
          <table:table-cell table:number-columns-repeated="1013"/>
        </table:table-row>
        <table:table-row table:style-name="ro1">
          <table:table-cell table:style-name="ce2" office:value-type="string" calcext:value-type="string">
            <text:p>IJP2P 2026</text:p>
          </table:table-cell>
          <table:table-cell table:style-name="ce2" office:value-type="string" calcext:value-type="string">
            <text:p>International Journal of Peer-to-Peer networks</text:p>
          </table:table-cell>
          <table:table-cell table:style-name="ce2" office:value-type="float" office:value="25" calcext:value-type="float">
            <text:p>25</text:p>
          </table:table-cell>
          <table:table-cell table:style-name="ce2" office:value-type="float" office:value="28" calcext:value-type="float">
            <text:p>28</text:p>
          </table:table-cell>
          <table:table-cell table:style-name="ce3" office:value-type="date" office:date-value="2026-07-10" calcext:value-type="date">
            <text:p>2026-07-10</text:p>
          </table:table-cell>
          <table:table-cell table:style-name="ce3" office:value-type="date" office:date-value="2026-08-10" calcext:value-type="date">
            <text:p>2026-08-10</text:p>
          </table:table-cell>
          <table:table-cell table:style-name="ce3" office:value-type="date" office:date-value="2026-08-17" calcext:value-type="date">
            <text:p>2026-08-17</text:p>
          </table:table-cell>
          <table:table-cell table:number-columns-repeated="2"/>
          <table:table-cell table:style-name="ce4" office:value-type="string" calcext:value-type="string">
            <text:p><text:a xlink:href="https://airccse.org/ijp2p/index.html" xlink:type="simple">https://airccse.org/ijp2p/index.html</text:a></text:p>
          </table:table-cell>
          <table:table-cell table:style-name="ce2" office:value-type="string" calcext:value-type="string">
            <text:p>International Journal of Peer-to-Peer networks (IJP2P) Call for Papers The International Journal of peer-to-peer networking is a quarterly open access peer-reviewed journal that publishes articles that contribute new results in all areas of P2P Networks. The journal provides a platform to disseminate new ideas and new research, advance theories, and propagate best practices in the area of P2P networking. This will include works that relate to peer-to-peer systems, peer-to-peer applications, grid systems, large-scale distributed systems, and overflay networks. The journal offers a forum in which academics, consultants, and practitioners in a variety of fields can exchange ideas to further research and improve practices in all areas of P2P. Authors are solicited to contribute to the journal by submitting articles that illustrate research results, projects, surveying works and industrial experiences that describe significant advances in the areas of P2P networks. Topics of interest include, but are not limited to, the following: Advances in Theoretical Foundations of P2P Commercial Applications Cooperation and Collaboration in P2P Systems Delay-tolerant P2P systems Higher-level Query Support in P2P Systems Mobile P2P Overlay Architectures and Topologies Overlay Monitoring and Management P2P and Wireless Convergence P2P Applications and Services P2P Economics P2P Grids P2P Information Retrieval P2P overlay Interaction with Underlying Infrastructure P2P Systems Over Mobile Networks P2P Technology and Sensors P2P Workload Characterization and Simulation Performance and Robustness of P2P systems Protocols and Algorithms for Mobile and Wireless Peer-to-peer Networks Security in P2P systems Self-Organization in P2P Systems Semantic Overlay Networks and Semantic Query Routing in P2P Systems Social Networks Trust, Reputation and Fairness in P2P Systems Ad Hoc and Sensor Networks Paper Submission : Authors are invited to submit papers for this journal through E-mail ijp2p@aircconline.com . Submissions must be original and should not have been published previously or be under consideration for publication while being evaluated for this Journal. Important Dates Submission Deadline : July 10, 2026 Authors Notification : August 10, 2026 Final Manuscript Due : August 17, 2026 Publication Date : Determined by the Editor-in-Chief Related Journal: International Journal of Distributed and Parallel systems (IJDPS) Editor in Chief Steven Gordon, Thammasat University, Thailand Editorial Board Members Amritam Sarcar , Microsoft, USA Ankit , Maharishi University of Management, USA Ankur Gupta, Model Institute of Engineering and Technology, India Antonio Coronato, Institute for High Performance Computing and Networking, Italy Claudio E.Palazzi, University of Padua, Italy Danda B Rawat, Eastern Kentucky University, USA Ederval Pablo Ferreira da Cruz , Instituto Federal do Espirito Santo (IFES) - Campus Itapina, Brazil Francesco Quaglia, Sapienza Universita' di Roma, Italy ... More</text:p>
          </table:table-cell>
          <table:table-cell table:number-columns-repeated="1013"/>
        </table:table-row>
        <table:table-row table:style-name="ro1">
          <table:table-cell table:style-name="ce2" office:value-type="string" calcext:value-type="string">
            <text:p>AIES--EI 2026</text:p>
          </table:table-cell>
          <table:table-cell table:style-name="ce2" office:value-type="string" calcext:value-type="string">
            <text:p>2026 International Conference on Artificial Intelligence and Education Systems (AIES 2026)</text:p>
          </table:table-cell>
          <table:table-cell table:style-name="ce2" office:value-type="float" office:value="25" calcext:value-type="float">
            <text:p>25</text:p>
          </table:table-cell>
          <table:table-cell table:style-name="ce2" office:value-type="float" office:value="28" calcext:value-type="float">
            <text:p>28</text:p>
          </table:table-cell>
          <table:table-cell table:style-name="ce3" office:value-type="date" office:date-value="2026-07-10" calcext:value-type="date">
            <text:p>2026-07-10</text:p>
          </table:table-cell>
          <table:table-cell table:number-columns-repeated="2"/>
          <table:table-cell table:style-name="ce2" office:value-type="string" calcext:value-type="string">
            <text:p>Kunming, China</text:p>
          </table:table-cell>
          <table:table-cell table:style-name="ce2" office:value-type="string" calcext:value-type="string">
            <text:p>Dec 18, 2026 - Dec 20, 2026</text:p>
          </table:table-cell>
          <table:table-cell table:style-name="ce4" office:value-type="string" calcext:value-type="string">
            <text:p><text:a xlink:href="https://www.aies.net/" xlink:type="simple">https://www.aies.net/</text:a></text:p>
          </table:table-cell>
          <table:table-cell table:style-name="ce2" office:value-type="string" calcext:value-type="string">
            <text:p>★Full name: 2026 International Conference on Artificial Intelligence and Education Systems (AIES 2026) ★Abbreviation: AIES 2026 ★Website: https://www.aies.net/ ★Date：December 18-20, 2026 ★Held in: Kunming, China ★Sponsored by: Yunnan Normal University, China ★Call for papers★ Generative AI in Education -AI content generation for teaching -LLM-powered tutoring systems -Automated essay evaluation -Synthetic educational materials -Ethical use of GenAI by students -Hallucination mitigation in EdTech -Prompt engineering for learning Intelligent Tutoring Systems -Adaptive learning algorithms -Knowledge tracing models -Personalized learning paths -Real-time feedback mechanisms -Learner modeling techniques -Cognitive diagnostic assessment -Multi-agent tutoring architectures Conversational AI &amp; Chatbots -Educational dialogue systems -Virtual learning assistants -Socratic questioning bots -Collaborative learning support -Emotional support chatbots -Multilingual educational bots -Voice-based learning interfaces Immersive Learning Tech -Immersive Learning Tech -AI-powered metaverse learning -Spatial computing for training -Haptic feedback systems -3D simulation environments -Embodied learning experiences -Multisensory learning design Learning Analytics &amp; Assessment -Multimodal learning data mining -Predictive student analytics -Automated grading systems -Learning behavior pattern recognition -Early warning systems -Dashboard visualization design -Privacy-preserving analytics Educational Intelligent Systems Design -Educational Intelligent Systems Design -Edge computing in smart classrooms -Real-time inference optimization -Federated learning for education -Cloud-native educational infrastructure -Microservices for scalable EdTech -API design for learning ecosystems System reliability &amp; fault tolerance ★ Publication The AIES 2026 accepted (Registered &amp; Presented) full papers will be included to be published in the International Conference Proceedings, which will be submitted to be indexed by Ei Compendex and Scopus. ★Submission★ 1. All submissions should be with a minimum paper length of Five (5) and a maximum paper length of Ten (10) printed pages including figures without incurring additional page charges. Papers exceeding 10 pages will not be accepted at AIES 2026. 2. The conference language is in English so please prepare the abstract / full paper and the oral presentation in English. 3. Full papers will be published in the conference proceedings. If publication is not required, then we invite you to submit the abstract only. 4. The version of your submission must be in the requested format. The authors are suggested to use the Conference template. Paper Template for Docx: https://www.aies.net/template.docx Paper Template for LaTex: https://www.aies.net/latex-template.zip *Electronic Submission System Link: https://www.zmeeting.org/submission/AIES2026 You will receive the submission confirmation email from the conference email after around 2 working days. If you haven't received it, please contact us as soon as possible. (Email: aies@academic.net) More details about submission, please visit at https://www.aies.net/sub.html ★Conference Venue Yunnan Lishui Yunquan Hotel Address: No. 768 Juxian Street, University Town, Chenggong District, Kunming, Yunnan, China Website: https://www.lishuiyunquanhotel.cn/en ★★Contact us Ms. Yulia Yu (Conference Secretary) Email: aies@academic.net Conference Website: https://www.aies.net/</text:p>
          </table:table-cell>
          <table:table-cell table:number-columns-repeated="1013"/>
        </table:table-row>
        <table:table-row table:style-name="ro1">
          <table:table-cell table:style-name="ce2" office:value-type="string" calcext:value-type="string">
            <text:p>AMLA 2026</text:p>
          </table:table-cell>
          <table:table-cell table:style-name="ce2" office:value-type="string" calcext:value-type="string">
            <text:p>7th International Conference on Advanced Machine Learning</text:p>
          </table:table-cell>
          <table:table-cell table:style-name="ce2" office:value-type="float" office:value="86" calcext:value-type="float">
            <text:p>86</text:p>
          </table:table-cell>
          <table:table-cell table:style-name="ce2" office:value-type="float" office:value="28" calcext:value-type="float">
            <text:p>28</text:p>
          </table:table-cell>
          <table:table-cell table:style-name="ce3" office:value-type="date" office:date-value="2026-07-11" calcext:value-type="date">
            <text:p>2026-07-11</text:p>
          </table:table-cell>
          <table:table-cell table:style-name="ce3" office:value-type="date" office:date-value="2026-07-18" calcext:value-type="date">
            <text:p>2026-07-18</text:p>
          </table:table-cell>
          <table:table-cell table:style-name="ce3" office:value-type="date" office:date-value="2026-07-22" calcext:value-type="date">
            <text:p>2026-07-22</text:p>
          </table:table-cell>
          <table:table-cell table:style-name="ce2" office:value-type="string" calcext:value-type="string">
            <text:p>Toronto, Canada</text:p>
          </table:table-cell>
          <table:table-cell table:style-name="ce2" office:value-type="string" calcext:value-type="string">
            <text:p>Jul 25, 2026 - Jul 26, 2026</text:p>
          </table:table-cell>
          <table:table-cell table:style-name="ce4" office:value-type="string" calcext:value-type="string">
            <text:p><text:a xlink:href="https://ais2026.org/amla/index" xlink:type="simple">https://ais2026.org/amla/index</text:a></text:p>
          </table:table-cell>
          <table:table-cell table:style-name="ce2" office:value-type="string" calcext:value-type="string">
            <text:p>7 th International Conference on Advanced Machine Learning (AMLA 2026) July 25 ~ 26, 2026, Toronto, Canada Hybrid -- Registered authors can present their work online or face to face. Scope &amp; Topics 7 th International Conference on Advanced Machine Learning (AMLA 2026) serves as a premier international forum for presenting cutting edge research, exchanging ideas, and exploring the latest breakthroughs in Machine Learning and its rapidly expanding ecosystem. As ML continues to transform science, engineering, industry, and society, AMLA 2026 aims to highlight both foundational advances and emerging innovations that define the next generation of intelligent systems. Topics of interest include, but are not limited to, the following Machine Learning Foundations Machine Learning Algorithms and Theory Supervised, Unsupervised and Semi Supervised Learning Learning in Knowledge Intensive Systems Optimization, Generalization and Learning Dynamics Probabilistic Modeling, Bayesian Learning and Uncertainty Quantification Classical ML Tasks: Classification, Regression, Clustering, Ranking Deep Learning and Representation Learning Deep Neural Networks and Advanced Architectures Self Supervised, Contrastive and Representation Learning Foundation Models and Large Scale Pretraining Parameter Efficient Fine Tuning (PEFT, LoRA, Adapters) Multimodal Deep Learning (Vision, Text, Audio, Graphs) Efficient Deep Learning: Distillation, Quantization, Pruning and Sparse Models Scaling Laws and Training Dynamics of Large Models Generative AI and Creative ML Diffusion Models and Score Based Generative Models Generative Transformers and Autoregressive Models GANs and Hybrid Generative Architectures Text to X, Image to X and Multimodal Generation Synthetic Data Generation, Evaluation and Bias Control Generative Agents and Simulation Driven Generation Reinforcement Learning and Decision Making Reinforcement Learning (RL) and Deep RL RLHF (Reinforcement Learning from Human Feedback) Model Based RL, World Models and Planning Multi Agent RL and Game Theoretic Learning RL for Robotics, Control, Games and Autonomous Systems Causal RL and Safe RL Agentic ML and Autonomous Learning Systems Autonomous ML Agents and Tool Using Agents Multi Agent Collaboration, Communication and Coordination Planning Augmented ML Models Agent Memory, Long Horizon Reasoning and Task Decomposition Evaluation of Agentic Systems Graph Machine Learning and Structured Models Graph Neural Networks (GNNs) Graph Transformers and Relational Learning Knowledge Graph Embeddings and Reasoning Structured Prediction and Probabilistic Graphical Models Spatio Temporal Graph Learning Causal ML, Reasoning and Explainability Causal Inference and Causal Representation Learning Counterfactual Reasoning and Causal Discovery Causal Generative Modeling Explainable ML (XAI) and Interpretable Models Trustworthy ML: Robustness, Fairness and Bias Mitigation Multimodal ML and Cross Domain Learning Vision Language, Audio Language and Multimodal Transformers Cross Modal Alignment, Fusion and Retrieval Multimodal Representation Learning Vision Language Action Models and Embodied ML Time Series ML, Forecasting and Sequential Models Temporal Transformers and Sequence Modeling Forecasting, Predictive Modeling and Anomaly Detection Sequential Decision Making and Temporal Representation Learning ML for Sensor Data, IoT and Real Time Systems Optimization, ML Systems and Infrastructure Optimization Algorithms for ML Distributed Training, Parallel ML and Large Scale Systems ML Compilers, Accelerators and Hardware Aware ML Efficient Inference, Model Compression and Deployment MLOps, ML Pipelines and Lifecycle Management Memory Augmented ML and Long Context Models Federated, Distributed and Privacy Preserving ML Federated Learning and Collaborative ML Differential Privacy and Secure ML Edge ML, TinyML and On Device Intelligence Privacy Preserving Training and Inference Adversarial ML and ML Security Adversarial Attacks and Defenses Robust ML and Certified Robustness Secure ML Pipelines and Model Integrity Red Teaming ML Systems and Safety Critical ML Meta Learning, Active Learning and Learning to Learn Meta Learning and Few Shot Learning Active Learning and Curriculum Learning AutoML, Neural Architecture Search (NAS) Continual Learning, Lifelong Learning and Catastrophic Forgetting Mitigation Applied Machine Learning and Real World Systems ML for Healthcare, Bioinformatics and Genomics ML for Finance, Economics and Risk Modeling ML for Engineering, Manufacturing and Industry 4.0 ML for Climate Science, Energy and Sustainability ML for Social Computing, Recommendation and Personalization ML for Scientific Discovery, Simulation and Physical Modeling ML for Software Engineering, Code Generation and Program Synthesis Paper Submission Authors are invited to submit papers through the conference Submission System by July 11, 2026 (Final Call) . Submissions must be original and should not have been published previously or be under consideration for publication while being evaluated for this conference. The proceedings of the conference will be published by The proceedings of the conference will be published by Computer Science Conference Proceedings (H index 46) in Computer Science &amp; Information Technology (CS &amp; IT) series (Confirmed). Selected papers from AMLA 2026 , after further revisions, will be published in the special issue of the following journals. Machine Learning and Applications: An International Journal (MLAIJ) International Journal of Artificial Intelligence &amp; Applications (IJAIA) Important Dates Submission Deadline : July 11, 2026 (Final Call) Authors Notification : July 18, 2026 Final Manuscript Due : July 22, 2026 Co - Located Event 12 th International Conference on Image Processing and Pattern Recognition (IPPR 2026) 12 th International Conference on Software Engineering (SOENG 2026) 14 th International Conference of Security, Privacy and Trust Management (SPTM 2026) 15 th International conference on Parallel, Distributed Computing and Applications (IPDCA 2026) 12 th International Conference on Data Mining (DaMi 2026) 13 th International Conference on Computer Science and Information Technology (CSIT 2026) 7 th International Conference on Natural Language Processing &amp; Applications (NLPA 2026) 12 th International Conference on Artificial Intelligence and Soft Computing (AIS 2026) 7 th International Conference on Big Data and Applications (BDAP 2026) ***** The invited talk proposals can be submitted to "&gt;amla@ais2026.org</text:p>
          </table:table-cell>
          <table:table-cell table:number-columns-repeated="1013"/>
        </table:table-row>
        <table:table-row table:style-name="ro1">
          <table:table-cell table:style-name="ce2" office:value-type="string" calcext:value-type="string">
            <text:p>ANaNO 2026</text:p>
          </table:table-cell>
          <table:table-cell table:style-name="ce2" office:value-type="string" calcext:value-type="string">
            <text:p>3rd International Conference on Advanced Nanoscience and Technology</text:p>
          </table:table-cell>
          <table:table-cell table:style-name="ce2" office:value-type="float" office:value="15" calcext:value-type="float">
            <text:p>15</text:p>
          </table:table-cell>
          <table:table-cell table:style-name="ce2" office:value-type="float" office:value="40" calcext:value-type="float">
            <text:p>40</text:p>
          </table:table-cell>
          <table:table-cell table:style-name="ce3" office:value-type="date" office:date-value="2026-07-11" calcext:value-type="date">
            <text:p>2026-07-11</text:p>
          </table:table-cell>
          <table:table-cell table:style-name="ce3" office:value-type="date" office:date-value="2026-07-25" calcext:value-type="date">
            <text:p>2026-07-25</text:p>
          </table:table-cell>
          <table:table-cell table:style-name="ce3" office:value-type="date" office:date-value="2026-07-26" calcext:value-type="date">
            <text:p>2026-07-26</text:p>
          </table:table-cell>
          <table:table-cell table:style-name="ce2" office:value-type="string" calcext:value-type="string">
            <text:p>Virtual Conference</text:p>
          </table:table-cell>
          <table:table-cell table:style-name="ce2" office:value-type="string" calcext:value-type="string">
            <text:p>Jul 28, 2026 - Jul 29, 2026</text:p>
          </table:table-cell>
          <table:table-cell table:style-name="ce4" office:value-type="string" calcext:value-type="string">
            <text:p><text:a xlink:href="https://anano2026.org/index" xlink:type="simple">https://anano2026.org/index</text:a></text:p>
          </table:table-cell>
          <table:table-cell table:style-name="ce2" office:value-type="string" calcext:value-type="string">
            <text:p>3 rd International Conference on Advanced Nanoscience and Technology (ANaNO 2026) July 28 ~ 29, 2026, Virtual Conference Scope &amp; Topics 3 rd International Conference on Advanced Nanoscience and Technology (ANaNO 2026) will provide an excellent international forum for sharing knowledge and new research results in all areas of Advanced Nanoscience and Technology. The goal of this conference is to bring together researchers and practitioners from academia and industry to focus on areas of Advanced Nanoscience and Technology for a cross cultural exploration and subsequent innovation of subjects concerned and establishing new collaborations in these areas. Authors are solicited to contribute to this conference by submitting articles for the development of Advanced Nanoscience and Technology. The conference documents practical and theoretical results which make a fundamental contribution for the development of Advanced Nanoscience and Technology. Topics of interest include, but are not limited to, the following Nanomaterials, Nanostructures and Emerging Nanoscale Systems Nanomaterials, Nanoparticles and Nanocomposites 0D/1D/2D Nanostructures (Quantum Dots, Nanowires, MXenes, Graphene, etc.) Low Dimensional and Quantum Confined Materials Topological Nanomaterials High Entropy Nanomaterials Nano Architected and Meta Materials Nanostructured Polymers and Hybrid Nanomaterials Nanomaterials for Extreme Environments 2D Magnetic Nanomaterials and Van der Waals Spintronic Systems Skyrmions and Topological Spin Textures at the Nanoscale Nanoelectronics, Nanophotonics and Quantum Technologies Nanoelectronics, Nano CMOS and Beyond CMOS Devices Flexible, Stretchable and Wearable Nanoelectronics Spintronics, Valleytronics and Nano Magnetism Nanophotonics, Plasmonics and Metasurfaces Photonic Integrated Circuits at the Nanoscale Quantum Dots, Quantum Emitters and Single Photon Sources Quantum Defect Nanomaterials (NV, SiV, GeV) for Sensing and Quantum Networking Quantum Nanophotonics and Quantum Plasmonics Nano Optomechanics and Hybrid Quantum Systems Materials and Devices for Quantum Computing Nanofabrication, Nano Manufacturing and Metrology Micro/Nano Fabrication (Lithography, E Beam, FIB, Nanoimprint) 3D/4D Nano Printing and Additive Nanomanufacturing Atomic Layer Deposition (ALD), CVD and Bottom Up Synthesis Nanopatterning, Self Assembly and Directed Assembly Nano Metrology, Characterization and In Situ/Operando Techniques Operando TEM, X ray and Neutron Nano Imaging Ultrafast Electron Microscopy (UEM) and 4D STEM Digital Twins for Nanomanufacturing Autonomous Nanofabrication Labs and Robotic Nano Synthesis Nanomechanics, Nanotribology and Nano Scale Transport Nanomechanics, Nano Indentation and Mechanical Properties Nanotribology and Wear at the Nanoscale Micro/Nano Heat Transfer and Thermal Transport Phonon Engineering and Thermal Metamaterials Nano Acoustics and Phononic Nanodevices Micro/Nanofluidics and Lab on Chip Systems Nanoscale Mass, Charge and Energy Transport Nanoscale Thermal Logic Devices Nano Bio Interfaces, Nanomedicine and Bio Nanotechnology Nanobiology, Nanobiomechanics and Nanobiotechnology Nanomedicine, Drug Delivery and Nano Therapeutics Nano Immunotherapy and Nanovaccines Nano Enabled Gene Editing (CRISPR Delivery) Nano Enabled Tissue Engineering and Regenerative Nanomedicine Nano Bio Interfaces and Cellular Interactions Bio Inspired and Bio Mimetic Nanomaterials Engineered Living Nanomaterials (ELMs) Microbial Engineered Nanomaterials and Bio Mineralization Nanobionics and Bio Hybrid Nano Systems Nanotoxicology and Safety Assessment Nano Mechanobiology and Cellular Nano Forces Living Nano Sensors and Bio Hybrid Electronics Nanosensors, Nano Actuators and Nano Robotics Micro/Nano Sensors and Actuators Molecular Sensors and Molecular Machines Nano Robotics, Nano Manipulation and Nano Assembly Autonomous Nano Systems and Swarm Nanorobotics Nano Electromechanical Systems (NEMS) Nano Enabled Wearable and Implantable Sensors Nano Biosensors for Health, Food and Environment Programmable Nano Systems and Active Matter Nano Cyber Physical Systems and Nano IoT Devices Nanocatalysis, Energy Nanotechnology and Environmental Nano Systems Nanocatalysis and Single Atom Catalysts Photocatalysis, Electrocatalysis and Plasmonic Catalysis Nanomaterials for Energy Storage (batteries, supercapacitors) Nanomaterials for Hydrogen, Fuel Cells and Solar Fuels Nanostructured Materials for Solar Energy and Photovoltaics Nano Electrochemical Interfaces and Single Particle Electrochemistry Nano Enabled Carbon Capture and Environmental Remediation Nanotechnology for Water Purification and Desalination Nanomaterials for Water Harvesting and Atmospheric Moisture Capture Nano Agriculture and Nano Enabled Sustainable Technologies Nano Enabled Climate Technologies (CO₂ mineralization, methane capture) Green Nanomanufacturing and Circular Nano Materials Modeling, Simulation and AI Driven Nanoscience Multiscale Modeling of Nanomaterials Molecular Dynamics, DFT and Quantum Simulations Machine Learning and AI for Nanomaterials Discovery Foundation Models for Nanoscience Data Driven Nanoscience and Materials Informatics Digital Twins for Nano Devices and Nano Systems Predictive Modeling for Nano Manufacturing Closed Loop AI Driven Nano Synthesis Applied Nanotechnology, Products and Societal Impact Nanotechnology in Electronics, Energy, Environment and Healthcare Nano Enabled Coatings, Textiles and Consumer Products Industrial Nanotechnology and Commercialization Nano Security, Anti Counterfeiting and Nano Forensics Nano Pollutants, Environmental Fate and Predictive Toxicology Nanotechnology Standards, Ethics and Regulation Education, Outreach and Public Engagement in Nanotechnology Paper Submission Authors are invited to submit papers through the conference Submission System by July 11, 2026 (Final Call) . Submissions must be original and should not have been published previously or be under consideration for publication while being evaluated for this conference. The proceedings of the conference will be published by The proceedings of the conference will be published by Advanced Nanoscience and Technology: An International Journal (ANTJ) series (Confirmed). Selected papers from ANaNO 2026 , after further revisions, will be published in the special issue of the following journals. Advances in Materials Science and Engineering : An International Journal (MSEJ) Advanced Energy: An International Journal (AEIJ) International Journal of Advances in Chemistry (IJAC) International Journal of Recent Advances in Physics (IJRAP) International Journal of Advances in Materials Science and Engineering (IJAMSE) Important Dates Submission Deadline : July 11, 2026 (Final Call) Authors Notification : July 25, 2026 Final Manuscript Due : July 26, 2026 Co - Located Event 3 rd International Conference on Antennas, Microwave and Microelectronics Engineering (AMiMi 2026) 3 rd International Conference on Advances in Chemistry &amp; Chemical Engineering (CHENG 2026) 3 rd International Conference on Advances in Materials Science and Engineering (CAMSE 2026) 3 rd International Conference on Information Technology Convergence Services &amp; AI (ITCAI 2026) 3 rd International Conference on Life Sciences (LiSci 2026) 3 rd International Conference on Humanities, Art and Social Studies (HAS 2026) 3 rd International Conference on AI in Bioinformatics &amp; Computational Biology (AIBCB 2026) 5 th International Conference of Multidisciplinary &amp; Interdisciplinary Bioscience (MIBIO 2026) ***** The invited talk proposals can be submitted to anano@anano2026.org</text:p>
          </table:table-cell>
          <table:table-cell table:number-columns-repeated="1013"/>
        </table:table-row>
        <table:table-row table:style-name="ro1">
          <table:table-cell table:style-name="ce2" office:value-type="string" calcext:value-type="string">
            <text:p>DaMi 2026</text:p>
          </table:table-cell>
          <table:table-cell table:style-name="ce2" office:value-type="string" calcext:value-type="string">
            <text:p>12th International Conference on Data Mining</text:p>
          </table:table-cell>
          <table:table-cell table:style-name="ce2" office:value-type="float" office:value="85" calcext:value-type="float">
            <text:p>85</text:p>
          </table:table-cell>
          <table:table-cell table:style-name="ce2" office:value-type="float" office:value="28" calcext:value-type="float">
            <text:p>28</text:p>
          </table:table-cell>
          <table:table-cell table:style-name="ce3" office:value-type="date" office:date-value="2026-07-11" calcext:value-type="date">
            <text:p>2026-07-11</text:p>
          </table:table-cell>
          <table:table-cell table:style-name="ce3" office:value-type="date" office:date-value="2026-07-18" calcext:value-type="date">
            <text:p>2026-07-18</text:p>
          </table:table-cell>
          <table:table-cell table:style-name="ce3" office:value-type="date" office:date-value="2026-07-22" calcext:value-type="date">
            <text:p>2026-07-22</text:p>
          </table:table-cell>
          <table:table-cell table:style-name="ce2" office:value-type="string" calcext:value-type="string">
            <text:p>Toronto, Canada</text:p>
          </table:table-cell>
          <table:table-cell table:style-name="ce2" office:value-type="string" calcext:value-type="string">
            <text:p>Jul 25, 2026 - Jul 26, 2026</text:p>
          </table:table-cell>
          <table:table-cell table:style-name="ce4" office:value-type="string" calcext:value-type="string">
            <text:p><text:a xlink:href="https://dami2026.org/" xlink:type="simple">https://dami2026.org/</text:a></text:p>
          </table:table-cell>
          <table:table-cell table:style-name="ce2" office:value-type="string" calcext:value-type="string">
            <text:p>12 th International Conference on Data Mining (DaMi 2026) July 25 ~ 26, 2026, Toronto, Canada Scope &amp; Topics 12 th International Conference on Data Mining (DaMi 2026) is a premier global forum dedicated to advancing the science, engineering, and practice of data mining and knowledge discovery. As data continues to grow in scale, complexity, and diversity, DaMi 2026 brings together researchers, practitioners, and industry innovators to explore the latest breakthroughs in machine learning, generative AI, large scale analytics, graph intelligence, multimodal mining, and responsible data driven systems. DaMi 2026 embraces the rapidly evolving landscape of data centric research, including foundation models, vector databases, streaming analytics, federated learning, data centric AI, and human in the loop discovery. The conference aims to foster collaboration between academia and industry, highlight emerging trends, and provide a platform for presenting cutting edge research that shapes the future of intelligent data systems. Authors are invited to contribute high quality research papers that present original results, innovative methodologies, practical applications, survey studies, or real world industrial experiences in all areas of data mining and knowledge discovery. DaMi 2026 welcomes contributions across a broad spectrum of topics, including (but not limited to): Topics of interest include, but are not limited to, the following Foundations of Data Mining and Knowledge Discovery Theoretical Foundations of Data Mining Statistical Learning, Probabilistic Modeling and Bayesian Methods Pattern Discovery, Sequence Mining and Frequent Pattern Mining Causal Inference, Causal Discovery and Counterfactual Reasoning Robust Learning from Noisy, Incomplete and Low Quality Data Feature Engineering, Dimensionality Reduction and Representation Learning Post processing, Model Interpretation and Knowledge Explanation Data Centric AI Foundations and Data Quality Theory Machine Learning, Deep Learning and Generative AI Supervised, Unsupervised and Semi Supervised Learning Deep Learning Architectures and Representation Learning Generative AI (GANs, Diffusion Models, Foundation Models) Retrieval Augmented Generation (RAG) and Knowledge Grounded Models Self Supervised and Contrastive Learning Transfer Learning, Domain Adaptation and Multi Task Learning Reinforcement Learning and Sequential Decision Making Large Scale ML Systems, Distributed Training and Model Parallelism Data Mining for LLM Training Pipelines and Dataset Curation Graph, Network and Structured Data Mining Graph Mining, Network Analysis and Link Prediction Graph Neural Networks (GNNs) and Graph Transformers Knowledge Graph Construction, Reasoning and Completion Temporal, Dynamic and Heterogeneous Graph Mining Graph Contrastive Learning and Graph Foundation Models Graph Based Anomaly Detection and Fraud Analytics Multimodal, Text, Web and Social Data Mining Text Mining, NLP and LLM Driven Analytics Web Mining, Social Media Mining and Opinion/Sentiment Analysis Multimedia Mining (Image, Video, Audio, Multimodal Fusion) Multimodal Foundation Models (Vision Language, Audio Text, Video Text) Cross Modal Retrieval, Alignment and Multimodal RAG Spatio Temporal, Mobility and Geographical Data Mining Event Detection, Trend Analysis and Behavioral Modeling Vector Databases, Embedding Based Retrieval and Semantic Search Vector Search and Approximate Nearest Neighbor (ANN) Embedding Based Retrieval and Indexing Semantic Search Pipelines and Hybrid Retrieval (Symbolic + Vector) Retrieval Optimization for LLMs and RAG Systems Large Scale Embedding Management and Drift Detection Streaming, Real Time and Edge Data Mining Data Stream Mining and Online Learning Real Time Analytics and Low Latency Inference Edge Intelligence and On Device Data Mining Distributed Stream Processing (Flink, Spark Streaming, Ray) Adaptive Learning in Dynamic Environments Real Time Event Detection and Monitoring Big Data, Cloud and Distributed Data Mining Scalable Data Mining Algorithms Parallel and Distributed Data Mining (Spark, Flink, Ray, Dask) Cloud Native Data Mining and Serverless Analytics Data Lakes, Lakehouses and Modern Data Engineering Pipelines GPU Accelerated Analytics and High Performance Data Mining Data Integration, Fusion and Multi Source Learning Data Lineage, Provenance and Versioning Responsible AI, Fairness, Ethics and Governance Explainable AI (XAI) and Interpretable Models Fairness, Bias Detection and Algorithmic Accountability Ethical Data Mining and Responsible AI Practices Trustworthy AI, Safety and Risk Assessment Human Centered Data Mining and Decision Support AI Governance, Compliance and Regulatory Analytics Privacy Preserving and Secure Data Mining Federated Learning and Collaborative Analytics Differential Privacy and Privacy Preserving Data Mining Secure Multi Party Computation and Homomorphic Encryption Adversarial Attacks, Robustness and Model Security Cybersecurity Analytics, Threat Detection and Anomaly Mining AI Safety Data Mining (jailbreak detection, harmful content detection) Data Centric AI and Data Quality Engineering Data Quality, Cleaning, Labeling and Weak Supervision Data Validation, Error Detection and Data Debugging Data Centric AI Pipelines and Automated Data Preparation Data Valuation, Influence Functions and Data Attribution Synthetic Data Generation, Simulation and Evaluation Digital Twins for Data Driven Modeling Interactive, Visual and Human in the Loop Data Mining Interactive Data Exploration and Visual Analytics Human in the Loop Learning and Collaborative Mining Visualization Techniques for Large Scale Data Interfaces, Tools and Languages for Data Mining Mixed Initiative Data Mining Systems Knowledge Discovery Frameworks and Processes KDD Process Models, Workflow Automation and Pipelines Knowledge Representation, Reasoning and Ontologies Integration of Data Mining with Knowledge Graphs Evaluation Metrics, Benchmarking and Reproducibility Emerging Trends, Opportunities and Future Directions Applications of Data Mining Bioinformatics, Computational Biology and Precision Medicine Financial Modeling, Fraud Detection and Risk Analytics Cybersecurity, Threat Intelligence and Intrusion Detection Healthcare Analytics and Medical Decision Support Educational Data Mining and Learning Analytics Smart Cities, IoT and Sensor Data Mining E commerce, Marketing, Recommendation Systems and Personalization Scientific Data Mining and Environmental Analytics Data Mining for Policy, Governance and Societal Impact Paper Submission Authors are invited to submit papers through the conference Submission System by July 11, 2026 (Final Call) . Submissions must be original and should not have been published previously or be under consideration for publication while being evaluated for this conference. The proceedings of the conference will be published by The proceedings of the conference will be published by Computer Science Conference Proceedings in Computer Science &amp; Information Technology (CS &amp; IT) series (Confirmed). Selected papers from DaMi 2026 , after further revisions, will be published in the special issue of the following journals. International Journal of Database Management Systems (IJDMS) International Journal of Data Mining &amp; Knowledge Management Process (IJDKP) International Journal on Web Service Computing (IJWSC) Information Technology in Industry (ITII) Important Dates Submission Deadline : July 11, 2026 (Final Call) Authors Notification : July 18, 2026 Final Manuscript Due : July 22, 2026 Co - Located Event 12 th International Conference on Image Processing and Pattern Recognition (IPPR 2026) 13 th International Conference on Computer Science and Information Technology (CSIT 2026) 14 th International Conference of Security, Privacy and Trust Management (SPTM 2026) 15 th International conference on Parallel, Distributed Computing and Applications (IPDCA 2026) 12 th International Conference on Software Engineering (SOENG 2026) 12 th International Conference on Artificial Intelligence and Soft Computing (AIS 2026) 7 th International Conference on Natural Language Processing &amp; Applications (NLPA 2026) 7 th International Conference on Advanced Machine Learning (AMLA 2026) 7 th International Conference on Big Data and Applications (BDAP 2026) ***** The invited talk proposals can be submitted to dami@dami2026.org</text:p>
          </table:table-cell>
          <table:table-cell table:number-columns-repeated="1013"/>
        </table:table-row>
        <table:table-row table:style-name="ro1">
          <table:table-cell table:style-name="ce2" office:value-type="string" calcext:value-type="string">
            <text:p>AIS 2026</text:p>
          </table:table-cell>
          <table:table-cell table:style-name="ce2" office:value-type="string" calcext:value-type="string">
            <text:p>12th International Conference on Artificial Intelligence and Soft Computing</text:p>
          </table:table-cell>
          <table:table-cell table:style-name="ce2" office:value-type="float" office:value="90" calcext:value-type="float">
            <text:p>90</text:p>
          </table:table-cell>
          <table:table-cell table:style-name="ce2" office:value-type="float" office:value="25" calcext:value-type="float">
            <text:p>25</text:p>
          </table:table-cell>
          <table:table-cell table:style-name="ce3" office:value-type="date" office:date-value="2026-07-11" calcext:value-type="date">
            <text:p>2026-07-11</text:p>
          </table:table-cell>
          <table:table-cell table:style-name="ce3" office:value-type="date" office:date-value="2026-07-18" calcext:value-type="date">
            <text:p>2026-07-18</text:p>
          </table:table-cell>
          <table:table-cell table:style-name="ce3" office:value-type="date" office:date-value="2026-07-22" calcext:value-type="date">
            <text:p>2026-07-22</text:p>
          </table:table-cell>
          <table:table-cell table:style-name="ce2" office:value-type="string" calcext:value-type="string">
            <text:p>Toronto, Canada</text:p>
          </table:table-cell>
          <table:table-cell table:style-name="ce2" office:value-type="string" calcext:value-type="string">
            <text:p>Jul 25, 2026 - Jul 26, 2026</text:p>
          </table:table-cell>
          <table:table-cell table:style-name="ce4" office:value-type="string" calcext:value-type="string">
            <text:p><text:a xlink:href="https://ais2026.org/" xlink:type="simple">https://ais2026.org/</text:a></text:p>
          </table:table-cell>
          <table:table-cell table:style-name="ce2" office:value-type="string" calcext:value-type="string">
            <text:p>12 th International Conference on Artificial Intelligence and Soft Computing (AIS 2026) July 25 ~ 26, 2026, Toronto, Canada Scope &amp; Topics The 12 th International Conference on Artificial Intelligence and Soft Computing (AIS 2026) will provide an excellent international forum for sharing knowledge, exchanging ideas, and presenting the latest advances in the theory, methodology, and applications of Artificial Intelligence and Soft Computing. As AI continues to evolve through breakthroughs in machine learning, generative models, intelligent systems, and computational intelligence, AIS 2026 aims to highlight both foundational research and cutting edge innovations that are shaping the future of intelligent technologies. The conference seeks significant contributions across all major areas of Artificial Intelligence and Soft Computing, spanning theoretical developments, algorithmic advances, system architectures, and real world applications. By providing a platform for interdisciplinary dialogue and high impact research dissemination, AIS 2026 supports the continued growth of the AI community and encourages the development of intelligent systems that address complex scientific, industrial, and societal challenges. Authors are solicited to contribute to the conference by submitting articles that illustrate research results, projects, surveying works, and industrial experiences that describe significant advances in the following areas, but are not limited to the topics listed. Topics of interest include, but are not limited to, the following Artificial Intelligence AI Algorithms &amp; Intelligent Decision Making Knowledge Representation, Reasoning &amp; Cognitive Architectures Probabilistic Reasoning, Bayesian Models &amp; Uncertainty Quantification Multi Agent Systems, Agentic AI &amp; Autonomous Decision Making Reactive, Distributed &amp; Self Organizing AI Systems Machine Learning &amp; Data Driven Intelligence Machine Learning (Supervised, Unsupervised, Semi Supervised) Deep Learning Architectures, Optimization &amp; Training Dynamics Foundation Models (LLMs, VLMs, Multimodal Models) Self Supervised, Contrastive &amp; Representation Learning Continual, Lifelong &amp; Online Learning Computational Learning Theory Trustworthy ML: Robustness, Safety, Fairness &amp; Explainability Efficient ML: Quantization, Distillation &amp; Sparse Models Generative AI &amp; Creative Intelligence Diffusion Models, GANs, VAEs &amp; Generative Transformers Text to Image, Text to Video, Text to 3D &amp; Multimodal Generation Synthetic Data Generation &amp; Evaluation Creative AI for Art, Music, Design &amp; Simulation Generative Agents &amp; Autonomous Creative Systems Natural Language Processing &amp; Speech Technologies Large Language Models (LLMs) &amp; Instruction Tuned Models Text Understanding, Summarization, QA &amp; Information Extraction Dialogue Systems, Conversational AI &amp; Agentic NLP Speech Recognition, Speech Synthesis &amp; Spoken Dialogue Multilingual NLP &amp; Low Resource Language Modeling NLP for Reasoning, Planning &amp; Knowledge Integration Computer Vision, Image &amp; Video Intelligence Computer Vision, Scene Understanding &amp; Object Recognition Vision Language Models (VLMs) &amp; Multimodal Perception Image Processing, Image Understanding &amp; Pattern Recognition Video Understanding, Action Recognition &amp; Video AI 3D Vision, NeRFs, 3D Reconstruction &amp; Spatial AI Biomedical Image Analysis &amp; Medical Vision AI Robotics, Autonomous Systems &amp; Mechatronics Autonomous Robotics, Planning &amp; Navigation Robot Perception, Manipulation &amp; Control Human Robot Interaction &amp; Cognitive Robotics Soft Robotics &amp; Bio Inspired Robotics Mechatronics &amp; Intelligent Automation Embodied AI &amp; Simulation Driven Robotics Soft Computing &amp; Computational Intelligence Fuzzy Logic, Fuzzy Systems &amp; Fuzzy Control Evolutionary Computing, Genetic Algorithms &amp; Swarm Intelligence Rough Sets, Granular Computing &amp; Morphic Computing Hybrid Intelligent Systems (Neuro Fuzzy, Neuro Symbolic, etc.) Soft Computing Theory &amp; Applications Reinforcement Learning &amp; Decision Making Reinforcement Learning (RL) &amp; Deep RL RLHF (Reinforcement Learning from Human Feedback) World Models &amp; Model Based RL Multi Agent RL &amp; Cooperative/Competitive Learning RL for Robotics, Games &amp; Autonomous Systems Data Science, Mining &amp; Knowledge Discovery Data Mining, Knowledge Discovery &amp; Big Data Analytics Graph Machine Learning, GNNs &amp; Graph Transformers Knowledge Graphs, Semantic Reasoning &amp; Web Intelligence Data Visualization, Interactive Analytics &amp; Explainability ML Pipelines, MLOps &amp; Data Centric AI Bio Inspired &amp; Bio Computing Bioinformatics, Computational Biology &amp; Genomic AI Neural Computation &amp; Brain Inspired AI Nano Computing, Micro Systems &amp; Bio Digital Interfaces AI for Healthcare, Precision Medicine &amp; Drug Discovery AI Systems, Optimization &amp; Engineering ML Compilers, Accelerators &amp; Optimization (XLA, TVM, Triton) Distributed Training, Scaling Laws &amp; Large Model Infrastructure Edge AI, TinyML &amp; On Device Intelligence AI Systems Engineering &amp; Deployment Architectures Energy Efficient AI &amp; Green Machine Learning AI Safety, Ethics, Alignment &amp; Governance AI Safety, Alignment &amp; Risk Mitigation Adversarial ML, Robustness &amp; Secure AI Explainability, Transparency &amp; Accountability Fairness, Bias Mitigation &amp; Responsible AI Policy, Governance &amp; Societal Impacts of AI Emerging AI Domains &amp; Future Directions Quantum Machine Learning &amp; Quantum AI AI for Science (Physics, Chemistry, Biology, Climate) AI for Telecommunications, Networking &amp; 6G Systems AI for Smart Cities, IoT &amp; Ambient Intelligence AI for Industry 4.0, Manufacturing &amp; Automation AI Driven Simulation, Digital Twins &amp; Virtual Worlds Paper Submission Authors are invited to submit papers through the conference SubmissionSystem by July 11, 2026 (Final Call) . Submissions must be original and should not have been published previously or be under consideration for publication while being evaluated for this conference. The proceedings of the conference will be published by The proceedings of the conference will be published by Computer Science Conference Proceedings in Computer Science &amp; Information Technology (CS &amp; IT) series (Confirmed). Selected papers from AIS 2026 , after further revisions, will be published in the special issue of the following journals. International Journal of Soft Computing (IJSC) International Journal of Artificial Intelligence &amp; Applications (IJAIA) Information Technology in Industry (ITII) Important Dates Submission Deadline : July 11, 2026 (Final Call) Authors Notification : July 18, 2026 Final Manuscript Due : July 22, 2026 Co - Located Event 12 th International Conference on Image Processing and Pattern Recognition (IPPR 2026) 12 th International Conference on Software Engineering (SOENG 2026) 14 th International Conference of Security, Privacy and Trust Management (SPTM 2026) 15 th International conference on Parallel, Distributed Computing and Applications (IPDCA 2026) 12 th International Conference on Data Mining (DaMi 2026) 13 th International Conference on Computer Science and Information Technology (CSIT 2026) 7 th International Conference on Natural Language Processing &amp; Applications (NLPA 2026) 7 th International Conference on Advanced Machine Learning (AMLA 2026) 7 th International Conference on Big Data and Applications (BDAP 2026) ***** The invited talk proposals can be submitted to ais@ais2026.org</text:p>
          </table:table-cell>
          <table:table-cell table:number-columns-repeated="1013"/>
        </table:table-row>
        <table:table-row table:style-name="ro1">
          <table:table-cell table:style-name="ce2" office:value-type="string" calcext:value-type="string">
            <text:p>IJFLS 2026</text:p>
          </table:table-cell>
          <table:table-cell table:style-name="ce2" office:value-type="string" calcext:value-type="string">
            <text:p>International Journal of Fuzzy Logic Systems</text:p>
          </table:table-cell>
          <table:table-cell table:style-name="ce2" office:value-type="float" office:value="20" calcext:value-type="float">
            <text:p>20</text:p>
          </table:table-cell>
          <table:table-cell table:style-name="ce2" office:value-type="float" office:value="30" calcext:value-type="float">
            <text:p>30</text:p>
          </table:table-cell>
          <table:table-cell table:style-name="ce3" office:value-type="date" office:date-value="2026-07-11" calcext:value-type="date">
            <text:p>2026-07-11</text:p>
          </table:table-cell>
          <table:table-cell table:style-name="ce3" office:value-type="date" office:date-value="2026-07-27" calcext:value-type="date">
            <text:p>2026-07-27</text:p>
          </table:table-cell>
          <table:table-cell table:style-name="ce3" office:value-type="date" office:date-value="2026-07-29" calcext:value-type="date">
            <text:p>2026-07-29</text:p>
          </table:table-cell>
          <table:table-cell table:number-columns-repeated="2"/>
          <table:table-cell table:style-name="ce4" office:value-type="string" calcext:value-type="string">
            <text:p><text:a xlink:href="http://wireilla.com/ijfls/index.html" xlink:type="simple">http://wireilla.com/ijfls/index.html</text:a></text:p>
          </table:table-cell>
          <table:table-cell table:style-name="ce2" office:value-type="string" calcext:value-type="string">
            <text:p>International Journal of Fuzzy Logic Systems (IJFLS) Call for Papers International Journal of Fuzzy Logic Systems (IJFLS) is an open access peer-reviewed journal that covers all topics in theoretical, experimental and applied fuzzy techniques and systems. It is aimed to bring together researchers and developers from both academia and industry to discuss the latest scientific and theoretical advances in this field, and to demonstrate the state-of-the-art systems. The journal solicits original technical papers that were not previously published and are not currently under review for publication elsewhere. Topics of Interest Fuzzy logic techniques &amp; Algorithm Fuzzy mathematics Fuzzy measure and integral Type 2 fuzzy Logic Possibility theory and imprecise probability Fuzzy database Fuzzy Clustering Fuzzy decision support system Fuzzy expert system Fuzzy mathematical programming Fuzzy decision making and decision support systems Fuzzy modeling and fuzzy control of biotechnological processes Fuzzy neural systems, neuro-fuzzy systems Fuzzy systems modeling and identification Fuzzy pattern recognition Fuzzy process control Fuzzy reasoning system Fuzzy-rule based system Fuzzy System in Multimedia and web-based applications Fuzzy system applications in computer vision Hybrid fuzzy systems (fuzzy-neuro-evolutionary-rough) Fuzzy system applications in e-commerce Fuzzy sets in bioinformatics Fuzzy system applications in human-machine interface Fuzzy system applications in robotics Fuzzy system applications in system and control engineering Paper Submission Authors are invited to submit papers for this journal through Submission system . Submissions must be original and should not have been published previously or be under consideration for publication while being evaluated for this Journal. Important Dates Submission Deadline : July 11, 2026 Authors Notification : July 27, 2026 Final Manuscript Due : July 29, 2026 Publication Date : Determined by the Editor-in-Chief Related Journal International Journal on Foundations of Computer Science &amp; Technology (IJFCST) Editor In Chief : Robert Burduk, Wroclaw University of Technology, Poland. Editorial Board: Ashutosh Kumar Dubey, Trinity Institute of Technology &amp; Research Bhopal, India Bharat Bhushan Agarwal, Instituto Federal do Triangulo Mineiro, University, India Cauvery N K, Rashtreeya Vidyalaya College of Engineering, India Derya Birant, Dokuz Eylul University, Turkey Julie M. David, MES college, India Kalpesh Wandra, Gujarat Technological University Ahmedabad, India Kim Le, University of Canberra, Australia M Roberts Masillamani, Hindustan University,India M.Pravin Kumar, K.S.R College of Engineering, India Manpreet Singh Gujral, Punjabi University, India Michael Gr. Voskoglou, Graduate Technological Educational Institute, Greece Mohammad Talib, University of Botswana, Botswana Mukesh Kumar, Maharshi Dayanand University,India Nishant Doshi, Sardar Vallabhbhai National Institute of Technology, India Nitiket Nijanand Mhala, Bapurao Deshmukh College of Engineering, India ... More</text:p>
          </table:table-cell>
          <table:table-cell table:number-columns-repeated="1013"/>
        </table:table-row>
        <table:table-row table:style-name="ro1">
          <table:table-cell table:style-name="ce2" office:value-type="string" calcext:value-type="string">
            <text:p>VCOI 2026</text:p>
          </table:table-cell>
          <table:table-cell table:style-name="ce2" office:value-type="string" calcext:value-type="string">
            <text:p>4th International Conference on Vision and Computational Intelligence</text:p>
          </table:table-cell>
          <table:table-cell table:style-name="ce2" office:value-type="float" office:value="75" calcext:value-type="float">
            <text:p>75</text:p>
          </table:table-cell>
          <table:table-cell table:style-name="ce2" office:value-type="float" office:value="30" calcext:value-type="float">
            <text:p>30</text:p>
          </table:table-cell>
          <table:table-cell table:style-name="ce3" office:value-type="date" office:date-value="2026-07-11" calcext:value-type="date">
            <text:p>2026-07-11</text:p>
          </table:table-cell>
          <table:table-cell table:style-name="ce3" office:value-type="date" office:date-value="2026-07-27" calcext:value-type="date">
            <text:p>2026-07-27</text:p>
          </table:table-cell>
          <table:table-cell table:style-name="ce3" office:value-type="date" office:date-value="2026-08-03" calcext:value-type="date">
            <text:p>2026-08-03</text:p>
          </table:table-cell>
          <table:table-cell table:style-name="ce2" office:value-type="string" calcext:value-type="string">
            <text:p>Virtual Conference</text:p>
          </table:table-cell>
          <table:table-cell table:style-name="ce2" office:value-type="string" calcext:value-type="string">
            <text:p>Aug 27, 2026 - Aug 28, 2026</text:p>
          </table:table-cell>
          <table:table-cell table:style-name="ce4" office:value-type="string" calcext:value-type="string">
            <text:p><text:a xlink:href="https://vcoi2026.org/index" xlink:type="simple">https://vcoi2026.org/index</text:a></text:p>
          </table:table-cell>
          <table:table-cell table:style-name="ce2" office:value-type="string" calcext:value-type="string">
            <text:p>4 th International Conference on Vision and Computational Intelligence (VCOI 2026) August 27 ~ 28, 2026, Virtual Conference Scope &amp; Topics The 4 th International Conference on Vision and Computational Intelligence (VCOI 2026) will provide an excellent international forum for sharing knowledge and results in theory, methodology and applications of Computer Science, Computer Engineering and Information Technology Trends. The aim of the conference is to provide a platform to the researchers and practitioners from both academia as well as industry to meet and share cutting-edge development in the fields. Authors are solicited to contribute to the conference by submitting articles that illustrate research results, projects, surveying works and industrial experiences that describe significant advances in the areas of vision computing &amp; Computational Intelligence. Topics of interest include, but are not limited to, the following Vision 3D Modeling, Visualization, Shape, Structure Action Recognition Active and robot vision Analysis &amp; Vision Augmented Reality (AR) and Virtual Reality (VR) Biomedical , Biomedical Imaging and Applications Biometrics, Face and Gesture Biometrics Camera networks and vision Cognitive and Biologically-inspired Vision Compiler Design Computational photography, photometry Computer Vision and Image Processing Applications Deep Learning in Vision Document Image Processing Ethics in Computer Vision Face and Gesture Recognition Fuzzy and Neural Techniques in Vision Human-Computer Interaction (HCI) and Vision Image Feature Extraction Invariance in Pattern Recognition Knowledge-Based Recognition Machine Learning Technologies for vision Medical Image Analysis Motion and Tracking Multi-modal Vision Neuro-Inspired Vision Models Recognition: Detection, Categorization, Indexing and Matching Robust Vision under Adverse Conditions Segmentation, Grouping and Shape Representation Statistical Pattern Recognition Structural and Syntactic Pattern Recognition Video Analysis and Event Recognition, Monitoring Vision for Autonomous Vehicles Vision for Smart Cities Visual SLAM (Simultaneous Localization and Mapping) Visual Special Effects Web Graphics Computational Intelligence AI for Climate Change and Sustainability CI for Internet of Things (IoT) CI for Multimedia, Signal, Image Processing &amp; Pattern Recognition CI for Wireless Systems CI in Bioinformatics CI in Control and Automation, Decision CI in Cyber Security CI in Data Mining CI in E-governance CI in Healthcare, E-health &amp; Health Informatics CI in Image and Pattern Recognition CI in Internet of Everything CI in Remote Sensing Computational Intelligence in Big Data Deep Learning Evolutionary Algorithms and Genetic Programming Explainable AI (XAI) in Computational Intelligence Federated Learning Intelligent Agents Meta-Learning (Learning to Learn) Neuro-Inspired Computational Intelligence Quantum Computing in Computational Intelligence Robotics and control applications Self-organizing and Self-adaptive Systems Swarm Intelligence Transfer Learning in Computational Intelligence Uncertainty Modeling and Decision Making Paper Submission Authors are invited to submit papers through the conference Submission System by July 11, 2026 . Submissions must be original and should not have been published previously or be under consideration for publication while being evaluated for this conference. The proceedings of the conference will be published by The proceedings of the conference will be published by International Journal of Computer Science, Engineering and Information Technology (IJCSEIT) (Confirmed). Selected papers from VCOI 2026 , after further revisions, will be published in the special issue of the following journals. International Journal of Ambient Systems and Applications (IJASA) International Journal of Computer Graphics &amp; Animation (IJCGA) Advances in Vision Computing: An International Journal (AVC) Important Dates Submission Deadline : July 11, 2026 Authors Notification : July 27, 2026 Final Manuscript Due : August 03, 2026 Co - Located Event 4 th International Conference on Blockchain and Applications (BLKCA 2026) 4 th International Conference on Machine Learning and IoT (MLIoT 2026) 4 th International Conference on Computer Science, Engineering and Information Technology Trends (CGASP 2026) 4 th International Conference on Computer Science, Engineering and Information Technology Trends (CSEITT 2026) 4 th International Conferences in Clinical Research and Pharmaceutical Sciences (CRPS 2026) 7 th International Conference on Applied Control, Electrical and Electronics Engineering (CEEE 2026) 7 th International Conference on Electrical Engineering (ELEG 2026) 7 th International Conference on Mechanical Engineering (MECN 2026) ***** The invited talk proposals can be submitted to vcoi@vcoi2026.org</text:p>
          </table:table-cell>
          <table:table-cell table:number-columns-repeated="1013"/>
        </table:table-row>
        <table:table-row table:style-name="ro1">
          <table:table-cell table:style-name="ce2" office:value-type="string" calcext:value-type="string">
            <text:p>SPTM 2026</text:p>
          </table:table-cell>
          <table:table-cell table:style-name="ce2" office:value-type="string" calcext:value-type="string">
            <text:p>14th International Conference of Security, Privacy and Trust Management</text:p>
          </table:table-cell>
          <table:table-cell table:style-name="ce2" office:value-type="float" office:value="80" calcext:value-type="float">
            <text:p>80</text:p>
          </table:table-cell>
          <table:table-cell table:style-name="ce2" office:value-type="float" office:value="30" calcext:value-type="float">
            <text:p>30</text:p>
          </table:table-cell>
          <table:table-cell table:style-name="ce3" office:value-type="date" office:date-value="2026-07-11" calcext:value-type="date">
            <text:p>2026-07-11</text:p>
          </table:table-cell>
          <table:table-cell table:style-name="ce3" office:value-type="date" office:date-value="2026-07-18" calcext:value-type="date">
            <text:p>2026-07-18</text:p>
          </table:table-cell>
          <table:table-cell table:style-name="ce3" office:value-type="date" office:date-value="2026-07-22" calcext:value-type="date">
            <text:p>2026-07-22</text:p>
          </table:table-cell>
          <table:table-cell table:style-name="ce2" office:value-type="string" calcext:value-type="string">
            <text:p>Toronto, Canada</text:p>
          </table:table-cell>
          <table:table-cell table:style-name="ce2" office:value-type="string" calcext:value-type="string">
            <text:p>Jul 25, 2026 - Jul 26, 2026</text:p>
          </table:table-cell>
          <table:table-cell table:style-name="ce4" office:value-type="string" calcext:value-type="string">
            <text:p><text:a xlink:href="https://sptm2026.org/" xlink:type="simple">https://sptm2026.org/</text:a></text:p>
          </table:table-cell>
          <table:table-cell table:style-name="ce2" office:value-type="string" calcext:value-type="string">
            <text:p>14 th International Conference of Security, Privacy and Trust Management (SPTM 2026) July 25 ~ 26, 2026, Toronto, Canada Scope &amp; Topics 14 th International Conference of Security, Privacy and Trust Management (SPTM 2026) provides a premier global forum for researchers, practitioners, and industry experts to present the latest innovations, research findings, and emerging trends in security, privacy, and trust technologies. As digital ecosystems continue to expand across cloud platforms, mobile environments, distributed systems, and AI driven infrastructures, the need for robust trust frameworks and secure computing models has never been greater. SPTM 2026 aims to bring together leading scholars and professionals to exchange ideas, discuss challenges, and explore cutting edge solutions that advance the state of the art in trust management, privacy engineering, cybersecurity, and secure system design. The conference encourages interdisciplinary contributions that bridge theory and practice, highlight real world applications, and address the evolving landscape of modern security threats and trust requirements. Authors are invited to submit high quality research papers describing original results, innovative projects, survey studies, and industrial experiences that demonstrate significant advances in security, privacy, and trust management. Submissions may address theoretical foundations, practical implementations, experimental evaluations, or emerging applications. Topics of interest include, but are not limited to, the following Trust Management, Identity and Access Control Trust Models, Trust Negotiation and Trust Reasoning Decentralized Trust Management and Zero Trust Architectures Identity and Access Management (IAM), Authentication and Authorization Continuous Authentication and Identity Threat Detection Trust in Cloud Native, Multi Cloud and Distributed Systems Trust and Reputation Systems for Online Platforms Trust in Microservices, APIs and Service Oriented Architectures Trust Management for IoT, Edge, Mobile and Sensor Networks Cross Platform Digital Identity Trust and Verifiable Credentials Privacy Engineering and Data Protection Privacy Preserving Machine Learning (PPML) Differential Privacy, Secure Aggregation and Federated Learning Privacy Enhancing Technologies (PETs) Data Anonymization, De identification and Synthetic Data Privacy Privacy in Social Platforms, Digital Ecosystems and Online Communities Privacy by Design, Governance and Compliance Automation Geo Distributed Data Privacy and Cross Border Data Trust Privacy in Cloud, Edge and Distributed Intelligence Systems Security Engineering and System Protection Secure Software Development Lifecycle (SSDLC) Vulnerability Discovery, Exploit Mitigation and Secure Coding Software Supply Chain Security and SBOM Management Secure DevOps (DevSecOps) and Continuous Security Testing Security of Cloud, Serverless, Container and Kubernetes Environments Security for IoT, CPS, Autonomous Systems and Robotics Hardware Security, TEEs, Side Channel Attacks and Defenses Chaos Engineering, Resilience Testing and Self Healing Systems Autonomous Cyber Defense Agents Cryptography, Blockchain and Distributed Trust Applied Cryptography and Cryptographic Protocols Blockchain Security, Smart Contract Verification and Web3 Trust Models Distributed Ledger Technologies (DLT) and Consensus Security Zero Knowledge Proofs, MPC and Homomorphic Encryption Decentralized Identity (DID) and Verifiable Credentials Post Quantum Cryptography and Quantum Resistant Trust Frameworks Quantum Networks, QKD and Quantum Trust Models AI, Machine Learning and Trustworthy Intelligence Adversarial Machine Learning and Model Robustness AI Safety, Alignment and Secure AI Pipelines Trustworthy AI, Explainability and Accountability Detection of Deepfakes, Synthetic Media and AI Generated Threats AI Driven Threat Detection, Security Analytics and Anomaly Detection Trust Management in Multi Agent and Autonomous AI Systems Secure LLM Deployment, Jailbreak Prevention and Policy Enforcement AI Generated Content Provenance, Watermarking and Authenticity Verification Trust in Multimodal Foundation Models (Vision LLMs, Audio LLMs, Video LLMs) Network, Cloud and Distributed Security Network Security, Intrusion Detection and Traffic Analysis Cloud Security, Virtualization Security and Multi Cloud Trust Secure Edge Computing, Fog Computing and Distributed Intelligence Secure Communication Protocols and End to End Encryption 5G/6G Security, Mobile Network Trust and Spectrum Security DNS Security, Routing Security and Internet Infrastructure Trust Secure Federated Knowledge Graphs and Distributed Trust Reasoning Human Centered Security, Usability and Social Trust Human Factors in Security and Privacy Social Engineering, Phishing and Behavioral Security Trust in Social Networks, Online Communities and Digital Platforms Usable Security and Privacy Interfaces Misinformation, Disinformation and Trust in Digital Media Psychological Models of Trust and Risk Perception Human Machine Trust Calibration and Cognitive Security Policy, Governance, Ethics and Regulation Security and Privacy Policy Management Governance, Risk and Compliance (GRC) Ethical AI, Responsible Data Use and Algorithmic Governance Legal, Regulatory and Societal Aspects of Security and Privacy Digital Trust Frameworks and Global Trust Standards Cyber Diplomacy and International Trust Agreements Emerging Domains and Future Directions Security and Trust in Metaverse, AR/VR and Immersive Environments Trust in Digital Twins, Simulation Driven Systems and Cyber Physical Twins Security for Autonomous Vehicles, Drones and Smart Mobility Space Systems Security, Satellite Swarm Trust and Orbital Mesh Networks Bio Cybersecurity and Trust in Genomic Data Ecosystems Security for AI Operated Infrastructure (Power Grids, ICS, Smart Cities) Synthetic Data Security, Leakage Risks and Trust Evaluation Trust in AI Driven Autonomous Infrastructure and Cloud Orchestration Paper Submission Authors are invited to submit papers through the conference Submission System by July 11, 2026 (Final Call) . Submissions must be original and should not have been published previously or be under consideration for publication while being evaluated for this conference. The proceedings of the conference will be published by Computer Science Conference Proceedings in Computer Science &amp; Information Technology (CS &amp; IT) series (Confirmed). Selected papers from SPTM 2026 , after further revisions, will be published in the special issue of the following journals. International Journal of Network Security &amp; Its Applications (IJNSA) - ERA Indexed International Journal on Cryptography and Information Security (IJCIS) International Journal of Security, Privacy and Trust Management (IJSPTM) Information Technology in Industry (ITII) Important Dates Submission Deadline : July 11, 2026 (Final Call) Authors Notification : July 18, 2026 Final Manuscript Due : July 22, 2026 Co - Located Event 12 th International Conference on Image Processing and Pattern Recognition (IPPR 2026) 12 th International Conference on Software Engineering (SOENG 2026) 13 th International Conference on Computer Science and Information Technology (CSIT 2026) 15 th International conference on Parallel, Distributed Computing and Applications (IPDCA 2026) 12 th International Conference on Data Mining (DaMi 2026) 12 th International Conference on Artificial Intelligence and Soft Computing (AIS 2026) 7 th International Conference on Natural Language Processing &amp; Applications (NLPA 2026) 7 th International Conference on Advanced Machine Learning (AMLA 2026) 7 th International Conference on Big Data and Applications (BDAP 2026) ***** The invited talk proposals can be submitted to sptm@sptm2026.org</text:p>
          </table:table-cell>
          <table:table-cell table:number-columns-repeated="1013"/>
        </table:table-row>
        <table:table-row table:style-name="ro1">
          <table:table-cell table:style-name="ce2" office:value-type="string" calcext:value-type="string">
            <text:p>MLIoT 2026</text:p>
          </table:table-cell>
          <table:table-cell table:style-name="ce2" office:value-type="string" calcext:value-type="string">
            <text:p>4th International Conference on Machine Learning and IoT</text:p>
          </table:table-cell>
          <table:table-cell table:style-name="ce2" office:value-type="float" office:value="75" calcext:value-type="float">
            <text:p>75</text:p>
          </table:table-cell>
          <table:table-cell table:style-name="ce2" office:value-type="float" office:value="28" calcext:value-type="float">
            <text:p>28</text:p>
          </table:table-cell>
          <table:table-cell table:style-name="ce3" office:value-type="date" office:date-value="2026-07-11" calcext:value-type="date">
            <text:p>2026-07-11</text:p>
          </table:table-cell>
          <table:table-cell table:style-name="ce3" office:value-type="date" office:date-value="2026-07-27" calcext:value-type="date">
            <text:p>2026-07-27</text:p>
          </table:table-cell>
          <table:table-cell table:style-name="ce3" office:value-type="date" office:date-value="2026-08-03" calcext:value-type="date">
            <text:p>2026-08-03</text:p>
          </table:table-cell>
          <table:table-cell table:style-name="ce2" office:value-type="string" calcext:value-type="string">
            <text:p>Virtual Conference</text:p>
          </table:table-cell>
          <table:table-cell table:style-name="ce2" office:value-type="string" calcext:value-type="string">
            <text:p>Aug 27, 2026 - Aug 28, 2026</text:p>
          </table:table-cell>
          <table:table-cell table:style-name="ce4" office:value-type="string" calcext:value-type="string">
            <text:p><text:a xlink:href="https://mliot2026.org/index" xlink:type="simple">https://mliot2026.org/index</text:a></text:p>
          </table:table-cell>
          <table:table-cell table:style-name="ce2" office:value-type="string" calcext:value-type="string">
            <text:p>4 th International Conference on Machine Learning and IoT (MLIoT 2026) August 27 ~ 28, 2026, Virtual Conference Scope &amp; Topics The 4 th International Conference on Machine Learning and IoT (MLIoT 2026) will provide an excellent international forum for sharing knowledge and results in theory, methodology and applications of Machine Learning and Internet of Things (IoT). Authors are solicited to contribute to the conference by submitting articles that illustrate research results, projects, surveying works and industrial experiences that describe significant advances in the following areas, but are not limited to: Topics of interest include, but are not limited to, the following Artificial Intelligence Bayesian Network Computer Vision Connectivity and Networking Data Mining and Machine Learning Tools Deep Learning Electronics and Signal processing for IoT Experimental Results and Deployment Scenarios Intelligent System Architecture IoT IoT &amp; Artificial Intelligence IoT Applications and Services IoT Big Data IoT-enabled Innovation and Entrepreneurship Learning in Knowledge-intensive Systems Learning Methods and Analysis Learning Problems Machine Learning and Analytics Machine learning &amp; IoT Machine Learning Algorithms Neural Networks Predictive Learning Recent Trends and Developments of AI &amp; IoT Reinforcement Learning Robotics, loT and Embedded System Security and Privacy for IoT Supervised Machine Learning Unsupervised Machine Learning Paper Submission Authors are invited to submit papers through the conference Submission System by July 11, 2026 . Submissions must be original and should not have been published previously or be under consideration for publication while being evaluated for this conference. The proceedings of the conference will be published by The proceedings of the conference will be published by International Journal on Cybernetics &amp; Informatics (IJCI) (Confirmed). Selected papers from MLIOT 2026 , after further revisions, will be published in the special issue of the following journals. International Journal of Game Theory and Technology ( IJGTT) International Journal of Ambient Systems and Applications (IJASA) International Journal of Ubiquitous Computing (IJU) Machine Learning and Applications: An International Journal (MLAIJ) International Journal of Artificial Intelligence &amp; Applications (IJAIA) International Journal on Soft Computing ( IJSC ) International Journal on Soft Computing, Artificial Intelligence and Applications (IJSCAI) Advances in Vision Computing: An International Journal (AVC) Important Dates Submission Deadline : July 11, 2026 Authors Notification : July 27, 2026 Final Manuscript Due : August 03, 2026 Co - Located Event 4 th International Conference on Blockchain and Applications (BLKCA 2026) 4 th International Conference on Vision and Computational Intelligence (VCOI 2026) 4 th International Conference on Computer Science, Engineering and Information Technology Trends (CGASP 2026) 4 th International Conference on Computer Science, Engineering and Information Technology Trends (CSEITT 2026) 4 th International Conferences in Clinical Research and Pharmaceutical Sciences (CRPS 2026) 7 th International Conference on Applied Control, Electrical and Electronics Engineering (CEEE 2026) 7 th International Conference on Electrical Engineering (ELEG 2026) 7 th International Conference on Mechanical Engineering (MECN 2026) ***** The invited talk proposals can be submitted to mliot@mliot2026.org</text:p>
          </table:table-cell>
          <table:table-cell table:number-columns-repeated="1013"/>
        </table:table-row>
        <table:table-row table:style-name="ro1">
          <table:table-cell table:style-name="ce2" office:value-type="string" calcext:value-type="string">
            <text:p>IPPR 2026</text:p>
          </table:table-cell>
          <table:table-cell table:style-name="ce2" office:value-type="string" calcext:value-type="string">
            <text:p>12th International Conference on Image Processing and Pattern Recognition</text:p>
          </table:table-cell>
          <table:table-cell table:style-name="ce2" office:value-type="float" office:value="30" calcext:value-type="float">
            <text:p>30</text:p>
          </table:table-cell>
          <table:table-cell table:style-name="ce2" office:value-type="float" office:value="25" calcext:value-type="float">
            <text:p>25</text:p>
          </table:table-cell>
          <table:table-cell table:style-name="ce3" office:value-type="date" office:date-value="2026-07-11" calcext:value-type="date">
            <text:p>2026-07-11</text:p>
          </table:table-cell>
          <table:table-cell table:style-name="ce3" office:value-type="date" office:date-value="2026-07-18" calcext:value-type="date">
            <text:p>2026-07-18</text:p>
          </table:table-cell>
          <table:table-cell table:style-name="ce3" office:value-type="date" office:date-value="2026-07-22" calcext:value-type="date">
            <text:p>2026-07-22</text:p>
          </table:table-cell>
          <table:table-cell table:style-name="ce2" office:value-type="string" calcext:value-type="string">
            <text:p>Toronto, Canada</text:p>
          </table:table-cell>
          <table:table-cell table:style-name="ce2" office:value-type="string" calcext:value-type="string">
            <text:p>Jul 25, 2026 - Jul 26, 2026</text:p>
          </table:table-cell>
          <table:table-cell table:style-name="ce4" office:value-type="string" calcext:value-type="string">
            <text:p><text:a xlink:href="https://csit2026.org/ippr/index" xlink:type="simple">https://csit2026.org/ippr/index</text:a></text:p>
          </table:table-cell>
          <table:table-cell table:style-name="ce2" office:value-type="string" calcext:value-type="string">
            <text:p>12 th International Conference on Image Processing and Pattern Recognition (IPPR 2026) July 25 ~ 26, 2026, Toronto, Canada Scope &amp; Topics 12 th International Conference on Image Processing and Pattern Recognition (IPPR 2026) is a forum for presenting new advances and research results in the fields of Digital Image Processing. The Workshop will bring together leading researchers, engineers and scientists in the domain of interest from around the world. The scope of the journal covers all theoretical and practical aspects of the Digital Image Processing &amp; Pattern Recognition, from basic research to development of application. The conference welcomes contributions that span the full spectrum of theoretical foundations, algorithmic innovations, and practical applications. From fundamental image processing techniques to next generation vision systems, from neural rendering and multimodal perception to medical imaging and scientific discovery, IPPR 2026 aims to highlight impactful research that pushes the boundaries of what intelligent visual systems can achieve. Authors are invited to submit high quality papers that present original research results, innovative projects, survey studies, and industrial experiences demonstrating significant advances in Image Processing, Computer Vision, Pattern Recognition, and related fields. Submissions may address theoretical contributions, methodological developments, experimental evaluations, or application driven research. Topics of interest include, but are not limited to, the following Image Processing and Computational Imaging Image Enhancement, Restoration and Super Resolution Image Coding, Compression and Learned Compression Image Segmentation, Matting and Contour Detection Denoising, Deblurring and Inverse Problems Computational Photography and Computational Optics HDR Imaging, Low Light Imaging and Reflectance Modeling PDE Based Image Processing and Variational Methods Physics Informed Imaging and Model Based Deep Learning AI Designed Optics, Coded Aperture Imaging and Diffractive Neural Networks Computer Vision and Scene Understanding Object Detection, Recognition and Categorization Semantic, Instance and Panoptic Segmentation 3D Vision, 3D Reconstruction and Neural Radiance Fields (NeRFs) 3D Gaussian Splatting and Real Time Neural Rendering Multi View Geometry, Stereo Vision and Structure from Motion SLAM, Visual Odometry and Scene Mapping Vision Transformers (ViT, Swin, Mamba Vision) Cognitive and Biologically Inspired Vision Neuro Symbolic Vision and Scene Reasoning Deep Learning, Generative Models and Foundation Models Deep Learning Architectures for Vision Generative AI (GANs, Diffusion Models, Autoregressive Models) Video Diffusion Models and Generative Video Synthesis Foundation Models for Vision and Multimodal Tasks Vision Language Models (CLIP, BLIP, LLaVA, VLMs) Vision Language Action (VLA) Models and Embodied Perception Self Supervised, Weakly Supervised and Semi Supervised Learning Continual Learning, Lifelong Learning and Domain Adaptation Neural Rendering, Implicit Neural Fields and Neural Light Transport Pattern Recognition and Machine Intelligence Statistical Learning and Pattern Recognition Biometrics (Face, Iris, Gait, Fingerprint) Document Analysis, OCR and Handwriting Recognition Shape Analysis, Feature Extraction and Representation Learning Pattern Recognition in New Modalities (Thermal, Hyperspectral, Event Cameras) Knowledge Driven Vision and Semantic Reasoning Medical, Biological and Scientific Imaging Medical Image Analysis (MRI, CT, Ultrasound, PET, X ray) Medical Foundation Models and Cross Modality Imaging Computational Pathology and Microscopy Foundation Models Radiomics, Image Guided Diagnosis and Surgical Vision Bioinformatics Driven Imaging and Genomic Imaging Vision for Materials Science, Physics and Scientific Discovery Signal Processing, Audio and Multidimensional Data Audio, Speech and Acoustic Signal Processing Time Frequency and Time Scale Analysis Multidimensional Signal Processing and Tensor Methods Nonlinear Signals and Systems Sensor Array Processing and Multi Channel Signal Processing Distributed Source Coding and Signal Reconstruction Learned Signal Processing and Neural DSP Video Processing, Analysis and Understanding Video Compression, Streaming and Transmission Video Super Resolution, Frame Interpolation and Restoration Video Object Tracking, Motion Analysis and Event Recognition Video Surveillance, Activity Recognition and Behavior Understanding Video Language Models and Video Text Understanding Video Agents and Long Horizon Temporal Reasoning 4D Vision, Dynamic Scene Reconstruction and Motion Fields Remote Sensing, Earth Observation and Geospatial Vision Satellite and Aerial Image Processing Hyperspectral and Multispectral Imaging SAR, Radar and Sonar Signal Processing Geospatial Vision, Mapping and Positioning Foundation Models for Remote Sensing Environmental Monitoring and Climate Driven Vision Applications Emerging Modalities and Advanced Sensing Event Based Vision and Neuromorphic Imaging Spiking Neural Networks for Vision Light Field Imaging, Plenoptic Cameras and Holography Thermal, Infrared and Hyperspectral Imaging LiDAR, Depth Sensors and Range Imaging Multimodal Sensor Fusion Security, Privacy and Ethical Vision Systems Watermarking, Steganography and Digital Forensics Adversarial Attacks, Robustness and Secure Vision Models Deepfake Detection and Synthetic Media Forensics Synthetic Identity Detection and Content Provenance Privacy Preserving Vision and Federated Learning Bias, Fairness and Responsible Vision Systems Vision Applications and Industry Use Cases Autonomous Driving, Robotics and Intelligent Transportation BEV Perception, Occupancy Networks and Trajectory Prediction AR/VR/MR, Metaverse and Immersive Vision Systems Smart Cities, IoT Vision and Edge AI Vision Systems Industrial Inspection, Manufacturing and Quality Control Retail, Agriculture, Sports Analytics and Cultural Heritage Vision for Digital Twins and Simulation Driven Environments Hardware, Systems and Real Time Vision DSP Implementation and Embedded Vision Systems Hardware Acceleration (GPU, FPGA, ASIC, NPU) Real Time Vision Systems and Low Latency Processing Energy Efficient Vision and TinyML for Imaging Edge Computing for Vision and Distributed Vision Systems Vision Centric Robotics Systems Paper Submission Authors are invited to submit papers through the conference Submission System by July 11, 2026 (Final Call) . Submissions must be original and should not have been published previously or be under consideration for publication while being evaluated for this conference. The proceedings of the conference will be published by The proceedings of the conference will be published by Computer Science Conference Proceedings in Computer Science &amp; Information Technology (CS &amp; IT) series (Confirmed). Selected papers from IPPR 2026 , after further revisions, will be published in the special issue of the following journals. Signal &amp; Image Processing : An International Journal (SIPIJ) International Journal of VLSI design &amp; Communication Systems (VLSICS) International Journal of Embedded Systems and Applications (IJESA) International Journal on Organic Electronics (IJOE) Information Technology in Industry (ITII) Important Dates Submission Deadline : July 11, 2026 (Final Call) Authors Notification : July 18, 2026 Final Manuscript Due : July 22, 2026 Co - Located Event 13 th International Conference on Computer Science and Information Technology (CSIT 2026) 14 th International Conference of Security, Privacy and Trust Management (SPTM 2026) 12 th International Conference on Data Mining (DaMi 2026) 15 th International conference on Parallel, Distributed Computing and Applications (IPDCA 2026) 12 th International Conference on Software Engineering (SOENG 2026) 12 th International Conference on Artificial Intelligence and Soft Computing (AIS 2026) 7 th International Conference on Natural Language Processing &amp; Applications (NLPA 2026) 7 th International Conference on Advanced Machine Learning (AMLA 2026) 7 th International Conference on Big Data and Applications (BDAP 2026) ***** The invited talk proposals can be submitted to ippr@csit2026.org</text:p>
          </table:table-cell>
          <table:table-cell table:number-columns-repeated="1013"/>
        </table:table-row>
        <table:table-row table:style-name="ro1">
          <table:table-cell table:style-name="ce2" office:value-type="string" calcext:value-type="string">
            <text:p>CGASP 2026</text:p>
          </table:table-cell>
          <table:table-cell table:style-name="ce2" office:value-type="string" calcext:value-type="string">
            <text:p>4th International Conference on Computer Graphics, Animation &amp; Signal Processing</text:p>
          </table:table-cell>
          <table:table-cell table:style-name="ce2" office:value-type="float" office:value="28" calcext:value-type="float">
            <text:p>28</text:p>
          </table:table-cell>
          <table:table-cell table:style-name="ce2" office:value-type="float" office:value="30" calcext:value-type="float">
            <text:p>30</text:p>
          </table:table-cell>
          <table:table-cell table:style-name="ce3" office:value-type="date" office:date-value="2026-07-11" calcext:value-type="date">
            <text:p>2026-07-11</text:p>
          </table:table-cell>
          <table:table-cell table:style-name="ce3" office:value-type="date" office:date-value="2026-07-27" calcext:value-type="date">
            <text:p>2026-07-27</text:p>
          </table:table-cell>
          <table:table-cell table:style-name="ce3" office:value-type="date" office:date-value="2026-08-03" calcext:value-type="date">
            <text:p>2026-08-03</text:p>
          </table:table-cell>
          <table:table-cell table:style-name="ce2" office:value-type="string" calcext:value-type="string">
            <text:p>Virtual Conference</text:p>
          </table:table-cell>
          <table:table-cell table:style-name="ce2" office:value-type="string" calcext:value-type="string">
            <text:p>Aug 27, 2026 - Aug 28, 2026</text:p>
          </table:table-cell>
          <table:table-cell table:style-name="ce4" office:value-type="string" calcext:value-type="string">
            <text:p><text:a xlink:href="https://cgasp2026.org/index" xlink:type="simple">https://cgasp2026.org/index</text:a></text:p>
          </table:table-cell>
          <table:table-cell table:style-name="ce2" office:value-type="string" calcext:value-type="string">
            <text:p>4 th International Conference on Computer Graphics, Animation &amp; Signal Processing (CGASP 2026) August 27 ~ 28, 2026, Virtual Conference Scope &amp; Topics The 4 th International Conference on Computer Graphics, Animation &amp; Signal Processing (CGASP 2026) Computer graphics and animation have has become a key technology in determining future research and development activities in many academic and industrial branches. The aim of the conference is to provide a platform to the researchers and practitioners from both academia as well as industry to meet and share cutting-edge development in the fields. The conference focuses on specific challenges in Computer Graphics, Animation and Signal, Image Processing. Authors are solicited to contribute to the conference by submitting articles that illustrate research results, projects, surveying works and industrial experiences that describe significant advances in the following areas, but are not limited to Topics of interest include, but are not limited to, the following Computer Graphics AI techniques, Computer Aided Design Compression for Graphics, Vision, Stereoscopy, Holography for Computer Graphics, 3D Displays &amp; 3D TV Mobile &amp; WEB Graphics, Applications Computer Art, 3-D object Extraction Computer GraphicsModeling, Rendering Graphical models, Model Validation HCI/ User interfaces Animation Algorithms &amp; Techniques Behavioral , Human Figure, Character Animation Computer Animation, Systems, Languages Mobile Control Kinematics Plausible Motion Simulation Robotics Visualization Computer Games Graph and Network Visualization Graphics User Interface Information Visualization Media immersion Real-Time Simulation Visualization Software Visualization, Virtual Reality and Augmented Reality Signal &amp; Image Processing Applied Digital Signal Processing Coding and Transmission Computer Graphics and Image Processing Computer Vision and Visualization Digital Image Processing and Application Digital Signal Processing in Communications Emerging Technologies in Digital Signal Processing Information Forensics and Security Machine Learning for Signal Processing Multimedia Signal Processing Pattern recognition Paper Submission Authors are invited to submit papers through the conference Submission System by July 11, 2026 . Submissions must be original and should not have been published previously or be under consideration for publication while being evaluated for this conference. The proceedings of the conference will be published by The proceedings of the conference will be published by International Journal on Cybernetics &amp; Informatics (IJCI) (Confirmed). Selected papers from CGASP 2026 , after further revisions, will be published in the special issue of the following journals. The International Journal of Multimedia &amp; Its Applications (IJMA) International Journal of Computer Graphics &amp; Animation (IJCGA) Informatics Engineering, an International Journal (IEIJ) International Journal of Game Theory and Technology (IJGTT) Advances in Vision Computing: An International Journal (AVC) Important Dates Submission Deadline : July 11, 2026 Authors Notification : July 27, 2026 Final Manuscript Due : August 03, 2026 Co - Located Event 4 th International Conference on Blockchain and Applications (BLKCA 2026) 4 th International Conference on Vision and Computational Intelligence (VCOI 2026) 4 th International Conference on Machine Learning and IoT (MLIoT 2026) 4 th International Conference on Computer Science, Engineering and Information Technology Trends (CSEITT 2026) 4 th International Conferences in Clinical Research and Pharmaceutical Sciences (CRPS 2026) 7 th International Conference on Applied Control, Electrical and Electronics Engineering (CEEE 2026) 7 th International Conference on Electrical Engineering (ELEG 2026) 7 th International Conference on Mechanical Engineering (MECN 2026) ***** The invited talk proposals can be submitted to cgasp@cgasp2026.org</text:p>
          </table:table-cell>
          <table:table-cell table:number-columns-repeated="1013"/>
        </table:table-row>
        <table:table-row table:style-name="ro1">
          <table:table-cell table:style-name="ce2" office:value-type="string" calcext:value-type="string">
            <text:p>NLPA 2026</text:p>
          </table:table-cell>
          <table:table-cell table:style-name="ce2" office:value-type="string" calcext:value-type="string">
            <text:p>7th International Conference on Natural Language Processing &amp; Applications</text:p>
          </table:table-cell>
          <table:table-cell table:style-name="ce2" office:value-type="float" office:value="80" calcext:value-type="float">
            <text:p>80</text:p>
          </table:table-cell>
          <table:table-cell table:style-name="ce2" office:value-type="float" office:value="30" calcext:value-type="float">
            <text:p>30</text:p>
          </table:table-cell>
          <table:table-cell table:style-name="ce3" office:value-type="date" office:date-value="2026-07-11" calcext:value-type="date">
            <text:p>2026-07-11</text:p>
          </table:table-cell>
          <table:table-cell table:style-name="ce3" office:value-type="date" office:date-value="2026-07-18" calcext:value-type="date">
            <text:p>2026-07-18</text:p>
          </table:table-cell>
          <table:table-cell table:style-name="ce3" office:value-type="date" office:date-value="2026-07-22" calcext:value-type="date">
            <text:p>2026-07-22</text:p>
          </table:table-cell>
          <table:table-cell table:style-name="ce2" office:value-type="string" calcext:value-type="string">
            <text:p>Toronto, Canada</text:p>
          </table:table-cell>
          <table:table-cell table:style-name="ce2" office:value-type="string" calcext:value-type="string">
            <text:p>Jul 25, 2026 - Jul 26, 2026</text:p>
          </table:table-cell>
          <table:table-cell table:style-name="ce4" office:value-type="string" calcext:value-type="string">
            <text:p><text:a xlink:href="https://csit2026.org/nlpa/index" xlink:type="simple">https://csit2026.org/nlpa/index</text:a></text:p>
          </table:table-cell>
          <table:table-cell table:style-name="ce2" office:value-type="string" calcext:value-type="string">
            <text:p>7 th International Conference on Natural Language Processing and Applications (NLPA 2026) July 25 ~ 26, 2026, Toronto, Canada Hybrid -- Registered authors can present their work online or face to face. Scope &amp; Topics 7 th International Conference on Natural Language Processing and Applications (NLPA 2026) will provide an excellent international forum for sharing knowledge, exchanging ideas, and presenting the latest advances in the theory, methodology, and applications of Natural Language Processing (NLP). As language technologies continue to evolve through breakthroughs in large language models, multimodal systems, conversational AI, and knowledge driven applications, NLPA 2026 aims to highlight both foundational research and cutting edge innovations that are shaping the future of human language understanding. The conference seeks significant contributions across all major areas of Natural Language Processing, spanning theoretical frameworks, computational models, linguistic analysis, machine learning approaches, and real world applications. NLPA 2026 brings together researchers, practitioners, and industry experts from around the world to foster collaboration, stimulate discussion, and explore emerging trends that are redefining the capabilities of modern language technologies. Contributions describing novel ideas, emerging directions, and transformative applications are especially encouraged. Papers that bridge NLP with other areas of Computer Science, Engineering, and Applied AI are also welcome. Authors are solicited to contribute to the conference by submitting articles that illustrate research results, projects, surveying works, and industrial experiences that describe significant advances in the areas of Natural Language Processing, Artificial Intelligence, Machine Learning, Speech Technologies, Multimodal Systems, and related applications. Topics of interest include, but are not limited to, the following Linguistics, Syntax and Semantics Phonology, Morphology and Lexical Semantics Syntax, Parsing and Grammatical Formalisms Semantic Processing, Compositional Semantics and Pragmatics Discourse Analysis, Coreference and Narrative Understanding Linguistic Resources, Corpora and Annotation Frameworks Ontologies, Knowledge Graphs and Semantic Representation Large Language Models (LLMs) and Foundation Models Pretraining, Fine Tuning and Instruction Tuning LLM Reasoning, Planning and Tool Use Retrieval Augmented Generation (RAG) and Memory Augmented LLMs Long Context Models, Compression and Efficient Attention LLM Safety, Alignment, Red Teaming and Hallucination Mitigation LLM Evaluation, Benchmarking and Robustness Multilingual, Cross Lingual and Low Resource LLMs Machine Learning for NLP Neural, Statistical and Hybrid NLP Methods Self Supervised and Representation Learning Continual, Lifelong and Online Learning for NLP Transfer Learning, Domain Adaptation and Cross Domain NLP Causal NLP and Causal Representation Learning Explainable, Trustworthy and Robust NLP Efficient NLP: Distillation, Quantization and Edge Deployment Natural Language Generation, Reasoning and Transformation Text Generation, Summarization and Paraphrasing Natural Language Inference, Entailment and Logical Reasoning Chain of Thought, Structured Reasoning and Symbolic Neural Integration Controlled Generation, Style Transfer and Text Simplification Data to Text, Knowledge to Text and Structured Generation Narrative Generation, Storytelling and Creative NLP Information Access, Retrieval and Knowledge Extraction Neural Information Retrieval (IR) and Dense Retrieval Hybrid Symbolic Neural Retrieval and Knowledge Augmented Models Information Extraction (IE), Event Extraction and Relation Extraction Text Mining, Topic Modeling and Document Understanding Question Answering (QA) and Reading Comprehension Fact Checking, Claim Verification and Misinformation Detection Document AI, OCR Free Models and Layout Aware Transformers Machine Translation and Multilingual NLP Neural Machine Translation (NMT) Cross Lingual Transfer and Multilingual Modeling Low Resource and Zero Shot Translation Speech to Text and Speech to Speech Translation Multimodal Translation Dialogue, Conversational AI and Language Agents Dialogue Systems and Conversational Agents Task Oriented Dialogue and Interactive Assistants Open Domain Chatbots and Safety in Dialogue Autonomous Language Agents and Multi Agent Communication Language Driven Tool Use and Planning Agents Emotion, Sentiment, Social NLP and Affective Dialogue Speech, Audio and Spoken Language Technologies Speech Recognition (ASR) and Speech Synthesis (TTS) Spoken Language Understanding (SLU) Prosody, Speaker Identification and Emotion in Speech Speech Language Multimodal Models End to End Speech to Speech Modeling Audio Language Grounding and Multimodal Speech Reasoning Multimodal NLP and Vision Language Models Vision Language Models (VLMs) and Multimodal Transformers Text Image, Text Video and Text Audio Understanding Multimodal Reasoning and Cross Modal Alignment Document AI, Layout Understanding and Multimodal OCR Multimodal Generation (Image/Video/Audio from Text) Embodied Language Models and Vision Language Action Systems Applied NLP and Domain Specific Language Technologies Biomedical NLP, Clinical Text Mining and Healthcare AI Legal NLP, Financial NLP and Scientific NLP NLP for Education, Assessment and Learning Analytics NLP for Social Media, Online Safety and Moderation NLP for E commerce, Personalization and Recommendation NLP for Scientific Discovery, Research Automation and Literature Mining NLP Infrastructure, Evaluation and Ethics NLP Datasets, Benchmarks and Evaluation Science Human in the Loop Evaluation and Cognitive Testing Data Quality, Bias Detection and Fairness in NLP Privacy Preserving NLP and Federated Language Models Efficient Training, Inference and Deployment Responsible NLP, Ethics, Governance and Societal Impact Paper Submission Authors are invited to submit papers through the conference Submission System by July 11, 2026 (Final Call) . Submissions must be original and should not have been published previously or be under consideration for publication while being evaluated for this conference. The proceedings of the conference will be published by Computer Science Conference Proceedings (H index 46) in Computer Science &amp; Information Technology (CS &amp; IT) series (Confirmed). Selected papers from NLPA 2026 , after further revisions, will be published in the special issue of the following journals. International Journal of Computer Science &amp; Information Technology (IJCSIT) - INSPEC Indexed International Journal on Information Theory (IJIT) International Journal on Natural Language Computing (IJNLC) International Journal of Web &amp; Semantic Technology (IJWesT) International Journal on Computational Science &amp; Applications (IJCSA) Information Technology in Industry (ITII) Important Dates Submission Deadline : July 11, 2026 (Final Call) Authors Notification : July 18, 2026 Final Manuscript Due : July 22, 2026 Co - Located Event 12 th International Conference on Image Processing and Pattern Recognition (IPPR 2026) 12 th International Conference on Software Engineering (SOENG 2026) 14 th International Conference of Security, Privacy and Trust Management (SPTM 2026) 15 th International conference on Parallel, Distributed Computing and Applications (IPDCA 2026) 12 th International Conference on Data Mining (DaMi 2026) 12 th International Conference on Artificial Intelligence and Soft Computing (AIS 2026) 13 th International Conference on Computer Science and Information Technology (CSIT 2026) 7 th International Conference on Advanced Machine Learning (AMLA 2026) 7 th International Conference on Big Data and Applications (BDAP 2026) ***** The invited talk proposals can be submitted to nlpa@csit2026.org</text:p>
          </table:table-cell>
          <table:table-cell table:number-columns-repeated="1013"/>
        </table:table-row>
        <table:table-row table:style-name="ro1">
          <table:table-cell table:style-name="ce2" office:value-type="string" calcext:value-type="string">
            <text:p>CHENG 2026</text:p>
          </table:table-cell>
          <table:table-cell table:style-name="ce2" office:value-type="string" calcext:value-type="string">
            <text:p>3rd International Conference on Advances in Chemistry &amp; Chemical Engineering</text:p>
          </table:table-cell>
          <table:table-cell table:style-name="ce2" office:value-type="float" office:value="58" calcext:value-type="float">
            <text:p>58</text:p>
          </table:table-cell>
          <table:table-cell table:style-name="ce2" office:value-type="float" office:value="30" calcext:value-type="float">
            <text:p>30</text:p>
          </table:table-cell>
          <table:table-cell table:style-name="ce3" office:value-type="date" office:date-value="2026-07-11" calcext:value-type="date">
            <text:p>2026-07-11</text:p>
          </table:table-cell>
          <table:table-cell table:style-name="ce3" office:value-type="date" office:date-value="2026-07-25" calcext:value-type="date">
            <text:p>2026-07-25</text:p>
          </table:table-cell>
          <table:table-cell table:style-name="ce3" office:value-type="date" office:date-value="2026-07-26" calcext:value-type="date">
            <text:p>2026-07-26</text:p>
          </table:table-cell>
          <table:table-cell table:style-name="ce2" office:value-type="string" calcext:value-type="string">
            <text:p>Virtual Conference</text:p>
          </table:table-cell>
          <table:table-cell table:style-name="ce2" office:value-type="string" calcext:value-type="string">
            <text:p>Jul 28, 2026 - Jul 29, 2026</text:p>
          </table:table-cell>
          <table:table-cell table:style-name="ce4" office:value-type="string" calcext:value-type="string">
            <text:p><text:a xlink:href="https://cheng2026.org/index" xlink:type="simple">https://cheng2026.org/index</text:a></text:p>
          </table:table-cell>
          <table:table-cell table:style-name="ce2" office:value-type="string" calcext:value-type="string">
            <text:p>3 rd International Conference on Advances in Chemistry &amp; Chemical Engineering (CHENG 2026) July 28 ~ 29, 2026, Virtual Conference Scope &amp; Topics 3 rd International Conference on Advances in Chemistry &amp; Chemical Engineering (CHENG 2026) serves as a premier global platform for researchers, scientists, engineers, and industry professionals to exchange knowledge, present cuttingedge research, and explore emerging innovations across the full spectrum of chemistry and chemical engineering. As these fields continue to evolve at an unprecedented pace, driven by breakthroughs in artificial intelligence, sustainable technologies, advanced materials, and nextgeneration manufacturing, CHENG 2026 aims to foster meaningful dialogue and collaboration that will shape the future of chemical sciences and engineering. The conference brings together a diverse community from academia, research institutions, and industry to engage in crossdisciplinary discussions, share transformative ideas, and build new partnerships Authors are invited to contribute original research articles, case studies, review papers, and industrial insights that highlight significant advances, emerging trends, and practical challenges in chemistry and chemical engineering. Submissions may address any of the conference themes, including—but not limited to—the following areas: Topics of interest include, but are not limited to, the following Analytical, Physical and Theoretical Chemistry Analytical Chemistry Advanced Spectroscopy andSpectromicroscopy Mass Spectrometry and Imaging MS Electrochemical Sensors and Biosensors Microfluidics, LabonChip and PointofCare Diagnostics Environmental and Forensic Analytical Chemistry Chemometrics, Machine Learning and DataDriven Analytics PFAS Detection and UltraTrace Contaminant Analysis Physical Chemistry and Chemical Physics Ultrafast Spectroscopy and Reaction Dynamics Soft Matter, Complex Fluids and Colloidal Systems Surface Science and Interface Chemistry Photochemistry andPhotophysics HighPressure, HighTemperature and ExtremeCondition Chemistry Mechanochemistry and SolventFree Reaction Dynamics Theoretical and Computational Chemistry Multiscale Modeling and Simulation Molecular Dynamics and Monte Carlo Methods AI/MLDriven Chemical Discovery and Predictive Modeling Neural Network Potentials and Reactive ML Models Computational Catalysis and Reaction Mechanisms Quantum Computing for Chemical Simulations Mechanochemistry and SolventFree Reaction Dynamics Organic, Inorganic and Biological Chemistry Organic Chemistry Synthetic Methodology and Reaction Innovation Asymmetric Synthesis and Catalysis Organometallic Chemistry Supramolecular Chemistry and Host–Guest Systems ElectroOrganic Chemistry andElectrosynthesis Green and Sustainable Organic Synthesis Inorganic, Bioinorganic and Biological Chemistry Bioinorganic Chemistry and Metalloproteins Chemical Biology and Chemical Genetics Enzyme Engineering andBiocatalysis Nucleic Acid Chemistry and Synthetic Biology Protein Engineering and Directed Evolution Metal–Organic Frameworks (MOFs) and Covalent Organic Frameworks (COFs) Catalysis, Reaction Engineering and Process Chemistry Catalysis Homogeneous, Heterogeneous and Enzyme Catalysis Photocatalysis, Electrocatalysis andPlasmonic Catalysis SingleAtom Catalysts (SACs) Operando and InSitu Catalyst Characterization CO₂ Conversion, Hydrogenation and Sustainable Catalysis Plasma Catalysis and NonThermal Activation Reaction Engineering Reaction Kinetics and Mechanistic Studies Microreactors, Flow Chemistry and Process Intensification HighThroughput Experimentation and Automation Autonomous Labs and ClosedLoop Reaction Optimization Industrial Process Chemistry and ScaleUp Environmental, Green and Sustainable Chemistry Green Chemistry and Circular Chemical Processes Circular Polymers and Chemical Upcycling of Plastics Environmental Remediation and Pollution Control Atmospheric and Aquatic Chemistry Microplastics andNanoplastics: Fate, Transport and Toxicology PFAS Degradation and Remediation Technologies WastetoValue Chemical Technologies LifeCycle Assessment (LCA) and Sustainable Process Design Climate Chemistry and Carbon Capture, Utilization and Storage (CCUS) Direct Air Capture (DAC) and Electrochemical CO₂ Capture Energy, Electrochemistry and Advanced Chemical Systems Energy Chemistry Batteries: Liion, Naion, Kion and Multivalent Systems SolidState Electrolytes and SolidState Batteries Fuel Cells, Electrolyzers and Hydrogen Technologies Solar Fuels, Artificial Photosynthesis and Photovoltaics Thermochemical and Electrochemical Energy Storage Organic Batteries and RedoxActive Polymers Electrochemistry Electrocatalysis andPhotoelectrochemistry Redox Flow Batteries Electrochemical CO₂ Reduction Electrochemical Sensors and Interfaces Advanced Chemical Systems Plasma Chemistry HighEnergy Materials Thermoelectrics and HeattoEnergy Materials Materials Chemistry, Polymers and Nanoscience Materials Chemistry Functional Materials and Smart Materials Hybrid Organic–Inorganic Materials Crystallography and SolidState Chemistry Biomaterials and BioInspired Materials Quantum Materials and Strongly Correlated Systems MXenes and Emerging 2D Materials Polymers and Soft Matter Polymer Synthesis and Characterization Sustainable Polymers and Biodegradable Plastics Polymer Composites and Nanocomposites Rheology and Polymer Physics SelfHealing and StimuliResponsive Polymers Nanoscience and Nanotechnology Nanomaterials: Synthesis, Properties and Applications Nanomedicine and Drug Delivery NanoCatalysis and NanoElectrochemistry Quantum Dots, Nanophotonics andPlasmonics Nanoparticle Toxicology and Environmental Nanoscience Chemical Engineering, Process Systems and Biotechnology Chemical Engineering Transport Phenomena and Multiphase Flow Colloids, Interfaces and Emulsions Separation Processes and Membrane Technologies Thermodynamics and Phase Behavior Advanced Membranes for Water, Gas and Ion Separation Process Systems Engineering (PSE) Process Modeling, Simulation and Optimization Digital Twins for Chemical Plants Process Control, Automation and Industry 4.0 Safety, Risk Assessment and Process Intensification Process Safety 4.0 and AIBased Hazard Prediction Biotechnology and BioSystems Engineering Bioprocess Engineering and Fermentation Metabolic Engineering and Synthetic Biology Bioreactors andBiomanufacturing Biomanufacturing 4.0 and Continuous Bioprocessing BioRefineries and BioBased Chemicals Tissue Engineering andBiomolecular Engineering CellFree Biomanufacturing Emerging and Interdisciplinary AI/ML for Chemical Discovery and Materials Design Autonomous Chemistry Labs and Robotic Experimentation Quantum Materials and Quantum Chemistry Applications Chemical Robotics, Automation and HighThroughput Labs Chemoinformatics and Big Data in Chemistry Space Chemistry andAstrochemistry Chemical Sensors for Health, Food and Security Chemical Safety, Regulation and Policy Education, Outreach and Diversity in Chemical Sciences Paper Submission Authors are invited to submit papers through the conference Submission System by July 11, 2026 (Final Call) . Submissions must be original and should not have been published previously or be under consideration for publication while being evaluated for this conference. The proceedings of the conference will be published by The proceedings of the conference will be published by International Journal of Advances in Chemistry (IJAC) series (Confirmed). Selected papers from CHENG 2026 , after further revisions, will be published in the special issue of the following journals. Advanced Nanoscience and Technology: An International Journal (ANTJ) Advances in Materials Science and Engineering: An International Journal (MSEJ) Advanced Energy: An International Journal (AEIJ) Bioscience &amp; Engineering: An International Journal (BIOEJ) Important Dates Submission Deadline : July 11, 2026 (Final Call) Authors Notification : July 25, 2026 Final Manuscript Due : July 26, 2026 Co - Located Event 3 rd International Conference on Antennas, Microwave and Microelectronics Engineering (AMiMi 2026) 3 rd International Conference on Humanities, Art and Social Studies (HAS 2026) 3 rd International Conference on Advances in Materials Science and Engineering (CAMSE 2026) 3 rd International Conference on Advanced Nanoscience and Technology (ANaNO 2026) 3 rd International Conference on Life Sciences (LiSci 2026) 3 rd International Conference on Information Technology Convergence Services &amp; AI (ITCAI 2026) 3 rd International Conference on AI in Bioinformatics &amp; Computational Biology (AIBCB 2026) 5 th International Conference of Multidisciplinary &amp; Interdisciplinary Bioscience (MIBIO 2026) ***** The invited talk proposals can be submitted to cheng@cheng2026.org</text:p>
          </table:table-cell>
          <table:table-cell table:number-columns-repeated="1013"/>
        </table:table-row>
        <table:table-row table:style-name="ro1">
          <table:table-cell table:style-name="ce2" office:value-type="string" calcext:value-type="string">
            <text:p>MIBIO 2026</text:p>
          </table:table-cell>
          <table:table-cell table:style-name="ce2" office:value-type="string" calcext:value-type="string">
            <text:p>5th International Conference of Multidisciplinary &amp; Interdisciplinary Bioscience</text:p>
          </table:table-cell>
          <table:table-cell table:style-name="ce2" office:value-type="float" office:value="40" calcext:value-type="float">
            <text:p>40</text:p>
          </table:table-cell>
          <table:table-cell table:style-name="ce2" office:value-type="float" office:value="25" calcext:value-type="float">
            <text:p>25</text:p>
          </table:table-cell>
          <table:table-cell table:style-name="ce3" office:value-type="date" office:date-value="2026-07-11" calcext:value-type="date">
            <text:p>2026-07-11</text:p>
          </table:table-cell>
          <table:table-cell table:style-name="ce3" office:value-type="date" office:date-value="2026-07-25" calcext:value-type="date">
            <text:p>2026-07-25</text:p>
          </table:table-cell>
          <table:table-cell table:style-name="ce3" office:value-type="date" office:date-value="2026-07-26" calcext:value-type="date">
            <text:p>2026-07-26</text:p>
          </table:table-cell>
          <table:table-cell table:style-name="ce2" office:value-type="string" calcext:value-type="string">
            <text:p>Virtual Conference</text:p>
          </table:table-cell>
          <table:table-cell table:style-name="ce2" office:value-type="string" calcext:value-type="string">
            <text:p>Jul 28, 2026 - Jul 29, 2026</text:p>
          </table:table-cell>
          <table:table-cell table:style-name="ce4" office:value-type="string" calcext:value-type="string">
            <text:p><text:a xlink:href="https://mibio2026.org/index" xlink:type="simple">https://mibio2026.org/index</text:a></text:p>
          </table:table-cell>
          <table:table-cell table:style-name="ce2" office:value-type="string" calcext:value-type="string">
            <text:p>5 th International Conference of Multidisciplinary &amp; Interdisciplinary Bioscience (MIBIO 2026) July 28 ~ 29, 2026, Virtual Conference Scope &amp; Topics 5 th International Conference of Multidisciplinary &amp; Interdisciplinary Bioscience (MIBIO 2026) stands as a premier global forum dedicated to advancing the frontiers of Biological Sciences. In an era where biological research profoundly shapes human health, environmental sustainability, and technological innovation, MIBIO 2026 reaffirms the indispensable role of multidisciplinary and interdisciplinary approaches in driving transformative scientific progress. MIBIO 2026 is designed as a dynamic launchpad for researchers, biologists, scientists, physicians, academicians, and students, offering a peerreviewed platform that fosters collaboration, innovation, and impactful scientific exchange. The conference emphasizes highquality, highvisibility publications to ensure that the research presented reaches a broad international audience and contributes meaningfully to global scientific discourse We welcome submissions addressing significant developments across all major domains of Biological Sciences, especially those that embody the spirit of multidisciplinary and interdisciplinary inquiry. MIBIO 2026 encourages contributions in pivotal and emerging areas that shape the future of life sciences, ensuring a rich and impactful scientific experience for all participants. Molecular, Cellular and Structural Biology Molecular Biology and Gene Regulation Cell Biology and Cell Dynamics Structural Biology, CryoEM and Advanced Imaging Epigenetics, Chromatin Biology and Nuclear Architecture Protein Engineering, Folding and Design SingleMolecule and LiveCell Imaging Stem Cell Biology and Regenerative Mechanisms Developmental Biology and Morphogenesis SingleCell Biology and Spatial Cell Mapping Genetics, Genomics and Precision Biology Genomics, Functional Genomics and Genome Architecture Genome Editing (CRISPR, Base Editing, Prime Editing, PASTE) NextGen CRISPR Systems (RNAguided transposases, CAST systems) In vivo Gene Editing Delivery Technologies (LNPs, VLPs, novel vectors) Population and Evolutionary Genomics Multiomics Integration (Genomics, Transcriptomics, Proteomics, Metabolomics, Lipidomics) Proteogenomics and Deep Proteomics Interactomics and Protein Network Biology Metagenomics and Microbiome Science Computational Biology, AINative Biology and DataDriven Biosciences Bioinformatics and Computational Modeling AINative Biology (AIfirst biological discovery) Biological Foundation Models (BioLLMs, protein/RNA foundation models) Generative AI for Protein, RNA and Small Molecule Design Autonomous Labs and SelfDriving Experimentation Digital Twins for Cells, Tissues and Organisms LargeScale Biological Simulations and Virtual Physiology Machine Learning for Omics, Imaging and HighThroughput Biology Synthetic Biology, Bioengineering andBiomanufacturing Synthetic Biology and Gene Circuit Engineering Cellular Engineering and Minimal Cells Xenobiology and Noncanonical Biological Systems Microbiome Engineering and Synthetic Microbiomes Biomanufacturing, Biofoundries and HighThroughput Automation Biomaterials, Biofabrication and 3D Bioprinting Biosensors, Bioelectronics and Bioinstrumentation Green Biomanufacturing and Biobased Circular Economy RNA Biology, RNA Therapeutics and Regulatory RNA RNA Structure, Folding and Dynamics RNA Therapeutics (siRNA, saRNA, circRNA, mRNA) RNA Editing Technologies (ADAR, RESCUE, LEAPER) Noncoding RNA Functions and Regulatory Networks RNA–Protein Interactions and RNP Complexes Microbiology, Virology and Infectious Disease Biology Microbial Physiology and Systems Microbiology Virology and Emerging Viral Threats Host–Pathogen Interactions Antimicrobial Resistance (AMR) and Novel Therapeutics Microbial Ecology and Environmental Microbiology Industrial and Synthetic Microbiology Microbiome–Immune and Microbiome–Brain Interactions Immunology, Inflammation and Immunotherapy Fundamental Immunology Cancer Immunology and Immunotherapy CART, TCRT and NextGen Immune Cell Therapies Autoimmunity and Inflammatory Diseases Vaccines, Immune Engineering and Adjuvant Design Immunometabolism Host Defense and Innate Immunity Biomedical Sciences, Translational Medicine and Therapeutics Translational and Precision Medicine Cell and Gene Therapies Organoids, OrganonChip and 3D Tissue Models Biomarkers, Diagnostics and PointofCare Technologies Nanomedicine and Targeted Delivery Systems Drug Discovery and Protein Degradation (PROTACs, molecular glues) Aging, Longevity andGeroscience Cellular Senescence, Reprogramming and Rejuvenation Technologies Neuroscience, Brain Engineering andBehavior Molecular and Cellular Neuroscience Systems and Cognitive Neuroscience Neurodegenerative Disorders Neuroimmunology Computational Neuroscience Neural Engineering and Brain–Machine Interfaces Gut–Brain Axis and Neuromicrobiome Interactions Ecology, Evolution, Climate Biology and Planetary Health Evolutionary Biology and Adaptation Biodiversity Genomics andeDNA Monitoring Climate Change Biology and Ecosystem Responses Environmental Genomics and Planetary Health Marine and Aquatic Biosciences One Health (Human–Animal–Environment Interactions) PlanetaryScale Ecological Modeling Plant, Agricultural and Food Biosciences Plant Genomics and Systems Biology Crop Biotechnology and Sustainable Agriculture Plant–Microbe Interactions Plant Physiology and Stress Biology Food Biotechnology and Nutritional Genomics Frontier and Emerging Bioscience Themes Space Biology and Life in Extreme Environments Quantum Biology and Biophysical Frontiers Biological Carbon Capture and Engineered CO₂ Fixation Synthetic Photosynthesis Biological Cybersecurity and Biorisk Management Bioethics, Policy and Responsible Innovation Digital Health, Wearables and Biodata Technologies Robotics and HighThroughput Automation in Biology Paper Submission Authors are invited to submit papers through the conference Submission System by July 11, 2026 (Final Call) . Submissions must be original and should not have been published previously or be under consideration for publication while being evaluated for this conference. The proceedings of the conference will be published by International journal of Bioinformatics and Biosciences (IJBB) (Confirmed). Selected papers from MIBIO 2026 , after further revisions, will be published in the special issue of the following journals. International Journal of Biomedical Engineering and Science (IJBES) Bioscience and Engineering: An International Journal (BIOEJ) Advanced Medical Sciences: An International Journal (AMS) Health Informatics: An International Journal (HIIJ) International Journal of Advances in Biology (IJAB) Important Dates Submission Deadline : July 11, 2026 (Final Call) Authors Notification : July 25, 2026 Final Manuscript Due : July 26, 2026 Co - Located Event 3 rd International Conference on Antennas, Microwave and Microelectronics Engineering (AMiMi 2026) 3 rd International Conference on Advances in Chemistry &amp; Chemical Engineering (CHENG 2026) 3 rd International Conference on Advances in Materials Science and Engineering (CAMSE 2026) 3 rd International Conference on Advanced Nanoscience and Technology (ANaNO 2026) 3 rd International Conference on Life Sciences (LiSci 2026) 3 rd International Conference on Information Technology Convergence Services &amp; AI (ITCAI 2026) 3 rd International Conference on Humanities, Art and Social Studies (HAS 2026) 3 rd International Conference on AI in Bioinformatics &amp; Computational Biology (AIBCB 2026) ***** The invited talk proposals can be submitted to mibio@mibio2026.org</text:p>
          </table:table-cell>
          <table:table-cell table:number-columns-repeated="1013"/>
        </table:table-row>
        <table:table-row table:style-name="ro1">
          <table:table-cell table:style-name="ce2" office:value-type="string" calcext:value-type="string">
            <text:p>IPDCA 2026</text:p>
          </table:table-cell>
          <table:table-cell table:style-name="ce2" office:value-type="string" calcext:value-type="string">
            <text:p>15th International conference on Parallel, Distributed Computing and Applications</text:p>
          </table:table-cell>
          <table:table-cell table:style-name="ce2" office:value-type="float" office:value="92" calcext:value-type="float">
            <text:p>92</text:p>
          </table:table-cell>
          <table:table-cell table:style-name="ce2" office:value-type="float" office:value="22" calcext:value-type="float">
            <text:p>22</text:p>
          </table:table-cell>
          <table:table-cell table:style-name="ce3" office:value-type="date" office:date-value="2026-07-11" calcext:value-type="date">
            <text:p>2026-07-11</text:p>
          </table:table-cell>
          <table:table-cell table:style-name="ce3" office:value-type="date" office:date-value="2026-07-18" calcext:value-type="date">
            <text:p>2026-07-18</text:p>
          </table:table-cell>
          <table:table-cell table:style-name="ce3" office:value-type="date" office:date-value="2026-07-22" calcext:value-type="date">
            <text:p>2026-07-22</text:p>
          </table:table-cell>
          <table:table-cell table:style-name="ce2" office:value-type="string" calcext:value-type="string">
            <text:p>Toronto, Canada</text:p>
          </table:table-cell>
          <table:table-cell table:style-name="ce2" office:value-type="string" calcext:value-type="string">
            <text:p>Jul 25, 2026 - Jul 26, 2026</text:p>
          </table:table-cell>
          <table:table-cell table:style-name="ce4" office:value-type="string" calcext:value-type="string">
            <text:p><text:a xlink:href="https://dami2026.org/ipdca/index" xlink:type="simple">https://dami2026.org/ipdca/index</text:a></text:p>
          </table:table-cell>
          <table:table-cell table:style-name="ce2" office:value-type="string" calcext:value-type="string">
            <text:p>15 th International conference on Parallel, Distributed Computing and Applications (IPDCA 2026) July 25 ~ 26, 2026, Toronto, Canada Scope &amp; Topics 15 th International conference on Parallel, Distributed Computing and Applications (IPDCA 2026) serves as a premier global forum for researchers, practitioners, and industry experts to exchange knowledge, innovations, and advances in the rapidly evolving fields of parallel and distributed computing. As modern computing systems scale to unprecedented levels, driven by cloud native architectures, AI centric workloads, exascale platforms, and edge intelligence, IPDCA 2026 aims to bring together cutting edge research that shapes the future of high performance and distributed systems. The conference welcomes original contributions covering the full spectrum of theory, design, implementation, and applications of parallel and distributed computing. Topics of interest span parallel algorithms and architectures, distributed systems, cloud and edge computing, AI native systems, high performance computing, networking, security, and emerging computing paradigms. IPDCA 2026 provides a unique platform for academic researchers and industry professionals to share breakthroughs, discuss challenges, and explore new directions in scalable computing technologies. Authors are invited to submit high quality articles presenting research results, innovative projects, survey studies, and industrial experiences that demonstrate significant advances in computer science, engineering, and real world applications of parallel and distributed systems. Topics of interest include, but are not limited to, the following Parallel &amp; High Performance Computing (HPC) Parallel Algorithms, Models &amp; Complexity Exascale &amp; Extreme Scale Computing High Performance Architectures (GPU, TPU, FPGA, ASIC) Memory Centric HPC Architectures Parallel Programming Models, Languages &amp; Compilers Runtime Systems, Scheduling &amp; Resource Management Performance Modeling, Benchmarking &amp; Optimization Energy Efficient, Green &amp; Carbon Aware HPC HPC for AI &amp; AI Accelerated Scientific Computing Hybrid HPC Cloud Architectures &amp; Workflows Distributed Systems &amp; Cloud Computing Distributed Algorithms, Consensus &amp; Fault Tolerance Cloud Computing (IaaS, PaaS, SaaS) &amp; Multi Tenant Isolation Cloud Native Systems (Kubernetes, Microservices, Serverless) Stateful Serverless &amp; Event Driven Distributed Systems Edge, Fog &amp; Geo Distributed Computing Planet Scale Distributed Systems (Spanner like architectures) Data Center Systems &amp; Software Defined Infrastructure Observability, Telemetry &amp; Distributed Tracing Cost Aware Scheduling &amp; Cloud Resource Economics Disaggregated Compute, Memory &amp; Storage (CXL, NVMe oF) Rack Scale &amp; Composable Infrastructure AI Native Systems &amp; Machine Learning Infrastructure Distributed Machine Learning &amp; Federated Learning Parallel Training of Large Models (LLMs, Foundation Models) AI Native Operating Systems &amp; Model Centric Runtimes Distributed Inference Serving (batching, KV cache management, MoE routing) Systems for AI/ML (tensor parallelism, pipeline parallelism, ZeRO, sharding) ML Optimized Hardware &amp; Accelerators AI Driven Resource Management &amp; Cluster Scheduling Privacy Preserving ML at Scale Real Time AI Pipelines &amp; Streaming Inference Networking, Communication &amp; Interconnects High Speed Interconnects (InfiniBand, RDMA, NVLink, CXL) Network Protocols for HPC &amp; Distributed Systems Software Defined Networking (SDN) &amp; Network Virtualization 5G/6G, Network Slicing &amp; Compute Offloading Wireless, Ad Hoc &amp; Sensor Network Architectures Network Performance, QoS &amp; Traffic Engineering In Network Computing &amp; SmartNIC Accelerated Systems Distributed Applications, Platforms &amp; Middleware Distributed AI/Analytics Platforms (Spark, Ray, Flink, Dask) Workflow Systems, Orchestration &amp; Automation Distributed Simulation, Modeling &amp; Digital Twins Collaborative, Real Time &amp; Interactive Distributed Applications Web Scale &amp; Internet Scale Services Data Intensive Systems &amp; Planet Scale Streaming Security, Trust &amp; Confidential Computing Security in HPC, Cloud, Edge &amp; Distributed Architectures Confidential Computing (TEE based, enclave based, confidential GPUs) Secure AI Training &amp; Inference Privacy Preserving Distributed Computation Trust Management, Identity &amp; Access Control Resilience, Fault Tolerance &amp; Self Healing Systems Secure Distributed Storage &amp; Blockchain Based Systems Zero Trust Architectures for Distributed Systems Emerging Computing Paradigms Quantum Computing &amp; Hybrid Quantum Classical Systems Quantum Inspired Algorithms for HPC Neuromorphic &amp; Bio Inspired Computing Heterogeneous &amp; Hybrid Computing Architectures Approximate, Probabilistic &amp; Stochastic Computing Sustainable Computing &amp; Carbon Aware Scheduling Autonomous Cluster Operations &amp; Self Managing Systems Software Systems, Tools &amp; Engineering Parallel/Distributed Software Engineering &amp; DevOps Programming Frameworks, Libraries &amp; Toolchains Debugging, Verification &amp; Testing of Distributed Systems Software Performance Engineering Middleware, APIs &amp; Distributed System Abstractions Reproducibility, Benchmarking &amp; Artifact Evaluation Applications of Parallel &amp; Distributed Computing Computational Biology &amp; Health Informatics at Scale Scientific Computing &amp; Numerical Methods Big Data Analytics &amp; Large Scale Data Processing Smart Cities, IoT &amp; Cyber Physical Systems Climate Modeling, Physics, Engineering &amp; Environmental Simulations Autonomous Systems, Robotics &amp; Real Time Distributed Control Digital Twins for Science, Industry &amp; Infrastructure Paper Submission Authors are invited to submit papers through the conference Submission System by July 11, 2026 (Final Call) . Submissions must be original and should not have been published previously or be under consideration for publication while being evaluated for this conference. The proceedings of the conference will be published by The proceedings of the conference will be published by Computer Science Conference Proceedings in Computer Science &amp; Information Technology (CS &amp; IT) series (Confirmed). Selected papers from IPDCA 2026 , after further revisions, will be published in the special issue of the following journals. International Journal of Network Security &amp; Its Applications (IJNSA) - ERA Indexed Advanced Computing: An International Journal (ACIJ) International Journal of Wireless &amp; Mobile Networks (IJWMN) - ERA Indexed International Journal on Applications of Graph Theory in Wireless Ad hoc Networks and Sensor Networks (GRAPH-HOC) International Journal of Next-Generation Networks (IJNGN) International Journal of Peer-to-Peer networks (IJP2P) International Journal of Distributed and Parallel Systems (IJDPS) International Journal of Grid Computing &amp; Applications (IJGCA) International Journal of UbiComp (IJU) International Journal of Advanced Smart Sensor Network Systems (IJASSN) International Journal of Mobile Network Communications &amp; Telematics (IJMNCT) International Journal on AdHoc Networking Systems (IJANS) Information Technology in Industry (ITII) Important Dates Submission Deadline : July 11, 2026 (Final Call) Authors Notification : July 18, 2026 Final Manuscript Due : July 22, 2026 Co - Located Event 12 th International Conference on Image Processing and Pattern Recognition (IPPR 2026) 13 th International Conference on Computer Science and Information Technology (CSIT 2026) 14 th International Conference of Security, Privacy and Trust Management (SPTM 2026) 12 th International Conference on Data Mining (DaMi 2026) 12 th International Conference on Software Engineering (SOENG 2026) 12 th International Conference on Artificial Intelligence and Soft Computing (AIS 2026) 7 th International Conference on Natural Language Processing &amp; Applications (NLPA 2026) 7 th International Conference on Advanced Machine Learning (AMLA 2026) 7 th International Conference on Big Data and Applications (BDAP 2026) ***** The invited talk proposals can be submitted to ipdca@dami2026.org</text:p>
          </table:table-cell>
          <table:table-cell table:number-columns-repeated="1013"/>
        </table:table-row>
        <table:table-row table:style-name="ro1">
          <table:table-cell table:style-name="ce2" office:value-type="string" calcext:value-type="string">
            <text:p>AMiMi 2026</text:p>
          </table:table-cell>
          <table:table-cell table:style-name="ce2" office:value-type="string" calcext:value-type="string">
            <text:p>3rd International Conference on Antennas, Microwave and Microelectronics Engineering</text:p>
          </table:table-cell>
          <table:table-cell table:style-name="ce2" office:value-type="float" office:value="20" calcext:value-type="float">
            <text:p>20</text:p>
          </table:table-cell>
          <table:table-cell table:style-name="ce2" office:value-type="float" office:value="30" calcext:value-type="float">
            <text:p>30</text:p>
          </table:table-cell>
          <table:table-cell table:style-name="ce3" office:value-type="date" office:date-value="2026-07-11" calcext:value-type="date">
            <text:p>2026-07-11</text:p>
          </table:table-cell>
          <table:table-cell table:style-name="ce3" office:value-type="date" office:date-value="2026-07-25" calcext:value-type="date">
            <text:p>2026-07-25</text:p>
          </table:table-cell>
          <table:table-cell table:style-name="ce3" office:value-type="date" office:date-value="2026-07-26" calcext:value-type="date">
            <text:p>2026-07-26</text:p>
          </table:table-cell>
          <table:table-cell table:style-name="ce2" office:value-type="string" calcext:value-type="string">
            <text:p>Virtual Conference</text:p>
          </table:table-cell>
          <table:table-cell table:style-name="ce2" office:value-type="string" calcext:value-type="string">
            <text:p>Jul 28, 2026 - Jul 29, 2026</text:p>
          </table:table-cell>
          <table:table-cell table:style-name="ce4" office:value-type="string" calcext:value-type="string">
            <text:p><text:a xlink:href="https://amimi2026.org/index" xlink:type="simple">https://amimi2026.org/index</text:a></text:p>
          </table:table-cell>
          <table:table-cell table:style-name="ce2" office:value-type="string" calcext:value-type="string">
            <text:p>3 rd International Conference on Antennas, Microwave and Microelectronics Engineering (AMiMi 2026) July 28 ~ 29, 2026, Virtual Conference Scope &amp; Topics 3 rd International Conference on Antennas, Microwave and Microelectronics Engineering (AMiMi 2026) will provide an excellent international forum for sharing knowledge andnew research results in all areas of Antennas, Microwave and Microelectronics Engineering. The conference focuses to promote interdisciplinary studies Antennas, Microwave and Microelectronics Engineering. Authors are solicited to contribute to the conference by submitting articles that illustrate research results, projects, surveying works and industrial experiences that describe significant advances in the following areas, but are not limited to these topics only. Topics of interest include, but are not limited to, the following Antennas, Propagation and Electromagnetic Engineering Antenna Technologies Antenna Theory, Radiation, and Electromagnetic Modeling Microstrip, Printed, Integrated, and On Chip Antennas Wideband, Multiband, UWB, and High Efficiency Antennas Dielectric Resonator Antennas (DRAs) Conformal, Flexible, Wearable, and Textile Antennas Reconfigurable, Tunable, and Active Antennas MIMO, Massive MIMO, and Holographic MIMO Surfaces Phased Arrays and AI Driven Beamforming Millimeter Wave, Sub THz, and THz Antennas Nano Antennas, Plasmonic and Optical Antennas Antenna in Package (AiP) and Antenna on Chip (AoC) Emerging Paradigms Reconfigurable Intelligent Surfaces (RIS) / Intelligent Reflecting Surfaces Holographic Beamforming and Continuous Aperture Surfaces Electromagnetic Digital Twins for Antennas and Arrays AI/ML Native Antenna Synthesis and Generative EM Design Antennas for 6G, IoT, UAVs, CubeSats, and Autonomous Systems Integrated Antenna Sensor Systems Propagation and Channel Modeling Channel Modeling for 5G/6G, mmWave, Sub THz, and THz Bands Propagation in Complex, Harsh, and Indoor Environments Scattering, RCS, and Electromagnetic Wave Interaction with Materials Propagation for Joint Communication, Sensing and Localization (JCSL / ISAC) Semantic and Goal Oriented Communication Models Microwave, Millimeter Wave and THz Engineering RF, Microwave and mmWave Components Passive Components: Filters, Multiplexers, Couplers, Transitions Active Components: LNAs, PAs, Mixers, Oscillators MMICs, RFICs, and High Frequency Integrated Components RF MEMS, NEMS, and Micro Machined RF Devices Novel Waveguides, SIW, and On Chip Transmission Lines Sub THz CMOS and SiGe RFICs (140–300+ GHz) High Power mmWave and THz Devices RF Packaging, Heterogeneous Integration and Chiplet Based RF Systems Advanced RF and Microwave Systems Microwave and mmWave Communication and Sensing Systems THz Sources, Detectors, and Imaging Systems Microwave Photonics and Photonic RF Integration Software Defined Radio (SDR) and Digital RF Architectures AI Enabled RF System Design and Optimization Signal Integrity, EMI/EMC, and High Speed Interconnects RF Interconnects for AI Accelerators and Chip to Chip Wireless Links Radar and Sensing Radar Systems, SAR, Automotive Radar, and Imaging Radar Integrated Sensing and Communication (ISAC) Chipsets Remote Sensing for Climate, Environment, and Security Electromagnetic Imaging and Inverse Scattering Applied Electromagnetics and Computational Techniques Computational Electromagnetics (CEM) and Numerical Methods Physics Informed Neural Networks (PINNs) for EM Simulation Foundation Models and Generative AI for EM Design Metamaterials, Metasurfaces, FSS, and EBG Structures Metasurface Based Analog Computing (EM Computing) Electromagnetic Materials and Novel Media Bio Electromagnetics and RF Exposure Modeling Electromagnetic Compatibility (EMC) and Interference Mitigation EM Digital Twins for RF, Antennas and Propagation Microelectronics, VLSI and Semiconductor Technologies Semiconductor Devices and Fabrication CMOS, FinFET, GAAFET, and Beyond CMOS Devices Device Modeling, Simulation, and Reliability 2D Material Devices (MoS₂, WS₂, Graphene) CNTFETs, TFETs, and Emerging Nano Devices 3D Monolithic Integration (3D IC) Heterogeneous Integration with Photonics and Co Packaged Optics (CPO) Cryogenic Electronics (Cryo CMOS) for Quantum Computing Advanced Lithography, Nanofabrication, and 3D Integration Organic, Flexible, and Wearable Electronics Circuits and Systems Analog, RF, and Mixed Signal ICs Low Power and Energy Efficient VLSI High Speed Digital and SerDes Circuits System on Chip (SoC), Lab on Chip, and Heterogeneous Integration Memory Technologies: SRAM, DRAM, MRAM, ReRAM, FeFET AI Accelerators and Hardware for Generative AI Neuromorphic Computing and In Memory Computing (IMC) In Sensor Computing and Edge Intelligence Design Automation and Hardware Security EDA Tools, Mixed Domain Simulation, and Co Design Logic, Architectural, and System Level Synthesis Hardware Security, PUFs, and Side Channel Attack Mitigation Testing, Design for Testability (DFT), and Reliability Engineering Sensors and Microsystems MEMS/NEMS Sensors and Actuators RF MEMS for 5G/6G and High Frequency Systems Micro Sensors for Biomedical, Environmental, and Industrial Applications Bio Integrated RF Systems and Wireless Neural Interfaces Wireless Communication Systems and Emerging Technologies 5G/6G Wireless Systems and Architectures Spectrum Above 100 GHz and Sub THz Communications IoT, Massive IoT, and Low Power Networks UAV to Everything (U2X) and Aerial Networks Non Terrestrial Networks (NTN): Satellite to Phone, HAPS, Inter Satellite Links RFID, NFC, Wireless Power Transfer, and Energy Harvesting Far Field and mmWave Wireless Power Transfer (WPT 2.0) AI Enabled Wireless Networks and Resource Optimization Semantic and Goal Oriented Communications Integrated Localization, Mapping and Communication (JCSL) Wireless for Robotics, Autonomous Systems and RF Based Perception Sustainability, Security and Cross Disciplinary Innovations Green RF, Sustainable Electronics and Low Carbon Semiconductor Processes Secure RF Systems and EM Side Channel Attack Mitigation Hardware Trojans and Secure IC Design Circular Electronics Manufacturing Bio Compatible RF Materials and Implantable Systems Paper Submission Authors are invited to submit papers through the conference Submission System by July 11, 2026 (Final Call) . Submissions must be original and should not have been published previously or be under consideration for publication while being evaluated for this conference. The proceedings of the conference will be published by The proceedings of the conference will be published by International Journal on Cybernetics &amp; Informatics (IJCI) series (Confirmed). Selected papers from AMiMi 2026 , after further revisions, will be published in the special issue of the following journals. International Journal of Microwave Engineering (JMICRO) International Journal of Antennas (JANT) International Journal of Microelectronics Engineering (IJME) Important Dates Submission Deadline : July 11, 2026 (Final Call) Authors Notification : July 25, 2026 Final Manuscript Due : July 26, 2026 Co - Located Event 3 rd International Conference on Information Technology Convergence Services &amp; AI (ITCAI 2026) 3 rd International Conference on Advances in Chemistry &amp; Chemical Engineering (CHENG 2026) 3 rd International Conference on Advances in Materials Science and Engineering (CAMSE 2026) 3 rd International Conference on Advanced Nanoscience and Technology (ANaNO 2026) 3 rd International Conference on Life Sciences (LiSci 2026) 3 rd International Conference on Humanities, Art and Social Studies (HAS 2026) 3 rd International Conference on AI in Bioinformatics &amp; Computational Biology (AIBCB 2026) 5 th International Conference of Multidisciplinary &amp; Interdisciplinary Bioscience (MIBIO 2026) ***** The invited talk proposals can be submitted to "&gt;amimi@amimi2026.org</text:p>
          </table:table-cell>
          <table:table-cell table:number-columns-repeated="1013"/>
        </table:table-row>
        <table:table-row table:style-name="ro1">
          <table:table-cell table:style-name="ce2" office:value-type="string" calcext:value-type="string">
            <text:p>CSIT 2026</text:p>
          </table:table-cell>
          <table:table-cell table:style-name="ce2" office:value-type="string" calcext:value-type="string">
            <text:p>13th International Conference on Computer Science and Information Technology</text:p>
          </table:table-cell>
          <table:table-cell table:style-name="ce2" office:value-type="float" office:value="88" calcext:value-type="float">
            <text:p>88</text:p>
          </table:table-cell>
          <table:table-cell table:style-name="ce2" office:value-type="float" office:value="30" calcext:value-type="float">
            <text:p>30</text:p>
          </table:table-cell>
          <table:table-cell table:style-name="ce3" office:value-type="date" office:date-value="2026-07-11" calcext:value-type="date">
            <text:p>2026-07-11</text:p>
          </table:table-cell>
          <table:table-cell table:style-name="ce3" office:value-type="date" office:date-value="2026-07-18" calcext:value-type="date">
            <text:p>2026-07-18</text:p>
          </table:table-cell>
          <table:table-cell table:style-name="ce3" office:value-type="date" office:date-value="2026-07-22" calcext:value-type="date">
            <text:p>2026-07-22</text:p>
          </table:table-cell>
          <table:table-cell table:style-name="ce2" office:value-type="string" calcext:value-type="string">
            <text:p>Toronto, Canada</text:p>
          </table:table-cell>
          <table:table-cell table:style-name="ce2" office:value-type="string" calcext:value-type="string">
            <text:p>Jul 25, 2026 - Jul 26, 2026</text:p>
          </table:table-cell>
          <table:table-cell table:style-name="ce4" office:value-type="string" calcext:value-type="string">
            <text:p><text:a xlink:href="https://csit2026.org/" xlink:type="simple">https://csit2026.org/</text:a></text:p>
          </table:table-cell>
          <table:table-cell table:style-name="ce2" office:value-type="string" calcext:value-type="string">
            <text:p>13 th International Conference on Computer Science and Information Technology (CSIT 2026) July 25 ~ 26, 2026, Toronto, Canada Hybrid -- Registered authors can present their work online or face to face. Scope &amp; Topics The 13 th International Conference on Computer Science and Information Technology (CSIT 2026) provides a premier international forum for researchers, practitioners, and industry experts to share knowledge, exchange ideas, and present the latest advances in the theory, methodology, and applications of Computer Science and Information Technology. As computing continues to evolve at an unprecedented pace—driven by breakthroughs in artificial intelligence, next generation systems, high performance architectures, and intelligent software—CSIT 2026 aims to bring together leading voices shaping the future of the discipline. The conference welcomes significant contributions across all major areas of computer science, ranging from foundational algorithms and intelligent systems to cutting edge developments in distributed computing, cybersecurity, networking, data engineering, and emerging computing paradigms. CSIT 2026 serves as a dynamic platform for academic researchers and industry innovators to meet, collaborate, and explore the latest trends that are redefining modern computing. Authors are invited to submit high quality papers presenting original research results, innovative projects, survey studies, and industrial experiences that demonstrate meaningful advances in Computer Science, Engineering, and IT driven applications. Topics of interest include, but are not limited to, the following Artificial Intelligence, Machine Learning and Intelligent Systems Machine Learning, Deep Learning and Reinforcement Learning Generative AI (LLMs, Diffusion Models, Multimodal Foundation Models) Agentic AI, Autonomous Agents and Multi Agent Systems Embodied AI, Vision Language Action Models and Robotics Intelligence Continual Learning, Lifelong AI and Adaptive Systems Neuro Symbolic AI and Hybrid Reasoning Systems On Device AI, TinyML and NPU Accelerated Intelligence Explainable AI (XAI), Fairness, Ethics and Responsible AI AI Engineering, LLMOps, MLOps and Model Lifecycle Management AI Driven Software Development and Autonomous Coding Systems Automated Science, AI Driven Discovery and Closed Loop Research Systems Data Science, Big Data and Data Engineering Big Data Analytics and Large Scale Data Processing Cloud Native Data Engineering, Data Lakes and Lakehouses Distributed Data Mining and Scalable ML (Spark, Flink, Ray) Vector Databases, Embedding Based Retrieval and Semantic Search Data Governance, Lineage, Provenance and Compliance Real Time Data Pipelines, Streaming Analytics and Event Processing Synthetic Data Generation, Simulation and Data Augmentation Data Observability, Monitoring and Drift Detection Computer Architecture, Systems and High Performance Computing Modern CPU/GPU/TPU Architectures and Accelerators Heterogeneous, Memory Centric and Disaggregated Architectures (CXL, NVMe oF) Parallel and Distributed Systems, Algorithms and Runtime Systems High Performance Computing (HPC), Exascale Systems and Green Computing AI Native Operating Systems and Model Centric Scheduling Hardware Software Co Design for AI Systems Operating Systems, Virtualization, Containerization and Serverless Systems Edge, Fog and Cloud Computing Systems Quantum Computing, Quantum AI Convergence and Hybrid Systems Neuromorphic Computing, Memristor Based Systems and Bio Inspired Hardware Sustainable Computing, Carbon Aware Scheduling and Energy Efficient Systems Networking, Communications and Cyber Physical Connectivity Next Generation Networking (5G/6G, Network Slicing, SDN/NFV) AI Accelerated Networking and Compute in Network Systems High Performance Networking, Data Center Networks and In Network Computing IoT, Industrial IoT, Smart Environments and Sensor Networks Satellite, Space Edge Computing and Interplanetary Networking (DTN) GNSS Integrated Systems and Space Based Communication Mobile, Ubiquitous and Pervasive Computing Vehicular Networks, Autonomous Mobility and V2X Systems AI Driven Autonomous Network Management and Self Optimizing Networks Cybersecurity, Privacy and Trust Security Architecture, Zero Trust Systems and Identity Resilience Cryptography, Post Quantum Security and Blockchain Security Secure Software Engineering, Vulnerability Detection and Fuzzing AI Security, Adversarial ML and Model Robustness Privacy Preserving Computing (Differential Privacy, MPC, Homomorphic Encryption) Cyber Physical Security, IoT Security and Embedded System Protection Threat Intelligence, Malware Analysis and Security Analytics AI Safety Engineering, Red Teaming and Harmful Output Detection Formal Verification of AI Systems and Secure by Design AI Software Engineering, Programming Languages and DevOps Software Architecture, Design Patterns and Refactoring DevOps, MLOps, AIOps and Continuous Delivery Formal Methods, Verification, Testing and Reliability Engineering Programming Languages, Compilers and Runtime Optimization Autonomous Software Systems and Self Healing Applications AI Assisted Development, Code Generation and Automated Testing Game Development, Simulation Engines and Interactive Media Engineering Databases, Information Systems and Knowledge Technologies Intelligent Information Systems and Knowledge Graphs Database Systems, Query Optimization and Transaction Processing Information Retrieval, Search Systems and Recommender Systems NLP, Speech Processing and Multilingual AI GIS, Spatial Computing and Location Aware Systems Digital Twins for Industry, Science and Smart Cities Web3 Native Computing, Decentralized Storage and Distributed Identity (DID) Privacy Enhancing Technologies (PETs) and Zero Knowledge Systems Multimedia, Vision and Signal Processing Image, Video and Audio Processing Computer Vision, Pattern Recognition and Multimodal Fusion AR/VR/XR Systems and Immersive Computing Vision Language Models and Multimodal Understanding Synthetic Reality, Digital Humans and Virtual Workforce Systems Multimedia Systems, Streaming and Content Delivery Networks Modeling, Simulation and Emerging Computing Paradigms Modeling and Simulation of Complex Systems Digital Twins and Simulation Driven Intelligence Bioinformatics, Computational Biology and Health Informatics Evolutionary Computation, Swarm Intelligence and Optimization Robotics, Autonomous Systems and Human Robot Interaction Cognitive Computing and Brain Inspired Systems Bio Computing, DNA Storage and Molecular Computing Planetary Scale Computing and Global Edge Infrastructure Interdisciplinary Computing for Science, Medicine and Engineering Paper Submission Authors are invited to submit papers through the conference Submission System by July 11, 2026 (Final Call) . Submissions must be original and should not have been published previously or be under consideration for publication while being evaluated for this conference. The proceedings of the conference will be published by Computer Science Conference Proceedings (H index 46) in Computer Science &amp; Information Technology (CS &amp; IT) series (Confirmed). Selected papers from CSIT 2026 , after further revisions, will be published in the special issue of the following journals. International Journal of Computer Science &amp; Information Technology (IJCSIT) - INSPEC Indexed International Journal of Network Security &amp; Its Applications (IJNSA) - ERA Indexed International Journal of Computer Science, Engineering and Information Technology (IJCSEIT) International Journal of Computer Science and Engineering Survey (IJCSES) Computer Science &amp; Engineering: An International Journal (CSEIJ) Advanced Computing: An International Journal (ACIJ) International Journal of Information Technology Convergence and Services (IJITCS) International Journal of Computer Science, Engineering and Applications (IJCSEA) International Journal of Advanced Information Technology (IJAIT) International Journal of Information Sciences and Techniques (IJIST) Information Technology in Industry (ITII) Important Dates Submission Deadline : July 11, 2026 (Final Call) Authors Notification : July 18, 2026 Final Manuscript Due : July 22, 2026 Co - Located Events 12 th International Conference on Image Processing and Pattern Recognition (IPPR 2026) 12 th International Conference on Software Engineering (SOENG 2026) 14 th International Conference of Security, Privacy and Trust Management (SPTM 2026) 15 th International conference on Parallel, Distributed Computing and Applications (IPDCA 2026) 12 th International Conference on Data Mining (DaMi 2026) 12 th International Conference on Artificial Intelligence and Soft Computing (AIS 2026) 7 th International Conference on Natural Language Processing and Applications (NLPA 2026) 7 th International Conference on Advanced Machine Learning (AMLA 2026) 7 th International Conference on Big Data and Applications (BDAP 2026) ***** The invited talk proposals can be submitted to csit@csit2026.org</text:p>
          </table:table-cell>
          <table:table-cell table:number-columns-repeated="1013"/>
        </table:table-row>
        <table:table-row table:style-name="ro1">
          <table:table-cell table:style-name="ce2" office:value-type="string" calcext:value-type="string">
            <text:p>IJMVSC 2026</text:p>
          </table:table-cell>
          <table:table-cell table:style-name="ce2" office:value-type="string" calcext:value-type="string">
            <text:p>The International Journal of Managing Value and Supply Chains</text:p>
          </table:table-cell>
          <table:table-cell table:style-name="ce2" office:value-type="float" office:value="65" calcext:value-type="float">
            <text:p>65</text:p>
          </table:table-cell>
          <table:table-cell table:style-name="ce2" office:value-type="float" office:value="32" calcext:value-type="float">
            <text:p>32</text:p>
          </table:table-cell>
          <table:table-cell table:style-name="ce3" office:value-type="date" office:date-value="2026-07-12" calcext:value-type="date">
            <text:p>2026-07-12</text:p>
          </table:table-cell>
          <table:table-cell table:style-name="ce3" office:value-type="date" office:date-value="2026-08-11" calcext:value-type="date">
            <text:p>2026-08-11</text:p>
          </table:table-cell>
          <table:table-cell table:style-name="ce3" office:value-type="date" office:date-value="2026-08-18" calcext:value-type="date">
            <text:p>2026-08-18</text:p>
          </table:table-cell>
          <table:table-cell table:number-columns-repeated="2"/>
          <table:table-cell table:style-name="ce4" office:value-type="string" calcext:value-type="string">
            <text:p><text:a xlink:href="https://airccse.org/journal/mvsc/ijmvsc.html" xlink:type="simple">https://airccse.org/journal/mvsc/ijmvsc.html</text:a></text:p>
          </table:table-cell>
          <table:table-cell table:style-name="ce2" office:value-type="string" calcext:value-type="string">
            <text:p>International Journal of Managing Value and Supply Chains (IJMVSC) ISSN: 0976 - 979X (Online); 2230 - 7966 (print) Citations, h-index, i10-index of IJMVSC Scope &amp; Topics The International Journal of Managing Value and Supply Chains ( IJMVSC) is a quarterly open access peer-reviewed journal that publishes articles that contribute new results in all areas of value and supply chain management. The journal provides a platform to disseminate new ideas and new research, advance theories, and propagate best practices in the management of value and supply chain management, looking across both product and service-based businesses. This will include works based in service management, logistics and distribution, operations management, process management, flow control, and customer service. The journal offers a forum in which academics, consultants, and practitioners in a variety of fields can exchange ideas to further research and improve practices in all areas of business. The International Journal of Managing Value and Supply Chains ( IJMVSC ) seek to establish new collaborations, new best practices, and new theories in the management of both product and service-based organizations around the world. Authors are solicited to contribute to the journal by submitting articles that illustrate research results, projects, surveying works and industrial experiences that describe significant advances in the areas of value and supply chain management. Topics of interest include but are not limited to, the following Supply chain management Value chain management Analytical frameworks Business-to-business marketing Change management Channel management Cultural issues Customer service Customer retention strategies Demand forecasting and planning Distribution channels Economic issues Information technology in product distribution Information technology in service delivery Knowledge management Legal and regulatory issues Logistics management and planning (inbound, outbound and reverse logistics) Manufacturing methods and strategies Metrics and Measurement Network design and routing Quality control and improvement Performance metrics Purchasing and procurement e-procurement and e-commerce Product innovation and development Sourcing strategies Supplier selection Vendor management and selection Paper Submission Authors are invited to submit papers for this journal through E-mail ijmvsc@aircconline.com . Submissions must be original and should not have been published previously or be under consideration for publication while being evaluated for this Journal. Important Dates Submission Deadline : July 12, 2026 Authors Notification : August 11, 2026 Final Manuscript Due : August 18, 2026 Publication Date : Determined by the Editor-in-Chief Editorial in Chief David C. Wyld, Southeastern Louisisna University, USA Editorial Board Members Ahmed Y. Nada , Al - Quds University, Palestine Ajayeb Salama Abu-Daabes , Emirates Collage of Technology, UAE Avinash Waikar , Southeastern Louisiana University, USA Binod Kumar Pattanayak , Siksha O Anusandhan University, India Charlie Kalinzi , Kyambogo University School of Management, Uganda Denivaldo Lopes , Federal University of Maranhao, Brazil Daniela Lopez De Luise , Universidad de Palermo, Argentina Elboukhari Mohamed , University Mohamed First, Morocco Habil. Janos Abonyi , University of Pannonia, Hungary Jayant Mishra , Rajiv Gandhi Proudyogiki Vishwavidyalaya, India Jeremy (Zheng) Li , University of Bridgeport, USA Lylia Abrouk , University of Burgundy, France Mccusker Rob , Teesside University Business School, UK Michael C. Budden , Southeastern Louisiana University, USA Michael Jones , Southeastern Louisiana University, USA Mohamed Firdhous , University of Moratuwa, Sri Lanka Nirbhay Chaubey , Gujarat Technological University, India Norhayati Zakuan , Universiti Teknologi Malaysia, Malaysia Robert F. Cope III , Southeastern Louisiana University, USA ... More</text:p>
          </table:table-cell>
          <table:table-cell table:number-columns-repeated="1013"/>
        </table:table-row>
        <table:table-row table:style-name="ro1">
          <table:table-cell table:style-name="ce2" office:value-type="string" calcext:value-type="string">
            <text:p>AVC 2026</text:p>
          </table:table-cell>
          <table:table-cell table:style-name="ce2" office:value-type="string" calcext:value-type="string">
            <text:p>Advances in Vision Computing: An International Journal</text:p>
          </table:table-cell>
          <table:table-cell table:style-name="ce2" office:value-type="float" office:value="18" calcext:value-type="float">
            <text:p>18</text:p>
          </table:table-cell>
          <table:table-cell table:style-name="ce2" office:value-type="float" office:value="30" calcext:value-type="float">
            <text:p>30</text:p>
          </table:table-cell>
          <table:table-cell table:style-name="ce3" office:value-type="date" office:date-value="2026-07-12" calcext:value-type="date">
            <text:p>2026-07-12</text:p>
          </table:table-cell>
          <table:table-cell table:style-name="ce3" office:value-type="date" office:date-value="2026-08-11" calcext:value-type="date">
            <text:p>2026-08-11</text:p>
          </table:table-cell>
          <table:table-cell table:style-name="ce3" office:value-type="date" office:date-value="2026-08-18" calcext:value-type="date">
            <text:p>2026-08-18</text:p>
          </table:table-cell>
          <table:table-cell table:number-columns-repeated="2"/>
          <table:table-cell table:style-name="ce4" office:value-type="string" calcext:value-type="string">
            <text:p><text:a xlink:href="https://airccse.org/journal/avc/index.html" xlink:type="simple">https://airccse.org/journal/avc/index.html</text:a></text:p>
          </table:table-cell>
          <table:table-cell table:style-name="ce2" office:value-type="string" calcext:value-type="string">
            <text:p>Advances in Vision Computing: An International Journal (AVC) Call For Papers Vision Computing is a branch of artificial intelligence that focuses on providing computers with the functions typical of human vision. Due to recent advances made in technology, scientists have incorporate portable imagers into computer vision systems that can be connected via wireless networks. Advances in Vision Computing: An International Journal (AVC) is an open access, peer-reviewed journal that publishes articles which contribute new results in all areas of the advanced vision computing. The goal of this journal is to bring together researchers and practitioners from academia and industry to focus on understanding advances in vision computing and establishing new collaborations in these areas. Authors are solicited to contribute to the journal by submitting articles that illustrate research results, projects, surveying works and industrial experiences that describe significant advances in the areas of vision computing. Topics of interest include, but are not limited to, the following: Machine Vision Image Processing and Formation Document Imaging in Business Pattern Recognition Image and Video Understanding Applications and Services Motion, Tracking and Stereo Vision Biometrics Machine Intelligence Data structures and databases Multimedia Speech Recognition Computational Models Mobile Imaging Robotic Vision Vision-based human-computer interactionComputer Vision Machine learning Algorithms Machine Learning Applications Deep learning Paper Submission Authors are invited to Submit papers for this journal through avcj@aircconline.com . Submissions must be original and should not have been published previously or be under consideration for publication while being evaluated for this Journal. Important Dates Submission Deadline : July 12, 2026 Authors Notification : August 11, 2026 Final Manuscript Due : August 18, 2026 Publication Date : Determined by the Editor-in-Chief Editorial Board Members Amritam Sarcar, Microsoft Corp, USA Grienggrai Rajchakit, Maejo University, Thailand Hazem El-Gendy, Ahram Canadian University, Egypt Hiromi Ban, Fukui University of Technology, Japan Jose Alvarez, National ICT Australia Ltd, Australia Lei Qin, Institute of Computing Technology, Chinese Academy of Sciences, China Mahmoud Rokaya, Taif University, Saudi Arabia Reda mohamed Hamou, University of Saïda, Algeria Saleh Hamad Al Da'ajeh, Abu Dhabi Polytechnic, UAE Shadi Far, Islamic Azad University, Iran ... More</text:p>
          </table:table-cell>
          <table:table-cell table:number-columns-repeated="1013"/>
        </table:table-row>
        <table:table-row table:style-name="ro1">
          <table:table-cell table:style-name="ce2" office:value-type="string" calcext:value-type="string">
            <text:p>AusDM 2026</text:p>
          </table:table-cell>
          <table:table-cell table:style-name="ce2" office:value-type="string" calcext:value-type="string">
            <text:p>The 24th Australasian Data Science and Machine Learning Conference (AusDM)</text:p>
          </table:table-cell>
          <table:table-cell table:style-name="ce2" office:value-type="float" office:value="92" calcext:value-type="float">
            <text:p>92</text:p>
          </table:table-cell>
          <table:table-cell table:style-name="ce2" office:value-type="float" office:value="25" calcext:value-type="float">
            <text:p>25</text:p>
          </table:table-cell>
          <table:table-cell table:style-name="ce3" office:value-type="date" office:date-value="2026-07-12" calcext:value-type="date">
            <text:p>2026-07-12</text:p>
          </table:table-cell>
          <table:table-cell table:style-name="ce3" office:value-type="date" office:date-value="2026-08-10" calcext:value-type="date">
            <text:p>2026-08-10</text:p>
          </table:table-cell>
          <table:table-cell table:style-name="ce3" office:value-type="date" office:date-value="2026-09-06" calcext:value-type="date">
            <text:p>2026-09-06</text:p>
          </table:table-cell>
          <table:table-cell table:style-name="ce2" office:value-type="string" calcext:value-type="string">
            <text:p>Sydney</text:p>
          </table:table-cell>
          <table:table-cell table:style-name="ce2" office:value-type="string" calcext:value-type="string">
            <text:p>Dec 2, 2026 - Dec 4, 2026</text:p>
          </table:table-cell>
          <table:table-cell table:style-name="ce4" office:value-type="string" calcext:value-type="string">
            <text:p><text:a xlink:href="https://ausdm26.ausdm.org/" xlink:type="simple">https://ausdm26.ausdm.org/</text:a></text:p>
          </table:table-cell>
          <table:table-cell table:style-name="ce2" office:value-type="string" calcext:value-type="string">
            <text:p>We seek contributions in, but not limited to, the following areas: Foundational Techniques in Machine Learning and AI Supervised, unsupervised, semi-supervised and self-supervised learning. Deep learning and representation learning. Reinforcement learning and federated learning. Transfer learning, meta learning, few-shot and continual learning. Multitask and multimodal learning. Generative models, including GANs and diffusion models. Large Language Models (LLMs) and Large Multimodal Models (LMMs). Zero-shot and prompt-based learning. Learning from Diverse and Complex Data Analytics over structured, semi-structured, and unstructured data. Text, time-series, graph, spatial, spatio-temporal, and network data. Web, social media, multimedia, IoT, and sensor data. Sequential, temporal, and dynamic data modelling. Data-Centric AI and Data Engineering Data preprocessing, cleaning, integration, matching, and linkage. Privacy-preserving and secure data mining. Data-centric AI pipelines and dataset curation. Computational aspects of data mining and large-scale data management. Scalable and Real-Time Data Analytics Big data analytics and scalable ML. Parallel and distributed learning algorithms. Data stream mining and real-time analytics. Edge, cloud, and IoT-enabled ML systems. Interactive and Visual Analytics Visual analytics and explainability through visualisation. Human-in-the-loop machine learning. Interactive data exploration and decision support. Responsible, Causal, and Explainable AI Explainable and interpretable machine learning. Fairness, accountability, transparency, and ethics in AI. Causal inference and causal machine learning. Robustness, generalization, and uncertainty quantification. Applied Data Science and ML Across Domains Applications in business, finance, education, agriculture, urban planning, healthcare, sports, social sciences, cybersecurity, arts, and humanities. Domain-specific AI systems in biomedical informatics, environmental science, astronomy, engineering, and more. Industrial case studies and data-driven product innovations.</text:p>
          </table:table-cell>
          <table:table-cell table:number-columns-repeated="1013"/>
        </table:table-row>
        <table:table-row table:style-name="ro1">
          <table:table-cell table:style-name="ce2" office:value-type="string" calcext:value-type="string">
            <text:p>ECIJ 2026</text:p>
          </table:table-cell>
          <table:table-cell table:style-name="ce2" office:value-type="string" calcext:value-type="string">
            <text:p>Electrical &amp; Computer Engineering: An International Journal</text:p>
          </table:table-cell>
          <table:table-cell table:style-name="ce2" office:value-type="float" office:value="85" calcext:value-type="float">
            <text:p>85</text:p>
          </table:table-cell>
          <table:table-cell table:style-name="ce2" office:value-type="float" office:value="30" calcext:value-type="float">
            <text:p>30</text:p>
          </table:table-cell>
          <table:table-cell table:style-name="ce3" office:value-type="date" office:date-value="2026-07-12" calcext:value-type="date">
            <text:p>2026-07-12</text:p>
          </table:table-cell>
          <table:table-cell table:style-name="ce3" office:value-type="date" office:date-value="2026-08-11" calcext:value-type="date">
            <text:p>2026-08-11</text:p>
          </table:table-cell>
          <table:table-cell table:style-name="ce3" office:value-type="date" office:date-value="2026-08-18" calcext:value-type="date">
            <text:p>2026-08-18</text:p>
          </table:table-cell>
          <table:table-cell table:number-columns-repeated="2"/>
          <table:table-cell table:style-name="ce4" office:value-type="string" calcext:value-type="string">
            <text:p><text:a xlink:href="https://wireilla.com/engg/ecij/index.html" xlink:type="simple">https://wireilla.com/engg/ecij/index.html</text:a></text:p>
          </table:table-cell>
          <table:table-cell table:style-name="ce2" office:value-type="string" calcext:value-type="string">
            <text:p>Electrical &amp; Computer Engineering: An International Journal (ECIJ) Scope &amp; Topics Electrical &amp; Computer Engineering: An International Journal (ECIJ) is a peer-reviewed, open access journal that addresses the impacts and challenges of Electrical and Computer Engineering. The journal documents practical and theoretical results which make a fundamental contribution for the development Electrical and Computer Engineering. This journal aims to bring together researchers and practitioners in all Electrical and Computer Engineering aspects, including (but not limited to): Topics of interest include but are not limited to, the following Communications and Networks Control, Intelligent Systems and Robotics Integrated Circuits and Embedded Systems Microelectronic Technologies, Devices, CAD and, VLSI Microwave, Nano Devices and RF Power and Energy Systems Signal Processing and New Media Applied Electromagnetics Artificial Intelligence and Artificial Life Hardware Formal Verification Photonics Software Engineering and Real-time Systems Paper Submission: Authors are invited to submit papers for this journal through the Submission System . Submissions must be original and should not have been published previously or be under consideration for publication while being evaluated for this Journal. Important Dates : Submission Deadline : July 12, 2026 Authors Notification : August 11, 2026 Final Manuscript Due : August 18, 2026 Publication Date : Determined by the Editor-in-Chief Related Journal : International Journal of Advances in Materials Science and Engineering (IJAMSE) Editorial Board: Ahmed Nabih Zaki Rashed, Menoufia University, Menoufia Ahmet KARAARSLAN , Yıldırım Beyazıt University, Turkey Ali Badri , Shahid Rajaee University, Iran Almoataz Youssef Abdelaziz, Ain Shams University, Egypt Ambarnath Banerji , Meghnad Saha Institute of Technology, India Anil Kumar Dubey , Govt.Eng.College, India Arvind Dhingra , Guru Nanak Dev Engineering College, Ind</text:p>
          </table:table-cell>
          <table:table-cell table:number-columns-repeated="1013"/>
        </table:table-row>
        <table:table-row table:style-name="ro1">
          <table:table-cell table:style-name="ce2" office:value-type="string" calcext:value-type="string">
            <text:p>IJCCMS 2026</text:p>
          </table:table-cell>
          <table:table-cell table:style-name="ce2" office:value-type="string" calcext:value-type="string">
            <text:p>International Journal of Chaos, Control, Modelling and Simulation</text:p>
          </table:table-cell>
          <table:table-cell table:style-name="ce2" office:value-type="float" office:value="78" calcext:value-type="float">
            <text:p>78</text:p>
          </table:table-cell>
          <table:table-cell table:style-name="ce2" office:value-type="float" office:value="30" calcext:value-type="float">
            <text:p>30</text:p>
          </table:table-cell>
          <table:table-cell table:style-name="ce3" office:value-type="date" office:date-value="2026-07-12" calcext:value-type="date">
            <text:p>2026-07-12</text:p>
          </table:table-cell>
          <table:table-cell table:style-name="ce3" office:value-type="date" office:date-value="2026-08-11" calcext:value-type="date">
            <text:p>2026-08-11</text:p>
          </table:table-cell>
          <table:table-cell table:style-name="ce3" office:value-type="date" office:date-value="2026-08-18" calcext:value-type="date">
            <text:p>2026-08-18</text:p>
          </table:table-cell>
          <table:table-cell table:number-columns-repeated="2"/>
          <table:table-cell table:style-name="ce4" office:value-type="string" calcext:value-type="string">
            <text:p><text:a xlink:href="https://airccse.org/journal/ijccms/index.html" xlink:type="simple">https://airccse.org/journal/ijccms/index.html</text:a></text:p>
          </table:table-cell>
          <table:table-cell table:style-name="ce2" office:value-type="string" calcext:value-type="string">
            <text:p>International Journal of Chaos, Control, Modelling and Simulation (IJCCMS) Scope &amp; Topics The International Journal of Chaos, Control, Modelling and Simulation is a Quarterly open access peer-reviewed journal that publishes articles which contribute new results in all areas of Chaos Theory, Control Systems, Scientific Modelling and Computer Simulation. In the last few decades, chaos theory has found important applications in secure communication devices and secure data encryption. Control methods are very useful in several applied areas like Chaos, Automation, Communication, Robotics, Power Systems, and Biomedical Instrumentation. The journal focuses on all technical and practical aspects of Chaos, Control, Modelling and Simulation. The goal of this journal is to bring together researchers and practitioners from academia and industry to focus on chaotic systems and applications, control theory, process control, automation, modelling concepts, computational methods, computer simulation and establishing new collaborations in these areas. Authors are solicited to contribute to this journal by submitting articles that illustrate research results, projects, surveying works and industrial experiences that describe significant advances in Chaos Theory, Control Systems, Modelling and Simulation Techniques. Topics of interest include but are not limited to, the following Adaptive control Advanced chaos theory Advanced computing techniques Algorithms, modelling and simulation Applications of chaos in science and engineering Artificial intelligence Artificial neural networks Automation and mobile robots Bioinformatics Biological modelling Biological systems and models Chaotic systems Chaos modelling Circuit realization of chaotic systems Control of chaotic systems Cloud computing Communication engineering Computational biology Computational fluid dynamics Computer science Control devices &amp; instruments Control theory Data mining Data Structures and Algorithms Scientific computing Secure communication devices Stochastic modelling and control Data visualization Digital control Digital image processing Digital signal processing Dynamical systems and stability theory Embedded systems and control Evolutionary techniques in engineering Flight control and surveillance systems Fuzzy logic control Genetic algorithms and applications Hyperchaotic systems Industrial applications of control Intelligent systems Information theory Linear and nonlinear programming Linear control theory Materials science Mathematical control theory Mathematical modelling and applications Measurement systems Modelling and control Nonlinear control theory Numerical methods in control systems Optimization and optimal control Parallel computing Process control and automation Real-time systems Real and complex analysis Robust control Soft computing techniques Paper Submission Authors are invited to Submit papers for this journal through E-mail ijccms@aircconline.com . Submissions must be original and should not have been published previously or be under consideration for publication while being evaluated for this Journal. Important Dates Submission Deadline : July 12, 2026 Authors Notification : August 11, 2026 Final Manuscript Due : August 18, 2026 Publication Date : Determined by the Editor-in-Chief Editorial Board Members Aditya Goel, Comviva Technologies Ltd., India Anand Rajavat, Shri Vaishnav Institute of Technology and Science, India Ankit Chaudhary, University of Iowa, USA Anurag Pal, Siksha O Anusandhan University, India Ashutosh Kumar Dubey, Trinity Institute of Technology and Research, India Mohammed Imran B, University of Dammam, Saudi Arabia Prasad B.D.C.N, Prasad V. Potluri Siddhartha Institute of Technology, India Binod Kumar Pattanayak, Siksha 'O' Anusandhan University, India Christos K. Volos, Hellenic Army Academy, Greece Maheswari C, Anna University, India Satish Kumar D, Nehru institute of technology, India Shravani D, Matrusri Institute of Post-Graduate Studies, India Deepak Gupta, IMS Engineering College, India Dinesh Kumar Madan, The Technological Institute of Textile &amp; Sciences, India Doreswamy, Mangalore University, India ... More</text:p>
          </table:table-cell>
          <table:table-cell table:number-columns-repeated="1013"/>
        </table:table-row>
        <table:table-row table:style-name="ro1">
          <table:table-cell table:style-name="ce2" office:value-type="string" calcext:value-type="string">
            <text:p>INFORMS-DSW 2026</text:p>
          </table:table-cell>
          <table:table-cell table:style-name="ce2" office:value-type="string" calcext:value-type="string">
            <text:p>INFORMS Workshop on Data Science 2026</text:p>
          </table:table-cell>
          <table:table-cell table:style-name="ce2" office:value-type="float" office:value="92" calcext:value-type="float">
            <text:p>92</text:p>
          </table:table-cell>
          <table:table-cell table:style-name="ce2" office:value-type="float" office:value="30" calcext:value-type="float">
            <text:p>30</text:p>
          </table:table-cell>
          <table:table-cell table:style-name="ce3" office:value-type="date" office:date-value="2026-07-12" calcext:value-type="date">
            <text:p>2026-07-12</text:p>
          </table:table-cell>
          <table:table-cell table:number-columns-repeated="2" table:style-name="ce3" office:value-type="date" office:date-value="2026-08-25" calcext:value-type="date">
            <text:p>2026-08-25</text:p>
          </table:table-cell>
          <table:table-cell table:style-name="ce2" office:value-type="string" calcext:value-type="string">
            <text:p>San Francisco, California, USA</text:p>
          </table:table-cell>
          <table:table-cell table:style-name="ce2" office:value-type="string" calcext:value-type="string">
            <text:p>Oct 31, 2026 - Oct 31, 2026</text:p>
          </table:table-cell>
          <table:table-cell table:style-name="ce4" office:value-type="string" calcext:value-type="string">
            <text:p><text:a xlink:href="https://sites.google.com/view/data-science-2026" xlink:type="simple">https://sites.google.com/view/data-science-2026</text:a></text:p>
          </table:table-cell>
          <table:table-cell table:style-name="ce2" office:value-type="string" calcext:value-type="string">
            <text:p>INFORMS 10th Workshop on Data Science Hosted by The INFORMS College on Artificial Intelligence Conference date: Saturday, October 31, 2026 Location: San Francisco, California Conference website: https://sites.google.com/view/data-science-2026 The 10th INFORMS Workshop on Data Science (DS 2026) is a premier research conference dedicated to developing data science theories, methods, and algorithms to solve challenging problems and benefit businesses and society at large. The workshop invites innovative data science research contributions that address business and societal challenges from the lens of statistical learning, machine learning, deep learning, reinforcement learning, large language models, generative AI, and network science. The workshop welcomes original research (complete papers or short papers) addressing non-trivial data analytical challenges and problems in marketing, finance, supply chain, healthcare, energy, cybersecurity, social networks, etc. We welcome research on novel methods that either identify and address shortcomings in current data science techniques or explore completely new problems. Additionally, we encourage submissions of research that incorporates existing methods and models (e.g., large language models) tailored to the unique needs of an application area. Research contributions on theoretical and methodological foundations of data science, such as optimization for machine learning and new algorithms or architectures for deep learning, are also welcome. Finally, we solicit submissions describing designs and implementations of data science solutions and AI systems demonstrating business or real-world impact in practical industrial applications. Research Contributions May Include: ● Advances in deep learning techniques, e.g., transformers, graph neural networks, and embedding approaches, for targeted business applications ● Applications and adaptations of generative AI and large language models (e.g., RAG, fine-tuning, prompt engineering, tool use, agentic frameworks) for domain-specific business and societal challenges ● Statistical inference and learning methods, e.g., causal inference, Bayesian methods, and high-dimensional statistics ● Algorithmic fairness, bias mitigation, and ethical frameworks for responsible AI ● AI-powered knowledge graphs and reasoning ● Agentic AI systems and autonomous decision-making agents ● Implications of AI, including generative AI and large language models, on individuals, organizations, and societies ● AI for environmental sustainability and climate change ● AI in digital marketing and consumer behavior analysis ● Human-AI collaboration and augmented intelligence ● Explainable AI, interpretability, and computational approaches for measuring and enhancing trust in AI systems ● Computational methods for big data, text mining, natural language processing, and large language models ● Innovative methods for social network analytics on individuals and firms ● Novel data-driven approaches for cybersecurity, privacy, healthcare (e.g., chronic disease management, preventative care), and industrial applications (e.g., energy, education, finance, supply chain) ● Large-scale recommendation systems and social media systems ● Multimodal analytics for business data across text, image, video, and audio formats ● Synthetic data generation and privacy-preserving data science ● Real-world experiences with AI and ML implementations in organizations ● Applications of data science across various sectors, including healthcare, finance, marketing, energy, operations, and supply chain Submission website: https://cmt3.research.microsoft.com/DATASCIENCE2026 Important Dates: Paper Submission Open: May 23, 2026 Paper Submission Deadline: July 1, 2026 Extended: July 12, 2026 Notification of Paper Acceptance: August 25, 2026 Workshop Date: October 31, 2026 Information for Authors: ● Submissions in the form of complete papers or short papers are welcome. ● Complete paper submissions should be a maximum of 10 pages, including tables and figures. ● Short paper submissions (which could be extended abstracts or work-in-progress papers) should be a maximum of 5 pages, including tables and figures. Real-world applications of AI in industry can be submitted as a short paper. ● References (irrespective of complete paper or short paper submissions) do not count towards the page limit. ● Use single-spaced text with 12-point font and one-inch margins on four sides, printable on 8.5 x 11-inch paper. ● Submissions must be blinded. No author information should appear anywhere in the document. ● INFORMS or this workshop does not take ownership of paper copyrights. ● When uploading papers to the submission portal, the authors can indicate whether the paper’s main contributor is a student (so as to be considered for the best student paper award). Organizing Committee: Honorary Chairs Olivia Sheng, Arizona State University Alexander S. Tuzhilin, New York University Conference Chairs Weifeng Li, University of Georgia, weifeng.li@uga.edu Haibing Lu, Santa Clara University, hlu@scu.edu Yinghui (Catherine) Yang, UC Davis, yiyang@ucdavis.edu Program Chairs Jessica Clark, University of Maryland, jmclark@umd.edu Yuanyang Liu, University of Tennessee, yliu191@utk.edu Feng Mai, University of Iowa, feng-mai@uiowa.edu Publicity Chairs Benjamin M. Ampel, Georgia State University Gene Moo Lee, University of British Columbia Konstantina Valogianni, IE University Xiang (Shawn) Wan, Santa Clara University Renyu (Philip) Zhang, Chinese University of Hong Kong</text:p>
          </table:table-cell>
          <table:table-cell table:number-columns-repeated="1013"/>
        </table:table-row>
        <table:table-row table:style-name="ro1">
          <table:table-cell table:style-name="ce2" office:value-type="string" calcext:value-type="string">
            <text:p>INFORMS-DSW 2026</text:p>
          </table:table-cell>
          <table:table-cell table:style-name="ce2" office:value-type="string" calcext:value-type="string">
            <text:p>INFORMS Workshop on Data Science 2026</text:p>
          </table:table-cell>
          <table:table-cell table:style-name="ce2" office:value-type="float" office:value="90" calcext:value-type="float">
            <text:p>90</text:p>
          </table:table-cell>
          <table:table-cell table:style-name="ce2" office:value-type="float" office:value="25" calcext:value-type="float">
            <text:p>25</text:p>
          </table:table-cell>
          <table:table-cell table:style-name="ce3" office:value-type="date" office:date-value="2026-07-12" calcext:value-type="date">
            <text:p>2026-07-12</text:p>
          </table:table-cell>
          <table:table-cell table:number-columns-repeated="2" table:style-name="ce3" office:value-type="date" office:date-value="2026-08-25" calcext:value-type="date">
            <text:p>2026-08-25</text:p>
          </table:table-cell>
          <table:table-cell table:style-name="ce2" office:value-type="string" calcext:value-type="string">
            <text:p>San Francisco, California, USA</text:p>
          </table:table-cell>
          <table:table-cell table:style-name="ce2" office:value-type="string" calcext:value-type="string">
            <text:p>Oct 31, 2026 - Oct 31, 2026</text:p>
          </table:table-cell>
          <table:table-cell table:style-name="ce4" office:value-type="string" calcext:value-type="string">
            <text:p><text:a xlink:href="https://sites.google.com/view/data-science-2026" xlink:type="simple">https://sites.google.com/view/data-science-2026</text:a></text:p>
          </table:table-cell>
          <table:table-cell table:style-name="ce2" office:value-type="string" calcext:value-type="string">
            <text:p>INFORMS 10th Workshop on Data Science Hosted by The INFORMS College on Artificial Intelligence Conference date: Saturday, October 31, 2026 Location: San Francisco, California Conference website: https://sites.google.com/view/data-science-2026 The 10th INFORMS Workshop on Data Science (DS 2026) is a premier research conference dedicated to developing data science theories, methods, and algorithms to solve challenging problems and benefit businesses and society at large. The workshop invites innovative data science research contributions that address business and societal challenges from the lens of statistical learning, machine learning, deep learning, reinforcement learning, large language models, generative AI, and network science. The workshop welcomes original research (complete papers or short papers) addressing non-trivial data analytical challenges and problems in marketing, finance, supply chain, healthcare, energy, cybersecurity, social networks, etc. We welcome research on novel methods that either identify and address shortcomings in current data science techniques or explore completely new problems. Additionally, we encourage submissions of research that incorporates existing methods and models (e.g., large language models) tailored to the unique needs of an application area. Research contributions on theoretical and methodological foundations of data science, such as optimization for machine learning and new algorithms or architectures for deep learning, are also welcome. Finally, we solicit submissions describing designs and implementations of data science solutions and AI systems demonstrating business or real-world impact in practical industrial applications. Research Contributions May Include: ● Advances in deep learning techniques, e.g., transformers, graph neural networks, and embedding approaches, for targeted business applications ● Applications and adaptations of generative AI and large language models (e.g., RAG, fine-tuning, prompt engineering, tool use, agentic frameworks) for domain-specific business and societal challenges ● Statistical inference and learning methods, e.g., causal inference, Bayesian methods, and high-dimensional statistics ● Algorithmic fairness, bias mitigation, and ethical frameworks for responsible AI ● AI-powered knowledge graphs and reasoning ● Agentic AI systems and autonomous decision-making agents ● Implications of AI, including generative AI and large language models, on individuals, organizations, and societies ● AI for environmental sustainability and climate change ● AI in digital marketing and consumer behavior analysis ● Human-AI collaboration and augmented intelligence ● Explainable AI, interpretability, and computational approaches for measuring and enhancing trust in AI systems ● Computational methods for big data, text mining, natural language processing, and large language models ● Innovative methods for social network analytics on individuals and firms ● Novel data-driven approaches for cybersecurity, privacy, healthcare (e.g., chronic disease management, preventative care), and industrial applications (e.g., energy, education, finance, supply chain) ● Large-scale recommendation systems and social media systems ● Multimodal analytics for business data across text, image, video, and audio formats ● Synthetic data generation and privacy-preserving data science ● Real-world experiences with AI and ML implementations in organizations ● Applications of data science across various sectors, including healthcare, finance, marketing, energy, operations, and supply chain Submission website: https://cmt3.research.microsoft.com/DATASCIENCE2026 Important Dates: Paper Submission Open: May 23, 2026 Paper Submission Deadline: July 1, 2026 Extended: July 12, 2026 Notification of Paper Acceptance: August 25, 2026 Workshop Date: October 31, 2026 Information for Authors: ● Submissions in the form of complete papers or short papers are welcome. ● Complete paper submissions should be a maximum of 10 pages, including tables and figures. ● Short paper submissions (which could be extended abstracts or work-in-progress papers) should be a maximum of 5 pages, including tables and figures. Real-world applications of AI in industry can be submitted as a short paper. ● References (irrespective of complete paper or short paper submissions) do not count towards the page limit. ● Use single-spaced text with 12-point font and one-inch margins on four sides, printable on 8.5 x 11-inch paper. ● Submissions must be blinded. No author information should appear anywhere in the document. ● INFORMS or this workshop does not take ownership of paper copyrights. ● When uploading papers to the submission portal, the authors can indicate whether the paper’s main contributor is a student (so as to be considered for the best student paper award). Organizing Committee: Honorary Chairs Olivia Sheng, Arizona State University Alexander S. Tuzhilin, New York University Conference Chairs Weifeng Li, University of Georgia, weifeng.li@uga.edu Haibing Lu, Santa Clara University, hlu@scu.edu Yinghui (Catherine) Yang, UC Davis, yiyang@ucdavis.edu Program Chairs Jessica Clark, University of Maryland, jmclark@umd.edu Yuanyang Liu, University of Tennessee, yliu191@utk.edu Feng Mai, University of Iowa, feng-mai@uiowa.edu Publicity Chairs Benjamin M. Ampel, Georgia State University Gene Moo Lee, University of British Columbia Konstantina Valogianni, IE University Xiang (Shawn) Wan, Santa Clara University Renyu (Philip) Zhang, Chinese University of Hong Kong</text:p>
          </table:table-cell>
          <table:table-cell table:number-columns-repeated="1013"/>
        </table:table-row>
        <table:table-row table:style-name="ro1">
          <table:table-cell table:style-name="ce2" office:value-type="string" calcext:value-type="string">
            <text:p>AIAT 2026</text:p>
          </table:table-cell>
          <table:table-cell table:style-name="ce2" office:value-type="string" calcext:value-type="string">
            <text:p>2026 6th International Conference on Artificial Intelligence and Application Technologies (AIAT 2026)</text:p>
          </table:table-cell>
          <table:table-cell table:style-name="ce2" office:value-type="float" office:value="85" calcext:value-type="float">
            <text:p>85</text:p>
          </table:table-cell>
          <table:table-cell table:style-name="ce2" office:value-type="float" office:value="35" calcext:value-type="float">
            <text:p>35</text:p>
          </table:table-cell>
          <table:table-cell table:style-name="ce3" office:value-type="date" office:date-value="2026-07-15" calcext:value-type="date">
            <text:p>2026-07-15</text:p>
          </table:table-cell>
          <table:table-cell table:number-columns-repeated="2"/>
          <table:table-cell table:style-name="ce2" office:value-type="string" calcext:value-type="string">
            <text:p>Tokyo, Japan</text:p>
          </table:table-cell>
          <table:table-cell table:style-name="ce2" office:value-type="string" calcext:value-type="string">
            <text:p>Dec 3, 2026 - Dec 5, 2026</text:p>
          </table:table-cell>
          <table:table-cell table:style-name="ce4" office:value-type="string" calcext:value-type="string">
            <text:p><text:a xlink:href="http://www.aiat.org/" xlink:type="simple">http://www.aiat.org/</text:a></text:p>
          </table:table-cell>
          <table:table-cell table:style-name="ce2" office:value-type="string" calcext:value-type="string">
            <text:p>★ AIAT 2026-[Ei Compendex &amp; Scopus] ★ * Full Name：2026 6th International Conference on Artificial Intelligence and Application Technologies (AIAT 2026) * Abbreviation: AIAT 2026 * Time: December 3-5, 2026 * Place: Tokyo, Japan * Website: http://www.aiat.org/ ★ Call for Papers ************************* Interest for submission include, but are not limited to： :: Artificial Intelligence :: AI and evolutionary algorithms Constraint-based reasoning and constraint programming Distributed AI algorithms and techniques Distributed AI systems and architectures Evaluation of AI tools Heuristic searching methods Intelligent databases Learning and adaptive sensor fusion Multisensor data fusion using neural and fuzzy techniques :: Automation Control and Applications :: Artificial intelligence and machine learning Automation control system Brain models, brain mapping, cognitive science Circuits and systems Decision support systems Fuzzy control and Its applications Industrial process control Measurement and diagnosis systems Software tools for AI More Topics, please visit at https://www.aiat.org/cfp.html ★ Proceedings ************************* Accepted papers will be published into AIAT 2026 Conference Proceedings, which will be published online, and submitted for indexing by Ei Compendex, Scopus, Thomson Reuters (WoS), Inspec. ★Submission★ 1. Full paper (publication and presentation) 2. Abstract (presentation only) Electronic Submission System: https://www.zmeeting.org/submission/aiat2026 Send your enquiry to: aiat_info@robotics.ac.cn More details about submission, please visit at https://www.aiat.org/sub.html ★ Conference Program ************************* Day 1 - December 3, 2026-Sign in and Collect Conference Materials Day 2 - December 4, 2026-Opening Remarks &amp; Keynote Speech&amp; Parallel Sessions Day 3 - December 5, 2026-Parallel Sessions ★ Contact Information ************************** Conference Secretary: Ms. Mia Huang Email: aiat_info@robotics.ac.cn Phone: +86-18010579209 Wechat ID: iconf-ras * Looking forward to your participation.</text:p>
          </table:table-cell>
          <table:table-cell table:number-columns-repeated="1013"/>
        </table:table-row>
        <table:table-row table:style-name="ro1">
          <table:table-cell table:style-name="ce2" office:value-type="string" calcext:value-type="string">
            <text:p>IDSTA 2026</text:p>
          </table:table-cell>
          <table:table-cell table:style-name="ce2" office:value-type="string" calcext:value-type="string">
            <text:p>2026 Seventh International Conference on Intelligent Data Science Technologies and Applications</text:p>
          </table:table-cell>
          <table:table-cell table:style-name="ce2" office:value-type="float" office:value="92" calcext:value-type="float">
            <text:p>92</text:p>
          </table:table-cell>
          <table:table-cell table:style-name="ce2" office:value-type="float" office:value="25" calcext:value-type="float">
            <text:p>25</text:p>
          </table:table-cell>
          <table:table-cell table:style-name="ce3" office:value-type="date" office:date-value="2026-07-15" calcext:value-type="date">
            <text:p>2026-07-15</text:p>
          </table:table-cell>
          <table:table-cell table:style-name="ce3" office:value-type="date" office:date-value="2026-08-10" calcext:value-type="date">
            <text:p>2026-08-10</text:p>
          </table:table-cell>
          <table:table-cell table:style-name="ce3" office:value-type="date" office:date-value="2026-08-25" calcext:value-type="date">
            <text:p>2026-08-25</text:p>
          </table:table-cell>
          <table:table-cell table:style-name="ce2" office:value-type="string" calcext:value-type="string">
            <text:p>Bucharest, Romania</text:p>
          </table:table-cell>
          <table:table-cell table:style-name="ce2" office:value-type="string" calcext:value-type="string">
            <text:p>Sep 22, 2026 - Sep 25, 2026</text:p>
          </table:table-cell>
          <table:table-cell table:style-name="ce4" office:value-type="string" calcext:value-type="string">
            <text:p><text:a xlink:href="https://idsta-conference.org/2026/" xlink:type="simple">https://idsta-conference.org/2026/</text:a></text:p>
          </table:table-cell>
          <table:table-cell table:style-name="ce2" office:value-type="string" calcext:value-type="string">
            <text:p>In an era increasingly defined by an explosion of data, coupled with the transformative power of artificial intelligence, data science has emerged as a pivotal field driving innovation and insights across every sector. This event will bring together researchers, practitioners, and industry leaders to explore the latest advancements, challenges, and opportunities in the field, recognizing the crucial role big data and advanced AI techniques play in shaping its trajectory. We invite submissions that delve into, but are not limited to, the following key areas: *Advanced AI and Machine Learning Integration: Explore novel applications and methodologies where AI and machine learning are deeply embedded in data science workflows. This includes the use of generative AI, sophisticated natural language processing (NLP), and advancements in automating tasks like data cleaning, feature engineering, and model building. *Automated Machine Learning (AutoML): Submissions on the development, application, and impact of AutoML tools are highly encouraged. We are interested in research that addresses how AutoML is increasing efficiency, democratizing machine learning, and making it accessible to a wider range of users, including domain experts. Cloud and Edge Computing in Data Science: We welcome papers discussing the continued role of cloud computing for scalable data storage, processing, and model deployment, as well as the growing significance of edge computing for real-time data analysis in applications like autonomous vehicles and IoT devices. *Big Data Technologies and Analytics: Submissions exploring the infrastructure, frameworks, and techniques required to manage and analyze massive, high-velocity datasets. Topics of interest include distributed processing (e.g., Spark, Hadoop), scalable data warehousing, real-time data streaming technologies, and data lakes. *Business Analytics and Intelligence: Papers focusing on the application of data science techniques to solve business problems. This includes descriptive, predictive, and prescriptive analytics, performance metrics (KPIs), data visualization, dashboarding, and strategies for translating data insights into actionable business decisions. *Risk Management and Analytics: We welcome papers on the application of data science and predictive modeling to identify, assess, and mitigate risks. This includes areas such as financial risk (e.g., credit scoring), operational risk, fraud detection, and cybersecurity threats. *Data Science for Sustainability and ESG: We seek papers on the use of data science, AI, and analytics to address environmental, social, and governance (ESG) challenges. This includes topics like climate modeling, sustainable resource management, supply chain transparency, and societal impact analysis. *Data Democratization: Papers focusing on strategies and technologies that promote making data and analytics tools more accessible to a wider range of users, fostering a data-driven culture within organizations. Data Governance: Submissions on policies, processes, and technologies for managing data assets effectively, ensuring data quality, compliance, and security. *Data Privacy and Ethics: We invite research addressing crucial considerations related to data privacy, including compliance with regulations (e.g., GDPR, CCPA), anonymization techniques, and secure data handling. This also encompasses broader ethical considerations in data science, such as bias detection, fairness in algorithms, and responsible AI practices. *Geospatial Data Science: Submissions exploring the use, analysis, and visualization of geospatial data, including applications in urban planning, environmental monitoring, logistics, and location intelligence, are highly encouraged. *Augmented Analytics: We seek contributions that showcase innovations in augmented analytics, where AI and machine learning enhance and automate the data analysis process, leading to more accessible insights, automated data cleaning, feature engineering, and report generation. *Data Science in Education: Submissions focusing on learning analytics, educational data mining, personalized learning paths, and the use of AI to enhance teaching, student engagement, and institutional effectiveness. *Emerging Trends in Data Science: We are also keen to receive papers on cutting-edge and future-looking topics, such as: -Quantum Computing's impact on data processing and complex problem-solving. -Data Fabric architectures for integrated data management across diverse environments. -XOps (including MLOps) for comprehensive lifecycle management of machine learning models. -The increasing demand for actionable data that directly informs business decisions. -The burgeoning field of decision intelligence, leveraging data and AI to improve decision-making processes.</text:p>
          </table:table-cell>
          <table:table-cell table:number-columns-repeated="1013"/>
        </table:table-row>
        <table:table-row table:style-name="ro1">
          <table:table-cell table:style-name="ce2" office:value-type="string" calcext:value-type="string">
            <text:p>IF-AIE 2026</text:p>
          </table:table-cell>
          <table:table-cell table:style-name="ce2" office:value-type="string" calcext:value-type="string">
            <text:p>The 2026 International Forum on Artificial Intelligence in Education Mode: Hybrid (On-site and Online)</text:p>
          </table:table-cell>
          <table:table-cell table:style-name="ce2" office:value-type="float" office:value="15" calcext:value-type="float">
            <text:p>15</text:p>
          </table:table-cell>
          <table:table-cell table:style-name="ce2" office:value-type="float" office:value="30" calcext:value-type="float">
            <text:p>30</text:p>
          </table:table-cell>
          <table:table-cell table:style-name="ce3" office:value-type="date" office:date-value="2026-07-15" calcext:value-type="date">
            <text:p>2026-07-15</text:p>
          </table:table-cell>
          <table:table-cell table:style-name="ce3" office:value-type="date" office:date-value="2026-08-20" calcext:value-type="date">
            <text:p>2026-08-20</text:p>
          </table:table-cell>
          <table:table-cell table:style-name="ce3" office:value-type="date" office:date-value="2026-08-28" calcext:value-type="date">
            <text:p>2026-08-28</text:p>
          </table:table-cell>
          <table:table-cell table:style-name="ce2" office:value-type="string" calcext:value-type="string">
            <text:p>Algiers, Algeria</text:p>
          </table:table-cell>
          <table:table-cell table:style-name="ce2" office:value-type="string" calcext:value-type="string">
            <text:p>Sep 27, 2026 - Sep 28, 2026</text:p>
          </table:table-cell>
          <table:table-cell table:style-name="ce4" office:value-type="string" calcext:value-type="string">
            <text:p><text:a xlink:href="https://inre2026.sciencesconf.org" xlink:type="simple">https://inre2026.sciencesconf.org</text:a></text:p>
          </table:table-cell>
          <table:table-cell table:style-name="ce2" office:value-type="string" calcext:value-type="string">
            <text:p>The 2026 International Forum on Artificial Intelligence in Education (IF-AIE 2026) will be held in Algiers, Algeria, on September 27-28, 2026. Mode: Hybrid (On-site and Online) The forum aims to bring together researchers, educators, policymakers, and technology experts to discuss advances, challenges, and opportunities in Artificial Intelligence in Education. Topics include: - Generative AI and LLMs - Adaptive Learning Systems - Learning Analytics - Explainable AI in Education - Educational Data Mining - Smart Learning Environments - AI Ethics in Education - Digital Sovereignty and Educational Technologies Website: https://inre2026.sciencesconf.org</text:p>
          </table:table-cell>
          <table:table-cell table:number-columns-repeated="1013"/>
        </table:table-row>
        <table:table-row table:style-name="ro1">
          <table:table-cell table:style-name="ce2" office:value-type="string" calcext:value-type="string">
            <text:p>ICCR 2026</text:p>
          </table:table-cell>
          <table:table-cell table:style-name="ce2" office:value-type="string" calcext:value-type="string">
            <text:p>2026 8th International Conference on Control and Robotics (ICCR 2026)</text:p>
          </table:table-cell>
          <table:table-cell table:style-name="ce2" office:value-type="float" office:value="70" calcext:value-type="float">
            <text:p>70</text:p>
          </table:table-cell>
          <table:table-cell table:style-name="ce2" office:value-type="float" office:value="30" calcext:value-type="float">
            <text:p>30</text:p>
          </table:table-cell>
          <table:table-cell table:style-name="ce3" office:value-type="date" office:date-value="2026-07-15" calcext:value-type="date">
            <text:p>2026-07-15</text:p>
          </table:table-cell>
          <table:table-cell table:number-columns-repeated="2"/>
          <table:table-cell table:style-name="ce2" office:value-type="string" calcext:value-type="string">
            <text:p>Tokyo, Japan</text:p>
          </table:table-cell>
          <table:table-cell table:style-name="ce2" office:value-type="string" calcext:value-type="string">
            <text:p>Dec 3, 2026 - Dec 5, 2026</text:p>
          </table:table-cell>
          <table:table-cell table:style-name="ce4" office:value-type="string" calcext:value-type="string">
            <text:p><text:a xlink:href="http://www.iccr.net/" xlink:type="simple">http://www.iccr.net/</text:a></text:p>
          </table:table-cell>
          <table:table-cell table:style-name="ce2" office:value-type="string" calcext:value-type="string">
            <text:p>ICCR 2026--Scopus, Ei Compendex 2026 8th International Conference on Control and Robotics (ICCR 2026) Web: http://www.iccr.net/ Time: December 3-5, 2026 Venue: Tokyo, Japan Welcome to Tokyo, Japan for 2026 8th International Conference on Control and Robotics (ICCR 2026 – www.iccr.net), to be held during the period December 3-5, 2026. We are excited to invite you to this event, which will bring together researchers, practitioners, and academics to exchange groundbreaking research and advance the fields of control systems and smart robotics. We believe you will benefit from sharing cutting-edge developments in control and robotics and engaging in insightful discussions with an international audience. ★★Paper Publication Accepted papers will be published into ICCR 2026 Conference Proceedings. The proceedings will be submitted to Ei Compendex and Scopus after the conference. Publication History ICCR 2024 Proceedings | ISBN: 979-8-3315-1815-8 | Archived in IEEE Xplore | Ei-Compendex &amp; Scopus Index ICCR 2023 Proceedings | ISBN: 979-8-3503-0762-7 | Archived in IEEE Xplore | Ei-Compendex &amp; Scopus Index ICCR 2022 Proceedings | ISBN: 978-1-6654-8641-5 | Archived in IEEE Xplore | Ei-Compendex &amp; Scopus Index ICCR 2020 Proceedings | ISBN: 978-1-7281-7562-1 | Archived in IEEE Xplore | Ei-Compendex &amp; Scopus Index ICCR 2018 Proceedings | ISBN: 978-1-5386-8243-2 | Archived in IEEE Xplore | Ei-Compendex &amp; Scopus Index ★★Call for Papers Topics of interest for submission include, but are not limited to: Activity/behaviour recognition Hybrid Learning Systems Perception systems Adaptive Signal Processing and Control Hybrid systems Performance Evaluation and Optimization Complex systems Intelligent Fault Detection and Diagnosis Robot Design, Development and Control Computer and Microprocessor-based Control Intelligent systems Robot sensing and data fusion Computer-based Manufacturing Technologies Intelligent Transportation Technologies and Systems Human-Machine Interfaces Optimization Problems in Signal Processing Virtual Environment, Virtual and Augmented Reality Humanoid Robots Pattern recognition Vision, Recognition and Reconstruction More details, please view: http://www.iccr.net/cfp.html ★★Paper Submission ★Language : English is the official language of the conference; the paper should be written and presented only in English ★A. Full Paper (Presentation and Publication): Accepted full paper will be invited to give the oral presentation at the conference and be published in the conference proceeding. ★B. Abstract (Presentation only): Accepted abstract will be invited to give the oral presentation or poster presentation at the conference, the presentation will not be published. More information: http://www.iccr.net/sub.html Please submit your papers by our online submission system: https://easychair.org/conferences/?conf=iccr2026 If you have any enquiry, contact: iccr_conf@robotics.ac.cn ★★ Program Overview December 3rd, 2026 | Sign in and Collect Conference Materials December 4th, 2026 | Opening Ceremony / Keynote Speeches / Invited Speeches December 5th, 2026 | Parallel Sessions ★★Delegate Registration To Register as a Delegate, please follow the steps below: 1. Please fill the information and complete the payment via https://zmeeting.org/online-payment/891426773 2. You need to email Payment Order ID &amp; Payment to iccr_conf@robotics.ac.cn and wait for the secretary's confirmation. ★★Contact ICCR: Conference Secretary: Ms. Lily ZENG Email: iccr_conf@robotics.ac.cn Website : http://www.iccr.net/</text:p>
          </table:table-cell>
          <table:table-cell table:number-columns-repeated="1013"/>
        </table:table-row>
        <table:table-row table:style-name="ro1">
          <table:table-cell table:style-name="ce2" office:value-type="string" calcext:value-type="string">
            <text:p>ASSE--EI 2026</text:p>
          </table:table-cell>
          <table:table-cell table:style-name="ce2" office:value-type="string" calcext:value-type="string">
            <text:p>2026 7th Asia Service Sciences and Software Engineering Conference (ASSE 2026)</text:p>
          </table:table-cell>
          <table:table-cell table:style-name="ce2" office:value-type="float" office:value="75" calcext:value-type="float">
            <text:p>75</text:p>
          </table:table-cell>
          <table:table-cell table:style-name="ce2" office:value-type="float" office:value="28" calcext:value-type="float">
            <text:p>28</text:p>
          </table:table-cell>
          <table:table-cell table:style-name="ce3" office:value-type="date" office:date-value="2026-07-15" calcext:value-type="date">
            <text:p>2026-07-15</text:p>
          </table:table-cell>
          <table:table-cell table:number-columns-repeated="2"/>
          <table:table-cell table:style-name="ce2" office:value-type="string" calcext:value-type="string">
            <text:p>Osaka, Japan</text:p>
          </table:table-cell>
          <table:table-cell table:style-name="ce2" office:value-type="string" calcext:value-type="string">
            <text:p>Nov 20, 2026 - Nov 22, 2026</text:p>
          </table:table-cell>
          <table:table-cell table:style-name="ce4" office:value-type="string" calcext:value-type="string">
            <text:p><text:a xlink:href="https://asse.net/" xlink:type="simple">https://asse.net/</text:a></text:p>
          </table:table-cell>
          <table:table-cell table:style-name="ce2" office:value-type="string" calcext:value-type="string">
            <text:p>Full name: 2026 7th Asia Service Sciences and Software Engineering Conference (ASSE 2026) Abbreviation: ASSE 2026 2026 7th Asia Service Sciences and Software Engineering Conference will be held in Ritsumeikan University, Osaka, Japan during November 20-22, 2026. Conference Website: https://asse.net/ Conference Venue: Ritsumeikan University, Osaka, Japan 2-150 Iwakuracho, Ibaraki, Osaka 567-8570, Japan ASSE 2026 information: 1. ASSE 2026 is sponsored by Ritsumeikan University, Osaka, Japan. 2. Prof. Hiroyuki SATO from The University of Tokyo, Japan will serve as the keynote speaker. 3. All peer reviewed and accepted papers, after registration and presentation, will be published into ASSE 2026 International Conference Proceedings, which will be submitted to be indexed by Ei Compendex and Scopus. ASSE History: ASSE 2020-ACM｜ISBN: 978-1-4503-7710-2, indexed by Ei Compendex and Scopus. ASSE 2021-ACM｜ISBN: 978-1-4503-8908-2, indexed by Ei Compendex and Scopus. ASSE 2022-ACM｜ISBN: 978-1-4503-8745-3, indexed by Ei Compendex and Scopus. ASSE 2023-ACM｜ISBN: 979-8-4007-0853-4, indexed by Ei Compendex and Scopus. ASSE 2024-ACM｜ISBN: 979-8-4007-1754-3, indexed by Ei Compendex and Scopus. ASSE 2025-ACM｜ISBN: 979-8-4007-1850-2. ASSE 2025 ACM International Conference Proceedings has successfully be published. We believe it will be indexed by Ei Compendex and Scopus soon. Submission and Contact Methods Submission Methods: Electronic System: https://www.zmeeting.org/submission/asse2026 E-mail: asse@acm-sg.org Conference Specialist: Ms. Ace Wong The 2026 7th Asia Service Sciences and Software Engineering Conference (ASSE 2026) is an international event dedicated to exploring the latest advancements in service sciences, software engineering, and their applications across industries. The conference will bring together leading researchers, practitioners, and academics to discuss emerging trends, share innovative ideas, and showcase cutting-edge research in these fields. ASSE 2026 will feature keynote speeches, technical sessions, and networking opportunities, fostering collaboration and knowledge exchange to drive future developments in service-oriented computing and software engineering solutions. For more conference information, please visit the conference website: https://asse.net/</text:p>
          </table:table-cell>
          <table:table-cell table:number-columns-repeated="1013"/>
        </table:table-row>
        <table:table-row table:style-name="ro1">
          <table:table-cell table:style-name="ce2" office:value-type="string" calcext:value-type="string">
            <text:p>AIPR 2026</text:p>
          </table:table-cell>
          <table:table-cell table:style-name="ce2" office:value-type="string" calcext:value-type="string">
            <text:p>SPIE--2026 9th International Conference on Artificial Intelligence and Pattern Recognition (AIPR 2026)</text:p>
          </table:table-cell>
          <table:table-cell table:style-name="ce2" office:value-type="float" office:value="60" calcext:value-type="float">
            <text:p>60</text:p>
          </table:table-cell>
          <table:table-cell table:style-name="ce2" office:value-type="float" office:value="30" calcext:value-type="float">
            <text:p>30</text:p>
          </table:table-cell>
          <table:table-cell table:style-name="ce3" office:value-type="date" office:date-value="2026-07-15" calcext:value-type="date">
            <text:p>2026-07-15</text:p>
          </table:table-cell>
          <table:table-cell table:number-columns-repeated="2"/>
          <table:table-cell table:style-name="ce2" office:value-type="string" calcext:value-type="string">
            <text:p>Xiamen, China</text:p>
          </table:table-cell>
          <table:table-cell table:style-name="ce2" office:value-type="string" calcext:value-type="string">
            <text:p>Sep 18, 2026 - Sep 20, 2026</text:p>
          </table:table-cell>
          <table:table-cell table:style-name="ce4" office:value-type="string" calcext:value-type="string">
            <text:p><text:a xlink:href="https://www.aipr.net/" xlink:type="simple">https://www.aipr.net/</text:a></text:p>
          </table:table-cell>
          <table:table-cell table:style-name="ce2" office:value-type="string" calcext:value-type="string">
            <text:p>★Full Name: 2026 9th International Conference on Artificial Intelligence and Pattern Recognition ★Abbreviation: AIPR 2026 ★Website: https://www.aipr.net/ ★Date: September 18-20, 2026 ★Place: Xiamen, China ★Organised by: mainly organised by Huaqiao University, and co-sponsored by Fujian Cyberspace Security Association, Wuhan Institute of Technology and Minnan Normal University ★Call for paper★ 1. Computer Vision and Robot Vision: Vision sensors Biologically motivated vision Illumination and reflectance modeling Image based modeling Physics-based vision Shape modeling and encoding 2. Image, Speech, Signal and Video Processing: Image and video analysis and understanding Sensor array &amp; multichannel signal processing Segmentation, features and descriptors 3. Document Analysis, Biometrics and Pattern Recognition Applications: Character and Text Recognition Handwriting Recognition Graphics Recognition Document Understanding Gesture and Behavior Analysis 4. Biomedical Image Analysis and Applications: Medical image and signal analysis Biological image and signal analysis Computer-aided detection and diagnosis Image guidance and robot guidance of interventions Content based image retrieval and data mining Medical and biological imaging For details about topics, please visit at https://www.aipr.net/pages/cfp.html ★ Publication AIPR2026 welcomes paper submissions on innovative work from researchers in academia, industry and government describing original research work in Artificial Intelligence &amp; Pattern Recognition field. After a careful reviewing process, all accepted papers after proper registration and presentation will be published into a volume of SPIE Proceedings, which will be included in SPIE Digital Library and indexed by Ei Compendex, Scopus, and CPCI (Web of Science). ★Submission★ 1. Full paper(publication and presentation) 2. Abstract (presentation only) There are two methods for submitting your paper: 1. By Electronic Submission System: https://www.zmeeting.org/submission/aipr2026 2. By our contact email: aipr@bmail.org More detail about submission, please visit at https://www.aipr.net/pages/sub.html ★★Conference Schedule★★ Friday, September 18, 2026 | Conference Registration and Materials Collection/Pre-test for Online Conference Saturday, September 19, 2026 | Invited Talks (Keynote Speech, Plenary Speech, Invited Speech) &amp; Parallel Sessions &amp; Poster Session &amp; Special Sessions Sunday, September 20, 2026 | Social Program&amp;Online sessions ★★Contact: Ms. Zenobia Yang (Conference Secretary) Email: aipr@bmail.org Telephone: (+86) 18702848313(Working hour: GMT+8 10:00am-17:00pm) Wechat: 18081079313</text:p>
          </table:table-cell>
          <table:table-cell table:number-columns-repeated="1013"/>
        </table:table-row>
        <table:table-row table:style-name="ro1">
          <table:table-cell table:style-name="ce2" office:value-type="string" calcext:value-type="string">
            <text:p>IEEE ICAII 2026</text:p>
          </table:table-cell>
          <table:table-cell table:style-name="ce2" office:value-type="string" calcext:value-type="string">
            <text:p>IEEE--2026 4th International Conference on Artificial Intelligence Innovation (ICAII 2026)</text:p>
          </table:table-cell>
          <table:table-cell table:style-name="ce2" office:value-type="float" office:value="85" calcext:value-type="float">
            <text:p>85</text:p>
          </table:table-cell>
          <table:table-cell table:style-name="ce2" office:value-type="float" office:value="30" calcext:value-type="float">
            <text:p>30</text:p>
          </table:table-cell>
          <table:table-cell table:style-name="ce3" office:value-type="date" office:date-value="2026-07-15" calcext:value-type="date">
            <text:p>2026-07-15</text:p>
          </table:table-cell>
          <table:table-cell table:number-columns-repeated="2"/>
          <table:table-cell table:style-name="ce2" office:value-type="string" calcext:value-type="string">
            <text:p>Beijing, China</text:p>
          </table:table-cell>
          <table:table-cell table:style-name="ce2" office:value-type="string" calcext:value-type="string">
            <text:p>Oct 16, 2026 - Oct 18, 2026</text:p>
          </table:table-cell>
          <table:table-cell table:style-name="ce4" office:value-type="string" calcext:value-type="string">
            <text:p><text:a xlink:href="http://www.icaii.org/" xlink:type="simple">http://www.icaii.org/</text:a></text:p>
          </table:table-cell>
          <table:table-cell table:style-name="ce2" office:value-type="string" calcext:value-type="string">
            <text:p>Abbreviation: ICAII 2026 Full name: 2026 4th International Conference on Artificial Intelligence Innovation Website：http://www.icaii.org/ Date: October 16-18, 2026 Place: Beijing, China 2026 4th International Conference on Artificial Intelligence Innovation (ICAII 2026) will be held from October 16-18, 2026 in Beijing, China, with the supports of Beijing Union University, China. ICAII 2026 provides a platform to explore the potential of AI, as well as its ethical and social implications. The conference encourages sharing of experiences and difficulties between researchers and mentoring new researchers, ensuring research is taken to the boundaries of new knowledge. ★Keynote Speaker★ Prof. Huaping Zhang from Beijing Institute of Technology, China, Prof. Harald Lowe from Technical University of Braunschweig, Germany and Prof. Guoqi Xie from Changsha University of Science and Technology, China will be the keynote speakers. ★Publication★ After a careful reviewing process, all accepted papers after proper registration and presentation of ICAII will be published in IEEE Proceedings, which will be published online and indexed by Ei Compendex, Scopus, and CPCI (Web of Science). ★Call for papers★ Topic about Mechatronics and Electrical Systems: √Natural Language Processing: Speech Understanding Fuzzy Computing with Words √Computer Vision: Image and Video Analysis Pattern Recognition √Robotics and Related Fields: Autonomous Robotics Human-Robot Interaction √Expert Systems and Multi-agent Systems: Reasoning and Decision Making Planning and Scheduling √Machine Learning and Neural Networks: Supervised and Unsupervised Learning Deep Learning √Intelligent Database Systems: Query Processing and Optimization Big Data Analytics √Distributed and Parallel Computing: Cloud Computing Edge Computing √Evolutionary Algorithms: Genetic Algorithms Genetic Programming √Other topics: Bioinformatics and Computational Biology Intelligent Transportation Systems More Topics, please visit at https://www.icaii.org/cfp.html ★Submission★ 1. Full Paper (Publication and Presentation) 2. Abstract (Presentation Only) Electronic Submission System (.pdf): http://www.zmeeting.org/submission/icaii2026 Send your enquiry to: icaii_conf@outlook.com More details about submission, please visit at https://www.icaii.org/submission.html ★★Conference Schedule★★ October 16th, 2026 | Conference Sign-in &amp; Materials Collection October 17th, 2026 | Opening Remarks &amp; Keynote Speeches &amp; Parallel Sessions October 18th, 2026 I Online Sessions ★★Contact: Ms. Willow Wong (Conference Secretary) Website: http://www.icaii.org/ Email: icaii_conf@outlook.com WeChat: 18149749902</text:p>
          </table:table-cell>
          <table:table-cell table:number-columns-repeated="1013"/>
        </table:table-row>
        <table:table-row table:style-name="ro1">
          <table:table-cell table:style-name="ce2" office:value-type="string" calcext:value-type="string">
            <text:p>PKAW 2026</text:p>
          </table:table-cell>
          <table:table-cell table:style-name="ce2" office:value-type="string" calcext:value-type="string">
            <text:p>2026 Principle and practice of data and Knowledge Acquisition Workshop (PKAW 2026)</text:p>
          </table:table-cell>
          <table:table-cell table:style-name="ce2" office:value-type="float" office:value="55" calcext:value-type="float">
            <text:p>55</text:p>
          </table:table-cell>
          <table:table-cell table:style-name="ce2" office:value-type="float" office:value="28" calcext:value-type="float">
            <text:p>28</text:p>
          </table:table-cell>
          <table:table-cell table:style-name="ce3" office:value-type="date" office:date-value="2026-07-15" calcext:value-type="date">
            <text:p>2026-07-15</text:p>
          </table:table-cell>
          <table:table-cell table:style-name="ce3" office:value-type="date" office:date-value="2026-09-15" calcext:value-type="date">
            <text:p>2026-09-15</text:p>
          </table:table-cell>
          <table:table-cell table:style-name="ce3" office:value-type="date" office:date-value="2026-09-22" calcext:value-type="date">
            <text:p>2026-09-22</text:p>
          </table:table-cell>
          <table:table-cell table:style-name="ce2" office:value-type="string" calcext:value-type="string">
            <text:p>Guangzhou, China</text:p>
          </table:table-cell>
          <table:table-cell table:style-name="ce2" office:value-type="string" calcext:value-type="string">
            <text:p>Nov 17, 2026 - Nov 18, 2026</text:p>
          </table:table-cell>
          <table:table-cell table:style-name="ce4" office:value-type="string" calcext:value-type="string">
            <text:p><text:a xlink:href="https://pkawwebsite.github.io/2026/" xlink:type="simple">https://pkawwebsite.github.io/2026/</text:a></text:p>
          </table:table-cell>
          <table:table-cell table:style-name="ce2" office:value-type="string" calcext:value-type="string">
            <text:p>Proceedings of PKAW 2026 will be published by Springer as a volume of Lecture Notes in Artificial Intelligence (LNAI) series, which will be indexed by EI, Scopus, DBLP, SCImago, etc. The proceedings of past PKAW events can be found at https://link.springer.com/conference/pkaw ------------------------------------------------------- Welcome to the 2026 Principle and practice of data and Knowledge Acquisition Workshop (PKAW). Following the successful PKAW 2006 (Guilin, China), PKAW 2008 (Hanoi, Vietnam), PKAW 2010 (Daegu, South Korea), PKAW 2012 (Kuching, Malaysia), PKAW 2014 (Gold Coast, Australia), PKAW 2016 (Phuket, Thailand), PKAW 2018 (Nanjing, China), PKAW 2019 (Fiji), PKAW 2020 (Yokohama, Japan, online), PKAW 2022 (Shanghai, China), PKAW 2023 (Jakarta, Indonesia), PKAW 2024 (Kyoto, Japan), and PKAW 2025 (Wellington, New Zealand), PKAW 2026 will be collocated with the 23rd Pacific Rim International Conference on Artificial Intelligence (PRICAI 2026) and held in Guangzhou, China in 17-18 November 2026. PKAW has provided a forum for researchers and practitioners to discuss the state-of-the-art in the areas of knowledge acquisition and machine intelligence (MI, also Artificial Intelligence, AI). PKAW 2025 will continue the above focus and welcome the contributions to the multi-disciplinary approach of human and big data-driven knowledge acquisition and AI techniques and applications. Wide range of topics related to knowledge acquisition and representation are greatly welcome. ------------------------------------------------------- Important Dates • Paper Submission: 15 July 2026 • Notification: 15 September 2026 • Camera-Ready Submission: 22 September 2026 • Workshop Date: 17-18 November 2026 All deadlines are at the end of the day specified, anywhere on Earth (UTC-12). ------------------------------------------------------- Areas of Interest All aspects of knowledge acquisition, data engineering and management for intelligent systems, including (but not restricted to): • Knowledge Acquisition o Fundamental views on knowledge that affect the knowledge acquisition process and the use of knowledge in knowledge engineering o Algorithmic approaches to knowledge acquisition o Tools and techniques for knowledge acquisition, knowledge maintenance and knowledge validation o Evaluation of knowledge acquisition techniques, tools and methods o Ontology and its role in knowledge acquisition o Knowledge acquisition applications tested and deployed in real-life settings o Knowledge processing for generative AI • Knowledge Representation and Discovering o Knowledge representation learning o Temporal knowledge graph o Data linkage o Data analytics and mining o Big data acquisition and analysis o Machine learning/deep learning o Semantic Web, the Linked Data and the Web of Data • Responsible Data/Knowledge Management and System o Transparency, explainability, trust, and accountability o Privacy and security o Other ethical concerns • Knowledge-aware Application o Question answering o Recommendation system o Domain-related application • Human-centric Knowledge Engineering o Human-machine collaboration, integration, interaction, delegation, dialog o Hybrid approaches combining knowledge engineering and machine learning • Other Topics o Experience and Lesson learned o Reproducibility and negative results of knowledge engineering o Innovative user interfaces o Crowd-sourcing for data generation and problem solving ------------------------------------------------------- Paper Submission PKAW will not accept any paper that, at the time of submission, is under review for, has already been published in, or has already been accepted for publication in, a journal or another venue with formally published proceedings. If part of the work has been previously published, authors are strongly encouraged to cite and compare/contrast the new contributions with the parts that were already published before. The paper must substantially extend the previously published work. PKAW 2026 will adopt the single-blind rule for the reviewing process, i.e., the authors do not know the names of the reviewers, but the reviewers can infer the names of the authors from the submission. Proceedings of PKAW 2026 will be published by Springer as a volume of Lecture Notes in Artificial Intelligence (LNAI) series. All papers for the review should be submitted electronically using the conference management tool in PDF format and formatted using the Springer LNCS template. The main content of the paper should not exceed 16 pages long (including references). For accepted papers, the LaTeX source files and a camera-ready version are required to be submitted using the Springer LNCS template. ------------------------------------------------------- More details can be found at: https://pkawwebsite.github.io/2026/ Submission link: https://cmt3.research.microsoft.com/PKAW2026</text:p>
          </table:table-cell>
          <table:table-cell table:number-columns-repeated="1013"/>
        </table:table-row>
        <table:table-row table:style-name="ro1">
          <table:table-cell table:style-name="ce2" office:value-type="string" calcext:value-type="string">
            <text:p>MIND 2026</text:p>
          </table:table-cell>
          <table:table-cell table:style-name="ce2" office:value-type="string" calcext:value-type="string">
            <text:p>2026 International Conference on Machine Intelligence and Nature-InspireD Computing</text:p>
          </table:table-cell>
          <table:table-cell table:style-name="ce2" office:value-type="float" office:value="92" calcext:value-type="float">
            <text:p>92</text:p>
          </table:table-cell>
          <table:table-cell table:style-name="ce2" office:value-type="float" office:value="28" calcext:value-type="float">
            <text:p>28</text:p>
          </table:table-cell>
          <table:table-cell table:style-name="ce3" office:value-type="date" office:date-value="2026-07-15" calcext:value-type="date">
            <text:p>2026-07-15</text:p>
          </table:table-cell>
          <table:table-cell/>
          <table:table-cell table:style-name="ce3" office:value-type="date" office:date-value="2026-09-30" calcext:value-type="date">
            <text:p>2026-09-30</text:p>
          </table:table-cell>
          <table:table-cell table:style-name="ce2" office:value-type="string" calcext:value-type="string">
            <text:p>Chongqing, China</text:p>
          </table:table-cell>
          <table:table-cell table:style-name="ce2" office:value-type="string" calcext:value-type="string">
            <text:p>Nov 13, 2026 - Nov 15, 2026</text:p>
          </table:table-cell>
          <table:table-cell table:style-name="ce4" office:value-type="string" calcext:value-type="string">
            <text:p><text:a xlink:href="https://www.ic-mind.org/index.html" xlink:type="simple">https://www.ic-mind.org/index.html</text:a></text:p>
          </table:table-cell>
          <table:table-cell table:style-name="ce2" office:value-type="string" calcext:value-type="string">
            <text:p>2026 International Conference on Machine Intelligence and Nature-InspireD Computing (MIND) will be held in Chongqing, China, from November 13 to November 15, 2026. 𝘾𝙤𝙣𝙛𝙚𝙧𝙚𝙣𝙘𝙚 𝙒𝙚𝙗𝙨𝙞𝙩𝙚: https://www.ic-mind.org/index.html ( 𝑪𝒂𝒍𝒍 𝒇𝒐𝒓 𝒑𝒂𝒑𝒆𝒓𝒔 ) The topics of interest for submission include, but are not limited to: 1.Brain-inspired Computing Brain-inspired Models and Learning Algorithms Brain-Computer Interfaces Neuromorphic Hardware Neuromorphic Datasets and Software Frameworks 2.Embodied AI and Robotics Agents and Multi-Agent Systems Embodied AI Robotic Learning Robotic Systems 3.Deep Learning and Large Foundation Models Artificial Neural Networks Explainable AI and Ethics Foundation Models Generative AI Machine Learning 4.Nature-inspired Intelligence Evolutionary Algorithms Evolutionary Multi-objective Optimization Evolutionary Transfer Optimization Fuzzy Logic and Systems Swarm Intelligence 5.Machine Intelligence Applications Applications of Generative AI Autonomous Driving Financial Technology Healthcare and Biomedical Industrial applications Intelligent Manufacturing Logistics and Supply Chain Management Smart Cities and IoT ( 𝑰𝒎𝒑𝒐𝒓𝒕𝒂𝒏𝒕 𝑫𝒂𝒕𝒆𝒔 ) Tutorial and Special Session Submission: 2026-5-1 Tutorial and Special Session Notification:2026-5-31 Paper Submission:2026-7-15 Paper Notification:2026-8-15 Camera-Ready:2026-9-15 Early Registration Deadline:2026-9-30 ( 𝑷𝒂𝒑𝒆𝒓 𝑺𝒖𝒃𝒎𝒊𝒔𝒔𝒊𝒐𝒏 ) Submission portal: https://cmt3.research.microsoft.com/IEEEMIND2026 MIND 2026 invites proposals for Special Sessions. Please click https://www.ic-mind.org/call-for-special-session.html for more information. ( 𝑪𝒐𝒏𝒕𝒂𝒄𝒕 ) · Tutorial Proposal Submission: yinglfeng@szu.edu.cn · Special Session Proposal Submission: xingy.wu@polyu.edu.hk · Conference Secretary: icmind2026@gmail.com</text:p>
          </table:table-cell>
          <table:table-cell table:number-columns-repeated="1013"/>
        </table:table-row>
        <table:table-row table:style-name="ro1">
          <table:table-cell table:style-name="ce2" office:value-type="string" calcext:value-type="string">
            <text:p>IC-MIND 2026</text:p>
          </table:table-cell>
          <table:table-cell table:style-name="ce2" office:value-type="string" calcext:value-type="string">
            <text:p>International Conference on Machine Intelligence and Nature-InspireD Computing</text:p>
          </table:table-cell>
          <table:table-cell table:style-name="ce2" office:value-type="float" office:value="78" calcext:value-type="float">
            <text:p>78</text:p>
          </table:table-cell>
          <table:table-cell table:style-name="ce2" office:value-type="float" office:value="25" calcext:value-type="float">
            <text:p>25</text:p>
          </table:table-cell>
          <table:table-cell table:style-name="ce3" office:value-type="date" office:date-value="2026-07-15" calcext:value-type="date">
            <text:p>2026-07-15</text:p>
          </table:table-cell>
          <table:table-cell table:style-name="ce3" office:value-type="date" office:date-value="2026-08-15" calcext:value-type="date">
            <text:p>2026-08-15</text:p>
          </table:table-cell>
          <table:table-cell table:style-name="ce3" office:value-type="date" office:date-value="2026-09-15" calcext:value-type="date">
            <text:p>2026-09-15</text:p>
          </table:table-cell>
          <table:table-cell table:style-name="ce2" office:value-type="string" calcext:value-type="string">
            <text:p>Chongqing, China</text:p>
          </table:table-cell>
          <table:table-cell table:style-name="ce2" office:value-type="string" calcext:value-type="string">
            <text:p>Nov 13, 2026 - Nov 15, 2026</text:p>
          </table:table-cell>
          <table:table-cell table:style-name="ce4" office:value-type="string" calcext:value-type="string">
            <text:p><text:a xlink:href="https://www.ic-mind.org/" xlink:type="simple">https://www.ic-mind.org/</text:a></text:p>
          </table:table-cell>
          <table:table-cell table:style-name="ce2" office:value-type="string" calcext:value-type="string">
            <text:p>The 2026 International Conference on Machine Intelligence and Nature-InspireD Computing (MIND) will be held in Chongqing, China, from November 13 to November 15, 2026, serving as a premier forum for showcasing original and groundbreaking research contributions in the fields of Machine Intelligence and Nature-Inspired Computing. The conference aims to bring together researchers, practitioners, and industry experts to share their latest innovations, advancements, and real-world applications. MIND provides a vibrant platform for discussing emerging trends and exploring the transformative potential of machine intelligence combined with computational strategies inspired by nature. Through this convergence, the conference seeks to foster interdisciplinary collaboration and inspire future developments that push the boundaries of these exciting and rapidly evolving research areas. The Proceedings of MIND 2025 have are available in IEEE Xplore at: https://ieeexplore.ieee.org/xpl/conhome/11349712/proceeding Topics of interest include (but not limited to) the following tracks: Brain-inspired Computing Brain-inspired Models and Learning Algorithms Brain-Computer Interfaces Neuromorphic Hardware Neuromorphic Datasets and Software Frameworks Embodied AI and Robotics Agents and Multi-Agent Systems Embodied AI Robotic Learning Robotic Systems Deep Learning and Large Foundation Models Artificial Neural Networks Explainable AI and Ethics Foundation Models Generative AI Machine Learning Nature-inspired Intelligence Evolutionary Algorithms Evolutionary Multi-objective Optimization Evolutionary Transfer Optimization Fuzzy Logic and Systems Swarm Intelligence Machine Intelligence Applications Applications of Generative AI Autonomous Driving Financial Technology Healthcare and Biomedical Industrial applications Intelligent Manufacturing Logistics and Supply Chain Management Smart Cities and IoT</text:p>
          </table:table-cell>
          <table:table-cell table:number-columns-repeated="1013"/>
        </table:table-row>
        <table:table-row table:style-name="ro1">
          <table:table-cell table:style-name="ce2" office:value-type="string" calcext:value-type="string">
            <text:p>ACM ICISS 2026</text:p>
          </table:table-cell>
          <table:table-cell table:style-name="ce2" office:value-type="string" calcext:value-type="string">
            <text:p>ACM--2026 The 9th International Conference on Information Science and Systems (ICISS 2026)</text:p>
          </table:table-cell>
          <table:table-cell table:style-name="ce2" office:value-type="float" office:value="85" calcext:value-type="float">
            <text:p>85</text:p>
          </table:table-cell>
          <table:table-cell table:style-name="ce2" office:value-type="float" office:value="25" calcext:value-type="float">
            <text:p>25</text:p>
          </table:table-cell>
          <table:table-cell table:style-name="ce3" office:value-type="date" office:date-value="2026-07-15" calcext:value-type="date">
            <text:p>2026-07-15</text:p>
          </table:table-cell>
          <table:table-cell table:number-columns-repeated="2"/>
          <table:table-cell table:style-name="ce2" office:value-type="string" calcext:value-type="string">
            <text:p>University of Cambridge, Cambridge, UK</text:p>
          </table:table-cell>
          <table:table-cell table:style-name="ce2" office:value-type="string" calcext:value-type="string">
            <text:p>Aug 27, 2026 - Aug 29, 2026</text:p>
          </table:table-cell>
          <table:table-cell table:style-name="ce4" office:value-type="string" calcext:value-type="string">
            <text:p><text:a xlink:href="http://iciss.org/" xlink:type="simple">http://iciss.org/</text:a></text:p>
          </table:table-cell>
          <table:table-cell table:style-name="ce2" office:value-type="string" calcext:value-type="string">
            <text:p>Full name: 2026 The 9th International Conference on Information Science and Systems Abbreviation: ICISS 2026 2026 The 9th International Conference on Information Science and Systems (ICISS 2026) Imporant Information Conference Date: August 27-29, 2026 Conference Venue: University of Cambridge, Cambridge, UK Conference Website: http://iciss.org/index.html Co-sponsored by: Edinburgh Napier University, UK University of Derby, UK Submission Link: http://confsys.iconf.org/submission/iciss2026 We would like to warmly welcome you to attend the 9th International Conference on Information Science and Systems (ICISS 2026), which will be held at University of Cambridge, Cambridge, UK during August 27-29, 2026. Founded in 2018, the International Conference on Information Science and Systems (ICISS) has been successfully held seven editions in cooperation with famous international universities such as Tokai University, Cardiff University, Edinburgh Napier University. Experts and scholars from more than 30 countries and regions including the UK, USA, South Korea, Australia, Japan, China, and Canada have participated in the conference. We are expecting exciting conference programs with great scholars and researchers from different countries around the world, sharing new and stimulating innovations in information science and systems. We look forward to welcoming you at ICISS 2026 at University of Cambridge, Cambridge, UK! Publication All papers will be strictly double blind reviewed by the program committee, and accepted papers after proper registration and presentation will be published in the International Conference Proceedings Series by ACM (ISBN: 979-8-4007-2432-9), which will be archived in the ACM Digital Library, and indexed by Ei Compendex, Scopus, etc. The previous conference proceedings have been indexed by Ei Compendex and Scopus. Topics Track 1: Machine Learning and Artificial Intelligence Track 2: Data Science and Analytics Track 3: Information Retrieval and Knowledge Management Track 4: Natural Language Processing and Text Mining Track 5: Computer Vision and Image Processing Track 6: Human-Computer Interaction and Usability Track 7: Internet of Things and Cyber-Physical Systems Track 8: Cloud Computing and Distributed Systems Track 9: Explainable Artificial Intelligence and Interpretable Machine Learning Track 10: Emerging Topics and Applications For more topics, please visit http://www.iciss.org/cfp.html Submission Instructions 1. Full Paper (Presentation and Publication) The full paper should be no less than 8 pages. The maximum paper length is 10 printed pages, including all figures, tables, and references, and extra page will be charged. Template download: http://iciss.org/files/template.docx 2. Abstract (Presentation only) We encourage you to send informative abstract (200-400 words) which is a compendious summary of a paper's substance including its background, purpose, methodology, results, and conclusion. Template download: http://iciss.org/files/template-abstract.docx 3. The submission should be in English. 4. Please log in the Online Submission System (http://confsys.iconf.org/submission/iciss2026) and upload your paper. Or directly send attachment to iciss_contact@yeah.net. Conference Venue University of Cambridge The University of Cambridge is a public collegiate research university in Cambridge, England. Founded in 1209, the University of Cambridge is the world's third-oldest university in continuous operation. The university's founding followed the arrival of scholars who left the University of Oxford for Cambridge after a dispute with local townspeople. The two ancient English universities, although sometimes described as rivals, share many common features and are often jointly referred to as Oxbridge. The university operates eight cultural and scientific museums, including the Fitzwilliam Museum and Cambridge University Botanic Garden. Cambridge's 116 libraries hold a total of approximately 16 million books, around 9 million of which are in Cambridge University Library, a legal deposit library and one of the world's largest academic libraries. Among the university's notable alumni are Francis Bacon, Lord Byron, Oliver Cromwell, Charles Darwin, Rajiv Gandhi, John Harvard, Stephen Hawking, John Maynard Keynes, John Milton, Vladimir Nabokov, Jawaharlal Nehru, Isaac Newton, Salman Rushdie, Bertrand Russell, Alan Turing, Ludwig Wittgenstein, and 194 Olympic medal-winning athletes.] Its alumni, academics, and affiliates have won 126 Nobel Prizes. Contact Us Conference Secretary: Rita Mihaylova Email: iciss_contact@yeah.net Tel: +86-18302820449 WhatsApp: +853-66494438 Website: http://iciss.org/index.html Office Hour: Monday- Friday, 9:30-18:00 (GMT+8)</text:p>
          </table:table-cell>
          <table:table-cell table:number-columns-repeated="1013"/>
        </table:table-row>
        <table:table-row table:style-name="ro1">
          <table:table-cell table:style-name="ce2" office:value-type="string" calcext:value-type="string">
            <text:p>QueerInAI 2026</text:p>
          </table:table-cell>
          <table:table-cell table:style-name="ce2" office:value-type="string" calcext:value-type="string">
            <text:p>Queer in AI 2026</text:p>
          </table:table-cell>
          <table:table-cell table:style-name="ce2" office:value-type="float" office:value="25" calcext:value-type="float">
            <text:p>25</text:p>
          </table:table-cell>
          <table:table-cell table:style-name="ce2" office:value-type="float" office:value="45" calcext:value-type="float">
            <text:p>45</text:p>
          </table:table-cell>
          <table:table-cell table:style-name="ce3" office:value-type="date" office:date-value="2026-07-15" calcext:value-type="date">
            <text:p>2026-07-15</text:p>
          </table:table-cell>
          <table:table-cell table:style-name="ce3" office:value-type="date" office:date-value="2026-07-30" calcext:value-type="date">
            <text:p>2026-07-30</text:p>
          </table:table-cell>
          <table:table-cell/>
          <table:table-cell table:style-name="ce2" office:value-type="string" calcext:value-type="string">
            <text:p>Bremen</text:p>
          </table:table-cell>
          <table:table-cell table:style-name="ce2" office:value-type="string" calcext:value-type="string">
            <text:p>Aug 14, 2026 - Aug 15, 2026</text:p>
          </table:table-cell>
          <table:table-cell table:style-name="ce4" office:value-type="string" calcext:value-type="string">
            <text:p><text:a xlink:href="https://www.queerinai.com/ijcai-2026" xlink:type="simple">https://www.queerinai.com/ijcai-2026</text:a></text:p>
          </table:table-cell>
          <table:table-cell table:style-name="ce2" office:value-type="string" calcext:value-type="string">
            <text:p>Queer in AI is organizing a two-day conference in Bremen on August 14 and 15. See here. The workshop is co-located with the IJCAI conference. We are looking forward to your submissions to our workshop. Feel free to submit the work that you have already published or looking forward to publishing. We welcome all relevant submissions, including: science done by queer people, science done about queer people and science done about queer people by queer people. August 14 is a full day workshop which is open to all, which will feature keynote speakers, participatory research activities, lightning talks and networking events. Talks can be in-person or virtual. August 15 is restricted only for IJCAI participants. We invite the community to submit proposals for lightning talks. These talks will be approximately 5-10 minutes in length. Using this form, please submit the work that will form the basis of your lightning talk. There is no page limit. If you have accessibility needs or questions about the submission process, please contact the organizers. We welcome all relevant submissions, including: - Science done by queer people - Science done about queer people - Science done about queer people by queer people We welcome submissions in a variety of formats: - Research papers, including those published in the IJCAI-ECAI 2026 main conference proceedings - Extended abstracts - Position papers - Opinion pieces - Surveys - Artistic expressions (art, poetry, or other creative work) Important Dates - Submissions Open: June 15th - Submissions Close: July 15th AoE - Notification: July 31st</text:p>
          </table:table-cell>
          <table:table-cell table:number-columns-repeated="1013"/>
        </table:table-row>
        <table:table-row table:style-name="ro1">
          <table:table-cell table:style-name="ce2" office:value-type="string" calcext:value-type="string">
            <text:p>EAIT--EI 2026</text:p>
          </table:table-cell>
          <table:table-cell table:style-name="ce2" office:value-type="string" calcext:value-type="string">
            <text:p>2026 The 7th International Conference on Education and Artificial Intelligence Technologies (EAIT 2026)</text:p>
          </table:table-cell>
          <table:table-cell table:style-name="ce2" office:value-type="float" office:value="40" calcext:value-type="float">
            <text:p>40</text:p>
          </table:table-cell>
          <table:table-cell table:style-name="ce2" office:value-type="float" office:value="35" calcext:value-type="float">
            <text:p>35</text:p>
          </table:table-cell>
          <table:table-cell table:style-name="ce3" office:value-type="date" office:date-value="2026-07-15" calcext:value-type="date">
            <text:p>2026-07-15</text:p>
          </table:table-cell>
          <table:table-cell table:number-columns-repeated="2"/>
          <table:table-cell table:style-name="ce2" office:value-type="string" calcext:value-type="string">
            <text:p>London, UK</text:p>
          </table:table-cell>
          <table:table-cell table:style-name="ce2" office:value-type="string" calcext:value-type="string">
            <text:p>Sep 21, 2026 - Sep 24, 2026</text:p>
          </table:table-cell>
          <table:table-cell table:style-name="ce4" office:value-type="string" calcext:value-type="string">
            <text:p><text:a xlink:href="http://www.eait.net" xlink:type="simple">http://www.eait.net</text:a></text:p>
          </table:table-cell>
          <table:table-cell table:style-name="ce2" office:value-type="string" calcext:value-type="string">
            <text:p>Full name: 2026 The 7th International Conference on Education and Artificial Intelligence Technologies (EAIT 2026) Abbreviation: EAIT 2026 London, UK September 21–24, 2026 http://www.eait.net The 7th International Conference on Education and Artificial Intelligence Technologies (EAIT) will be held in London, UK during September 21–24, 2026. It is sponsored by Birmingham City University, Science and Engineering Institute, and Bubo.AI, hosted by Staffordshire University London, and technically supported by QAHE at Northumbria University London Campus, Middlesex University London, etc. EAIT is the premier forum that brings both industry and academia together for the dissemination of technological advances and research results in the fields of Artificial Intelligence methods and technologies as an aid to education at all levels. The conference will provide a valuable opportunity for researchers, scholars and scientists to exchange their ideas face to face. ●Publication: Accepted papers will be published in the Conference Proceedings, which can be indexed by EI Compendex, Scopus, or the Journal“International Journal of Information and Education Technology”, with ISSN: 2010-3689, indexed by Scopus (Since 2019), etc. ●Call for Paper: Artificial intelligence and education Artificial intelligence algorithms in education Artificial neural networks in education Artificial intelligence in student evaluation Assessing student performance using artificial intelligence Educational robotics Evaluation of artificial intelligence educational systems Intelligent adaptive learning Intelligent agent-based learning environments Intelligent agents on the internet More topics, please visit: http://eait.net/cfp.html ●Agenda Overview： September 21, 2026 | Monday | Sign in and collect materials September 22, 2026 | Tuesday | Keynote Speeches and Parallel Sessions September 23–24, 2026 | Wednesday–Thursday | Parallel Sessions and City Visit (pending) ●Submission Submit on the conference system: https://www.zmeeting.org/submission/eait2026 Or email your papers to: eait@sciei.org Options: *Abstract: presentation only *Full paper: presentation and publication ●Contact: Dr. Maggie Flores E-mail: eait@sciei.org Tel: +1-562-606-1057 | Mobile: +(86)182-0777-7775</text:p>
          </table:table-cell>
          <table:table-cell table:number-columns-repeated="1013"/>
        </table:table-row>
        <table:table-row table:style-name="ro1">
          <table:table-cell table:style-name="ce2" office:value-type="string" calcext:value-type="string">
            <text:p>ICAAI 2026</text:p>
          </table:table-cell>
          <table:table-cell table:style-name="ce2" office:value-type="string" calcext:value-type="string">
            <text:p>IEEE--2026 10th International Conference on Advances in Artificial Intelligence (ICAAI 2026)</text:p>
          </table:table-cell>
          <table:table-cell table:style-name="ce2" office:value-type="float" office:value="78" calcext:value-type="float">
            <text:p>78</text:p>
          </table:table-cell>
          <table:table-cell table:style-name="ce2" office:value-type="float" office:value="30" calcext:value-type="float">
            <text:p>30</text:p>
          </table:table-cell>
          <table:table-cell table:style-name="ce3" office:value-type="date" office:date-value="2026-07-15" calcext:value-type="date">
            <text:p>2026-07-15</text:p>
          </table:table-cell>
          <table:table-cell table:number-columns-repeated="2"/>
          <table:table-cell table:style-name="ce2" office:value-type="string" calcext:value-type="string">
            <text:p>London, UK</text:p>
          </table:table-cell>
          <table:table-cell table:style-name="ce2" office:value-type="string" calcext:value-type="string">
            <text:p>Sep 21, 2026 - Sep 24, 2026</text:p>
          </table:table-cell>
          <table:table-cell table:style-name="ce4" office:value-type="string" calcext:value-type="string">
            <text:p><text:a xlink:href="http://www.icaai.org" xlink:type="simple">http://www.icaai.org</text:a></text:p>
          </table:table-cell>
          <table:table-cell table:style-name="ce2" office:value-type="string" calcext:value-type="string">
            <text:p>Full name: IEEE--2026 10th International Conference on Advances in Artificial Intelligence (ICAAI 2026) Abbreviation: ICAAI 2026 London, UK September 21-24, 2026 http://www.icaai.org ICAAI 2026 conference committee sincerely invite you to take part in 2026 10th International Conference on Advances in Artificial Intelligence (ICAAI) during September 21-24, 2026 in London, UK. It is sponsored by The University of Staffordshire, patrons Birmingham City University, Middlesex University, Swansea University , Oslo Metropolitan University, Bubo.AI, QAHE at Northumbria University London Campus, etc. ●Publication: Honorable authors are cordially invited to contribute their research papers. All papers submitted to the conference will be subjected to the rigorous peer-review process. For accepted papers, it will be published in the IEEE Conference Proceedings, which will be included in IEEE Xplore, indexed by EI Compendex, Scopus, etc. ●Conference History: *ICAAI 2025 | November 14-16, Manchester Metropolitan University, UK | Publication: ACM Conference Proceedings, ISBN: 979-8-4007-2104-5 *ICAAI 2024 | October 13-15, Staffordshire University London Campus, UK | Publication: ACM Conference Proceedings, ISBN: 979-8-4007-1801-4 Indexing: SCOPUS and EI Compendex. *ICAAI 2023 | October 13-15, Istinye University, Turkey | Publication: ACM Conference Proceedings, ISBN: 979-8-4007-0898-5 Indexing: SCOPUS and EI Compendex. *ICAAI 2022 | October 21-23, Birmingham City University, UK | Publication: ACM Conference Proceedings, ISBN: 978-1-4503-9694-3 Indexing: SCOPUS and EI Compendex. *ICAAI 2021 | November 20-22, Virtual | Publication: ACM Conference Proceedings, ISBN: 978-1-4503-9069-9 Indexing: SCOPUS and EI Compendex. *ICAAI 2020 | November 13-15, Virtual | Publication: ACM Conference Proceedings, ISBN: 978-1-4503-8784-2 Indexing: SCOPUS and EI Compendex. *ICAAI 2019 | October 26-28, 2019, Bahcesehir University, Turkey | Publication: ACM Conference Proceedings, ISBN: 978-1-4503-7253-4 Indexing: SCOPUS and EI Compendex. *ICAAI 2018 | October 6-8, 2018, Barcelona, Spain | Publication: ACM Conference Proceedings, ISBN: 978-1-4503-6583-3 Indexing: SCOPUS and EI Compendex. *ICAAI 2017 | April 3-5, 2017, Bangkok, Thailand | Publication: International Journal of Machine Learning and Computing (IJMLC), Volume 7 Number 5 (Oct. 2017), Online: http://www.ijmlc.org/list-73-1.html ●Call for Papers: Robotics Biometrics Neural Networks Image Processing Machine Learning Automatic Control Pattern Recognition Artificial Intelligence Data and Web Mining Networking and Information Security More topics, please visit: https://icaai.org/cfp.html ●Call for Special Session ICAAI proposals for special sessions within the technical scope of the conference. Special sessions supplement the regular program of the conference and provide a sample of the state-of-the-art research in both academia and industry in special, novel, challenging, and emerging topics. Special-session proposals should be submitted by the prospective organizer(s) who will commit to promoting and handling the review process of their special session as Chairs or Co-Chairs of the event. Proposals should include the following information: The title General information of organizers (mail address of main contact person, biodata) Brief description of special session Related topics Potential participants Description of publicity and promotion plan Please send your proposal to icaai@sciei.org in PDF format. ●Agenda Overview： September 21, 2026 | Sign in and collect materials September 22, 2026 | Keynote Speeches and Parallel Sessions September 23, 2026 | Parallel Sessions September 24, 2026 | Academic Visit (Pending) ●Submission https://www.zmeeting.org/submission/icaai2026 Or email your papers to: icaai@sciei.org Options: *Abstract: Abstract will only be included into the conference proceedings and not be published. *Full paper: Presentation and publication ●Contacts: Ms. Hedy Huang E-mail: icaai@sciei.org Tel: +1-562-606-1057 Tel: +86 182-0777-7775 Office Time: 9:30-18:00, From Monday to Friday.</text:p>
          </table:table-cell>
          <table:table-cell table:number-columns-repeated="1013"/>
        </table:table-row>
        <table:table-row table:style-name="ro1">
          <table:table-cell table:style-name="ce2" office:value-type="string" calcext:value-type="string">
            <text:p>ICACTE 2026</text:p>
          </table:table-cell>
          <table:table-cell table:style-name="ce2" office:value-type="string" calcext:value-type="string">
            <text:p>IEEE--2026 The 19th International Conference on Advanced Computer Theory and Engineering (ICACTE 2026)</text:p>
          </table:table-cell>
          <table:table-cell table:style-name="ce2" office:value-type="float" office:value="82" calcext:value-type="float">
            <text:p>82</text:p>
          </table:table-cell>
          <table:table-cell table:style-name="ce2" office:value-type="float" office:value="28" calcext:value-type="float">
            <text:p>28</text:p>
          </table:table-cell>
          <table:table-cell table:style-name="ce3" office:value-type="date" office:date-value="2026-07-15" calcext:value-type="date">
            <text:p>2026-07-15</text:p>
          </table:table-cell>
          <table:table-cell table:number-columns-repeated="2"/>
          <table:table-cell table:style-name="ce2" office:value-type="string" calcext:value-type="string">
            <text:p>Hangzhou, China</text:p>
          </table:table-cell>
          <table:table-cell table:style-name="ce2" office:value-type="string" calcext:value-type="string">
            <text:p>Aug 21, 2026 - Aug 23, 2026</text:p>
          </table:table-cell>
          <table:table-cell table:style-name="ce4" office:value-type="string" calcext:value-type="string">
            <text:p><text:a xlink:href="http://www.icacte.org/" xlink:type="simple">http://www.icacte.org/</text:a></text:p>
          </table:table-cell>
          <table:table-cell table:style-name="ce2" office:value-type="string" calcext:value-type="string">
            <text:p>Full Name: The 19th International Conference on Advanced Computer Theory and Engineering Abbreviation: ICACTE 2026 The 19th International Conference on Advanced Computer Theory and Engineering (ICACTE 2026) is scheduled to take place in Hangzhou, China during August 21-23, 2026. Since its inception in 2008, ICACTE has been held in various locations across the globe, including Germany, Singapore, South Korea, and China. Each edition attracts participants from all over the world, providing them with an opportunity to collaborate and network. Co-sponsored by IEEE and Hangzhou Dianzi University, China, hosted by School of Computer, Hangzhou Dianzi University, China; assisted by by Hangzhou International Innovation Institute of Beihang University, China, Anhui Jianzhu University, China and Nanjing Xiaozhuang University. ICACTE 2026 aims to bring together researchers, engineers, and industry experts to share their latest research findings and innovative ideas in the field of computer theory and engineering. The conference will cover a wide range of topics, including computer networks, data mining and analysis, software engineering, artificial intelligence, computer graphics, and many others. Conference Website: http://www.icacte.org/ Conference Time: August 21-23, 2026 Conference Venue: Hangzhou, China Co-sponsored by: IEEE &amp; Hangzhou Dianzi University, China Hosted by: School of Computer, Hangzhou Dianzi University, China Assisted by: Hangzhou International Innovation Institute of Beihang University, China, Anhui Jianzhu University, China and Nanjing Xiaozhuang University ★Committees Conference Chairs Witold Pedrycz, University of Alberta, Canada (IEEE Fellow) Zhigeng Pan, Hangzhou International Innovation Institute of Beihang University, China Gang Xu, Hangzhou Dianzi University, China Technical Program Committee Chairs Changsheng Xu, Chinese Academy of Sciences, China (IEEE Fellow &amp; IAPR Fellow) Yudong Zhang, Southeast University, China (IEEE Fellow) Jozef M. Zurada, University of Louisville, USA Manolis Vavalis, University of Thessaly, Greece Huan Zhou, Northwestern Polytechnical University, China Kewen Xia, Hebei University of Technology, China Li Li, Hangzhou Dianzi University, China Technical Program Committee Co-chairs Le Sun, Nanjing University of Information Science and Technology, China Yalong Yang, Anhui Jianzhu University, China Hao Zheng, Nanjing Xiaozhuang University, China Publicity Chairs Jie Yu, National University of Defense Technology, China Abu Barkat Ullah, University of Canberra, Australia Kashif Naseer Qureshi, University of Limerick, Ireland Yafei Hou, Okayama University, Japan Changli Li, Nanjing University of Information Science and Technology, China Wenwen Pan, Hangzhou Dianzi University, China Publication Chairs Fairouz Kamareddine, Heriot-Watt University, UK Zhi Li, Guangxi Normal University, China Steering Committee Zhiguo Qu, Nanjing University of Information Science and Technology, China Donghui Shi, Anhui Jianzhu University, China Regional Chairs Xianyong Fang, Anhui University, China Yong Wang, Anhui Polytechnic University, China Komalpreet Kaur, Salem State University, USA Pavel Loskot, Zhejiang University, China Local Organizing Chairs Jianfeng Lu, Hangzhou Dianzi University, China Jiayi Xu, Hangzhou Dianzi University, China Shanqing Zhang, Hangzhou Dianzi University, China For more committee informations please check: https://www.icacte.org/committee.html ★Publication 1) Conference Proceedings Submitted papers will be peer reviewed by program committees and technical committee, and accepted papers will be published into conference proceedings by IEEE after registration and presentation. The proceedings will be submitted for inclusion into IEEE Xplore and indexed by Ei Compendex &amp; Scopus. 2) Publication History * ICACTE 2025 Proceedings | IEEE Xplore (ISBN: 979-8-3503-5759-2) | Ei Compendex | Scopus * ICACTE 2024 Proceedings | IEEE Xplore (ISBN: 979-8-3315-3988-7) | Ei Compendex | Scopus * ICACTE 2023 Proceedings | IEEE Xplore (ISBN: 979-8-3503-1752-7) | Ei Compendex | Scopus * ICACTE 2022 Proceedings | IEEE Xplore (ISBN: 978-1-6654-8180-9) | Ei Compendex | Scopus * ICACTE 2021 Proceedings | IEEE Xplore (ISBN: 978-1-6654-4244-2) | Ei Compendex | Scopus * ICACTE 2020 Proceedings | ACM Digital Library (ISBN: 978-1-4503-7734-8) | Ei Compendex | Scopus ★Topics Topics of interest for submission include, but are not limited to: Track 1. Artificial Intelligence and Machine Learning Artificial intelligence Machine learning Neural networks Pattern recognition Track 2. Computer Systems and Networks Computer architecture and embedded systems High performance computing Reconfigurable computing systems System security Track 3. Data Science and Applications Bioinformatics and scientific computing Data encryption Information retrieval Natural language processing Track 4. Human-Computer Interaction and Multimedia Computer animation Computer graphics and multimedia Human-computer interaction Virtual reality Track 5. Software Engineering and Applications Compilers and interpreters Computing practices and applications Programming languages Technology in education Track 6. Quantum Information and Quantum Computing Quantum neural networks Quantum convolutional neural networks Quantum federated learning Quantum reinforcement learning Track 7. Blockchain Technology and Applications Fundamentals and technological innovations in blockchain The rise of decentralized finance (DeFi) Development and security of smart contracts Integration of blockchain in supply chain management Track 8. Emerging Technologies Biomedical engineering Control systems Theoretical computer science Ubiquitous computing For more topics and scope please check: http://www.icacte.org/cfp.html ★Submission Instructions 2). Language: English is the official language of the conference; the paper should be written and presented only in English. 3). Submission Types * Abstract submission for presentation only without publication. * Full paper submission for both presentation and publication. 4). Paper Length: Each full paper should be no less than four full pages, including all figures, tables, and references. If the length of the full paper exceeds six pages, the cost of each extra page is 60 USD / 400 RMB / page. 5). Submission Methods ▪By online submission system: http://www.easychair.org/conferences/?conf=icacte2026 ▪By Email:icacte@bmail.org ★Conference Program Day 1 - Friday - August 21, 2026 10:00 - 17:00 | Registration &amp; Materials Collection 14:00 - 17:00 | Campus Tour Day 2 - Saturday- August 22, 2026 09:00 - 09:05 | Opening Remark 09:05 - 11:50 | Keynote Speeches 12:00 - 13:30 | Lunch 13:30 - 18:00 | Parallel Sessions 18:30 - 20:30 | Award Ceremony &amp; Dinner Banquet Day 3 - Sunday- August 23, 2026 09:00 - 18:00 | Parallel Sessions ★Conference Venue Hangzhou Dianzi University, China Address: No. 1158, Ave. 2, Qiantang District, Hangzhou, 310018, Zhejiang Province, China Hangzhou Dianzi University (HDU) is a research and teaching-oriented university with prominent features in electronic information and distinctive advantages in economics and management. It is characterized by the interdisciplinary integration of engineering, science, economics, management, liberal arts, law, and art. Established in 1956, the university was initially named Hangzhou Aviation Industry Finance and Economics School. In 1980, it was approved by the State Council to establish Hangzhou Institute of Electronic Engineering. In 2004, it was renamed Hangzhou Dianzi University. In 2015, HDU was listed as a key university for construction in Zhejiang Province. HDU adheres to its roots in Zhejiang, relies on industry sectors, faces the world and serves society. It upholds the fine tradition of unity, diligence, truth-seeking, and innovation and promotes the school spirit embodied in its motto, diligent in study, resolute in action, upright and innovative, forming a distinctive educational characteristic. ★Contact us Conference secretary: Ms. Luna Wu Tel: +86-18000547208 Email: icacte@bmail.org Website: http://www.icacte.org/ Office Time: 9:30--18:00, Monday to Friday (GMT+8 Time Zone)</text:p>
          </table:table-cell>
          <table:table-cell table:number-columns-repeated="1013"/>
        </table:table-row>
        <table:table-row table:style-name="ro1">
          <table:table-cell table:style-name="ce2" office:value-type="string" calcext:value-type="string">
            <text:p>IEEE FMLDS 2026</text:p>
          </table:table-cell>
          <table:table-cell table:style-name="ce2" office:value-type="string" calcext:value-type="string">
            <text:p>2026 IEEE International Conference on Future Machine Learning and Data Science (FMLDS2026)</text:p>
          </table:table-cell>
          <table:table-cell table:style-name="ce2" office:value-type="float" office:value="83" calcext:value-type="float">
            <text:p>83</text:p>
          </table:table-cell>
          <table:table-cell table:style-name="ce2" office:value-type="float" office:value="30" calcext:value-type="float">
            <text:p>30</text:p>
          </table:table-cell>
          <table:table-cell table:style-name="ce3" office:value-type="date" office:date-value="2026-07-15" calcext:value-type="date">
            <text:p>2026-07-15</text:p>
          </table:table-cell>
          <table:table-cell table:style-name="ce3" office:value-type="date" office:date-value="2026-08-15" calcext:value-type="date">
            <text:p>2026-08-15</text:p>
          </table:table-cell>
          <table:table-cell table:style-name="ce3" office:value-type="date" office:date-value="2026-10-15" calcext:value-type="date">
            <text:p>2026-10-15</text:p>
          </table:table-cell>
          <table:table-cell table:style-name="ce2" office:value-type="string" calcext:value-type="string">
            <text:p>Kobe, Japan</text:p>
          </table:table-cell>
          <table:table-cell table:style-name="ce2" office:value-type="string" calcext:value-type="string">
            <text:p>Nov 20, 2026 - Nov 23, 2026</text:p>
          </table:table-cell>
          <table:table-cell table:style-name="ce4" office:value-type="string" calcext:value-type="string">
            <text:p><text:a xlink:href="https://fmlds.org/2026/" xlink:type="simple">https://fmlds.org/2026/</text:a></text:p>
          </table:table-cell>
          <table:table-cell table:style-name="ce2" office:value-type="string" calcext:value-type="string">
            <text:p>2026 IEEE International Conference on Future Machine Learning and Data Science (FMLDS2026) Location: Kobe, Japan Dates: November 20-23, 2026 Website: https://fmlds.org/2026/ E-mail: info@fmlds.org Conference Format: Online and In-person 2026 IEEE International Conference on Future Machine Learning and Data Science (FMLDS2026) -------------------------------------------------------------------------------- FMLDS2026 will bring international experts in Future Machine Learning Technologies, Artificial Intelligence, Computer Vision, Machine Learning Applications in Engineering and Data Science. It will feature keynote addresses from prominent world industry and academic leaders in Machine Learning and Data Science. It will span a wide spectrum of areas within Machine Learning and Data Science research, providing a platform for established and emerging researchers as well as industry practitioners to exchange insights and innovative ideas. The conference will be conducted in a hybrid format, accommodating both in-person and virtual participation. FMLDS2026 will be hosted at the University of Hyogo in Japan’s Hyogo Prefecture. Kobe, the capital of Hyogo, is the country’s seventh-largest city and the third-largest port after Tokyo and Yokohama. Located in the Kansai region on the northern shore of Osaka Bay, Kobe is renowned for its Kobe beef. CONFERENCE TRACK: Future Machine Learning Advancements of Machine Learning Data Science and Big Data Data Classification and Regression Pattern Recognition Computer Graphics Motion and Tracking Bioinformatics and Biomedical Image Analysis Cyber Security and Privacy for Big Data Knowledge Discovery, Integration and Transformation Social Media, Social Network and Social Data Financial Machine Learning and Data Mining Internet of Things (IoT) Machine Learning in Language Models SPECIAL SESSIONS: Application of Machine learning and Artificial Intelligence in Transportation Systems and Safety Application of Machine learning in Engineering Machine Learning Applications in Biomedical and Bioinformatics Machine Learning for Empathic Computing PRESENTATION MODE: Face to Face Virtual (Zoom) Poster WHO CAN JOIN: As Presenter: If you want to share you latest research results by giving presentation without publishing papers, please submit your abstract (300-400 words) to info@fmlds.org As Listener: You are also warmly welcomed to take part in ACAI 2026 as a listener even though you have no paper to submit. As Reviewer: To ensure the fairness and to guarantee the quality of ACAI 2026, we cordially invite experts and scholars join us as a reviewer. GRANT: Limited Travel and Registration. KEY DATES: Submission Due: 30 April, 2026 Notification: 07 July, 2026 Early Birds Registration opens: 07 July, 2026 Camera ready due date: 15 October, 2026 REGISTRATION: Non IEEE Author: JPY ¥77,500 IEEE Author: JPY ¥70,000 Student Non IEEE: JPY ¥65,000 IEEE Student: JPY ¥55,000 Participants: JPY ¥65,000 Virtual Presentation: JPY ¥30,000 Conference Dinner: JPY ¥15,000 PUBLICATIONS: The conference proceedings will be published to IEEE Xplore with Scopus Indexing SPEAKERS: Professor Toshio Fukuda, Nagoya University, Japan Professor Yulan Guo, Sun Yat-sen University, China Professor Kaoru Ota, Tohoku University, Japan Professor Mohammed Nazim Uddin, Vice Chancellor, East Delta University, Bangladesh ORGANIZING CHAIRS: Professor Essam Rashed, University of Hyogo, Japan Professor Mohamed Mabrok, Qatar University, Qatar TECHNICAL CHAIRS: Professor Adel Ali Al Jumaily, Melbourne Institute of Technology, Australia Professor Rafiqul Islam, Charles Stuart University, Australia Dr Syed Shamsul Islam, Edith Cowan University, Australia INDUSTRY CHAIRS: Professor Tesuya Saito, Globiz Professional University, Japan Professor Jerry Yu, George Washington University, USA Contact: info@fmlds.org</text:p>
          </table:table-cell>
          <table:table-cell table:number-columns-repeated="1013"/>
        </table:table-row>
        <table:table-row table:style-name="ro1">
          <table:table-cell table:style-name="ce2" office:value-type="string" calcext:value-type="string">
            <text:p>AICyDef 2026</text:p>
          </table:table-cell>
          <table:table-cell table:style-name="ce2" office:value-type="string" calcext:value-type="string">
            <text:p>Workshop on Trustworthy and Secure AI for Cyber Defense</text:p>
          </table:table-cell>
          <table:table-cell table:style-name="ce2" office:value-type="float" office:value="22" calcext:value-type="float">
            <text:p>22</text:p>
          </table:table-cell>
          <table:table-cell table:style-name="ce2" office:value-type="float" office:value="30" calcext:value-type="float">
            <text:p>30</text:p>
          </table:table-cell>
          <table:table-cell table:style-name="ce3" office:value-type="date" office:date-value="2026-07-17" calcext:value-type="date">
            <text:p>2026-07-17</text:p>
          </table:table-cell>
          <table:table-cell table:style-name="ce3" office:value-type="date" office:date-value="2026-08-07" calcext:value-type="date">
            <text:p>2026-08-07</text:p>
          </table:table-cell>
          <table:table-cell table:style-name="ce3" office:value-type="date" office:date-value="2026-09-04" calcext:value-type="date">
            <text:p>2026-09-04</text:p>
          </table:table-cell>
          <table:table-cell table:style-name="ce2" office:value-type="string" calcext:value-type="string">
            <text:p>New York City, USA</text:p>
          </table:table-cell>
          <table:table-cell table:style-name="ce2" office:value-type="string" calcext:value-type="string">
            <text:p>Oct 9, 2026 - Oct 11, 2026</text:p>
          </table:table-cell>
          <table:table-cell table:style-name="ce4" office:value-type="string" calcext:value-type="string">
            <text:p><text:a xlink:href="https://attend.ieee.org/dsc/workshops/" xlink:type="simple">https://attend.ieee.org/dsc/workshops/</text:a></text:p>
          </table:table-cell>
          <table:table-cell table:style-name="ce2" office:value-type="string" calcext:value-type="string">
            <text:p>Workshop on Trustworthy and Secure AI for Cyber Defense In conjunction with IEEE DSC 2026 -Introduction ************************************************* Artificial Intelligence (AI) is transforming cybersecurity by enabling advanced threat detection, vulnerability analysis, incident response, and cyber defense automation. Simultaneously, AI systems themselves have become critical attack surfaces exposed to prompt injection, jailbreak attacks, adversarial manipulation, model poisoning, and other emerging threats. As AI technologies are increasingly deployed in security-critical environments, ensuring their trustworthiness, transparency, robustness, and explainability has become equally important. The Workshop on Trustworthy and Secure AI for Cyber Defense 2026 aims to bring together researchers, practitioners, industry experts, and policymakers working at the intersection of cybersecurity and artificial intelligence. The workshop provides a forum for discussing advances in AI-driven cyber defense, security evaluation of AI systems, trustworthy and explainable AI, benchmarking methodologies, standardization efforts, and emerging challenges in securing future AI-enabled cyber ecosystems. This workshop welcomes original research papers, industrial experiences, benchmark studies, datasets, system demonstrations, surveys, and standardization reports that contribute to the development of secure, trustworthy, and effective AI technologies for cybersecurity. ************************************************* -Topics of Interest ************************************************* The workshop focuses on advancing research and practice in the following three complementary areas: 1. AI for Cyber Defense Research on the application of artificial intelligence, machine learning, and foundation models to enhance cybersecurity capabilities, including threat detection, vulnerability analysis, incident response, and cyber resilience. Topics include, but are not limited to: •AI-assisted vulnerability detection and analysis •Benchmarking of LLMs for vulnerability discovery and assessment •LLM-based software security analysis •AI-driven malware analysis and classification •AI-powered threat intelligence •Autonomous cyber defense agents •AI-enhanced Security Operations Centers (SOC) •AI-assisted fuzzing and vulnerability discovery •AI for incident response and cyber resilience 2. Security of AI Systems Research on identifying, evaluating, and mitigating security risks in AI systems, foundation models, and AI-enabled applications. Topics include, but are not limited to: •Prompt injection attacks and defenses •Jailbreak attacks against LLMs •Adversarial machine learning •Model poisoning and backdoor attacks •Malicious prompt generation and attack automation •AI agent security •Secure deployment of foundation models •LLM security evaluation methodologies •Security benchmarking of LLMs and AI agents •Red teaming for generative AI systems •Risk assessment frameworks for AI systems 3. Trustworthy AI Research on improving the transparency, interpretability, robustness, reliability, and human-centered design of AI systems for cybersecurity and other security-critical applications. Topics include, but are not limited to: •Explainable AI (XAI) for cybersecurity •Human-centered explainability •Uncertainty-aware AI systems •Human-AI collaboration in security operations •Trustworthy AI frameworks •Interpretable machine learning for cyber defense •Fairness, accountability, and transparency •Privacy-preserving AI •AI assurance and certification In addition, the workshop welcomes contributions on evaluation methodologies, benchmarking, surveys, datasets, governance, and standardization activities related to the above areas, including initiatives from ITU-T, ISO/IEC, ETSI, NIST, and other relevant organizations. ************************************************* -Paper submission ************************************************* The workshop welcomes submissions in the following categories. Full Papers (up to 6 pages): Full papers may present original research contributions, preliminary results, work-in-progress studies, industrial experiences, benchmark studies, surveys, standardization activities, system demonstrations, datasets, and emerging ideas. Poster Papers (up to 2 pages): Poster papers provide an opportunity to present novel concepts, early-stage research, ongoing projects, and discussion-oriented work. Papers must be written in English and should not exceed 6 pages for technical papers and 2 pages for poster papers, including figures, tables, references, and appendices. Manuscripts must follow the IEEE Conference Proceedings format (two-column layout, single-spaced, 10-point font). Submitted work must be original and must not have been previously published, nor be under review or consideration for publication elsewhere. All submissions will undergo a peer-review process. Paper templates can be downloaded from the IEEE website: https://www.ieee.org/conferences/publishing/templates.html Submission site: https://edas.info/newPaper.php?c=35273&amp;track=139092 Further information or questions may be addressed to: ieeedsc2026-workshop@ml.nict.go.jp Accepted papers will be presented as part of the IEEE DSC 2026 workshop program. Publication and indexing details will follow the official IEEE DSC 2026 Conference Proceedings policy. The conference proceedings will be published in the IEEE XPlore Digital Library. At least one author of each accepted paper must register for the conference in order for the paper to be included in the proceedings. ************************************************* -Important Dates ************************************************* Workshop Paper Submission Deadline: July 17, 2026 Notification of Acceptance: August 7, 2026 Camera-Ready Submission: September 4, 2026 Conference Dates: October 9–11, 2026 ************************************************* -Organizers ************************************************* Workshop Co-chairs •Takeshi Takahashi (National Institute of Information and Communications Technology, Japan) •Gregory Blanc (Telecom SudParis, Institut Polytechnique de Paris, France) Publicity Chair •Keisuke Furumoto (National Institute of Information and Communications Technology, Japan) *************************************************</text:p>
          </table:table-cell>
          <table:table-cell table:number-columns-repeated="1013"/>
        </table:table-row>
        <table:table-row table:style-name="ro1">
          <table:table-cell table:style-name="ce2" office:value-type="string" calcext:value-type="string">
            <text:p>IJASSN 2026</text:p>
          </table:table-cell>
          <table:table-cell table:style-name="ce2" office:value-type="string" calcext:value-type="string">
            <text:p>International Journal of Advanced Smart Sensor Network Systems</text:p>
          </table:table-cell>
          <table:table-cell table:style-name="ce2" office:value-type="float" office:value="25" calcext:value-type="float">
            <text:p>25</text:p>
          </table:table-cell>
          <table:table-cell table:style-name="ce2" office:value-type="float" office:value="35" calcext:value-type="float">
            <text:p>35</text:p>
          </table:table-cell>
          <table:table-cell table:style-name="ce3" office:value-type="date" office:date-value="2026-07-18" calcext:value-type="date">
            <text:p>2026-07-18</text:p>
          </table:table-cell>
          <table:table-cell table:style-name="ce3" office:value-type="date" office:date-value="2026-08-18" calcext:value-type="date">
            <text:p>2026-08-18</text:p>
          </table:table-cell>
          <table:table-cell table:style-name="ce3" office:value-type="date" office:date-value="2026-08-25" calcext:value-type="date">
            <text:p>2026-08-25</text:p>
          </table:table-cell>
          <table:table-cell table:number-columns-repeated="2"/>
          <table:table-cell table:style-name="ce4" office:value-type="string" calcext:value-type="string">
            <text:p><text:a xlink:href="http://airccse.org/journal/ijassn/ijassn.html" xlink:type="simple">http://airccse.org/journal/ijassn/ijassn.html</text:a></text:p>
          </table:table-cell>
          <table:table-cell table:style-name="ce2" office:value-type="string" calcext:value-type="string">
            <text:p>International Journal of Advanced Smart Sensor Network Systems (IJASSN) Scope and Topics With the availability of low cost, short range sensor technology along with advances in wireless networking, sensor networks has become a hot topic of discussion. The International Journal of Advanced Smart Sensor Network Systems is an open access peer-reviewed journal which focuses on applied research and applications of sensor networks. While sensor networks provide ample opportunities to provide various services, its effective deployment in large scale is still challenging due to various factors. This journal provides a forum that impacts the development of high performance computing solutions to problems arising due to the complexities of sensor network systems. It also acts as a path to exchange novel ideas about impacts of sensor networks research. Topics of interest include but are not limited to, the following Next Generation Ad Hoc &amp; Autonomous Wireless Systems Autonomous wireless networks UAV, drone, and robot ad hoc networks Swarm communication and coordination AI driven self organizing networks Distributed intelligence and cooperative decision making IoT, Massive IoT &amp; Cyber Physical Systems Large scale IoT architectures Industrial IoT (IIoT) and mission critical IoT Edge and fog computing for IoT Low power wide area networks (LPWAN) Smart environments and cyber physical systems Vehicular &amp; Intelligent Transportation Networks V2X, V2V, V2I communication Connected and autonomous vehicles Edge assisted vehicular intelligence Safety critical vehicular networking Mobility aware communication protocols 5G/6G Enabled Ad Hoc Networking 5G NR sidelink and device to device (D2D) communication 6G ad hoc and ultra dense networks Terahertz and mmWave ad hoc systems Reconfigurable intelligent surfaces (RIS) AI native networking and network slicing Wireless Sensing, Localization &amp; Context Awareness RF sensing and wireless perception Indoor/outdoor localization Joint communication and sensing (JCAS) Mobility prediction and context aware networking Protocols &amp; Algorithms for Intelligent Wireless Networks AI enhanced routing, MAC, and scheduling Cross layer optimization for intelligent networks Multi channel, multi radio, and MIMO systems Energy efficient and green networking Distributed resource allocation Security, Privacy &amp; Trust in Distributed Wireless Systems Lightweight cryptography for IoT and edge devices Secure routing and intrusion detection Blockchain based trust management Privacy preserving communication and computation Secure cooperative and autonomous systems Resilience, Reliability &amp; Quality of Service Fault tolerant and self healing networks Ultra reliable low latency communication (URLLC) Network dependability and survivability QoS/QoE provisioning in dynamic environments Experimental Platforms, Testbeds &amp; Real World Deployments Large scale testbeds and field trials Hardware/software co design for wireless systems Prototyping tools, simulators, and emulators Measurement driven research and performance evaluation Emerging Applications of Ad Hoc &amp; Distributed Networks Smart cities and intelligent infrastructure Environmental monitoring and precision agriculture Disaster response and mission critical communication Wearable and human centric networks Space air ground integrated networks (SAGIN) Paper Submission Authors are invited to submit papers for this journal through E-mail : ijassn@aircconline.com . Submissions must be original and should not have been published previously or be under consideration for publication while being evaluated for this Journal. Important Dates Submission Deadline : July 18, 2026 Authors Notification : August 18, 2026 Final Manuscript Due : August 25, 2026 Publication Date : Determined by the Editor-in-Chief Editorial Board Members Agoujil said , University of Moulay Ismail, Morocco Ali Abdrhman Ukasha , University, Libya Andysah Putera Utama Siahaan , Universitas Pembangunan Panca Budi, Indonesia Apala Ray , Research Associate Scientist, India Behnam Dezfouli , University Technology Malaysia, Malaysia Binod Kumar Pattanayak , Siksha O Anusandhan University, India Binu G.S , University of Calicut, India Sridharan D , Anna University, India El arbi abdellaoui alaoui , My Ismail University, Morocco Franco frattolillo , University of Sannio, Italy Geetha G , Anna university, India Purohit G.N , Banasthali University, India Hala Abukhalaf ,Palestine Polytechnic University,Palestine Haibo Yi , Shenzhen Polytechnic, China Hemn barzan abdalla , Ministry of education in KRG, Iraq Hyunsung KIm , Kyungil University, Korea Issa Atoum , The World Islamic Sciences and Education University, Jordan Jae Seung Yang , Seoul Women's University, Korea Kuruvilla Mathew ,Swinburne University ofTechnology,Malaysia Kire jakimoski , FON University, Republic of Macedonia Latif , Ibn Zohr University, Morocco Marzak bouchra , Hassan II University of Casablanca, Morocco Bhagyaveni M.A , Anna University chennai, India Mohammad Talib , University of Botswana, Botswana Mohammed M. Kadhum , Universiti Utara Malaysia, Malaysia Md Irfanul Hasan , Graphi</text:p>
          </table:table-cell>
          <table:table-cell table:number-columns-repeated="1013"/>
        </table:table-row>
        <table:table-row table:style-name="ro1">
          <table:table-cell table:style-name="ce2" office:value-type="string" calcext:value-type="string">
            <text:p>IJCI 2026</text:p>
          </table:table-cell>
          <table:table-cell table:style-name="ce2" office:value-type="string" calcext:value-type="string">
            <text:p>International Journal on Cybernetics &amp; Informatics</text:p>
          </table:table-cell>
          <table:table-cell table:style-name="ce2" office:value-type="float" office:value="80" calcext:value-type="float">
            <text:p>80</text:p>
          </table:table-cell>
          <table:table-cell table:style-name="ce2" office:value-type="float" office:value="30" calcext:value-type="float">
            <text:p>30</text:p>
          </table:table-cell>
          <table:table-cell table:style-name="ce3" office:value-type="date" office:date-value="2026-07-18" calcext:value-type="date">
            <text:p>2026-07-18</text:p>
          </table:table-cell>
          <table:table-cell table:style-name="ce3" office:value-type="date" office:date-value="2026-08-18" calcext:value-type="date">
            <text:p>2026-08-18</text:p>
          </table:table-cell>
          <table:table-cell table:style-name="ce3" office:value-type="date" office:date-value="2026-08-25" calcext:value-type="date">
            <text:p>2026-08-25</text:p>
          </table:table-cell>
          <table:table-cell table:number-columns-repeated="2"/>
          <table:table-cell table:style-name="ce4" office:value-type="string" calcext:value-type="string">
            <text:p><text:a xlink:href="http://airccse.org/journal/ijci/index.html" xlink:type="simple">http://airccse.org/journal/ijci/index.html</text:a></text:p>
          </table:table-cell>
          <table:table-cell table:style-name="ce2" office:value-type="string" calcext:value-type="string">
            <text:p>International Journal on Cybernetics &amp; Informatics ( IJCI) Scope and Topics International Journal on Cybernetics &amp; Informatics ( IJCI) is an open access peer- reviewed journal that focuses on the areas related to cybernetics which is information, control and system theory, understands the design and function of any system and the relationship among these applications. This journal aims to provide a platform for exchanging ideas in new emerging trends that needs more focus and exposure and will attempt to publish proposals that strengthen our goals. Topics of interest include, but are not limited to, the following : Advanced Control Systems &amp; Strategies Robotics &amp; Artificial Intelligence Complex adaptive System &amp; Theory Hybrid systems Network Dynamics Systems Mechatronics Multimedia &amp; Telecommunications Medical Cybernetics Synthetic Biology Biocybernetics Engineering Cybernetics Entrepreneurial, Management &amp; Organization Cybernetics Operation Research Sociocybernetics Transportation Systems Power Systems Manufacturing Systems Neural Networks &amp; Fuzzy System Image Signal Processing Computer Vision Soft Computing Genetic Algorithm Database &amp; Information Retrieval Decision Support System Risk Management Paper Submission: Authors are invited to submit papers for this journal through E-mail ijcijournal@airccse.org . Submissions must be original and should not have been published previously or be under consideration for publication while being evaluated for this Journal. Important Dates : Submission Deadline : July 18, 2026 Authors Notification : August 18, 2026 Final Manuscript Due : August 25, 2026 Publication Date : Determined by the Editor-in-Chief Editor In Chief Obaid Ur-Rehman, University of Siegen, Germany Editorial Board Members Abe Zeid , Northeastern University, USA Adnan , Institute of Technology, Iraq Amel B.H. Adamou-Mitiche , University of Djelfa, Algeria Annamalai , Prairie View A&amp;M University, USA Ashok Baburaj C , K.L.N College of Engineering, India Ashutosh Kumar Dubey , Trinity Institute of Technology and Research, India Ava Clare Robles , Mindanao State University, Philippines Ayad Ghany Ismaeel , Erbil Polytechnic University, Iraq Ayman Khalil , INSA-IETR, France Azi joseph , Ahmadu Bello University Zaria, Nigeria Barbaros Preveze , Cankaya University, Turkey Biradar R. C , Reva Institute of technology and Management, India ...for more</text:p>
          </table:table-cell>
          <table:table-cell table:number-columns-repeated="1013"/>
        </table:table-row>
        <table:table-row table:style-name="ro1">
          <table:table-cell table:style-name="ce2" office:value-type="string" calcext:value-type="string">
            <text:p>ICAICTA 2026</text:p>
          </table:table-cell>
          <table:table-cell table:style-name="ce2" office:value-type="string" calcext:value-type="string">
            <text:p>The 13th International Conference on Advanced Informatics: Concepts, Theory and Applications</text:p>
          </table:table-cell>
          <table:table-cell table:style-name="ce2" office:value-type="float" office:value="85" calcext:value-type="float">
            <text:p>85</text:p>
          </table:table-cell>
          <table:table-cell table:style-name="ce2" office:value-type="float" office:value="28" calcext:value-type="float">
            <text:p>28</text:p>
          </table:table-cell>
          <table:table-cell table:style-name="ce3" office:value-type="date" office:date-value="2026-07-19" calcext:value-type="date">
            <text:p>2026-07-19</text:p>
          </table:table-cell>
          <table:table-cell table:style-name="ce3" office:value-type="date" office:date-value="2026-08-17" calcext:value-type="date">
            <text:p>2026-08-17</text:p>
          </table:table-cell>
          <table:table-cell table:style-name="ce3" office:value-type="date" office:date-value="2026-09-06" calcext:value-type="date">
            <text:p>2026-09-06</text:p>
          </table:table-cell>
          <table:table-cell table:style-name="ce2" office:value-type="string" calcext:value-type="string">
            <text:p>UTAR, Kampar, Perak, Malaysia</text:p>
          </table:table-cell>
          <table:table-cell table:style-name="ce2" office:value-type="string" calcext:value-type="string">
            <text:p>Oct 20, 2026 - Oct 21, 2026</text:p>
          </table:table-cell>
          <table:table-cell table:style-name="ce4" office:value-type="string" calcext:value-type="string">
            <text:p><text:a xlink:href="https://icaicta.org/" xlink:type="simple">https://icaicta.org/</text:a></text:p>
          </table:table-cell>
          <table:table-cell table:style-name="ce2" office:value-type="string" calcext:value-type="string">
            <text:p>CALL FOR PAPERS ICAICTA 2026 Title: The 13th International Conference on Advanced Informatics: Concepts, Theory and Applications (ICAICTA 2026) Date: 20–21 October 2026 Mode: Hybrid Physical Venue: Universiti Tunku Abdul Rahman (UTAR), Kampar Perak, Malaysia Dear Prof./ Assoc. Prof./ Dr./ Gs./ Ts./ Ir./ Br./ Mr./ Ms., Good day. We are pleased to invite you to participate in the ICAICTA 2026. The Call for Papers is now officially open. We welcome submissions in areas including: - Artificial Intelligence and Machine Learning - Data Science and Big Data Analytics - Computer Vision and Image Processing - Internet of Things (IoT) - Software Engineering and Information Systems - Cryptography - Natural Language Processing - Others (please refer to the website) The conference proceedings will be published in IEEE Xplore and indexed by SCOPUS. Important Dates: - 5 July 2026 – Full Paper Submission Due *extend to 17 of July 2026 - 3 August 2026 – Notification of Acceptance * extend to 17 August 2026 - 6 September 2026 – Camera Ready Due - 13 September 2026 - Early Bird Registration Due - 30 September 2026 - Registration Due For details &amp; registration: https://icaicta.org/ Email: icaicta2026@utar.edu.my There may be an extension to the full paper submission deadline.</text:p>
          </table:table-cell>
          <table:table-cell table:number-columns-repeated="1013"/>
        </table:table-row>
        <table:table-row table:style-name="ro1">
          <table:table-cell table:style-name="ce2" office:value-type="string" calcext:value-type="string">
            <text:p>CAIT--EI 2026</text:p>
          </table:table-cell>
          <table:table-cell table:style-name="ce2" office:value-type="string" calcext:value-type="string">
            <text:p>2026 7th International Conference on Computers and Artificial Intelligence Technology (CAIT 2026)</text:p>
          </table:table-cell>
          <table:table-cell table:style-name="ce2" office:value-type="float" office:value="88" calcext:value-type="float">
            <text:p>88</text:p>
          </table:table-cell>
          <table:table-cell table:style-name="ce2" office:value-type="float" office:value="30" calcext:value-type="float">
            <text:p>30</text:p>
          </table:table-cell>
          <table:table-cell table:style-name="ce3" office:value-type="date" office:date-value="2026-07-20" calcext:value-type="date">
            <text:p>2026-07-20</text:p>
          </table:table-cell>
          <table:table-cell table:number-columns-repeated="2"/>
          <table:table-cell table:style-name="ce2" office:value-type="string" calcext:value-type="string">
            <text:p>Guiyang, Guizhou, China</text:p>
          </table:table-cell>
          <table:table-cell table:style-name="ce2" office:value-type="string" calcext:value-type="string">
            <text:p>Nov 13, 2026 - Nov 15, 2026</text:p>
          </table:table-cell>
          <table:table-cell table:style-name="ce4" office:value-type="string" calcext:value-type="string">
            <text:p><text:a xlink:href="https://www.cait.net/" xlink:type="simple">https://www.cait.net/</text:a></text:p>
          </table:table-cell>
          <table:table-cell table:style-name="ce2" office:value-type="string" calcext:value-type="string">
            <text:p>Full name: 2026 7th International Conference on Computers and Artificial Intelligence Technology (CAIT 2026) Abbreviation: CAIT 2026 2026 7th International Conference on Computers and Artificial Intelligence Technology (CAIT) will be held in Guiyang, Guizhou, China during November 13-15, 2026. The conference is sponsored by IEEE, Guizhou University, hosted by College of Computer Science and Technology, Institute of Artificial Intelligence, Guizhou University, and patrons with Macau University of Science and Technology, Beijing University of Posts and Telecommunications, Guangxi University, Inner Mongolia University of Technology, SIIT, Shenzhen Smart City, Lanzhou Institute of Technology, Hangzhou Polytechnic University, and other patrons. More information, please visit: https://www.cait.net/ Publication and Indexing: Submissions of CAIT 2026 will be peer reviewed. Accepted and registered papers will be published in Conference Proceedings, and indexed by EI Compendex, SCOPUS, etc. Submission ways: Submit full paper or abstract through the linkage below: http://www.easychair.org/conferences/?conf=cait2026 Note: *An account is needed. Please register first, if you do not have one. *Full paper submission can be published in conference proceeding after reviewing and registration. Abstract can be included in conference program only. Call for Papers: Topics of interest for submission include, but are not limited to: Data mining Deep learning Pattern recognition Computer vision Artificial neural network Natural language processing Robotics and Intelligent Systems For more topics, please visit: https://cait.net/cfp.html Call for Special Sessions: Special Sessions Proposals should be submitted in PDF format by email to maggie.fu@sciei.org before August 20, 2026. The proposals should include the following information: Title and general information General information of organizers Proposed speakers Description of publicity and promotion plan Program November 13, 2026--Registration, collecting conference materials November 14, 2026--Keynote Speech &amp; Presentation Day November 15, 2026--Presentation Day (Online) Contact Us: Ms. Anna Yuan Email: cait_conference@163.com Tel. : +1-562-606-1057 / +86 18207777775</text:p>
          </table:table-cell>
          <table:table-cell table:number-columns-repeated="1013"/>
        </table:table-row>
        <table:table-row table:style-name="ro1">
          <table:table-cell table:style-name="ce2" office:value-type="string" calcext:value-type="string">
            <text:p>AAIE--EI 2027</text:p>
          </table:table-cell>
          <table:table-cell table:style-name="ce2" office:value-type="string" calcext:value-type="string">
            <text:p>2027 Asia Artificial Intelligence and Education Conference (AAIE 2027)</text:p>
          </table:table-cell>
          <table:table-cell table:style-name="ce2" office:value-type="float" office:value="32" calcext:value-type="float">
            <text:p>32</text:p>
          </table:table-cell>
          <table:table-cell table:style-name="ce2" office:value-type="float" office:value="30" calcext:value-type="float">
            <text:p>30</text:p>
          </table:table-cell>
          <table:table-cell table:style-name="ce3" office:value-type="date" office:date-value="2026-07-20" calcext:value-type="date">
            <text:p>2026-07-20</text:p>
          </table:table-cell>
          <table:table-cell table:number-columns-repeated="2"/>
          <table:table-cell table:style-name="ce2" office:value-type="string" calcext:value-type="string">
            <text:p>Tokyo, Japan</text:p>
          </table:table-cell>
          <table:table-cell table:style-name="ce2" office:value-type="string" calcext:value-type="string">
            <text:p>Jan 9, 2027 - Jan 11, 2027</text:p>
          </table:table-cell>
          <table:table-cell table:style-name="ce4" office:value-type="string" calcext:value-type="string">
            <text:p><text:a xlink:href="http://icaaie.org/" xlink:type="simple">http://icaaie.org/</text:a></text:p>
          </table:table-cell>
          <table:table-cell table:style-name="ce2" office:value-type="string" calcext:value-type="string">
            <text:p>Abbreviation：AAIE 2027 Full Name: 2027 Asia Artificial Intelligence and Education Conference (AAIE 2027) Tokyo, Japan January 9-11, 2027 http://icaaie.org/ Publication: Accepted papers of AAIE 2027 after proper registration and presentation will be published into Conference Proceedings, submitted for Ei Compendex and Scopus. Call For Papers: **Artificial Intelligence (AI)** Foundation Models and Large Language Models (LLMs) Generative AI and Multimodal Intelligence Autonomous and Agentic AI Systems Reinforcement Learning and Decision Intelligence Embodied AI and Robotics Explainable, Trustworthy, and Responsible AI Human-AI Interaction and Alignment Edge AI and Scalable AI Systems **Educational Technology (EdTech)** Learning Analytics and Educational Data Mining Adaptive and Personalized Learning Systems Intelligent Tutoring Systems (ITS) Game-Based Learning and Simulation-Based Learning XR/VR/AR and Immersive Learning Digital Learning Environments and LMS Innovation Assessment, Feedback, and Learning Evaluation Technology-Enhanced Collaborative Learning **AI in Education (AI + EdTech Integration)** Generative AI for Teaching, Learning, and Assessment AI Agents and Copilots in Education Teacher–AI Collaboration and Augmentation Multimodal AI for Learning Analytics AI-Driven Personalized and Adaptive Learning Human-AI Co-Learning and Pedagogical Innovation AI Literacy and Future Skills Education Ethical, Fair, and Trustworthy AI in Education AI for Inclusive and Global Education More Topics: http://icaaie.org/cfp.html Submission Methods: Full Paper(publication and oral presentation) Abstract(oral presentation only) Please log in the Electronic Submission System to submit your paper. \--Electronic Submission System: http://confsys.iconf.org/submission/aaie2027 \--By email: AAIE_Conf@vip.163.com Contacts: Ms. Yukina E-mail: AAIE_Conf@vip.163.com Tel: +86-19382255134</text:p>
          </table:table-cell>
          <table:table-cell table:number-columns-repeated="1013"/>
        </table:table-row>
        <table:table-row table:style-name="ro1">
          <table:table-cell table:style-name="ce2" office:value-type="string" calcext:value-type="string">
            <text:p>VSIP 2026</text:p>
          </table:table-cell>
          <table:table-cell table:style-name="ce2" office:value-type="string" calcext:value-type="string">
            <text:p>IEEE--2026 The 8th International Conference on Video, Signal and Image Processing (VSIP 2026)</text:p>
          </table:table-cell>
          <table:table-cell table:style-name="ce2" office:value-type="float" office:value="28" calcext:value-type="float">
            <text:p>28</text:p>
          </table:table-cell>
          <table:table-cell table:style-name="ce2" office:value-type="float" office:value="30" calcext:value-type="float">
            <text:p>30</text:p>
          </table:table-cell>
          <table:table-cell table:style-name="ce3" office:value-type="date" office:date-value="2026-07-20" calcext:value-type="date">
            <text:p>2026-07-20</text:p>
          </table:table-cell>
          <table:table-cell table:number-columns-repeated="2"/>
          <table:table-cell table:style-name="ce2" office:value-type="string" calcext:value-type="string">
            <text:p>Zhenjiang, Jiangsu, China</text:p>
          </table:table-cell>
          <table:table-cell table:style-name="ce2" office:value-type="string" calcext:value-type="string">
            <text:p>Nov 6, 2026 - Nov 8, 2026</text:p>
          </table:table-cell>
          <table:table-cell table:style-name="ce4" office:value-type="string" calcext:value-type="string">
            <text:p><text:a xlink:href="http://vsip.net/" xlink:type="simple">http://vsip.net/</text:a></text:p>
          </table:table-cell>
          <table:table-cell table:style-name="ce2" office:value-type="string" calcext:value-type="string">
            <text:p>Full name: The 8th International Conference on Video, Signal and Image Processing Abbreviation: VSIP 2026 *2026 The 8th International Conference on Video, Signal and Image Processing (VSIP)* November 6-8, 2026 | Zhenjiang, Jiangsu, China VSIP 2026 has been included in IEEE event list! 2026 The 8th International Conference on Video, Signal and Image Processing (VSIP) will be held in Zhenjiang, Jiangsu, China during November 6-8, 2026. VSIP 2026 solicits contributions worldwide that illustrate research results, projects, surveys and industrial experiences in related fields of Video, Signal and Image Processing. VSIP 2026 is co-sponsored by Jiangsu University of Science and Technology, China and IEEE; hosted by Ocean College, Jiangsu University of Science and Technology, China. ☑Publication Submitted papers will be peer reviewed by program committees and technical committee, and accepted papers will be published into conference proceedings by IEEE after registration and presentation. The proceedings will be submitted for inclusion into IEEE Xplore and indexed by Ei Compendex &amp; Scopus. VSIP 2019-2025 Proceedings have been archived in the ACM Digital Library, and indexed by Ei Compendex, Scopus. ☑Topics Topics of interest for submission include, but are not limited to: ★ Video Processing &amp; Analysis ★ - Real-time video processing algorithms - Video super-resolution and enhancement - Motion estimation and object tracking - 3D video processing and stereo vision - Video summarization and retrieval ★ Signal Processing &amp; Applications ★ - Adaptive and nonlinear signal processing - Biomedical signal processing and analysis - Speech and audio signal processing - Time-frequency analysis and wavelets - Edge and fog computing for signal processing ★ Image Processing &amp; Computer Vision ★ - Image segmentation and object detection - Deep learning for image classification - Medical image processing (e.g., MRI, CT) - Hyperspectral and multispectral imaging - Image fusion and panorama stitching ★ Multimedia Systems &amp; Applications ★ - Multimedia content analysis and indexing - Augmented/Virtual Reality (AR/VR) technologies - Multimedia for autonomous vehicles - Haptic and tactile multimedia systems - Cloud-based multimedia processing ★ Machine Learning &amp; AI for Visual Data ★ - Self-supervised learning for video/image data - Few-shot learning in visual recognition - Transformer models for visual processing - Federated learning for distributed vision systems - Bias and fairness in visual AI models For more topics, please visit: http://www.vsip.net/cfp.html ☑Submission Guideline ♢ English is the official language. Paper should be prepared in English. ♢ Abstract submission is for presentation only without publication. ♢ Full paper submission is for both presentation and publication. (No less than 5 pages) ♢ Submission Methods: - By online submission system: http://confsys.iconf.org/submission/vsip2026 - Or Submit to vsip_contact@126.com as attachment For more details, please visit: http://www.vsip.net/sub.html ☑Zhenjiang Brief Guide When talking about Zhenjiang, most people will naturally associate it with the legend of the Flooding of Jinshan Temple by the White Lady. It has its own unique cultural heritage. The old streets, full of charming historical architecture, make you feel like you are in an old movie. The aromatic vinegar of Zhenjiang is also a symbol of the city, and when paired with the local specialty crab dumplings, the taste is very sweet and fresh! Zhenjiang is so beautiful that it makes people green with envy that they cannot live here. ☑Contact Us Conference Secretary: Miss Nila Wang Email: vsip_contact@126.com Tel: +86-18080013977 Website: http://vsip.net/ Office Hour: Monday-Friday, 9:30-18:00 (GMT+8)</text:p>
          </table:table-cell>
          <table:table-cell table:number-columns-repeated="1013"/>
        </table:table-row>
        <table:table-row table:style-name="ro1">
          <table:table-cell table:style-name="ce2" office:value-type="string" calcext:value-type="string">
            <text:p>PRIMA 2026</text:p>
          </table:table-cell>
          <table:table-cell table:style-name="ce2" office:value-type="string" calcext:value-type="string">
            <text:p>Pacific Rim International Conference on Multi-Agents</text:p>
          </table:table-cell>
          <table:table-cell table:style-name="ce2" office:value-type="float" office:value="60" calcext:value-type="float">
            <text:p>60</text:p>
          </table:table-cell>
          <table:table-cell table:style-name="ce2" office:value-type="float" office:value="22" calcext:value-type="float">
            <text:p>22</text:p>
          </table:table-cell>
          <table:table-cell table:style-name="ce3" office:value-type="date" office:date-value="2026-07-20" calcext:value-type="date">
            <text:p>2026-07-20</text:p>
          </table:table-cell>
          <table:table-cell table:style-name="ce3" office:value-type="date" office:date-value="2026-09-25" calcext:value-type="date">
            <text:p>2026-09-25</text:p>
          </table:table-cell>
          <table:table-cell table:style-name="ce3" office:value-type="date" office:date-value="2026-10-09" calcext:value-type="date">
            <text:p>2026-10-09</text:p>
          </table:table-cell>
          <table:table-cell table:style-name="ce2" office:value-type="string" calcext:value-type="string">
            <text:p>Kumamoto, Japan</text:p>
          </table:table-cell>
          <table:table-cell table:style-name="ce2" office:value-type="string" calcext:value-type="string">
            <text:p>Dec 14, 2026 - Dec 17, 2026</text:p>
          </table:table-cell>
          <table:table-cell table:style-name="ce4" office:value-type="string" calcext:value-type="string">
            <text:p><text:a xlink:href="https://www.prima2026.org/" xlink:type="simple">https://www.prima2026.org/</text:a></text:p>
          </table:table-cell>
          <table:table-cell table:style-name="ce2" office:value-type="string" calcext:value-type="string">
            <text:p>CALL FOR PAPERS The 27th International Conference on Principles and Practice of Multi-Agent Systems (PRIMA 2026) Kumamoto, Japan - 14th - 17th December 2026. For more info and details, please see https://www.prima2026.org. We invite you to submit your best work on agents and multi-agent systems to PRIMA 2026, the 27th International Conference on Principles and Practice of Multi-Agent Systems, to be held in Kumamoto (Japan) in December 2026. PRIMA 2026 welcomes original, unpublished work in the field of Multi-Agent Systems (MAS). The vision of PRIMA 2026 is to move beyond traditional MAS by combining the rigorous foundations of conventional multi-agent systems with the flexibility, adaptability, and context-awareness of Generative and Agentic AI. PRIMA 2026 will be co-located with IEEE ICA 2026 (https://attend.ieee.org/ica-2026), which places a stronger focus on Agentic AI. The two conferences are complementary as IEEE ICA2026 emphasizes Agentic AI while PRIMA 2026 focuses on the theory, design, and practice of multi-agent systems. ========== IMPORTANT DATES Abstract Submission Deadline: 13 July 2026 (AoE, UTC-12) Paper Submission Deadline: 20 July 2026 (AoE, UTC-12) Paper Notification: 25 September 2026 (AoE, UTC-12) Camera Ready Submission: 9 October 2026 (AoE, UTC-12) ========== AREAS OF INTEREST The conference areas of interest include, but are not limited to: Foundations of MAS - Logic and Reasoning - Collaboration and Coordination - Algorithmic Game Theory - Computational Social Choice Systems and Learning - Generative and Agentic AI - Agent and Multi-Agent Learning - Engineering Multi-Agent Systems - Agent-Based Modeling and Simulation Interaction and Society - Human-Agent Interaction - Decentralized Paradigms and Applications - Ethics, Society, and Governance ========== PAPER SUBMISSION TYPES PRIMA 2026 accepts three types of submissions. Full papers may be up to 16 pages plus references. Short papers may be up to 6 pages plus references. Poster papers may be up to 3 pages plus references. Papers submitted as Full Papers may be accepted as Short Papers or Poster Papers depending on the review results and recommendations of the Program Committee. ========== INFORMATION FOR AUTHORS PRIMA 2026 invites submissions of original, unpublished work that are strongly relevant to multi-agent systems. All submitted papers must be in a form suitable for double-blind review. Authors must omit their names and affiliations from the manuscript and avoid revealing identifying information. Submissions will be reviewed by experts in the field according to standard evaluation criteria, including significance and novelty, technical quality, clarity, and adequacy of evaluation. All accepted papers will be published in Springer’s Lecture Notes in Artificial Intelligence (LNCS/LNAI) series. Papers must be written in English and follow the Springer LNCS formatting guidelines: https://www.springer.com/gp/computer-science/lncs. PRIMA papers should be submitted through CMT at https://cmt3.research.microsoft.com/PRIMA2026 ========== ORGANIZATION COMMITTEE General Chairs: Rafik Hadfi (Kyoto University) and Shigeo Matsubara (Osaka University) Program Chair: Donghui Lin (Okayama University) and Pradeep Kumar Murukannaiah (TU Delft) Publication Chairs: Fumito Uwano (Tokyo University of Agriculture and Technology) and Jack McKinlay (University of Bath) Publicity Chairs: Zhaohong Sun (Kyushu University), Zehua Si (Kyoto University), and Vahid Yazdanpanah (University of Southampton) Web Chair: Zehua Si (Kyoto University) Tutorial Chairs: Shun Okuhara (Mie University) and Shiyao Ding (Kyoto University) Local Arrangements and Financial Chair: Tokuro Matsuo (Advanced Institute of Industrial Technology) Steering Committee: Takayuki Ito, Reyhan Aydogan, Abdul Sattar, Shiyao Ding, Paolo Torroni, Edith Elkind, Nir Oren, Makoto Yokoo, Bastin Tony Roy Savarimuthu, Jane Y. Hsu, Bo An, Yuko Sakurai, Mehdi Dastani, Víctor Sánchez Anguix, Guido Governatori, Joao Leite, Frank Dignum, Andrea Omicini, Katsutoshi Hirayama, Tran Cao Son, Matteo Baldoni, and Leon van der Torre. ========== For inquiries regarding paper submissions, please contact: prima2026.pc@gmail.com Further information, including the full call for papers, submission guidelines, programmes updates, and registration details, is available at: https://www.prima2026.org/ We would greatly appreciate it if you could circulate this call within your networks. Kind regards, PRIMA 2026 Publicity Team</text:p>
          </table:table-cell>
          <table:table-cell table:number-columns-repeated="1013"/>
        </table:table-row>
        <table:table-row table:style-name="ro1">
          <table:table-cell table:style-name="ce2" office:value-type="string" calcext:value-type="string">
            <text:p>AMMS 2026</text:p>
          </table:table-cell>
          <table:table-cell table:style-name="ce2" office:value-type="string" calcext:value-type="string">
            <text:p>ACM--2026 8th International Applied Mathematics, Modelling and Simulation Conference (AMMS 2026)</text:p>
          </table:table-cell>
          <table:table-cell table:style-name="ce2" office:value-type="float" office:value="85" calcext:value-type="float">
            <text:p>85</text:p>
          </table:table-cell>
          <table:table-cell table:style-name="ce2" office:value-type="float" office:value="32" calcext:value-type="float">
            <text:p>32</text:p>
          </table:table-cell>
          <table:table-cell table:style-name="ce3" office:value-type="date" office:date-value="2026-07-20" calcext:value-type="date">
            <text:p>2026-07-20</text:p>
          </table:table-cell>
          <table:table-cell table:number-columns-repeated="2"/>
          <table:table-cell table:style-name="ce2" office:value-type="string" calcext:value-type="string">
            <text:p>Paris, France</text:p>
          </table:table-cell>
          <table:table-cell table:style-name="ce2" office:value-type="string" calcext:value-type="string">
            <text:p>Sep 11, 2026 - Sep 13, 2026</text:p>
          </table:table-cell>
          <table:table-cell table:style-name="ce4" office:value-type="string" calcext:value-type="string">
            <text:p><text:a xlink:href="http://www.amms.org" xlink:type="simple">http://www.amms.org</text:a></text:p>
          </table:table-cell>
          <table:table-cell table:style-name="ce2" office:value-type="string" calcext:value-type="string">
            <text:p>Full name: 2026 8th International Applied Mathematics, Modelling and Simulation Conference Abbreviation: AMMS 2026 2026 8th International Applied Mathematics, Modelling and Simulation Conference (AMMS 2026) will be held from September 11-13, 2026 in Paris, France. This Conference will cover topics on Applied Mathematics, Modelling, Simulation and related fields. It dedicates to providing a platform for exchanging the latest research results and sharing the advanced research methods for researchers, practitioners, and professionals from all over the world. Conference Website: http://www.amms.org Conference Date: September 11-13, 2026 Some social programs such as academic visit and city tour will be arranged on September 13, 2026(depends on the actual notice). Paper Publication 1. Conference Proceedings by ACM, which will be archived in ACM Digital Library, indexed by Ei Compendex and Scopus, and submitted to be reviewed by Thomson Reuters Conference Proceedings Citation Index (ISI Web of Science). 2. For those who are not willing to publish their papers, it's acceptable to submit abstracts for Presentation Only. Call for papers Topics of interest for submission include, but are not limited to: Topic 1: Mathematics Analysis；Algebra；Applied Mathematics；Computational Mathematics；Control Theory and Automation；Data Mining and Soft Computing；Geometry；Mathematical Chemistry and Biology；Optimization and Operational Research；Rough Set and Soft Set Theory；Statistics；Theoretical Computer Science Topic 2: Statistics Probability Theory；Stochastic Processes；Simulation, Parametric and Nonparametric Inference；Multivariate；Baysian Inference；Regression Analysis Estimation Theory；Decision Theory；Econometrics；Statistical Tomography and Image Processing；Sampling Theory Etc Topic 3: Simulation Tools and Platforms Enterprise Resource Planning；Petri Nets；Virtual Reality and Graphical Simulations；Discrete-Event Simulation；Security/Emergency Support Tools；Plant Simulation；Domain-Specific Tools；Serious Games；Team-support Tools；Education and Training；e-Learning Platforms；Laboratory Simulation Software；Computer Simulation Techniques；Case Studies Topic 4: Complex Systems Modeling and Simulation Collaborative Systems;Business Process Modeling Multiscale Simulation;Performance Analysis;Social Systems Simulation;Swarm Simulation;Fluid Dynamics;Biological Systems;Environmental Modeling;Crisis Modelling and Simulation Topic 5: Formal Methods Security;Planning and Scheduling;Ontologies;Conceptual Modeling;Stochastic Modeling and Simulation;Dynamical Systems Models and Methods;Non-Linear Systems;Distributed Simulation;Decision Support;Mathematical Simulation;Neural Nets and Fuzzy Systems;Risk Analysis Topic 6: Application Domains Automotive Industry;Chemical and Petroleum Engineering;Military and Defense;Construction Engineering and Project Management;Telecommunication Systems and Networks;Energy and Power Systems;Electronics Design and Manufacturing;Industrial Processes;Logistics, Traffic and Transportation;Robotics, Automation and Mechatronics;Hydraulic and Pneumatic Systems;GIS/GPS Systems More topics can be found at http://amms.org/cfp.html Call for Invited Speakers: Research Area: Applied Mathematics, Modelling and Simulation Presentation Format: 20-25-minute English presentation Participation Mode: Online or Offline Application Materials: Please submit your bio (within 200 words) and a photo to the conference email: amms@cbees.net. Upon successful application, your information will be updated on the conference website. *Both submission and registration must follow the procedures for invited speakers. Upon successful application, the conference will provide partial financial support. Call for Special Session Chairs: To enhance communication in the fields of Applied Mathematics, Modelling and Simulation, AMMS 2026 is specifically soliciting proposals for special sessions. Interested scholars are invited to submit their proposals the conference email box: amms@cbees.net. Optional Topics: 1) AI-Driven Multiscale Modeling and Simulation 2) Uncertainty Quantification and Trustworthy Simulation 3) Differentiable Programming and Automatic Differentiation in Scientific Computing 4) Data Assimilation, Fusion, and Real-time Simulation 5) Deep Generative Models for Physics-informed Simulation *After the organization of the Special Sessions is successful, the organizing committee will provide certain financial support. Conference Venue: Hotel Le Parchamp Addr.：114 Route de la Reine, 46 Rue de Billancourt, 92100 Boulogne-Billancourt, France Tel.：+33181890680 Web.： https://www.marriott.com/fr/hotels/parbt-le-parchamp-paris-boulogne-a-tribute-portfolio-hotel/overview/ Submission Methods and Listener Registration: Electronic Submission System: http://confsys.iconf.org/submission/amms2026 E-mail: amms@cbees.net Listener Registration: http://confsys.iconf.org/register/amms2026 Contact Methods: Conference Secretary: Ms. Jasmine Chen E-mail: amms@cbees.net Tel: +852-3500-0799 AMMS 2026 welcomes scholars and researchers working in the field of Applied Mathematics, Modelling and Simulation from all over the world to submit original and not published papers for reviewing of publication and presentation; submit abstract for presentation only or register for participation and listening conference. For more information, please visit: https://amms.org/index.html</text:p>
          </table:table-cell>
          <table:table-cell table:number-columns-repeated="1013"/>
        </table:table-row>
        <table:table-row table:style-name="ro1">
          <table:table-cell table:style-name="ce2" office:value-type="string" calcext:value-type="string">
            <text:p>ISCMI--EI 2026</text:p>
          </table:table-cell>
          <table:table-cell table:style-name="ce2" office:value-type="string" calcext:value-type="string">
            <text:p>2026 13th International Conference on Soft Computing &amp; Machine Intelligence (ISCMI 2026)</text:p>
          </table:table-cell>
          <table:table-cell table:style-name="ce2" office:value-type="float" office:value="92" calcext:value-type="float">
            <text:p>92</text:p>
          </table:table-cell>
          <table:table-cell table:style-name="ce2" office:value-type="float" office:value="30" calcext:value-type="float">
            <text:p>30</text:p>
          </table:table-cell>
          <table:table-cell table:style-name="ce3" office:value-type="date" office:date-value="2026-07-20" calcext:value-type="date">
            <text:p>2026-07-20</text:p>
          </table:table-cell>
          <table:table-cell table:number-columns-repeated="2"/>
          <table:table-cell table:style-name="ce2" office:value-type="string" calcext:value-type="string">
            <text:p>Vienna, Austria</text:p>
          </table:table-cell>
          <table:table-cell table:style-name="ce2" office:value-type="string" calcext:value-type="string">
            <text:p>Nov 18, 2026 - Nov 20, 2026</text:p>
          </table:table-cell>
          <table:table-cell table:style-name="ce4" office:value-type="string" calcext:value-type="string">
            <text:p><text:a xlink:href="http://www.iscmi.us/" xlink:type="simple">http://www.iscmi.us/</text:a></text:p>
          </table:table-cell>
          <table:table-cell table:style-name="ce2" office:value-type="string" calcext:value-type="string">
            <text:p>ISCMI 2026---EI Compendex, Scopus Index Full Name: 2026 13th International Conference on Soft Computing &amp; Machine Intelligence (ISCMI 2026) Abbreviation: ISCMI 2026 Place: Vienna, Austria Date: November 18-20, 2026 Website: http://www.iscmi.us/ Organizer: India International Congress on Computational Intelligence(IICCI) Technical Co-sponsor: IEEE Austria Section 2026 13th International Conference on Soft Computing &amp; Machine Intelligence will be held in Vienna, Austria during November 18-20, 2026. ISCMI 2026 is organized by India International Congress on Computational Intelligence(IICCI), and technically co-sponsored by IEEE Austria Section. The main objective of ISCMI 2026 is to present the latest research and results of scientists related to Soft Computing &amp; Machine Intelligence topics. This conference provides opportunities for the delegates to exchange new ideas face-to-face, to establish business or research relations as well as to find global partners for future collaborations. We hope that the conference results will lead to significant contributions to the knowledge in these evolving scientific fields. ISCMI has Achieved the Milestone of Covering EACH OF THE 6 INHABITED CONTINENTS OF THIS PLANET. ☛ 2026 10th IICCI Prof. Lotfi Zadeh Memorial Lecture Speaker Prof. Keeley A Crockett SMlEEE Lead Data and AI Ethics Group / Lead Machine Intelligence Group Manchester Metropolitan University, UK ☛ Plenary Speaker Prof. Laszlo T. Koczy Professor Emeritus Budapest University of Technology and Economics, Hungary ☛ Keynote Speakers Prof. Schahram Dustdar Member of the Academia Europaea IEEE Fellow, EAI Fellow, AAIA Fellow ACM Distinguished Scientist ACM Distinguished Speaker AIIA (InternationaI AI Industry Alliance) president TU Wien, Austria Prof. Keeley Crockett SMIEEE Lead Data and AI Ethics Group / Lead Machine Intelligence Group Manchester Metropolitan University, UK ☛ CALL FOR PAPERS 1. Artificial Intelligence and Machine Learning Artificial Intelligence Cognitive Science Computational Intelligence Evolutionary Computation 2. Data Mining and Knowledge Discovery Automatic Annotation Bioinformatics and Biological Computing Data Fusion Data Mining and Data Fusion 3. Probabilistic Reasoning and Uncertainty Associative Memory Computational Intelligence in Bioinformatics and Computational Biology Connectionism DNA Computing Emotional Intelligence 4. Fuzzy Systems and Optimization Fuzziness in Chaotic Systems Fuzziness in Multi-Agent Systems Fuzzy Aggregation Techniques Fuzzy Decision Making 5. Intelligent Control and Robotics Ant Colony Optimization and Swarm Intelligence Automatic Reasoning Case-Based and Temporal Reasoning Distributed Artificial Intelligence 6. Computer Vision and Information Retrieval Computer Vision Systems Intelligent Information Retrieval Intelligent Information Systems For details about topics, please visit: http://www.iscmi.us/cfp.html ☛ PUBLICATIONS ✿ Conference Proceedings Submitted papers will be peer reviewed by conference committees, and accepted papers after successful registration will be published into Conference Proceedings, which will submitted for index by Ei Compendex and Scopus. The authors of the papers will be invited to participate in the ISCMI 2026 to display their research results. ISCMI has a credible publication and index history: ISCMI 2025 Conference Proceedings (ISBN: 979-8-3315-8690-4) ISCMI 2024 Conference Proceedings (ISBN: 979-8-3315-1811-0) | IEEE Xplore | Scopus and Ei Compendex ISCMI 2023 Conference Proceedings (ISBN: 979-8-3503-5936-7) | IEEE Xplore | Scopus and Ei Compendex ISCMI 2022 Conference Proceedings (ISBN: 979-8-3503-2087-9) | IEEE Xplore | Scopus and Ei Compendex ISCMI 2021 Conference Proceedings (ISBN: 978-1-7281-8682-5) | IEEE Xplore | Scopus and Ei Compendex ISCMI 2020 Conference Proceedings (ISBN: 978-1-7281-7558-4) | IEEE Xplore | Scopus and Ei Compendex ISCMI 2019 Conference Proceedings (ISBN: 978-1-7281-4576-1) | IEEE Xplore | Scopus and Ei Compendex ISCMI 2018 Conference Proceedings (ISBN: 978-1-7281-1300-5) | IEEE Xplore | Scopus and Ei Compendex ISCMI 2017 Conference Proceedings (ISBN: 978-1-5386-1313-9) | IEEE Xplore | Scopus and Ei Compendex ISCMI 2016 Conference Proceedings (ISBN: 978-1-5090-3697-4) | IEEE Xplore | Scopus and Ei Compendex ISCMI 2015 Conference Proceedings (ISBN: 978-1-4673-9819-0) | IEEE Xplore | Scopus and Ei Compendex ISCMI 2014 Conference Proceedings (ISBN: 978-1-4673-6751-6) | IEEE Xplore | Scopus and Ei Compendex ✿ Conference will publish a selected set of extended versions of ISCMI2026 papers (to be shortlisted after the conference), after the usual reviewing of those papers to sent to Enterprise Information Systems (EIS) Special Issue Index: Ei Compendex, Australian Business Deans Council Journal Quality List (Rating: A), Scopus, Web of Science, Chartered Association of Business Schools (CABS) Academic Journal Guide (Rating: 2), Inspec (The IET), Science Citation Index Expanded, etc., Citation Metrics: 3.9 (2024) Impact Factor Q2 Impact Factor Best Quartile 3.9 (2024) 5 year IF 12.1 (2024) CiteScore (Scopus) Q1 CiteScore Best Quartile ☛ SUBMISSION Full paper/Abstract: Submission Link: https://easychair.org/conferences/?conf=iscmi2026 Submission Email: iscmi@outlook.com More details about submission, please visit: http://www.iscmi.us/submission.html ☛ CONFERENCE SCHEDULE November 18, 2026---Sign-in and Collect Conference Materials November 19, 2026---Opening Ceremony &amp; Keynote Speeches &amp; Parallel Sessions November 20, 2026---Parallel Sessions ☛ CONTACT Sia Liu (Conference Secretary) E-mail: iscmi@outlook.com</text:p>
          </table:table-cell>
          <table:table-cell table:number-columns-repeated="1013"/>
        </table:table-row>
        <table:table-row table:style-name="ro1">
          <table:table-cell table:style-name="ce2" office:value-type="string" calcext:value-type="string">
            <text:p>ICOAI--ESCI 2026</text:p>
          </table:table-cell>
          <table:table-cell table:style-name="ce2" office:value-type="string" calcext:value-type="string">
            <text:p>2026 The 13th International Conference on Artificial Intelligence (ICOAI 2026)--ESCI</text:p>
          </table:table-cell>
          <table:table-cell table:style-name="ce2" office:value-type="float" office:value="92" calcext:value-type="float">
            <text:p>92</text:p>
          </table:table-cell>
          <table:table-cell table:style-name="ce2" office:value-type="float" office:value="30" calcext:value-type="float">
            <text:p>30</text:p>
          </table:table-cell>
          <table:table-cell table:style-name="ce3" office:value-type="date" office:date-value="2026-07-20" calcext:value-type="date">
            <text:p>2026-07-20</text:p>
          </table:table-cell>
          <table:table-cell table:number-columns-repeated="2"/>
          <table:table-cell table:style-name="ce2" office:value-type="string" calcext:value-type="string">
            <text:p>Paris, France</text:p>
          </table:table-cell>
          <table:table-cell table:style-name="ce2" office:value-type="string" calcext:value-type="string">
            <text:p>Sep 25, 2026 - Sep 27, 2026</text:p>
          </table:table-cell>
          <table:table-cell table:style-name="ce4" office:value-type="string" calcext:value-type="string">
            <text:p><text:a xlink:href="http://www.icoai.org" xlink:type="simple">http://www.icoai.org</text:a></text:p>
          </table:table-cell>
          <table:table-cell table:style-name="ce2" office:value-type="string" calcext:value-type="string">
            <text:p>Full name: 2026 The 13th International Conference on Artificial Intelligence (ICOAI 2026)--ESCI Abbreviation: ICOAI 2026 Conference Date: September 25-27, 2026 Conference Venue: Paris, France Conference Website: http://www.icoai.org Hosted by: University of Haute-Alsace, France .........................................................................................................  The 13th International Conference on Artificial Intelligence (ICOAI 2026) will be held in Paris, France during September 25-27, 2026. ICOAI allows academia to meet industry from the international community to exchange experiences, demonstrate their studies and further advance AI technologies. You will also have a chance to discover the fascinating culture and architecture of Paris, try out the local cuisine, and discover the city's hidden gems. As the workshop of ICCSIT, ICOAI has been successfully held in Spain, Italy, The Netherlands etc. over the past twelve years. We look forward to seeing many returning faces and welcoming new attendees at ICOAI 2026. →Publication Paper accepted by ICOAI 2026 will be published in conference proceedings or one of the following journal based on the topic of the paper. Journal of Advances in Information Technology (JAIT, ISSN: 1798-2340 (Online)) Abstracting/Indexing: ESCI (Web of Science), Scopus, EBSCO, Google Scholar, CNKI, etc. Or International Journal of Machine Learning (IJML, ISSN: 2972-368X) Abstracting/Indexing: Inspec (IET), Google Scholar, Crossref, ProQuest, Electronic Journals Library, CNKI. →Topics - Artificial Intelligence in Scheduling and Optimization - Artificial Life - Bioinformatics and Computational Biology - Brain-Machine Interfaces - Cognitive Systems and Applications - Collective Intelligence - Data Mining - Differential Evolution - Evolutionary Data Mining - Evolutionary Design - Fuzzy Pattern Recognition - Fuzzy Systems for Robotics - Game Theory - Hardware Implementations - Human–Computer Interaction - Intelligent Database Systems - Knowledge Engineering - Machine Learning - Modeling and Identification For more topics, please check：http://www.icoai.org/cfp.html →Submission Guideline ▶Language: All submissions should be written in English. ▶Submission Types: Abstract submission for presentation only without publication; Full paper submission for both presentation and publication. ▶Paper Length: The submitted papers should be no less than 8 pages. ▶How to submit? Send to official email directly: icoai@iacsit.net or Submit via Online submission system: http://confsys.iconf.org/submission/icoai2026 →Program Overview Day 1: Friday | September 25, 2026 10:00--17:00 Registration and Materials Collection Day 2: Saturday | September 26, 2026 9:30--9:35 Opening Remarks 9:35--12:30 Keynote &amp; Invited Speeches 12:30--14:00 Lunch 14:00--19:45 Oral Presentation Sessions 1-4 Oral Presentation Sessions 5-8 Day 3: Sunday | September 27, 2026 10:00--18:00 City Tour →Conference Venue University of Haute-Alsace, France University of Haute-Alsace was officially founded on the 8th October 1975 and now incorporates 4 faculties, 2 engineering schools and 2 Institutes of Technology (IUTs) some of which pre-date the university itself. In fact, this is exactly the case with the two engineering schools (established in the 19th century) which were created in response to the needs of local industrialists for skilled manual workers. Ever since, the university has continued to expand and improve its education and training course portfolio and also to focus upon its research to feed into its learning and teaching programmes and enhance their professionalism and innovative nature. →Contact: Conference secretary: Ms. Yolanda Dong Email: icoai@iacsit.net Office Hour: 09:30--18:00, Monday to Friday (GMT+8 Time Zone)</text:p>
          </table:table-cell>
          <table:table-cell table:number-columns-repeated="1013"/>
        </table:table-row>
        <table:table-row table:style-name="ro1">
          <table:table-cell table:style-name="ce2" office:value-type="string" calcext:value-type="string">
            <text:p>IEEE ICoIAS 2026</text:p>
          </table:table-cell>
          <table:table-cell table:style-name="ce2" office:value-type="string" calcext:value-type="string">
            <text:p>IEEE--2026 the 8th International Conference on Intelligent Autonomous Systems (ICoIAS 2026)</text:p>
          </table:table-cell>
          <table:table-cell table:style-name="ce2" office:value-type="float" office:value="40" calcext:value-type="float">
            <text:p>40</text:p>
          </table:table-cell>
          <table:table-cell table:style-name="ce2" office:value-type="float" office:value="25" calcext:value-type="float">
            <text:p>25</text:p>
          </table:table-cell>
          <table:table-cell table:style-name="ce3" office:value-type="date" office:date-value="2026-07-20" calcext:value-type="date">
            <text:p>2026-07-20</text:p>
          </table:table-cell>
          <table:table-cell table:number-columns-repeated="2"/>
          <table:table-cell table:style-name="ce2" office:value-type="string" calcext:value-type="string">
            <text:p>Qinhuangdao, China</text:p>
          </table:table-cell>
          <table:table-cell table:style-name="ce2" office:value-type="string" calcext:value-type="string">
            <text:p>Aug 21, 2026 - Aug 23, 2026</text:p>
          </table:table-cell>
          <table:table-cell table:style-name="ce4" office:value-type="string" calcext:value-type="string">
            <text:p><text:a xlink:href="http://www.icias.org" xlink:type="simple">http://www.icias.org</text:a></text:p>
          </table:table-cell>
          <table:table-cell table:style-name="ce2" office:value-type="string" calcext:value-type="string">
            <text:p>★Full Name: IEEE--2026 the 8th International Conference on Intelligent Autonomous Systems (ICoIAS 2026) ★Abbreviation: ICoIAS 2026 ★Conference Venue: Qinhuangdao, China August 21-23, 2026 ★Website: http://www.icias.org ★Sponsored by Yanshan University, China. And assisted by The Institution of Engineers, Singapore and University of Manchester, UK. Tiny but proficient, that's the goal for ICoIAS. We focus on gathering the profound and gifted researchers here at this platform, only to show the must-attendance of this event, and the speakers invited will speak for this: Prof. Tianyou Chai (IEEE Fellow) | Northeastern University, China Prof. Zengguang Hou | Institute of Automation, Chinese Academy of Sciences, China Prof. Jonathan Garibaldi | University of Nottingham, UK IEEE Fellow; Editor-in-Chief of IEEE Transactions on Fuzzy Systems Prof. Hisao Ishibuchi (IEEE Fellow) | Southern University of Science and Technology (SUSTech), China Prof. Robert Kozma (IEEE Fellow) | University of Memphis, USA Prof. Haizhou Li (IEEE Fellow) | National University of Singapore, Singapore Prof. Chin-Teng Lin (IEEE Fellow) | University of Technology Sydney, Australia Prof. Derong Liu (IEEE Fellow) | Southern University of Science and Technology (SUSTech), China Prof. Marios M. Polycarpou (IEEE Fellow) | University of Cyprus, Cyprus Prof. Mohamad SAWAN (IEEE Fellow) | Westlake University, China Editor-in-chief of IEEE Transactions on Biomedical Circuits and Systems Prof. Yongduan Song (IEEE Fellow) | Chongqing University, China Editor-in-Chief of IEEE Transactions on Neural Networks and Learning Systems Prof. Alice E. Smith (IEEE Fellow) | Auburn University, USA Prof. Kay Chen Tan (IEEE Fellow) | The Hong Kong Polytechnic University, Hong Kong SAR Prof. Ljiljana Trajkovic (IEEE Fellow) | Simon Fraser University, Canada Prof. Feiyue Wang (IEEE Fellow) | Institute of Automation, Chinese Academy of Sciences, China Prof. Dongrui Wu (IEEE Fellow) | Huazhong University of Science and Technology (HUST), China Prof. Gary G. Yen (IEEE Fellow) | Oklahoma State University, USA Prof. Shen Yin (IEEE Fellow) | Norwegian University of Science and Technology, Norway ★Conference Proceedings All accepted papers after proper registration and presentation will be will be published in the ICoIAS 2026 Conference Proceedings, and reviewed by the IEEE Conference Publication Program for IEEE Xplore, Ei Compendex and Scopus. ★Previous ICoIAS ICoIAS 2025 | ISBN: 979-8-3315-9013-0 - IEEE Xplore | Ei Compendex &amp; Scopus| Osaka University, Japan ICoIAS 2023 | ISBN: 979-8-3503-7125-3 - IEEE Xplore | Ei Compendex &amp; Scopus| Qinhuangdao, China ICoIAS 2022 | ISBN: 978-1-6654-9837-1 - IEEE Xplore | Ei Compendex &amp; Scopus| Dalian, China ICoIAS 2021 | ISBN: 978-1-6654-4195-7 - IEEE Xplore | Ei Compendex &amp; Scopus| Wuhan, China ICoIAS 2020 | ISBN: 978-1-7281-6077-1 - IEEE Xplore | Ei Compendex &amp; Scopus | National University of Singapore, Singapore ICoIAS 2019 | ISBN: 978-1-7281-2662-3 - IEEE Xplore | Ei Compendex &amp; Scopus | Nanyang Technological University, Singapore ICoIAS 2018 | ISBN: 978-1-5386-6329-5 - IEEE Xplore | Ei Compendex &amp; Scopus | Nanyang Technological University, Singapore ★Conference Topics Topics of interest for submission include, but are not limited to: A.→ Advanced Intelligent Control: Intelligent control theories and methods, multi-agent collaborative control, sensor fusion in intelligent automatic systems; B.→ Robotic In-Situ Assembly and Manufacturing: human-robot interaction, intelligent reasoning, motion planning, multi-modal perception, automatic operation; C.→ Robot Grasping and Manipulation: grasping planning, grasp synergies, human grasping and manipulation modeling and learning, dexterous manipulation, in-hand manipulation, learning and cognitive development of grasping and manipulation; D.→ Vision and Navigation: SLAM, 3D vision, RGB-D Perception, machine vision, vision inspection, scene understanding; E.→ Bionic Robots and Technologies: Bionic materials, Mechanism, Ingenious structure; F.→ Deep Learning and Pattern Recognition: objection detection, and recognition G.→ Applications to Autonomous Systems: unmanned surface vehicles, unmanned aerial vehicles, spacecrafts, robotic systems, flexible manipulators etc. ★Submission Details Submission Link: https://easychair.org/conferences/?conf=icoias2026 Template: http://www.icias.org/IEEE-Formatting.docx (Note: a. Your submission will be reviewed by the conference scientific committee. b. Only Full paper submission will be published in conference proceedings if accepted.) Abstract is only for oral/poster presentation, and will not be published. ★Contact Us Conference Secretary: Ms. Yvaine. N. Yang Email: icoias_secretary@163.com Tel: +86-28-83533337</text:p>
          </table:table-cell>
          <table:table-cell table:number-columns-repeated="1013"/>
        </table:table-row>
        <table:table-row table:style-name="ro1">
          <table:table-cell table:style-name="ce2" office:value-type="string" calcext:value-type="string">
            <text:p>ICCPR 2026</text:p>
          </table:table-cell>
          <table:table-cell table:style-name="ce2" office:value-type="string" calcext:value-type="string">
            <text:p>Springer--2026 15th International Conference on Computing and Pattern Recognition (ICCPR 2026)</text:p>
          </table:table-cell>
          <table:table-cell table:style-name="ce2" office:value-type="float" office:value="90" calcext:value-type="float">
            <text:p>90</text:p>
          </table:table-cell>
          <table:table-cell table:style-name="ce2" office:value-type="float" office:value="30" calcext:value-type="float">
            <text:p>30</text:p>
          </table:table-cell>
          <table:table-cell table:style-name="ce3" office:value-type="date" office:date-value="2026-07-20" calcext:value-type="date">
            <text:p>2026-07-20</text:p>
          </table:table-cell>
          <table:table-cell table:number-columns-repeated="2"/>
          <table:table-cell table:style-name="ce2" office:value-type="string" calcext:value-type="string">
            <text:p>Wuxi, China</text:p>
          </table:table-cell>
          <table:table-cell table:style-name="ce2" office:value-type="string" calcext:value-type="string">
            <text:p>Oct 29, 2026 - Nov 1, 2026</text:p>
          </table:table-cell>
          <table:table-cell table:style-name="ce4" office:value-type="string" calcext:value-type="string">
            <text:p><text:a xlink:href="http://www.iccpr.org/" xlink:type="simple">http://www.iccpr.org/</text:a></text:p>
          </table:table-cell>
          <table:table-cell table:style-name="ce2" office:value-type="string" calcext:value-type="string">
            <text:p>Full name: 2026 15th International Conference on Computing and Pattern Recognition Abbreviation: ICCPR 2026 2026 15th International Conference on Computing and Pattern Recognition (ICCPR 2026) will be held in Wuxi, China during October 29-November 01, 2026. It is sponsored by Jiangnan University, supported by Beijing University of Technology, Tiangong University, East China Normal University, Shanghai University, Shenzhen University, Xiamen University of Technology, and Wayne State University. Conference Website: http://www.iccpr.org/ **Shining Point: 1. ICCPR papers have been published in International Conference Proceedings, indexed by Ei Compendex and Scopus for 7 years. 2. Many IEEE Fellows and IAPR Fellows such as Prof. Mohamed-Slim Alouin, Prof. David Zhang, Prof. Jenq-Neng Hwang, Prof. Mengjie Zhang, Prof. Sushmita Mitra, Prof. Yew-Soon Ong, Assoc. Prof. Jiwen Lu and so on participated in ICCPR. 3. The conference will include keynote talk, invited talk, panel session, oral session, poster session, and exhibition. 4. Academic Visit: To further enhance academic exchanges and practical experiences, ICCPR 2026 may add an academic visit and city tour in Wuxi based on the conference's actual arrangements. **Publication&amp;Indexing: 1. International Conference Proceedings: Communications in Computer and Information Science (CCIS) – Springer, indexed by Scopus, EI-Compendex, etc. 2. Journal of Advances in Information Technology (JAIT) (ISSN: 1798-2340; Impact Factor 2023: 0.9, CiteScore: 4.2): indexed by ESCI (Web of Science), Scopus, EBSCO, Google Scholar, CNKI, Crossref, etc. 3. International Journal of Machine Learning (IJML) (E-ISSN: 2972-368X), which will be indexed by Inspec (IET), Google Scholar, Crossref, ProQuest, Electronic Journals Library, CNKI. **Call for papers (include but not limited to): Track 1-Computer Vision and Image Processing: Image segmentation and annotation, Object detection and recognition Track 2-Pattern Recognition and Data Mining: Pattern classification and clustering, Feature selection and dimensionality reduction Track 3-Machine Learning and Deep Learning: Machine learning algorithms and methods, Deep learning models and architectures Track 4-Natural Language Processing and Text Analysis: Language models and semantic representation, Machine translation and cross-lingual processing Track 5-Human-Computer Interaction and Intelligent Systems: Multimodal interaction and affective computing, Virtual reality and augmented reality Track 6-Data Analysis and Big Data: Data preprocessing and cleansing, Large-scale data analysis and processing Track 7-Face Recognition and Biometrics: Face detection and recognition, Biometric identification and authentication Track 8-Time Series Analysis and Forecasting: Time series modeling and analysis, Time series forecasting and trend analysis Track 9-Reinforcement Learning and Adaptive Control: Model-based reinforcement learning, Model-free reinforcement learning Track 10-Media Analysis and Content Understanding: Video content analysis and understanding, Audio signal processing and music analysis For more information, please visit: https://www.iccpr.org/cfp.html **Call for Invited Speakers: Research Area: Computing and Pattern Recognition Presentation Format: 20-25-minute English presentation Participation Mode: Online or Offline Application Materials: Please submit your bio (within 200 words) and a photo to the conference email: iccpr@cbees.net. Upon successful application, your information will be updated on the conference website. *Both submission and registration must follow the procedures for invited speakers. Upon successful application, the conference will provide partial financial support. **Call for Special Sessions: 1. To complement the regular conference schedule and focus on emerging topics in the field of Computing and Pattern Recognition, ICCPR 2026 welcomes proposals for special sessions from experts and scholars. Please submit your proposals to: iccpr@cbees.net. 1.The proposal should include the following content: 1). Title of Special Session 2). Brief description of Special Session 3). Related topics 4). Name, Affiliation, E-mail, Short biography of the organizers *After the organization of the Special Sessions is successful, the organizing committee will provide certain financial support. 2. Optional Topics: Special Session 1: Foundation Models and Representation Learning for Multi-Modal Data Fusion Special Session 2: Security and Trustworthiness in Pattern Recognition Systems Special Session 3: Visual Understanding under Adverse Conditions and Foundation Model Adaptation Special Session 4: Generative AI and Fine-Grained Content Analysis **Award 1. Best Paper Award 2. Best Oral Presentation Award 3. Best Poster Presentation Award **Submission and Contact Methods: Submission Methods: http://confsys.iconf.org/submission/iccpr2026 E-mail: iccpr@cbees.net Tel: +852-3500-0799 (English)/+86-28-86528465 (Chinese) Wechat: CBEES-BBS Conference Secretary: Ms. Jamila Liu ICCPR 2026 can provide a platform for academic communication in Computing and Pattern Recognition as well as related areas. We welcomes participant include both authors and delegates. For more conference information, please visit the conference website: http://www.iccpr.org/.</text:p>
          </table:table-cell>
          <table:table-cell table:number-columns-repeated="1013"/>
        </table:table-row>
        <table:table-row table:style-name="ro1">
          <table:table-cell table:style-name="ce2" office:value-type="string" calcext:value-type="string">
            <text:p>ICMV 2026</text:p>
          </table:table-cell>
          <table:table-cell table:style-name="ce2" office:value-type="string" calcext:value-type="string">
            <text:p>SPIE--2026 19th International Conference on Machine Vision (ICMV 2026)</text:p>
          </table:table-cell>
          <table:table-cell table:style-name="ce2" office:value-type="float" office:value="42" calcext:value-type="float">
            <text:p>42</text:p>
          </table:table-cell>
          <table:table-cell table:style-name="ce2" office:value-type="float" office:value="30" calcext:value-type="float">
            <text:p>30</text:p>
          </table:table-cell>
          <table:table-cell table:style-name="ce3" office:value-type="date" office:date-value="2026-07-20" calcext:value-type="date">
            <text:p>2026-07-20</text:p>
          </table:table-cell>
          <table:table-cell table:number-columns-repeated="2"/>
          <table:table-cell table:style-name="ce2" office:value-type="string" calcext:value-type="string">
            <text:p>Budapest, Hungary</text:p>
          </table:table-cell>
          <table:table-cell table:style-name="ce2" office:value-type="string" calcext:value-type="string">
            <text:p>Oct 15, 2026 - Oct 18, 2026</text:p>
          </table:table-cell>
          <table:table-cell table:style-name="ce4" office:value-type="string" calcext:value-type="string">
            <text:p><text:a xlink:href="http://icmv.org/" xlink:type="simple">http://icmv.org/</text:a></text:p>
          </table:table-cell>
          <table:table-cell table:style-name="ce2" office:value-type="string" calcext:value-type="string">
            <text:p>Full name: SPIE--2026 19th International Conference on Machine Vision (ICMV 2026) Abbreviation: ICMV 2026 ★2026 19th International Conference on Machine Vision (ICMV 2026)★ 2026 19th International Conference on Machine Vision (ICMV 2026) is going to be held at Budapest, Hungary. ◤October 15-18, 2026◢. Conference official website: http://icmv.org/ Accepted and presented papers of ICMV 2026 will be published by SPIE, to be included in SPIE Digital Library, provided to the Web of Science Conference Proceedings Citation Index-Science, Scopus, Ei Compendex, etc, to ensure maximum awareness of the Proceedings. Since 2013, all ICMV Proceedings have been published by SPIE and all indexed by EI, Scopus and ISI. ◆ICMV History ICMV 2025(Paris, France)-SPIE-V14114, already included by SPIE Digital Library. ICMV 2024(Edinburgh, UK)-SPIE-V13517, indexed by Ei Compendex, Scopus, ISI, etc. ICMV 2023(Yerevan, Armenia)-SPIE-V13072, indexed by Ei Compendex, Scopus, ISI, etc; ICMV 2022(Rome, Italy)-SPIE-V12701, indexed by Ei Compendex, Scopus, ISI, etc; ICMV 2021(Virtual)-SPIE-V12084, indexed by Ei Compendex, Scopus, ISI, etc; ICMV 2020(Virtual)-SPIE-V11605, indexed by Ei Compendex, Scopus, ISI, etc; ICMV 2019(Amsterdam, the Netherlands)-SPIE-V11433, indexed by Ei Compendex, Scopus, ISI, etc; ICMV 2018(Munich, Germany)-SPIE-V11041, indexed by Ei Compendex, Scopus, ISI, etc; ICMV 2017(Vienna, Austria)-SPIE-V10696, indexed by Ei Compendex, Scopus, ISI, etc; ICMV 2016(Nice, France)-SPIE-V10341, indexed by Ei Compendex, Scopus, ISI, etc; ICMV 2015(Barcelona, Spain)-SPIE-V9875, indexed by Ei Compendex, Scopus, ISI, etc; ICMV 2014(Milano, Italy)-SPIE-V9445, indexed by Ei Compendex, Scopus, ISI, etc; ICMV 2013(London, UK)-SPIE-V9067, indexed by Ei Compendex, Scopus, ISI, etc. … ◆Call for Paper: including, but not limited to: A. Theory and Principles: Image Formation (Image Acquisition, Optical Basics, Photometric Basics, Vision Models, Color Spaces, Sensors) Image Modeling (Image Representation, Systems and Signals, 2D-, 3D-Models, Projections, Rendering, Modalities, Parameters) Image Processing (Image Preprocessing, Image Enhancement, Image Filtering, Image Analysis, Image Restoration, Multiresolution Analysis, Image Alignment and Stitching, Geometric Transformations) Image Classification (Feature Space, Feature Extraction, etches and Contours, Segmentation, Texture Analysis, Morphology, Pattern Recognition, Computer Vision, Machine Vision) Image Reconstruction (Depth Estimation and Reconstruction, Monocular Depth Estimation, Stereo Vision, Multi-View Stereo, Shape from Shading, 3D Reconstruction, Volumetric Representations) Machine Learning, Deep Learning and Neural Networks (Supervised Learning, Unsupervised Learning, Deep Neural Networks, Convolutional Neural Networks) B. Practice and Applications Industrial Automation; Digital Production Digital / Metrology; Quality Control and Inspection; Non-Destructive Testing and Fault Detection; Medical Imaging; Robotics; Autonomous Vehicles, Inspection of Micro and Nano Structures; Automation in Agriculture and Food Production; Surveillance and Security; Motion Analysis; Environmental Monitoring, Protection of Cultural Heritage; Remote Sensing ◆Call for Special Session ICMV 2026 proposals for special sessions within the technical scope of the conference. Special sessions supplement the regular program of the conference and provide a sample of the state-of-the-art research in both academia and industry in special, novel, challenging, and emerging topics. Special-session proposals should be submitted by the prospective organizer(s) who will commit to promoting and handling the review process of their special session as Chairs or Co-Chairs of the event. Please see: https://icmv.org/sessions.html for details. Proposal Deadline: Aug. 5, 2026. ◆Submit Way: For presentation only, please submit abstract will be enough; For presentation and publishing, please submit full paper, via Easychair System: http://www.easychair.org/conferences/?conf=icmv2026 For any inquires, please contact us via email: secretary@icmv.org; ◆Contact: Conference secretary: Allen Foster Phone: +86-13688461344 Email: secretary@icmv.org Website: http://icmv.org/</text:p>
          </table:table-cell>
          <table:table-cell table:number-columns-repeated="1013"/>
        </table:table-row>
        <table:table-row table:style-name="ro1">
          <table:table-cell table:style-name="ce2" office:value-type="string" calcext:value-type="string">
            <text:p>WSOM 2026</text:p>
          </table:table-cell>
          <table:table-cell table:style-name="ce2" office:value-type="string" calcext:value-type="string">
            <text:p>WSOM+'26 16th International Workshop on Self-Organizing Maps, Learning Vector Quantization &amp; Beyond</text:p>
          </table:table-cell>
          <table:table-cell table:style-name="ce2" office:value-type="float" office:value="30" calcext:value-type="float">
            <text:p>30</text:p>
          </table:table-cell>
          <table:table-cell table:style-name="ce2" office:value-type="float" office:value="25" calcext:value-type="float">
            <text:p>25</text:p>
          </table:table-cell>
          <table:table-cell table:style-name="ce3" office:value-type="date" office:date-value="2026-07-22" calcext:value-type="date">
            <text:p>2026-07-22</text:p>
          </table:table-cell>
          <table:table-cell table:style-name="ce3" office:value-type="date" office:date-value="2026-09-01" calcext:value-type="date">
            <text:p>2026-09-01</text:p>
          </table:table-cell>
          <table:table-cell/>
          <table:table-cell table:style-name="ce2" office:value-type="string" calcext:value-type="string">
            <text:p>Manchester</text:p>
          </table:table-cell>
          <table:table-cell table:style-name="ce2" office:value-type="string" calcext:value-type="string">
            <text:p>Nov 19, 2026 - Nov 21, 2026</text:p>
          </table:table-cell>
          <table:table-cell table:style-name="ce4" office:value-type="string" calcext:value-type="string">
            <text:p><text:a xlink:href="https://personen.fiw.thws.de/wsom/" xlink:type="simple">https://personen.fiw.thws.de/wsom/</text:a></text:p>
          </table:table-cell>
          <table:table-cell table:style-name="ce2" office:value-type="string" calcext:value-type="string">
            <text:p>Call for Papers: WSOM+ 2026 (co-organized with IDEAL 2026), Manchester, UK, 19-21 November 2026 -- Apologies in advance for multiple postings -- WSOM+ 2026 16th International Workshop on Self-Organizing Maps, Learning Vector Quantization &amp; Beyond https://personen.fiw.thws.de/wsom/ Co-organized with IDEAL 2026 Manchester, UK, 19-21 November 2026 Call for Papers WSOM+ 2026 invites original contributions related to the theoretical, methodological, and application-oriented aspects of unsupervised learning, Self-Organizing Maps, Learning Vector Quantization, clustering, data visualization, and closely related topics. WSOM+ provides an international forum for research on SOM, LVQ, prototype-based learning, interpretable models, and related methods for unsupervised and supervised data analysis, visualization, and applications. Topics of interest include, but are not limited to: - Self-Organizing Maps and related models - Learning Vector Quantization - Prototype-based Learning - Vector Quantization - Clustering and Unsupervised Learning - Data Visualization - Embedding Techniques - Statistical Data Analysis and Machine Learning - Interpretable Models - Confidence &amp; Transfer Learning - Hardware and Neuromorphic Hardware for LVQ &amp; SOM We also encourage scientific and application-oriented papers demonstrating the use of these methods in areas including, but not limited to: - Data mining, including stream mining and process mining - Pattern recognition - Knowledge management - Business intelligence and financial analysis - Anomaly detection and outlier analysis - Industrial applications - Scientific applications - Bioinformatics, biostatistics, and applications in biomedicine and healthcare Telecommunications - Transport optimization - Cognitive modeling - Language modeling - Robotics and intelligent systems - Image processing and vision - Speech processing - Text and document analysis IMPORTANT DATES: Paper submission deadline: 22 July 2026 Notification of acceptance: 1 September 2026 Final version due: 11 September 2026 Conference dates: 19-21 November 2026 SUBMISSION: Submission will be handled via the IDEAL 2026 online submission system (tbc) The dedicated submission link will be announced soon. For updates look at: https://personen.fiw.thws.de/wsom/ PUBLICATION: The WSOM+ 2026 proceedings will be published by Springer in the Lecture Notes in Networks and Systems (LNNS) series. VENUE: Manchester, UK (Details follow) FURTHER INFORMATION: The dedicated WSOM+ 2026 webpage is currently under preparation. More details on submission, registration, and programme will follow soon.</text:p>
          </table:table-cell>
          <table:table-cell table:number-columns-repeated="1013"/>
        </table:table-row>
        <table:table-row table:style-name="ro1">
          <table:table-cell table:style-name="ce2" office:value-type="string" calcext:value-type="string">
            <text:p>NCTA 2026</text:p>
          </table:table-cell>
          <table:table-cell table:style-name="ce2" office:value-type="string" calcext:value-type="string">
            <text:p>18th International Conference on Neural Computation Theory and Applications</text:p>
          </table:table-cell>
          <table:table-cell table:style-name="ce2" office:value-type="float" office:value="80" calcext:value-type="float">
            <text:p>80</text:p>
          </table:table-cell>
          <table:table-cell table:style-name="ce2" office:value-type="float" office:value="22" calcext:value-type="float">
            <text:p>22</text:p>
          </table:table-cell>
          <table:table-cell table:style-name="ce3" office:value-type="date" office:date-value="2026-07-24" calcext:value-type="date">
            <text:p>2026-07-24</text:p>
          </table:table-cell>
          <table:table-cell table:style-name="ce3" office:value-type="date" office:date-value="2026-07-17" calcext:value-type="date">
            <text:p>2026-07-17</text:p>
          </table:table-cell>
          <table:table-cell table:style-name="ce3" office:value-type="date" office:date-value="2026-07-31" calcext:value-type="date">
            <text:p>2026-07-31</text:p>
          </table:table-cell>
          <table:table-cell table:style-name="ce2" office:value-type="string" calcext:value-type="string">
            <text:p>Angers, France</text:p>
          </table:table-cell>
          <table:table-cell table:style-name="ce2" office:value-type="string" calcext:value-type="string">
            <text:p>Oct 28, 2026 - Oct 30, 2026</text:p>
          </table:table-cell>
          <table:table-cell table:style-name="ce4" office:value-type="string" calcext:value-type="string">
            <text:p><text:a xlink:href="https://ncta.scitevents.org" xlink:type="simple">https://ncta.scitevents.org</text:a></text:p>
          </table:table-cell>
          <table:table-cell table:style-name="ce2" office:value-type="string" calcext:value-type="string">
            <text:p>CALL FOR PAPERS 18th International Conference on Neural Computation Theory and Applications (NCTA) Submission Deadline: May 19, 2026 In Cooperation with: ACM Special Interest Group on Artificial Intelligence International Neural Network Society European Society for Fuzzy Logic and Technology Proceedings will be submitted for evaluation for indexation by: DBLP Google Scholar EI-Compendex INSPEC Japanese Science and Technology Agency (JST) Norwegian Register for Scientific Journals and Series Mathematical Reviews SCImago Scopus zbMATH Web of Science / Conference Proceedings Citation Index The event will be of hybrid nature, in the sense that online presentations of accepted papers will be possible for those authors that are unable to travel to the venue. https://ncta.scitevents.org October 28 - 30, 2026 Angers, France --------- Scope: Neural computation and artificial neural networks, especially in relation to deep learning, have seen an explosion of interest over the recent decades, and are being successfully applied across an extraordinary range of problem domains, in areas as diverse as finance, medicine, engineering, geology and physics, in problems of complex dynamics and complex behavior prediction, classification or control. Several architectures, learning strategies and algorithms have been introduced in this highly dynamic field in the last couple of decades. Nowadays, having reached notable scientific and applicative maturity, neural computation and related techniques are considered as major basis toward the completion of intelligent artificial systems. This conference intends to be a major forum for scientists, engineers and practitioners interested in the study, analysis, design, modeling and implementation of neural computing systems, both theoretically and in a broad range of application fields. NCTA is organized in 1 major tracks: Neural Computation Theory and Applications Conference Chair(s) Francesco Marcelloni, University of Pisa, Italy Program Chair(s) Kurosh Madani, University of Paris-EST Créteil (UPEC), France Program Committee https://ncta.scitevents.org/ProgramCommittee.aspx NCTA Secretariat ncta.secretariat@insticc.org Address: Avenida de S. Francisco Xavier, Lote 7 Cv. C, Setubal 2900-616, Portugal Tel:+351 265 520 184 Web: https://ncta.scitevents.org</text:p>
          </table:table-cell>
          <table:table-cell table:number-columns-repeated="1013"/>
        </table:table-row>
        <table:table-row table:style-name="ro1">
          <table:table-cell table:style-name="ce2" office:value-type="string" calcext:value-type="string">
            <text:p>CVML 2026</text:p>
          </table:table-cell>
          <table:table-cell table:style-name="ce2" office:value-type="string" calcext:value-type="string">
            <text:p>2026 2nd International Conference on Computer Vision and Machine Learning（CVML2026）</text:p>
          </table:table-cell>
          <table:table-cell table:style-name="ce2" office:value-type="float" office:value="85" calcext:value-type="float">
            <text:p>85</text:p>
          </table:table-cell>
          <table:table-cell table:style-name="ce2" office:value-type="float" office:value="25" calcext:value-type="float">
            <text:p>25</text:p>
          </table:table-cell>
          <table:table-cell table:style-name="ce3" office:value-type="date" office:date-value="2026-07-24" calcext:value-type="date">
            <text:p>2026-07-24</text:p>
          </table:table-cell>
          <table:table-cell table:style-name="ce3" office:value-type="date" office:date-value="2026-08-10" calcext:value-type="date">
            <text:p>2026-08-10</text:p>
          </table:table-cell>
          <table:table-cell table:style-name="ce3" office:value-type="date" office:date-value="2026-09-11" calcext:value-type="date">
            <text:p>2026-09-11</text:p>
          </table:table-cell>
          <table:table-cell table:style-name="ce2" office:value-type="string" calcext:value-type="string">
            <text:p>Jiangxi Normal University, China</text:p>
          </table:table-cell>
          <table:table-cell table:style-name="ce2" office:value-type="string" calcext:value-type="string">
            <text:p>Sep 18, 2026 - Sep 20, 2026</text:p>
          </table:table-cell>
          <table:table-cell table:style-name="ce4" office:value-type="string" calcext:value-type="string">
            <text:p><text:a xlink:href="https://iccvml.com/" xlink:type="simple">https://iccvml.com/</text:a></text:p>
          </table:table-cell>
          <table:table-cell table:style-name="ce2" office:value-type="string" calcext:value-type="string">
            <text:p>Conference information 1. Conference Name: 2026 2nd International Conference on Computer Vision and Machine Learning (CVML 2026) 2. Dates: September 18-20, 2026 3. Sponsor: Xi’an Jiaotong University, China 4. Organizer: Jiangxi Normal University, China 5. Location: Nanchang, Jiangxi, China 6. Indexing: EI Compendex, Scopus (audited by SPIE – The International Society for Optical Engineering, ISSN: 0277-786X) 7. Format: In-person (Nanchang, China) 8. Website: https://iccvml.com/ !!!IMPORTANT DATES!!!(All times are midnight AoE) - Full paper submission deadline: July 24, 2026 - Workshop proposals deadline: August 14, 2026 - Author registration deadline: August 28, 2026 - Workshop date: September 18, 2026 - Main conference (CVML 2026): September 18-20, 2026 CVML 2026 welcomes submissions that cover the broad areas of computer vision, machine learning, and related emerging technologies. Accepted and presented papers will be published by SPIE – The International Society for Optical Engineering (ISSN: 0277-786X), and submitted to EI Compendex and Scopus for indexing. Topics of interest include, but are not limited to: Computer Vision and Image Processing - 3D Vision Reconstruction and Scene Understanding - Object Detection, Recognition, and Tracking - Biometric Recognition and Analysis (face, fingerprint, iris, gait, etc.) - Medical and Biomedical Image Analysis - Video Analysis, Action Recognition, and Event Detection Machine Learning Algorithms and Theory - Deep Learning, Representation Learning, and Generative Models - Reinforcement Learning and Sequential Decision Making - Few-shot, Zero-shot, and Continual Learning - Explainable, Fair, and Trustworthy Machine Learning - Optimization Methods for Large-Scale Learning Autonomous Systems and Intelligent Driving - Autonomous Driving Perception, Localization, and Mapping - Sensor Fusion (LiDAR, Radar, Camera, IMU) - Path Planning, Motion Prediction, and Control - Driver Monitoring, In-Cabin Sensing, and Safety Systems - Simulation and Testing for Autonomous Vehicles AI for Societal Applications - Smart Healthcare and AI-Assisted Diagnosis - Intelligent Transportation and Urban Computing - Environmental Monitoring, Remote Sensing, and Smart Agriculture - AI for Sustainable Development and Inclusive Society - Human-Centered AI and Assistive Technologies SUBMISSION GUIDELINES Please submit your contributions via the conference website: - Website: https://iccvml.com/ - For inquiries: please refer to the contact information on the official website. PUBLICATION AND INDEXING - Accepted and presented papers will be published by SPIE – The International Society for Optical Engineering (ISSN: 0277-786X), and submitted to EI Compendex and Scopus for possible indexing. - For those who prefer NOT to publish their full research, the conference encourages the submission of abstracts, which will be considered for oral presentations only. Authors should register AFTER receiving the acceptance letter of their paper and before the registration deadline (August 28, 2026) to ensure their accepted paper is included in the conference proceedings. Sponsored by Xi’an Jiaotong University, China | Organized by Jiangxi Normal University, China | In-person conference in Nanchang, China</text:p>
          </table:table-cell>
          <table:table-cell table:number-columns-repeated="1013"/>
        </table:table-row>
        <table:table-row table:style-name="ro1">
          <table:table-cell table:style-name="ce2" office:value-type="string" calcext:value-type="string">
            <text:p>IEEE CompAuto 2026</text:p>
          </table:table-cell>
          <table:table-cell table:style-name="ce2" office:value-type="string" calcext:value-type="string">
            <text:p>IEEE--2026 4th International Conference on Computers and Automation (CompAuto 2026)</text:p>
          </table:table-cell>
          <table:table-cell table:style-name="ce2" office:value-type="float" office:value="84" calcext:value-type="float">
            <text:p>84</text:p>
          </table:table-cell>
          <table:table-cell table:style-name="ce2" office:value-type="float" office:value="30" calcext:value-type="float">
            <text:p>30</text:p>
          </table:table-cell>
          <table:table-cell table:style-name="ce3" office:value-type="date" office:date-value="2026-07-25" calcext:value-type="date">
            <text:p>2026-07-25</text:p>
          </table:table-cell>
          <table:table-cell table:number-columns-repeated="2"/>
          <table:table-cell table:style-name="ce2" office:value-type="string" calcext:value-type="string">
            <text:p>Perth, Australia</text:p>
          </table:table-cell>
          <table:table-cell table:style-name="ce2" office:value-type="string" calcext:value-type="string">
            <text:p>Sep 10, 2026 - Sep 12, 2026</text:p>
          </table:table-cell>
          <table:table-cell table:style-name="ce4" office:value-type="string" calcext:value-type="string">
            <text:p><text:a xlink:href="http://www.icca.net/" xlink:type="simple">http://www.icca.net/</text:a></text:p>
          </table:table-cell>
          <table:table-cell table:style-name="ce2" office:value-type="string" calcext:value-type="string">
            <text:p>★★ CompAuto 2026-[EI compendex &amp; Scopus]★★ ★Full Name: 2026 4th International Conference on Computers and Automation (CompAuto 2026) ★Abbreviation: CompAuto 2026 ★Website: http://www.icca.net/ ★Date: September 10th-12th, 2026 ★Venue: Perth, Australia 2026 4th International Conference on Computers and Automation (CompAuto 2026). The conference will take place in Perth, Australia from September 10 to 12, 2026. CompAuto aims to boost development of the computers and automation field, expand channels of international academic exchange in science and technology, build a sharing platform of academic resources, promote scientific innovation on the global scale. ★Conference Committee★ - International Advisory Committee - Rajkumar Buyya, The University of Melbourne, Australia Yong Yue, Xi'an Jiaotong-Liverpool University, China - Conference Chair - Ferdous Sohel, Murdoch University, Australia - Conference Co-Chair - Maria Pia Fanti, Polytechnic of Bari, Italy - Steering Committee - Zhiyong Chen, The University of Newcastle, Australia - Program Chairs - Cheng Siong LEE, Monash University, Australia José Manuel Molina López, University Carlos III of Madrid, Spain - Program Co-Chairs - Alaa Sheta, Southern Connecticut State University, USA Muhamamd Asif Khan, Qatar University, Qatar - Publicity Chairs - Gai-Ge Wang, Ocean University of China, China Guanghui Wang, University of Toronto, Canada Maizatul Akmar Ismail, University of Malaya, Malaysia - Publication Chairs - Amirmehdi Yazdani, Murdoch University, Australia Maki K. Habib, The American University in Cairo, Egypt Quang Ha, University of Technology Sydney, Australia Zhiyu Jiang, Northwestern Polytechnical University, China ★Call for Papers★ Topics of interest for submission include, but are not limited to: Track 1: Software Design and Analysis • Continuous integration and delivery • Distributed and collaborative software engineering • Green software engineering • Modeling and design • Software architecture • Virtual and augmented reality software development Track 2: Parallel and Distributed Systems • Blockchain and smart business transactions • Cloud metering and monitoring • Distributed and parallel query processing • Edge/fog computing system &amp; architectures • Genetic algorithms • Optimization algorithms Track 3: Database and Data Science • Active databases • Big data management • Conceptual data modeling • Data cleaning • Multimedia databases • Nosql databases Track 4 : Multimedia, Computer Vision and Image Processing • Advanced descriptors and similarity metrics for multimedia • Classification and clustering • Emotional and social signals • Feature extraction and selection • Image processing • Vision and languages Track 5: Intelligent Information Systems and Management • Business analytics • Digital libraries and applications • Enterprise architecture • Human-computer interaction in IS • Information architecture • Machine learning and statistics Track 6: AI, Agent Systems and Ambient Intelligence • AI and cloud computing • Dialog and interactive systems • Extracting information from texts • Hybrid learning systems • Knowledge representation and reasoning • Machine translation, phonology Track 7: Signal Processing, Sensors, Communication Systems • Biological inspired sensors sensors fusion • Communication systems technologies • Digital signal processing in communications • Environmental monitoring and control • Green communications • IoT application development Track 8: Intelligent Control Systems and Robotics Technology • Control and supervision systems • Distributed control systems • Evolutionary computation and control • Fuzzy control • Humanoid robots • Process control More Topics, please visit at https://www.icca.net/cfp.html ★ Publication★ Papers submitted to CompAuto 2026 will be reviewed by technical committees of the conference. All accepted papers presented at the conference will be published in CompAuto 2026 Conference Proceedings, which will be archived in IEEE Xplore, and indexed by EI Compendex, Scopus, and other indexing services. ★Submission★ 1. Full Paper (Publication and Presentation) 2. Abstract (Presentation Only) Electronic Submission System: http://www.zmeeting.org/submission/CompAuto2026 Any question, please contact: icca_conf@outlook.com More details about submission, please visit at https://www.icca.net/sub.html ★Conference Schedule★ Day 1- September 10th, 2026 | Sign in and Collect Conference Materials Day 2- September 11th, 2026 | Welcome Remarks &amp; Keynote Speeches &amp; Plenary Speeches &amp; Parallel Sessions Day 3- September 12th, 2026 | Parallel Sessions ★Contact Us★ Ms. Lorraine (Conference Secretary) Email: icca_conf@outlook.com Tel: +86-15902806624 (Office Time: 10:30 - 18:00, Monday - Friday)</text:p>
          </table:table-cell>
          <table:table-cell table:number-columns-repeated="1013"/>
        </table:table-row>
        <table:table-row table:style-name="ro1">
          <table:table-cell table:style-name="ce2" office:value-type="string" calcext:value-type="string">
            <text:p>ICCS--EI 2026</text:p>
          </table:table-cell>
          <table:table-cell table:style-name="ce2" office:value-type="string" calcext:value-type="string">
            <text:p>2026 the 6th International Conference on Computer Systems (ICCS 2026)</text:p>
          </table:table-cell>
          <table:table-cell table:style-name="ce2" office:value-type="float" office:value="78" calcext:value-type="float">
            <text:p>78</text:p>
          </table:table-cell>
          <table:table-cell table:style-name="ce2" office:value-type="float" office:value="25" calcext:value-type="float">
            <text:p>25</text:p>
          </table:table-cell>
          <table:table-cell table:style-name="ce3" office:value-type="date" office:date-value="2026-07-25" calcext:value-type="date">
            <text:p>2026-07-25</text:p>
          </table:table-cell>
          <table:table-cell table:number-columns-repeated="2"/>
          <table:table-cell table:style-name="ce2" office:value-type="string" calcext:value-type="string">
            <text:p>Zhengzhou, China</text:p>
          </table:table-cell>
          <table:table-cell table:style-name="ce2" office:value-type="string" calcext:value-type="string">
            <text:p>Sep 18, 2026 - Sep 20, 2026</text:p>
          </table:table-cell>
          <table:table-cell table:style-name="ce4" office:value-type="string" calcext:value-type="string">
            <text:p><text:a xlink:href="http://www.iccs.net/" xlink:type="simple">http://www.iccs.net/</text:a></text:p>
          </table:table-cell>
          <table:table-cell table:style-name="ce2" office:value-type="string" calcext:value-type="string">
            <text:p>★ICCS 2026-2026 the 6th International Conference on Computer Systems / Ei Compendex and Scopus★ ★ Full name: 2026 the 6th International Conference on Computer Systems (ICCS 2026) ★ Abbreviation: ICCS 2026 ★ Website: http://www.iccs.net/ ★ Date: September 18-20, 2026 ★ Held in: Zhengzhou, China 2026 the 6th International Conference on Computer Systems will be held in Zhengzhou, China from September 18-20, 2026, sponsored by Henan University, China; Organized by School of Artificial Intelligence, Henan University; Co-sponsored by Xi'an University of Science and Technology, China. The field of computer systems is rapidly advancing, with new hardware and software innovations being developed every year. This includes the design and optimization of systems for large-scale data processing, distributed computing, and parallel processing, as well as the development of new programming languages and compilers to improve efficiency. There is also a growing interest in computer systems security, including intrusion detection and prevention techniques. These advancements are critical for improving the performance and reliability of computer systems, with significant implications for various applications, from scientific computing to machine learning. - Call for Papers - Topics of interest for submission include, but are not limited to: #Track 1: Artificial Intelligence and Machine Learning #Track 2: Cloud, Edge, and Distributed Systems #Track 3: Engineering education construction and talent training #Track 4: High-Performance Computing and Architectures #Track 5: Emerging Technologies and Applications More Topics, please visit at https://www.iccs.net/cfp.html - Publication - Accepted papers will be included in ICCS 2026 Conference Proceedings, which will be indexed by EI Compendex, Scopus, and other indexing services. ICCS 2025 IEEE Xplore ISBN: 979-8-3315-7506-9 ICCS 2024 IEEE Xplore ISBN: 979-8-3503-6633-4 ICCS 2023 IEEE Xplore ISBN: 979-8-3503-1365-9 ICCS 2022 IEEE Xplore ISBN: 979-8-3503-6633-4 For more：https://www.iccs.net/history.html - Submission - 1. The official language is English. The submitted paper should be no less than 4 full pages and prepared carefully according to the conference template. 2. Abstract submission is acceptable but it will be accepted for presentation only. * Welcome to submit the paper or abstract by Electronic Submission System: https://www.zmeeting.org/submission/iccs2026_1 More details about submission, please visit at https://www.iccs.net/sub.html - Conference Program - September 18, 2026 | Sign in and Collect Conference Materials &amp; Online ZOOM Test September 19, 2026 | Opening Ceremony &amp; Keynote Speeches &amp; Invited Speeches &amp;Parallel Sessions September 20, 2026 | Invited Speeches &amp;Parallel Sessions - About Zhengzhou - Zhengzhou (Chinese: 郑州), the capital city of Henan Province in the People's Republic of China, carries profound cultural and historical weight. Celebrated as one of China’s Eight Great Ancient Capitals, it served as the capital for several key dynasties and states, including the Xia, Shang, Zheng, and Han. As a core birthplace of Chinese civilization and a pivotal hub of the "Air Silk Road" and China’s high-speed rail network, Zhengzhou has long been a vital node for cultural inheritance and domestic-international exchanges. With a history stretching over 3,600 years, it was formerly known as Shangdu (traditional Chinese: 商都), a name deeply tied to its status as the first capital of the Shang Dynasty. - Contact - Conference Secretary: Robin Luo Contact Email: iccs_conf@163.com Website: www.iccs.net</text:p>
          </table:table-cell>
          <table:table-cell table:number-columns-repeated="1013"/>
        </table:table-row>
        <table:table-row table:style-name="ro1">
          <table:table-cell table:style-name="ce2" office:value-type="string" calcext:value-type="string">
            <text:p>IEEE ICRCV 2026</text:p>
          </table:table-cell>
          <table:table-cell table:style-name="ce2" office:value-type="string" calcext:value-type="string">
            <text:p>IEEE--2026 8th International Conference on Robotics and Computer Vision (ICRCV 2026)</text:p>
          </table:table-cell>
          <table:table-cell table:style-name="ce2" office:value-type="float" office:value="20" calcext:value-type="float">
            <text:p>20</text:p>
          </table:table-cell>
          <table:table-cell table:style-name="ce2" office:value-type="float" office:value="30" calcext:value-type="float">
            <text:p>30</text:p>
          </table:table-cell>
          <table:table-cell table:style-name="ce3" office:value-type="date" office:date-value="2026-07-25" calcext:value-type="date">
            <text:p>2026-07-25</text:p>
          </table:table-cell>
          <table:table-cell table:number-columns-repeated="2"/>
          <table:table-cell table:style-name="ce2" office:value-type="string" calcext:value-type="string">
            <text:p>Jiangyin, China</text:p>
          </table:table-cell>
          <table:table-cell table:style-name="ce2" office:value-type="string" calcext:value-type="string">
            <text:p>Nov 6, 2026 - Nov 8, 2026</text:p>
          </table:table-cell>
          <table:table-cell table:style-name="ce4" office:value-type="string" calcext:value-type="string">
            <text:p><text:a xlink:href="http://www.icrcv.org/" xlink:type="simple">http://www.icrcv.org/</text:a></text:p>
          </table:table-cell>
          <table:table-cell table:style-name="ce2" office:value-type="string" calcext:value-type="string">
            <text:p>ICRCV 2026--IEEE, Ei Compendex, Scopus ★2026 8th International Conference on Robotics and Computer Vision (ICRCV 2026)★ Web: http://www.icrcv.org/ Time: November 6-8, 2026 Venue: Jiangyin, China 2026 8th International Conference on Robotics and Computer Vision (ICRCV 2026) will be held during November 6-8, 2026 in Jiangyin, China. ICRCV 2026 is co-sponsored by Nanjing University of Science and Technology and IEEE Robotics and Automation Society. This event will serve as a key platform for professionals in the fields of robotics and computer vision to present their latest research and explore new opportunities for collaboration and innovation. ★★Call for Papers Topics of interest for submission include, but are not limited to: Track I: Robot Design and Control Cross-domain morphing aircraft modeling and control Mechanism design and applications Micro robots and micro-manipulation Mobile robotics Mobile sensor networks Track II: Intelligent Control Systems and Engineering Applications Adaptive control Complex systems Control applications Control engineering education Control of biological systems Track III: Artificial Intelligence in Robot Systems Artificial intelligence Computational intelligence Evolutionary computation Fuzzy and neural systems Human-centered systems Track IV: Machine Vision and Visualization Activity/behavior recognition Autonomous driving Biomedical Image analysis Biometrics Computational imaging Track V: Robotics in Biomedicine and Rehabilitation Applications for Robotics in Medicine Assist-as-needed Exoskeleton Robots Biomechatronics Biomedical and Rehabilitation Engineering, Human motion intention detection and observation More details, please view: http://www.icrcv.org/cfp.html ★★Paper Publication ★Accepted full papers will be published into ICRCV 2026 Conference Proceedings, which will be archived in IEEE Xplore, and indexed by EI Compendex, Scopus, and other indexing services. ★Publication History ICRCV 2025 conference proceedings has been archived in IEEE Xplore and indexed by Ei and Scopus. ICRCV 2024 conference proceedings has been archived in IEEE Xplore and indexed by Ei and Scopus. ICRCV 2023 conference proceedings has been archived in IEEE Xplore and indexed by Ei and Scopus. ICRCV 2022 conference proceedings has been archived in IEEE Xplore and indexed by Ei and Scopus. ICRCV 2021 conference proceedings has been archived in IEEE Xplore and indexed by Ei and Scopus. ★★Organizing Committee **Conference Chair Haoping Wang, Nanjing University of Science and Technology, China **Conference Co-Chairs Darwin Caldwell, Italian Institute of Technology in Genoa, Italy (FIEEE) Pierre Borne, Ecole Central de Lille, France (FIEEE) **Program Chairs Radu-Emil Precup, Politehnica University of Timisoara, Romania (FIEEE) Samia Bouchafa-bruneau, Paris-Sacly University, France **Program Co-Chairs Stefano Mariani, Politecnico di Milano, Italy Yew Kee WONG, Hong Kong Chu Hai College, Hong Kong **Local Organizing Chair Hefeng Pang, Nanjing University of Science and Technology, China **Publicity Chairs Abdel Aitouche, HEI JUINA, France Dawei Zhang, Zhejiang Normal University, China Giuseppe Carbone, University of Calabria, Italy Lianwu Guan, Harbin Engineering University, China Hui Liu, Kunming University of Science and Technology, China Sofiane Ahmed Ali, Sacly University, France **Publication Chairs Ahmad Taher Azar, Research Professor Prince Sultan University, Saudi Arabia Guoguang Wen, Beijing Jiaotong University, China Jerome Bosche University of Picardie Jules Verne, France ★★Paper Submission ★A. Full Paper (for Presentation and Publication) ★B. Abstract (Presentation only) Online Submission System: https://www.zmeeting.org/submission/icrcv2026 Full Paper Template: https://www.icrcv.org/template.docx LaTex Template: https://www.icrcv.org/Conference-LaTeX-template.zip Abstract Template: https://www.icrcv.org/abstract.docx ★★Conference Program: November 6, 2026 | Sign in and Collect Conference Materials November 7, 2026 | Opening Ceremony &amp; Keynote Speeches &amp; Parallel Sessions November 8, 2026 | Invited Speeches and Parallel Sessions ★★Contact: Conference Secretary : Ms. Lily Zeng Email : icrcv_conf@163.com</text:p>
          </table:table-cell>
          <table:table-cell table:number-columns-repeated="1013"/>
        </table:table-row>
        <table:table-row table:style-name="ro1">
          <table:table-cell table:style-name="ce2" office:value-type="string" calcext:value-type="string">
            <text:p>ICREC--EI 2026</text:p>
          </table:table-cell>
          <table:table-cell table:style-name="ce2" office:value-type="string" calcext:value-type="string">
            <text:p>2026 11th International Conference on Renewable Energy and Conservation (ICREC 2026)</text:p>
          </table:table-cell>
          <table:table-cell table:style-name="ce2" office:value-type="float" office:value="78" calcext:value-type="float">
            <text:p>78</text:p>
          </table:table-cell>
          <table:table-cell table:style-name="ce2" office:value-type="float" office:value="30" calcext:value-type="float">
            <text:p>30</text:p>
          </table:table-cell>
          <table:table-cell table:style-name="ce3" office:value-type="date" office:date-value="2026-07-25" calcext:value-type="date">
            <text:p>2026-07-25</text:p>
          </table:table-cell>
          <table:table-cell table:number-columns-repeated="2"/>
          <table:table-cell table:style-name="ce2" office:value-type="string" calcext:value-type="string">
            <text:p>Rome, Italy</text:p>
          </table:table-cell>
          <table:table-cell table:style-name="ce2" office:value-type="string" calcext:value-type="string">
            <text:p>Nov 20, 2026 - Nov 22, 2026</text:p>
          </table:table-cell>
          <table:table-cell table:style-name="ce4" office:value-type="string" calcext:value-type="string">
            <text:p><text:a xlink:href="http://www.icrec.org/" xlink:type="simple">http://www.icrec.org/</text:a></text:p>
          </table:table-cell>
          <table:table-cell table:style-name="ce2" office:value-type="string" calcext:value-type="string">
            <text:p>ICREC 2026 2026 11th International Conference on Renewable Energy and Conservation (ICREC 2026) Rome, Italy November 20-22, 2026 http://www.icrec.org/ Publication: ICREC 2026 all accepted papers will be published into ICREC Conference Proceedings, which submitted for Ei Compendex, Scopus, et al. Call for Papers: New Trends and Technologies for RESSs Policies and Strategies for RESSs Energy Transformation from Renewable Energy System (RES) to Grid Novel Energy Conversion Studies for RESs Power Devices and Driving Circuits for RESs Control Techniques for RESs Grid Interactive Systems Used in Hybrid RESs Performance Analysis of RESs Hybrid RESSs Decision Support Systems for RESSs Renewable Energy Research and Applications for Industries RESSs for Electrical Vehicles and Components Artificial Intelligence and Machine Learning Studies for RESs and Applications Computational Methods for RESSs More topics: http://www.icrec.org/cfp.html Submission Methods: Full Paper (publication and oral presentation) Abstract (oral presentation only) Electronic Submission System (.pdf) http://confsys.iconf.org/submission/icrec2026 or send it directly to conference email: icrec_conf@163.com Contacts: Ms. Nina Lee E-mail: icrec_conf@163.com Tel: +86-19382255134</text:p>
          </table:table-cell>
          <table:table-cell table:number-columns-repeated="1013"/>
        </table:table-row>
        <table:table-row table:style-name="ro1">
          <table:table-cell table:style-name="ce2" office:value-type="string" calcext:value-type="string">
            <text:p>WSSE 2026</text:p>
          </table:table-cell>
          <table:table-cell table:style-name="ce2" office:value-type="string" calcext:value-type="string">
            <text:p>ACM--2026 The 8th World Symposium on Software Engineering (WSSE 2026)</text:p>
          </table:table-cell>
          <table:table-cell table:style-name="ce2" office:value-type="float" office:value="72" calcext:value-type="float">
            <text:p>72</text:p>
          </table:table-cell>
          <table:table-cell table:style-name="ce2" office:value-type="float" office:value="28" calcext:value-type="float">
            <text:p>28</text:p>
          </table:table-cell>
          <table:table-cell table:style-name="ce3" office:value-type="date" office:date-value="2026-07-25" calcext:value-type="date">
            <text:p>2026-07-25</text:p>
          </table:table-cell>
          <table:table-cell table:number-columns-repeated="2"/>
          <table:table-cell table:style-name="ce2" office:value-type="string" calcext:value-type="string">
            <text:p>Nara, Japan</text:p>
          </table:table-cell>
          <table:table-cell table:style-name="ce2" office:value-type="string" calcext:value-type="string">
            <text:p>Oct 16, 2026 - Oct 18, 2026</text:p>
          </table:table-cell>
          <table:table-cell table:style-name="ce4" office:value-type="string" calcext:value-type="string">
            <text:p><text:a xlink:href="http://wsse.org/" xlink:type="simple">http://wsse.org/</text:a></text:p>
          </table:table-cell>
          <table:table-cell table:style-name="ce2" office:value-type="string" calcext:value-type="string">
            <text:p>Full name: ACM--2026 The 8th World Symposium on Software Engineering (WSSE 2026) WSSE 2026 October 16-18, 2026 Nara, Japan http://wsse.org/ We warmly invite the scientific community to join us for the 8th World Symposium on Software Engineering (WSSE 2026), taking place in Nara, Japan, from October 16-18. Sponsored by Nara Women's University, Hiroshima University, Science and Engineering Institute, co-sponsored by Kindai University, Wuhan University, the University of Houston-Downtown, and Huaqiao University, with technical support from the University of Houston-Clear Lake, University of North Dakota, Chongqing University of Posts and Telecommunications, etc. Publication and indexing: 1. Proceedings All the papers will be peer reviewed by experts. The review result comes out in 15 to 20 days. Accepted, registered and presented papers will be published in the ACM Conference Proceedings, which will be submitted for indexing to Ei Compendex, Scopus, and others. WSSE conference proceedings have been successfully indexed by Scopus and EI since 2019. 2. Special Issue Software (ISSN 2674-113X) Special Issue "Software Reliability, Security and Quality Assurance" Delegates are encouraged to submit their papers/abstracts to the conference. Good quality papers will be selected by the organizing committee and Prof. Dr. Tadashi Dohi, the editor. After it, the authors will be invited to extent their papers/abstracts and submit them to the special issue. Submission way: Submitting an Abstract for presentation only Submitting a Paper for presentation and publication http://www.easychair.org/conferences/?conf=wsse2026 Call for papers: * Fundamentals of Software Engineering * Software Architecture and Design * Software Requirements and Testing * Software Quality and Reliability * Software Process and Management * Software Reuse and Maintenance * Artificial Intelligence and Intelligent Systems * Human-Computer Interaction and User Experience * Data and Information Management For more topics, please visit: http://wsse.org/cfp.html Call for special sessions: WSSE 2026 proposals for special sessions within the technical scope of the conference. Special Session Proposal Format: Session title 3-5 keywords Related topics Organizer's names, affiliations, and email addresses Organizers of sessions are given 600 words so that they can describe the session format. Proposal should be submitted for reviewing through e-mail at wsse@sciei.org Program: October 16, 2026--Registration, collecting conference materials October 17, 2026--Keynote Speech &amp; Presentation Day October 18, 2026--Presentation Day &amp; Academic Visit (Pending) Contact us: Conf.Secretary: Ms. Hedy Huang E-mail: wsse@sciei.org Tel: +1-562-606-1057; Mobile: +(86)19180921310</text:p>
          </table:table-cell>
          <table:table-cell table:number-columns-repeated="1013"/>
        </table:table-row>
        <table:table-row table:style-name="ro1">
          <table:table-cell table:style-name="ce2" office:value-type="string" calcext:value-type="string">
            <text:p>ISCIPT 2026</text:p>
          </table:table-cell>
          <table:table-cell table:style-name="ce2" office:value-type="string" calcext:value-type="string">
            <text:p>IEEE 2026 11th International Conference on Computer and Information Processing Technology</text:p>
          </table:table-cell>
          <table:table-cell table:style-name="ce2" office:value-type="float" office:value="90" calcext:value-type="float">
            <text:p>90</text:p>
          </table:table-cell>
          <table:table-cell table:style-name="ce2" office:value-type="float" office:value="30" calcext:value-type="float">
            <text:p>30</text:p>
          </table:table-cell>
          <table:table-cell table:style-name="ce3" office:value-type="date" office:date-value="2026-07-28" calcext:value-type="date">
            <text:p>2026-07-28</text:p>
          </table:table-cell>
          <table:table-cell/>
          <table:table-cell table:style-name="ce3" office:value-type="date" office:date-value="2026-08-11" calcext:value-type="date">
            <text:p>2026-08-11</text:p>
          </table:table-cell>
          <table:table-cell table:style-name="ce2" office:value-type="string" calcext:value-type="string">
            <text:p>Fushun, China</text:p>
          </table:table-cell>
          <table:table-cell table:style-name="ce2" office:value-type="string" calcext:value-type="string">
            <text:p>Sep 11, 2026 - Sep 13, 2026</text:p>
          </table:table-cell>
          <table:table-cell table:style-name="ce4" office:value-type="string" calcext:value-type="string">
            <text:p><text:a xlink:href="https://ais.cn/u/Bz6nUv" xlink:type="simple">https://ais.cn/u/Bz6nUv</text:a></text:p>
          </table:table-cell>
          <table:table-cell table:style-name="ce2" office:value-type="string" calcext:value-type="string">
            <text:p>IEEE 2026 11th International Conference on Computer and Information Processing Technology (ISCIPT 2026) will be held on September 11-13, 2026, in Fushun, China. 𝗖𝗼𝗻𝗳𝗲𝗿𝗲𝗻𝗰𝗲 𝗪𝗲𝗯𝘀𝗶𝘁𝗲: https://ais.cn/u/Bz6nUv ---𝗖𝗮𝗹𝗹 𝗳𝗼𝗿 𝗽𝗮𝗽𝗲𝗿𝘀--- The topics of interest for submission include, but are not limited to: ◕ Computer Science and Engineering · Computer System Design · Embedded System Technology · Computer Architecture · System-on-Chip Integration · Computer Hardware Optimization · Virtual Computing Systems · Cloud Computing Systems · Edge Computing Systems · Brain-Machine Interface Systems ... ◕ Machine Learning and Intelligent Computing · Machine Learning Systems · Deep Learning Applications · Intelligent Algorithm Optimization · Lightweight Computing Technology · Distributed Intelligent Systems · Quantum-Inspired Computing · Computing System Integration · Intelligent Computing Fault-Tolerant Technology · Multi-source Information Fusion Computing ... ◕ Information Processing and Analysis · Information Processing Technology · Data Mining and Analysis · Signal Processing Systems · Image Information Processing · Text Information Analysis · Multi-source Information Fusion · Big Data Processing Technology · Information Denoising Processing · Real-time Information Processing ... ◕ Information Transmission and Security · Information Transmission Technology · Communication System Optimization · Information Security Protection · Data Encryption Technology · Network Security Technology · Privacy Protection Technology · Transmission Protocol Optimization · Security Detection Systems · Anti-interference Transmission Technology ... ---𝗣𝘂𝗯𝗹𝗶𝗰𝗮𝘁𝗶𝗼𝗻--- All accepted full papers will be published in IEEE (ISBN:979-8-3195-0805-8) and will be submitted to IEEE Xplore, EI Compendex, Scopus and Inspec for indexing. ---𝗜𝗺𝗽𝗼𝗿𝘁𝗮𝗻𝘁 𝗗𝗮𝘁𝗲𝘀--- Full Paper Submission Date: July 28, 2026 Registration Deadline: August 27, 2026 Final Paper Submission Date: August 11, 2026 Conference Dates: September 11-13, 2026 --- 𝗣𝗮𝗽𝗲𝗿 𝗦𝘂𝗯𝗺𝗶𝘀𝘀𝗶𝗼𝗻--- Please send the full paper(word+pdf) to Submission System: https://ais.cn/u/Bz6nUv</text:p>
          </table:table-cell>
          <table:table-cell table:number-columns-repeated="1013"/>
        </table:table-row>
        <table:table-row table:style-name="ro1">
          <table:table-cell table:style-name="ce2" office:value-type="string" calcext:value-type="string">
            <text:p>AICM--EI 2026</text:p>
          </table:table-cell>
          <table:table-cell table:style-name="ce2" office:value-type="string" calcext:value-type="string">
            <text:p>2026 International Conference on Artificial Intelligence and Computational Modeling (AICM 2026)</text:p>
          </table:table-cell>
          <table:table-cell table:style-name="ce2" office:value-type="float" office:value="82" calcext:value-type="float">
            <text:p>82</text:p>
          </table:table-cell>
          <table:table-cell table:style-name="ce2" office:value-type="float" office:value="30" calcext:value-type="float">
            <text:p>30</text:p>
          </table:table-cell>
          <table:table-cell table:style-name="ce3" office:value-type="date" office:date-value="2026-07-30" calcext:value-type="date">
            <text:p>2026-07-30</text:p>
          </table:table-cell>
          <table:table-cell table:number-columns-repeated="2"/>
          <table:table-cell table:style-name="ce2" office:value-type="string" calcext:value-type="string">
            <text:p>Hangzhou, China</text:p>
          </table:table-cell>
          <table:table-cell table:style-name="ce2" office:value-type="string" calcext:value-type="string">
            <text:p>Nov 27, 2026 - Nov 29, 2026</text:p>
          </table:table-cell>
          <table:table-cell table:style-name="ce4" office:value-type="string" calcext:value-type="string">
            <text:p><text:a xlink:href="https://aicm.net/" xlink:type="simple">https://aicm.net/</text:a></text:p>
          </table:table-cell>
          <table:table-cell table:style-name="ce2" office:value-type="string" calcext:value-type="string">
            <text:p>Full name: 2026 International Conference on Artificial Intelligence and Computational Modeling (AICM 2026) Abbreviation: AICM 2026 November 27-29, 2026 | Hangzhou, China More details, please visit: https://aicm.net/ The 2026 International Conference on Artificial Intelligence and Computational Modeling (AICM 2026) is sponsored by Zhejiang Sci-Tech University, will be held in Hangzhou, China during November 27-29, 2026. The conference will feature plenary keynote speeches, invited sessions, oral and poster presentations, as well as panel discussions highlighting emerging trends, theoretical breakthroughs, and real-world applications. · Young Scientist Award · Outstanding Organization Award · Outstanding Reviewer Award · Best Student Paper Award · Best Oral Presentation Award · Best Poster Presentation Award Registered and presented papers will be published by AICM Conference Proceedings, and submitted for Scopus &amp; Ei Compendex. via https://aicm.net/topics.html · AI &amp; Computational Modeling · Advanced AI Models &amp; Computational Paradigms · Trustworthy, Secure &amp; Sustainable AI · AI &amp; Computational Modeling Applications ...... By online submission system: https://www.zmeeting.org/submission/aicm2026 Full paper template (word) : https://aicm.net/file/Final_Template.docx Full paper template (Latex) : https://aicm.net/file/conference-latex-template.zip 1. Manuscript Submission: Both full papers and abstracts are welcome for submission. 2. Invited Speeches: You are cordially invited to deliver an invited speech at the conference. 3. Special Session: You are welcome to organize a special session to foster in-depth discussions on focused topics. 4. Listener: No submission, no report; you can register as a listener. * Registration link: https://www.zmeeting.org/register/aicm2026 Grand Metropark Hotel Hangzhou (pending) Add: No. 2 Pinghai Road, Hubin Commercial District, Shangcheng District, Hangzhou, Zhejiang Province, China Ms. Maggie Xu E-mail: aicm_conf@vip.163.com WeChat: iconf-cs-2</text:p>
          </table:table-cell>
          <table:table-cell table:number-columns-repeated="1013"/>
        </table:table-row>
        <table:table-row table:style-name="ro1">
          <table:table-cell table:style-name="ce2" office:value-type="string" calcext:value-type="string">
            <text:p>AIAIS 2027</text:p>
          </table:table-cell>
          <table:table-cell table:style-name="ce2" office:value-type="string" calcext:value-type="string">
            <text:p>IEEE--2027 International Conference on Artificial Intelligence and Applied Intelligent Systems (AIAIS)</text:p>
          </table:table-cell>
          <table:table-cell table:style-name="ce2" office:value-type="float" office:value="90" calcext:value-type="float">
            <text:p>90</text:p>
          </table:table-cell>
          <table:table-cell table:style-name="ce2" office:value-type="float" office:value="30" calcext:value-type="float">
            <text:p>30</text:p>
          </table:table-cell>
          <table:table-cell table:style-name="ce3" office:value-type="date" office:date-value="2026-07-30" calcext:value-type="date">
            <text:p>2026-07-30</text:p>
          </table:table-cell>
          <table:table-cell table:style-name="ce3" office:value-type="date" office:date-value="2026-08-30" calcext:value-type="date">
            <text:p>2026-08-30</text:p>
          </table:table-cell>
          <table:table-cell table:style-name="ce3" office:value-type="date" office:date-value="2026-09-20" calcext:value-type="date">
            <text:p>2026-09-20</text:p>
          </table:table-cell>
          <table:table-cell table:style-name="ce2" office:value-type="string" calcext:value-type="string">
            <text:p>Hong Kong</text:p>
          </table:table-cell>
          <table:table-cell table:style-name="ce2" office:value-type="string" calcext:value-type="string">
            <text:p>Jan 22, 2027 - Jan 24, 2027</text:p>
          </table:table-cell>
          <table:table-cell table:style-name="ce4" office:value-type="string" calcext:value-type="string">
            <text:p><text:a xlink:href="https://www.aiais.site/" xlink:type="simple">https://www.aiais.site/</text:a></text:p>
          </table:table-cell>
          <table:table-cell table:style-name="ce2" office:value-type="string" calcext:value-type="string">
            <text:p>2027 International Conference on Artificial Intelligence and Applied Intelligent Systems (AIAIS) Date: January 22 – 24, 2027 Location: Hong Kong Organizer: City University of Hong Kong Website: www.aiais.site *PROCEEDINGS ------------------- Accepted and registered full papers will be published in IEEE Xplore and submitted for indexing in Scopus and Ei Compendex. *TOPICS ---------- We target contributions from both academia and industrials on the following topics, but not limited to: AI Algorithms and Computational Intelligence • Machine Learning, Deep Learning, and Reinforcement Learning • Neural Networks, Fuzzy Systems, and Evolutionary Computation • Foundation Models and Large Language Models • Generative Models and Representation Learning • Optimization Methods and Heuristic Algorithms • Explainable and Interpretable AI Data Analytics, Perception, and Intelligent Processing • Machine Learning, Deep Learning, and Reinforcement Learning • Data Mining and Knowledge Discovery • Computer Vision and Image/Video Processing • Natural Language Processing and Speech Technologies • Multimodal Data Fusion and Sensor Integration • Pattern Recognition and Signal Processing Intelligent Systems, Control, and Engineering Applications • Autonomous Systems and Robotics • Intelligent Control and Automation • Cyber-Physical Systems (CPS) • Internet of Things (IoT) and Edge Computing • Embedded AI and Real-Time Systems • Applications in Smart Manufacturing, Smart Grid, Healthcare, Transportation, and Smart Cities Trustworthy, Secure, and Emerging AI Systems • AI Safety, Robustness, and Reliability • Privacy, Security, and Adversarial Machine Learning • Fairness, Accountability, and Ethical AI • Distributed and Federated Learning • Energy-Efficient and Green AI • Emerging Technologies (e.g., Neuromorphic Computing, Quantum AI) *SUBMISSION ----------------- 1. Full Paper (Publication and Presentation) 2. Abstract (Presentation only) Submission link: https://easychair.org/conferences/?conf=aiais2027 *IMPORTANT DATES ------------------------ ▪Submission Deadline July 30th, 2026 ▪Notification Date August 30th, 2026 ▪Registration Deadline September 20th, 2026 *AIAIS 2027 AWARDS ------------------------ ▪Best Paper Award ▪Best Student Paper Award ▪Outstanding Paper Award ▪Best Oral Presentation Award ▪Best Poster Presentation Award *ORGANIZING COMMITTEE -------------------------------- ▪Honorary Chair Jianping Wang, City University of Hong Kong ▪Conference Chairs Hao Zhang, Xidian University Jin Wang, Soochow University Weiwei Wu, Southeast University ▪Conference Co-chairs Shiqi Wang, City University of Hong Kong Yangbin Chen, Xi'an Jiaotong–Liverpool University Wenqi Fan, Hong Kong Polytechnic University ▪Program Chairs Chenchen Fu, Southeast University Jianqiao Sun, Xidian University ▪Program Co-chairs Chenqi Kong, National University of Singapore Peilin Chen, City University of Hong Kong ▪Local Organizing Chairs Lingyu Zhu, City University of Hong Kong Meng Wang, Lingnan University ▪Special Session Chairs Yifan Zhang, City University of Hong Kong (Dongguan) Meng Wang, Lingnan University ▪Publicity Chairs Qian Xu, City University of Hong Kong Shurun Wang, Sun Yat-sen University Baoliang Chen, City University of Hong Kong ▪ Publication Chair Hanwei Zhu, Jiangxi University of Finance and Economics *VENUE ---------- City University of Hong Kong Tat Chee Avenue, Kowloon, Hong Kong *CONTACT ---------- Conference Secretary: Alice Chan E-mail Address: aiais_info@163.com website: www.aiais.site</text:p>
          </table:table-cell>
          <table:table-cell table:number-columns-repeated="1013"/>
        </table:table-row>
        <table:table-row table:style-name="ro1">
          <table:table-cell table:style-name="ce2" office:value-type="string" calcext:value-type="string">
            <text:p>INTELSYST 2026 2026</text:p>
          </table:table-cell>
          <table:table-cell table:style-name="ce2" office:value-type="string" calcext:value-type="string">
            <text:p>International Conference on Intelligent Systems and Smart Technologies</text:p>
          </table:table-cell>
          <table:table-cell table:style-name="ce2" office:value-type="float" office:value="92" calcext:value-type="float">
            <text:p>92</text:p>
          </table:table-cell>
          <table:table-cell table:style-name="ce2" office:value-type="float" office:value="32" calcext:value-type="float">
            <text:p>32</text:p>
          </table:table-cell>
          <table:table-cell table:style-name="ce3" office:value-type="date" office:date-value="2026-07-31" calcext:value-type="date">
            <text:p>2026-07-31</text:p>
          </table:table-cell>
          <table:table-cell table:style-name="ce3" office:value-type="date" office:date-value="2026-08-20" calcext:value-type="date">
            <text:p>2026-08-20</text:p>
          </table:table-cell>
          <table:table-cell table:style-name="ce3" office:value-type="date" office:date-value="2026-09-15" calcext:value-type="date">
            <text:p>2026-09-15</text:p>
          </table:table-cell>
          <table:table-cell table:style-name="ce2" office:value-type="string" calcext:value-type="string">
            <text:p>Fez Morocco</text:p>
          </table:table-cell>
          <table:table-cell table:style-name="ce2" office:value-type="string" calcext:value-type="string">
            <text:p>Oct 22, 2026 - Oct 24, 2026</text:p>
          </table:table-cell>
          <table:table-cell table:style-name="ce4" office:value-type="string" calcext:value-type="string">
            <text:p><text:a xlink:href="https://intelsyst2026.emena.org/" xlink:type="simple">https://intelsyst2026.emena.org/</text:a></text:p>
          </table:table-cell>
          <table:table-cell table:style-name="ce2" office:value-type="string" calcext:value-type="string">
            <text:p>7th-Edition EMENA International Conference on Intelligent Systems and Smart Technologies INTELSYST 2026 Fez Morocco 22 to 24 October, 2026 https://intelsyst2026.emena.org Please send to interested colleagues and students * Conference Scope INTELSYST 2026 is part of a Europe Middle East and North Africa EMENA conference series founded in 2011. It has evolved into a multi-track interdisciplinary meeting featuring invited talks, oral and poster presentations of peer-reviewed papers. The event also includes a professional exposition focused on practical applications of AI, Machine Learning, Cyber Security, Computer sciences, and thematic workshops that foster informal and stimulating exchanges and collaborations. Conference with participants from over 56 countries. The host Fez is city of University of AL Quaraouiyine, founded in 859 AD and recognized by UNESCO and the Guinness World Records as the oldest existing, continually operating educational institution in the world. * Exclusive Keynote Program INTELSYST 2026: Welcoming the "Nobel Prize of Computing"in the city of the World's Oldest University. We are deeply honored to announce that INTELSYST 2026 will feature a truly exceptional Keynote Speaker: a recipient of the prestigious A.M. Turing Award Laureate, often referred to as the "Nobel Prize of Computing" . Turing Award recognizes individuals whose contributions have fundamentally changed the landscape of Computer Science. This year’s keynote will offer our attendees a rare opportunity to engage with one of the most influential minds in the history of technology. Join us in Fes for this landmark event as we bridge the gap between foundational computer science excellence and the future of Artificial intelligent systems. *Topics including butan not limited to the following: Track 1: AI Foundations, Machine Learning &amp; Deep Learning Focuses on the core algorithmic advancements and theoretical breakthroughs. - Core Learning: Supervised, Unsupervised, Online, and Active Learning. -Advanced Architectures: Deep Learning (Generative Models, Foundation Models, LLMs/VLM). -Modern Paradigms: Federated &amp; Self-Supervised Learning, Transfer Learning. -Bio-Inspired AI: Neural Networks, Evolutionary Computing, Swarm Intelligence, and Neuromorphic Computing. -Emerging Tech: Quantum Machine Learning (QML), Probabilistic Methods (Bayesian, Monte Carlo), and Optimization. Track 2: Data Science, Big Data &amp; High-Performance Computing Focuses on massive data processing, knowledge discovery, and computational infrastructure. -Analytics &amp; Mining: Knowledge Discovery, Data &amp; Process Mining, Predictive Modeling, and Forecasting. Knowledge Engineering: Representation, Reasoning, and Data Visualization. -Infrastructure: High-Performance Computing (HPC), Parallel Algorithms, Cloud and Scalable Computing. -Edge Intelligence: Edge/Fog Computing, Wearable Computing, and MLOps. -Time Series: Analysis and Inverse Problems. Track 3: Cybersecurity, Trustworthy AI &amp; Ethics A critical pillar focusing on security, privacy, and the responsible deployment of AI. - Trustworthy ML: Explainable AI (XAI), Interpretable AI, Fairness, Robustness, Privacy, and Safety. -Cyber Defense: Intrusion Detection/Prevention, AI for Cybersecurity, and Cryptography (including Quantum Cryptology). -Distributed Security: Blockchain Technologies, Secure and Privacy-Preserving ML. -Identity &amp; Access: Biometrics, Watermarking, Secure Transactions, and Identity in IoT. -Societal Impact: Ethics, Policy, Legal Tech, and AI for Sustainable Development. Track 4: Intelligent Systems, Robotics &amp; Communications Focuses on the intersection of AI, autonomous physical systems, and next-gen networking. -Perception &amp; Language: Computer Vision, Image/Video Analysis, NLP, and Conversational AI. -Autonomous Systems: Robotics, Multi-Agent Systems (MAS), Autonomous Vehicles, and Drone Swarms. -Next-Gen Networks: Wireless/Mobile Networks (5G/6G), IoT, and M2M Communications. -Network Resilience: Virtualization, Survivability, Green Networks, and Smart Grids. -Human-Centric AI: Human-Computer Interaction (HCI), Brain-Computer Interfaces (BCI), and Social Network Analysis. Track 5: Applied AI &amp; Domain-Specific Solutions Focuses on vertical domain-specific applications and real-world impact. -Industrial AI: Digital Twins, Industry 4.0, Logistics, Transport, and Smart Energy Systems. -Health &amp; Life Sciences: Smart Health, Bioinformatics, and Life Sciences. -Society &amp; Education: Smart Education, Intelligent Tutoring Systems, E-Learning, and Educational Games. -Environment: Environmental Monitoring, Climate Science, Smart Farming, and Agriculture. -Economy &amp; Business: AI in Finance, Economics, Management, and Business Process Management. -Immersive Tech: Augmented/Virtual Reality (AR/VR), Gaming, and Entertainment. - Legal Technologies and Applied Mathematics for ML * Paper Submission This is a blind peer-reviewed conference. Authors are invited to submit their papers in English through the conference submission system by June 30, 2026. Submissions must be original and should not have been published previously. Submission link: hhttps://cmt3.research.microsoft.com/INTELSYST2026 * Important Dates: - Submission Deadline: 31 July 2026 - Notification to Authors: 15 August 2026 - Camera-Ready: 30 August 2026 - Registration: 15 September 2026 - Conference : 22-24 October 2026 Fez cultural heart of Morocco * Paper Publication All papers will be subjected to a "double-blind review" by at least two members of the Program Committee. Full and Short papers will be published in Proceedings by Springer, in several books of the Poster and company papers will not be published, just presented in the conference. All accepted and presented papers will be submitted to the Springer Digital Library and included in the conference proceedings Indexed in Scopus, WoS, EI-Compendex, DBLP, Google Scholar, etc. The authors of the best selected papers will be invited to extend them for publication in international journals indexed by WoS/SCI, SCOPUS and DBLP, among others. communicated later Best Author and Student papers are Awarded. We are awaiting your paper submission. * Conference Contact: E-mail: intelsyst2026@emena.org Web site: https://intelsyst2026.emena.org/</text:p>
          </table:table-cell>
          <table:table-cell table:number-columns-repeated="1013"/>
        </table:table-row>
        <table:table-row table:style-name="ro1">
          <table:table-cell table:style-name="ce2" office:value-type="string" calcext:value-type="string">
            <text:p>HybAI 2026</text:p>
          </table:table-cell>
          <table:table-cell table:style-name="ce2" office:value-type="string" calcext:value-type="string">
            <text:p>Special Session on Hybrid Intelligence: Integrating Physics-Based Principles with Data-Driven AI</text:p>
          </table:table-cell>
          <table:table-cell table:style-name="ce2" office:value-type="float" office:value="62" calcext:value-type="float">
            <text:p>62</text:p>
          </table:table-cell>
          <table:table-cell table:style-name="ce2" office:value-type="float" office:value="25" calcext:value-type="float">
            <text:p>25</text:p>
          </table:table-cell>
          <table:table-cell table:style-name="ce3" office:value-type="date" office:date-value="2026-07-31" calcext:value-type="date">
            <text:p>2026-07-31</text:p>
          </table:table-cell>
          <table:table-cell table:style-name="ce3" office:value-type="date" office:date-value="2026-09-09" calcext:value-type="date">
            <text:p>2026-09-09</text:p>
          </table:table-cell>
          <table:table-cell table:style-name="ce3" office:value-type="date" office:date-value="2026-09-18" calcext:value-type="date">
            <text:p>2026-09-18</text:p>
          </table:table-cell>
          <table:table-cell table:style-name="ce2" office:value-type="string" calcext:value-type="string">
            <text:p>Angers, France</text:p>
          </table:table-cell>
          <table:table-cell table:style-name="ce2" office:value-type="string" calcext:value-type="string">
            <text:p>Oct 26, 2026 - Oct 28, 2026</text:p>
          </table:table-cell>
          <table:table-cell table:style-name="ce4" office:value-type="string" calcext:value-type="string">
            <text:p><text:a xlink:href="https://icinco.scitevents.org/HybAI.aspx" xlink:type="simple">https://icinco.scitevents.org/HybAI.aspx</text:a></text:p>
          </table:table-cell>
          <table:table-cell table:style-name="ce2" office:value-type="string" calcext:value-type="string">
            <text:p>CALL FOR PAPERS: HybAI 2026 Special Session on Hybrid Intelligence: Integrating Physics-Based Principles with Data-Driven AI Within the 23rd International Conference on Informatics in Control, Automation and Robotics (ICINCO 2026) October 26 - 28, 2026 | Angers, France Official Website: https://icinco.scitevents.org/HybAI.aspx === SCOPE === This special session focuses on the intersection of physical sciences, control engineering, and artificial intelligence. The scope encompasses the development, analysis, and application of gray-box modeling—approaches that strategically combine physical laws, domain knowledge, and first principles with the flexibility of modern data-driven AI. The session aims to bring together researchers and practitioners developing methods that are both intelligent and accountable, targeting safety-critical, data-scarce, or highly complex domains (such as industrial automation, healthcare, scientific discovery, and robotics) where purely black-box models are insufficient, and purely white-box models fail to scale. === TOPICS OF INTEREST === Topics of interest include, but are not limited to: Hybrid and Gray-Box Modeling: Integration of physics-based principles, constraints, and domain knowledge with neural networks; Physics-Informed Neural Networks (PINNs) for modeling, simulation, and control. System Modeling, Control, and Digital Twins: System identification and parameter estimation using hybrid models; controllers combining first-principles and data-driven components; high-fidelity digital twins for optimization. Applications in Industry, Medicine, and Science: Predictive maintenance and process optimization; biomechanical models combined with AI for personalized medicine; hybrid models for inverse problems in physics, chemistry, and climate science. Human-Centric and Safety-Critical AI: Human-in-the-loop systems; safety, robustness, and certification of AI systems where hallucinations or failures are unacceptable. Explainability, Robustness, and Evaluation: Methods for interpretability, uncertainty quantification, and stability analysis in hybrid models; benchmarks for evaluating hybrid intelligence in real-world settings. === IMPORTANT DATES === Paper Submission: July 31, 2026 Authors Notification: September 9, 2026 Camera Ready and Registration: September 18, 2026 === PUBLICATIONS === After thorough reviewing by the special session program committee, all accepted papers will be published in a special section of the conference proceedings book - under an ISBN reference and on digital support - and submitted for indexation by SCOPUS, Google Scholar, DBLP, Semantic Scholar, EI and Web of Science / Conference Proceedings Citation Index. SCITEPRESS is a member of CrossRef and every paper is given a DOI. === SUBMISSION INSTRUCTIONS === Prospective authors are invited to submit papers via the web-based submission system on the ICINCO Special session website: https://icinco.scitevents.org/HybAI.aspx === SESSION COMMITTEE === Co-Chairs: Dr. Vittorio Lippi (Calejo Hybrid Intelligence AB, Germany) Dr. Ndivhuwo Makondo (IBM Research, University of the Witwatersrand, South Africa) Dr. Leonard Johard (Calejo Hybrid Intelligence AB, Sweden) Program Committee: Martin Ciupa (MindMaze, Switzerland) Dr. Elena Gramellini (Univ. of Manchester, United Kingdom) Dr. Ines Schweigert (Jonas &amp; Redmann, Germany) Dr. Riccardo di Sipio (Dayforce, ex-CERN, Canada) Prof. Claudio Zito (Heriot-Watt Univ., United Arab Emirates) Secretariat Contact: icinco.secretariat@insticc.org</text:p>
          </table:table-cell>
          <table:table-cell table:number-columns-repeated="1013"/>
        </table:table-row>
        <table:table-row table:style-name="ro1">
          <table:table-cell table:style-name="ce2" office:value-type="string" calcext:value-type="string">
            <text:p>APCT--EI 2027</text:p>
          </table:table-cell>
          <table:table-cell table:style-name="ce2" office:value-type="string" calcext:value-type="string">
            <text:p>2027 6th Asia-Pacific Computer Technologies Conference (APCT 2027)</text:p>
          </table:table-cell>
          <table:table-cell table:style-name="ce2" office:value-type="float" office:value="80" calcext:value-type="float">
            <text:p>80</text:p>
          </table:table-cell>
          <table:table-cell table:style-name="ce2" office:value-type="float" office:value="30" calcext:value-type="float">
            <text:p>30</text:p>
          </table:table-cell>
          <table:table-cell table:style-name="ce3" office:value-type="date" office:date-value="2026-08-05" calcext:value-type="date">
            <text:p>2026-08-05</text:p>
          </table:table-cell>
          <table:table-cell table:number-columns-repeated="2"/>
          <table:table-cell table:style-name="ce2" office:value-type="string" calcext:value-type="string">
            <text:p>Jakarta, Indonesia</text:p>
          </table:table-cell>
          <table:table-cell table:style-name="ce2" office:value-type="string" calcext:value-type="string">
            <text:p>Jan 15, 2027 - Jan 17, 2027</text:p>
          </table:table-cell>
          <table:table-cell table:style-name="ce4" office:value-type="string" calcext:value-type="string">
            <text:p><text:a xlink:href="https://www.apct.net/" xlink:type="simple">https://www.apct.net/</text:a></text:p>
          </table:table-cell>
          <table:table-cell table:style-name="ce2" office:value-type="string" calcext:value-type="string">
            <text:p>★Full Name: 2027 6th Asia-Pacific Computer Technologies Conference (APCT 2027) ★Abbreviation: APCT 2027 ★Website: https://www.apct.net/ ★Date: January 15-17, 2027 ★Held in: Jakarta, Indonesia ★Publication★ Accepted papers will be published into APCT 2027 Conference Proceedings, and indexed by Ei Compendex and Scopus. APCT 2026 Proceedings will be published online soon. APCT 2025 Proceedings are published in Volume 3378 of AIP Conference Proceedings. APCT 2024 Selected Papers are published by International Journal of Computer Theory and Engineering (ISSN: 2972-4511) and indexed by Scopus. APCT 2023 Proceedings (ISBN: 979-8-3503-3611-5) are included into IEEE xplore and indexed by Ei compendex and Scopus. APCT 2022 Proceedings (ISBN: 978-1-6654-8345-2) are included into IEEE xplore and indexed by Ei compendex and Scopus. ★Call for papers★ * Track 1: Software Engineering * Track 2: Computer Applications * Track 3: Computational Intelligence and AI Techniques * Track 4: Smart Production * Track 5: Systems Modeling and Simulation * Track 6: Interconnection Networks More Topics, please visit: https://www.apct.net/cfp.html ★Submission★ * Abstract (Presentation only) * Full paper (Presentation &amp; Publication) * Submitted papers should be written in English. * Submitted full papers should be prepared according to the template and no less than 5 pages. Please submit the paper by Electronic Submission System: https://www.zmeeting.org/submission/apct2027 More details, please visit: https://www.apct.net/sub.html ★History★ APCT 2026 | January 16-18, 2026 | Bali Island, Indonesia (Hybird Style) APCT 2025 | January 10-12, 2025 | Bangkok, Thailand (Hybird Style) APCT 2024 | January 12-14, 2024 | Wuhan, China (Hybird Style) APCT 2023 | January 6-8, 2023 | Wuhan, China (Full virtual Style) APCT 2022 | January 7-9, 2022 | Wuhan, China (Full virtual Style) ★Conference Schedule★ January 15, 2027 | 10:00-16:00 | Conference Sign in and Materials Collection January 16, 2027 | 09:20-20:00 | Opening Remarks &amp; Keynote Speeches &amp; Invited Speeches &amp; Presentation Sessions &amp; Conference Banquet January 17, 2027 | 09:30-16:00 | Invited Speeches &amp; Presentation Sessions &amp; Best Presentation Awards and Closing Remarks ★Conference Venue★ Jakarta, Indonesia More details, please visit: https://www.apct.net/venue.html ★Contact★ Conference Secretary: Ms. Jasmine Li Email: apctconf@163.com Tel: +86-18008065167 Wechat: asr2020217 (Please note with "APCT 2027" when you add the wechat ID)</text:p>
          </table:table-cell>
          <table:table-cell table:number-columns-repeated="1013"/>
        </table:table-row>
        <table:table-row table:style-name="ro1">
          <table:table-cell table:style-name="ce2" office:value-type="string" calcext:value-type="string">
            <text:p>AICCC 2026</text:p>
          </table:table-cell>
          <table:table-cell table:style-name="ce2" office:value-type="string" calcext:value-type="string">
            <text:p>ACM--2026 9th Artificial Intelligence and Cloud Computing Conference (AICCC 2026)</text:p>
          </table:table-cell>
          <table:table-cell table:style-name="ce2" office:value-type="float" office:value="88" calcext:value-type="float">
            <text:p>88</text:p>
          </table:table-cell>
          <table:table-cell table:style-name="ce2" office:value-type="float" office:value="30" calcext:value-type="float">
            <text:p>30</text:p>
          </table:table-cell>
          <table:table-cell table:style-name="ce3" office:value-type="date" office:date-value="2026-08-05" calcext:value-type="date">
            <text:p>2026-08-05</text:p>
          </table:table-cell>
          <table:table-cell table:number-columns-repeated="2"/>
          <table:table-cell table:style-name="ce2" office:value-type="string" calcext:value-type="string">
            <text:p>Tokyo, Japan</text:p>
          </table:table-cell>
          <table:table-cell table:style-name="ce2" office:value-type="string" calcext:value-type="string">
            <text:p>Dec 18, 2026 - Dec 21, 2026</text:p>
          </table:table-cell>
          <table:table-cell table:style-name="ce4" office:value-type="string" calcext:value-type="string">
            <text:p><text:a xlink:href="http://www.aiccc.net" xlink:type="simple">http://www.aiccc.net</text:a></text:p>
          </table:table-cell>
          <table:table-cell table:style-name="ce2" office:value-type="string" calcext:value-type="string">
            <text:p>Full name: 2026 9th Artificial Intelligence and Cloud Computing Conference Abbreviation: AICCC 2026 2026 9th Artificial Intelligence and Cloud Computing Conference (AICCC 2026) will be held during December 18-21, 2026 in The University of Electro-Communications, Tokyo, Japan. (http://www.aiccc.net) Conference Website: http://www.aiccc.net AICCC 2026 information: 1. AICCC conferences were successfully held from 2018 to 2025 in Tokyo, Osaka, Kyoto and so on. 2. Publication History: AICCC conference Proceedings from 2018 to 2025 have been published in ACM digital library and indexed by EI Compendex, Scopus . 2026 Publication information: After the peer-review process, all accepted papers of AICCC 2026 after proper registration and presentation will be published in AICCC 2026 ACM Conference Proceedings, which will be sent to be indexed by Ei Compendex and Scopus. 3. Keynote Speakers: Prof. Runhe Huang, Hosei University, Japan , Prof. Gaurav Sharma (IEEE Fellow, SPIE fellow), University of Rochester, USA Prof. Cheng-Hsuan Li, National Taichung University of Education, Taiwan Conference Venue: The University of Electro-Communications, Tokyo, Japan Address: 1-5-1 Chofu-ga-oka, Chofu-shi, Tokyo 182-8585 Submission and Contact Methods Submission Methods: Zmeeting System: https://www.zmeeting.org/submission/AICCC2026 E-mail: aiccc.contact@gmail.com Conference Specialist: Ms. Jassica Yao AICCC 2026 can provide a better platform for academic communication in Artificial Intelligence and Cloud Computing in theoretical and practical aspects. For more conference information, please visit the conference website: http://www.aiccc.net</text:p>
          </table:table-cell>
          <table:table-cell table:number-columns-repeated="1013"/>
        </table:table-row>
        <table:table-row table:style-name="ro1">
          <table:table-cell table:style-name="ce2" office:value-type="string" calcext:value-type="string">
            <text:p>IEEE WAIE 2026</text:p>
          </table:table-cell>
          <table:table-cell table:style-name="ce2" office:value-type="string" calcext:value-type="string">
            <text:p>IEEE--2026 8th International Workshop on Artificial Intelligence and Education (WAIE 2026)</text:p>
          </table:table-cell>
          <table:table-cell table:style-name="ce2" office:value-type="float" office:value="35" calcext:value-type="float">
            <text:p>35</text:p>
          </table:table-cell>
          <table:table-cell table:style-name="ce2" office:value-type="float" office:value="30" calcext:value-type="float">
            <text:p>30</text:p>
          </table:table-cell>
          <table:table-cell table:style-name="ce3" office:value-type="date" office:date-value="2026-08-05" calcext:value-type="date">
            <text:p>2026-08-05</text:p>
          </table:table-cell>
          <table:table-cell table:number-columns-repeated="2"/>
          <table:table-cell table:style-name="ce2" office:value-type="string" calcext:value-type="string">
            <text:p>Sapporo, Japan</text:p>
          </table:table-cell>
          <table:table-cell table:style-name="ce2" office:value-type="string" calcext:value-type="string">
            <text:p>Sep 26, 2026 - Sep 28, 2026</text:p>
          </table:table-cell>
          <table:table-cell table:style-name="ce4" office:value-type="string" calcext:value-type="string">
            <text:p><text:a xlink:href="http://www.waie.org/" xlink:type="simple">http://www.waie.org/</text:a></text:p>
          </table:table-cell>
          <table:table-cell table:style-name="ce2" office:value-type="string" calcext:value-type="string">
            <text:p>Abbreviation：WAIE 2026 Full Name: 2026 8th International Workshop on Artificial Intelligence and Education Sapporo, Japan September 26-28, 2026 http://www.waie.org/ Publication: Accepted papers of WAIE 2026 after proper registration and presentation will be published into Conference Proceedings by IEEE，included into IEEE Xplore, and submitted for indexing by Ei Compendex and Scopus Index, and other indexing services. Call For Papers: Artificial intelligence algorithms in education Artificial neural networks in education Educational robotics Knowledge Science and Knowledge Engineering Intelligent tutoring systems Intelligent virtual reality based learning systems Distance education, teaching New Generations of Educational Technologies E-learning Educational Technology System Architecture Educational Technology System Development Technology Model and Architecture of Educational Technology System Distance learning system Artificial Intelligence and Open Learning Human-Computer Interaction in Teaching System Educational Knowledge Management Technology Simulation in learning Affective Computing in Education Education software Education hardware More Topics: http://www.waie.org/cfp.html Submission Methods: Full Paper(publication and oral presentation) Abstract(oral presentation only) Please log in the Electronic Submission System to submit your paper. --Electronic Submission System: http://confsys.iconf.org/submission/waie2026 --By email: waie_conf@126.com Contacts: Ms. Nina Lee E-mail: waie_conf@126.com Tel: +86 19382255134</text:p>
          </table:table-cell>
          <table:table-cell table:number-columns-repeated="1013"/>
        </table:table-row>
        <table:table-row table:style-name="ro1">
          <table:table-cell table:style-name="ce2" office:value-type="string" calcext:value-type="string">
            <text:p>IWQPS 2026</text:p>
          </table:table-cell>
          <table:table-cell table:style-name="ce2" office:value-type="string" calcext:value-type="string">
            <text:p>The International Workshop on Quantum Computing, Privacy and Security</text:p>
          </table:table-cell>
          <table:table-cell table:style-name="ce2" office:value-type="float" office:value="15" calcext:value-type="float">
            <text:p>15</text:p>
          </table:table-cell>
          <table:table-cell table:style-name="ce2" office:value-type="float" office:value="30" calcext:value-type="float">
            <text:p>30</text:p>
          </table:table-cell>
          <table:table-cell table:style-name="ce3" office:value-type="date" office:date-value="2026-08-10" calcext:value-type="date">
            <text:p>2026-08-10</text:p>
          </table:table-cell>
          <table:table-cell table:style-name="ce3" office:value-type="date" office:date-value="2026-08-25" calcext:value-type="date">
            <text:p>2026-08-25</text:p>
          </table:table-cell>
          <table:table-cell table:style-name="ce3" office:value-type="date" office:date-value="2026-09-05" calcext:value-type="date">
            <text:p>2026-09-05</text:p>
          </table:table-cell>
          <table:table-cell table:style-name="ce2" office:value-type="string" calcext:value-type="string">
            <text:p>Bucharest, Romania</text:p>
          </table:table-cell>
          <table:table-cell table:style-name="ce2" office:value-type="string" calcext:value-type="string">
            <text:p>Sep 22, 2026 - Sep 25, 2026</text:p>
          </table:table-cell>
          <table:table-cell table:style-name="ce4" office:value-type="string" calcext:value-type="string">
            <text:p><text:a xlink:href="https://idsta-conference.org/IWQPS2026/" xlink:type="simple">https://idsta-conference.org/IWQPS2026/</text:a></text:p>
          </table:table-cell>
          <table:table-cell table:style-name="ce2" office:value-type="string" calcext:value-type="string">
            <text:p>The International Workshop on Quantum Computing, Privacy and Security (IWQPS 2026) Bucharest, Romania | September 22-25, 2026 In conjunction with The Seventh International Conference on Intelligent Data Science Technologies and Applications (IDSTA 2026) About the Workshop Quantum computing is expected to significantly reshape the landscape of secure computing, software, and network infrastructures. As quantum technologies continue to evolve, traditional security approaches and software design paradigms face new challenges, requiring the development of quantum-aware architectures and resilient software systems. IWQPS 2026 aims to explore the intersection of quantum computing with privacy and security. It will provide a forum for researchers and practitioners to discuss how emerging quantum technologies—including quantum algorithms, quantum communication protocols, and quantum machine learning—influence the design and deployment of software systems. The workshop will focus on full and hybrid classical–quantum software architectures, quantum-aware security mechanisms, and programming models for quantum-enabled platforms. We will also examine how quantum technologies can be integrated into modern computing environments such as cloud infrastructures, distributed systems, and large-scale networked platforms. By bringing together experts from quantum computing, software engineering, artificial intelligence, data science, and cybersecurity, the workshop aims to foster interdisciplinary collaboration and identify emerging research challenges and opportunities for building secure, scalable, and intelligent distributed software architectures in the quantum era. Topics of Interest We invite submissions describing original research, position papers, or case studies related to the intersection of quantum computing, privacy, and security. Topics of interest include (but are not limited to): - Quantum Machine Learning for security analysis - Quantum-aware distributed system architectures - Quantum networking and secure communication protocols - Full and Hybrid classical–quantum computing infrastructures - Quantum-secure authentication and access control - Software engineering practices for quantum-enabled systems - Quantum-safe cloud and edge computing platforms - Blockchain in the quantum era - Post quantum cryptography - Programming frameworks for quantum-aware distributed applications Important Dates - Submission Deadline: August 10, 2026 - Notification of Acceptance: August 25, 2026 - Camera-Ready Submission: September 5, 2026 Target Audience &amp; Peer Review Tentative participants include researchers, academics, and industry practitioners working on quantum computing, quantum machine learning, quantum networking, and distributed software architectures. Participants presenting accepted papers will be selected through a rigorous peer-review process conducted by the workshop's program committee. Submission Guidelines All papers must be submitted electronically through the Sparcly.ai Conference Management System website. Previously published papers or papers under review for other venues should not be submitted. Submission Link: https://conferences.sparcly.ai/SP/IDSTA2026 Publication Accepted papers to IDSTA and its co-located workshops will be submitted for inclusion into IEEE Xplore subject to meeting IEEE Xplore’s scope and quality requirements. Earlier versions of the proceedings are indexed in Scopus, DBLP, and IEEE.</text:p>
          </table:table-cell>
          <table:table-cell table:number-columns-repeated="1013"/>
        </table:table-row>
        <table:table-row table:style-name="ro1">
          <table:table-cell table:style-name="ce2" office:value-type="string" calcext:value-type="string">
            <text:p>NLPIR 2026</text:p>
          </table:table-cell>
          <table:table-cell table:style-name="ce2" office:value-type="string" calcext:value-type="string">
            <text:p>Springer--2026 10th International Conference on Natural Language Processing and Information Retrieval (NLPIR 2026)</text:p>
          </table:table-cell>
          <table:table-cell table:style-name="ce2" office:value-type="float" office:value="68" calcext:value-type="float">
            <text:p>68</text:p>
          </table:table-cell>
          <table:table-cell table:style-name="ce2" office:value-type="float" office:value="25" calcext:value-type="float">
            <text:p>25</text:p>
          </table:table-cell>
          <table:table-cell table:style-name="ce3" office:value-type="date" office:date-value="2026-08-10" calcext:value-type="date">
            <text:p>2026-08-10</text:p>
          </table:table-cell>
          <table:table-cell table:number-columns-repeated="2"/>
          <table:table-cell table:style-name="ce2" office:value-type="string" calcext:value-type="string">
            <text:p>Nara, Japan</text:p>
          </table:table-cell>
          <table:table-cell table:style-name="ce2" office:value-type="string" calcext:value-type="string">
            <text:p>Dec 11, 2026 - Dec 13, 2026</text:p>
          </table:table-cell>
          <table:table-cell table:style-name="ce4" office:value-type="string" calcext:value-type="string">
            <text:p><text:a xlink:href="http://www.nlpir.net" xlink:type="simple">http://www.nlpir.net</text:a></text:p>
          </table:table-cell>
          <table:table-cell table:style-name="ce2" office:value-type="string" calcext:value-type="string">
            <text:p>★Full name: Springer--2026 10th International Conference on Natural Language Processing and Information Retrieval (NLPIR 2026) ★Abbreviation: NLPIR 2026 ★Website: http://www.nlpir.net ★Date：December 11-13, 2026 ★Held in: Nara, Japan ★Call for papers★ Core NLP &amp; Data Science -Foundations of Language Processing Data/text mining, corpus linguistics, and psycholinguistic modeling Basic NLP pipelines: tokenization, POS tagging, lemmatization, dependency parsing, and semantic role labeling Low-resource language engineering and cross-lingual adaptation -Linguistic Analysis &amp; Understanding Syntax, semantics, discourse analysis, and pragmatics Multimodal speech recognition/synthesis (ASR/TTS) and conversational AI Diachronic corpora, temporal reasoning, and evolving language models -Knowledge Systems &amp; Semantics Automated knowledge acquisition, ontology generation/alignment, and semantic web technologies Neuro-symbolic integration: combining logic-based reasoning with neural networks -Content Analysis &amp; IR Topic modeling, event/anomaly detection, and sentiment/emotion analysis Document summarization, plagiarism detection, and authorship attribution Dynamic/personalized IR, adversarial retrieval, and cross-language systems -Social &amp; Multimedia Analysis Personality/emotion detection in social media, misinformation tracking Multimodal IR (text, image, video) and virality prediction -AI-Driven Methods &amp; Innovations Large Language Models (LLMs) &amp; Transformers Architectures (BERT, GPT, T5, LLaMA) for NLU, generation, and few-shot learning Domain-specific LLMs (e.g., BioGPT, Codex) and tools like ChatGPT, DeepSeek, Claude Ethical challenges: bias mitigation, hallucination control, and AI-generated content detection -Generative AI &amp; Automation Abstractive summarization, synthetic data generation, and conversational agents Multimodal LLMs (e.g., GPT-4V) for vision-language tasks -Graph &amp; Deep Learning GNNs for co-occurrence graphs, knowledge graph completion, and dynamic networks Swarm intelligence hybridized with transformer architectures -Efficiency &amp; Scalability Model compression (pruning, quantization), federated learning, and edge NLP Distributed training frameworks for trillion-parameter models -Cross-Cutting Themes Human-Centric NLP Interactive AI: chatbots, dynamic query resolution, and personalized recommendation systems Explainability (XAI) and visualization of attention mechanisms -Machine Translation &amp; Multilinguality Zero-shot translation, LLM-driven low-resource adaptation, and post-editing workflows -Decentralized &amp; Collaborative Systems Blockchain for decentralized knowledge graphs, federated search, and privacy-preserving NLP -Ethics &amp; Governance AI safety, fairness audits, and regulatory compliance (e.g., EU AI Act) Combatting misinformation and deepfakes in social/content platforms -Emerging Frontiers AI for Science: LLMs in biomedical NLP, climate text analysis, and legal document processing Embodied AI: Language models integrated with robotics and real-world interaction Self-Supervised Learning: Pre-training paradigms beyond transformers ★ Publication All peer-reviewed and presented papers from NLPIR 2026 will be published as post-proceedings in a volume of the Springer book series: Lecture Notes in Networks and Systems, indexed by Ei Compendex, Scopus, etc. **NLPIR 2018-2025 Conference Proceedings has been published online, and indexed by Ei Compendex and Scopus already. NLPIR 2025 Springer:Lecture Notes in Networks and Systems (LNNS, volume 1904) NLPIR 2024 ACM Digital Library (ISBN: 979-8-4007-1738-3) NLPIR 2023 ACM Digital Library (ISBN: 979-8-4007-0922-7) NLPIR 2022 ACM Digital Library (ISBN: 978-1-4503-9762-9) NLPIR 2021 ACM Digital Library (ISBN: 978-1-4503-8735-4) NLPIR 2020 ACM Digital Library (ISBN: 978-1-4503-7760-7) NLPIR 2019 ACM Digital Library (ISBN: 978-1-4503-6279-5) NLPIR 2018 ACM Digital Library (ISBN: 978-1-4503-6551-2) ★Submission★ 1. Submitted papers should be prepared according to the paper template and the length should be at least 10 pages (Single column) 2. The submitted paper is requested to be written in complete English. Paper Template for Docx: https://nlpir.net/splnproc1703.docm Paper Template for LaTex: https://nlpir.net/Latex-template.zip *Electronic Submission System Link: https://www.zmeeting.org/submission/NLPIR2026 You will receive the submission confirmation email from the conference email after around 2 working days. If you haven't received it, please contact us as soon as possible. (Email: nlpir@asr.org) More details about submission, please visit at https://nlpir.net/sub.html ★Conference Venue Nara Women's University Address: 〒630-8506, 奈良市北魚屋東町( Kita-uoya-higashi-machi, Nara City 630-8506) ★★Contact us Ms. Sophie Chen (Conference Secretary) Email:nlpir@asr.org Conference Website: www.nlpir.net</text:p>
          </table:table-cell>
          <table:table-cell table:number-columns-repeated="1013"/>
        </table:table-row>
        <table:table-row table:style-name="ro1">
          <table:table-cell table:style-name="ce2" office:value-type="string" calcext:value-type="string">
            <text:p>CTML--EI 2026</text:p>
          </table:table-cell>
          <table:table-cell table:style-name="ce2" office:value-type="string" calcext:value-type="string">
            <text:p>2026 International Conference on Computational Theory and Machine Learning (CTML 2026)</text:p>
          </table:table-cell>
          <table:table-cell table:style-name="ce2" office:value-type="float" office:value="90" calcext:value-type="float">
            <text:p>90</text:p>
          </table:table-cell>
          <table:table-cell table:style-name="ce2" office:value-type="float" office:value="25" calcext:value-type="float">
            <text:p>25</text:p>
          </table:table-cell>
          <table:table-cell table:style-name="ce3" office:value-type="date" office:date-value="2026-08-10" calcext:value-type="date">
            <text:p>2026-08-10</text:p>
          </table:table-cell>
          <table:table-cell table:number-columns-repeated="2"/>
          <table:table-cell table:style-name="ce2" office:value-type="string" calcext:value-type="string">
            <text:p>Rio de Janeiro, Brazil</text:p>
          </table:table-cell>
          <table:table-cell table:style-name="ce2" office:value-type="string" calcext:value-type="string">
            <text:p>Nov 27, 2026 - Nov 29, 2026</text:p>
          </table:table-cell>
          <table:table-cell table:style-name="ce4" office:value-type="string" calcext:value-type="string">
            <text:p><text:a xlink:href="https://www.ctml.org/" xlink:type="simple">https://www.ctml.org/</text:a></text:p>
          </table:table-cell>
          <table:table-cell table:style-name="ce2" office:value-type="string" calcext:value-type="string">
            <text:p>CTML 2026---Ei Compendex and Scopus Full Name: 2026 International Conference on Computational Theory and Machine Learning (CTML 2026) Acronym: CTML 2026 Place: Rio de Janeiro, Brazil Date: November 27-29, 2026 Website: https://www.ctml.org/ Organizer: India International Congress on Computational Intelligence(IICCI) The International Conference on Computational Theory and Machine Learning (CTML 2026) will be held in Rio de Janeiro, Brazil, during November 27-29, 2026. This conference focuses on computational theory, machine learning foundations, algorithm design, and related interdisciplinary research. It provides a high-level academic platform for global researchers, scholars, and practitioners to share innovative findings, exchange ideas, and promote academic cooperation. CTML 2026 welcomes high-quality papers and presentations, aiming to advance theoretical progress and practical applications in computational theory and machine learning. ☛ CALL FOR PAPERS Authors are invited to submit full papers describing original research work in areas including, but not limited to: TRACK 1: Foundations of Computational Learning Statistical Learning Theory and Generalization Computational Complexity of Learning Online Learning and Regret Analysis Learning Dynamics and Convergence Scaling Laws and Emergent Behavior in Large Models PAC-Bayes Theory and Algorithmic Stability TRACK 2: Deep Learning Theory and Neural Architectures Expressivity and Capacity of Neural Networks Theoretical Analysis of Transformers and Foundation Models Neural Network Optimization Landscapes Overparameterization and Double Descent Implicit Regularization and Bias of Gradient Methods Mechanistic Interpretability and Model Internals Physics-Informed Neural Networks and Neural Operators TRACK 3: Optimization and Algorithms for Machine Learning Convex and Non-Convex Optimization Evolutionary Algorithms and Metaheuristics Combinatorial Optimization in Learning Surrogate-Assisted and Expensive Optimization Optimization for Resource-Constrained Settings Federated Learning and Distributed Optimization Multi-Objective Optimization in ML Systems TRACK 4: Graph Theory, Combinatorics, and Learning on Structures Graph Neural Networks Theory Spectral Graph Theory and Applications Algorithmic Graph Theory and Network Analysis Combinatorial Optimization with Learning Random Graphs and Probabilistic Methods Geometric Deep Learning Learning on Manifolds and Non-Euclidean Data TRACK 5: Trustworthy and Explainable AI Causal Inference and Discovery Explainability and Interpretability Robustness, Uncertainty, and Calibration Privacy and Fairness in Machine Learning Adversarial Machine Learning Distribution Shift and Domain Generalization Safety and Alignment of AI Systems TRACK 6: AI for Scientific Discovery and Emerging Frontiers AI for Scientific Discovery Quantum Machine Learning Symbolic Regression and Scientific Law Discovery AI-Accelerated Scientific Computing Multi-Modal Learning and Fusion Computational Biology and AI for Healthcare Climate Modeling and Environmental AI TRACK 7: Efficient and Scalable Machine Learning Systems Model Compression and Knowledge Distillation Quantization and Pruning Neural Architecture Search Edge AI and TinyML Green AI and Energy-Efficient Learning Large-Scale Training Systems ML Compilers and Hardware-Software Co-Design For details about topics, please visit at https://www.ctml.org/cfp.html ☛ PUBLICATION ✿ Conference Proceedings Submissions will be reviewed by the conference technical committees, and accepted papers will be published in Conference Proceedings and submitted to EI Compendex, Scopus, etc. for indexing. ☛ SUBMISSION 1. Full Paper (Publication and Presentation) 2. Abstract (Presentation Only) For full paper(.pdf), please upload to https://www.zmeeting.org/submission/ctml2026 For abstract, please send it to ctmlconf@163.com More details about submission, please visit at https://www.ctml.org/submission.html ☛ CONFERENCE SCHEDULE November 27, 2026 10:30-17:00 Onsite Sign-in November 28, 2026 09:00-17:00 Registration 09:00-09:10 Opening Ceremony 09:10-09:55 Keynote 1 09:55-10:30 Group Photo &amp; Coffee Break 10:30-11:15 Keynote 2 11:15-12:00 Keynote 3 12:00-13:30 Conference Lunch 13:30-15:30 Parallel Sessions 15:30-15:45 Coffee Break 15:45-18:00 Parallel Sessions 18:30-21:00 Conference Dinner November 29, 2026 All day Parallel Sessions ☛ CONTACT Mary Zhan (Conference Secretary) E-mail: ctmlconf@163.com</text:p>
          </table:table-cell>
          <table:table-cell table:number-columns-repeated="1013"/>
        </table:table-row>
        <table:table-row table:style-name="ro1">
          <table:table-cell table:style-name="ce2" office:value-type="string" calcext:value-type="string">
            <text:p>CNCC 2026</text:p>
          </table:table-cell>
          <table:table-cell table:style-name="ce2" office:value-type="string" calcext:value-type="string">
            <text:p>The 3rd International Conference on Computer Network and Cloud Computing</text:p>
          </table:table-cell>
          <table:table-cell table:style-name="ce2" office:value-type="float" office:value="90" calcext:value-type="float">
            <text:p>90</text:p>
          </table:table-cell>
          <table:table-cell table:style-name="ce2" office:value-type="float" office:value="30" calcext:value-type="float">
            <text:p>30</text:p>
          </table:table-cell>
          <table:table-cell table:style-name="ce3" office:value-type="date" office:date-value="2026-08-14" calcext:value-type="date">
            <text:p>2026-08-14</text:p>
          </table:table-cell>
          <table:table-cell table:style-name="ce3" office:value-type="date" office:date-value="2026-08-28" calcext:value-type="date">
            <text:p>2026-08-28</text:p>
          </table:table-cell>
          <table:table-cell table:style-name="ce3" office:value-type="date" office:date-value="2026-10-09" calcext:value-type="date">
            <text:p>2026-10-09</text:p>
          </table:table-cell>
          <table:table-cell table:style-name="ce2" office:value-type="string" calcext:value-type="string">
            <text:p>Nanchang, China</text:p>
          </table:table-cell>
          <table:table-cell table:style-name="ce2" office:value-type="string" calcext:value-type="string">
            <text:p>Oct 13, 2026 - Oct 14, 2026</text:p>
          </table:table-cell>
          <table:table-cell table:style-name="ce4" office:value-type="string" calcext:value-type="string">
            <text:p><text:a xlink:href="https://sensys.guojia.ru/" xlink:type="simple">https://sensys.guojia.ru/</text:a></text:p>
          </table:table-cell>
          <table:table-cell table:style-name="ce2" office:value-type="string" calcext:value-type="string">
            <text:p>Conference information: 1. Conference Name: 2026 3rd International Conference on Computer Networks and Cloud Computing (CNCC 2026) 2. Dates: October 13-14, 2026 3. Sponsor: Nanchang Institute of Technology, China 4. Location: Nanchang, Jiangxi, China 5. Indexing: EI Compendex, Scopus 6. Format: Hybrid (Virtual &amp; In-person) 7. Website: https://sensys.guojia.ru/admin.php !!!IMPORTANT DATES!!! - Submission deadline: August 14, 2026 - Notification of acceptance: August 28, 2026 - Registration deadline: September 11, 2026 CNCC 2026 welcomes submissions that cover the broad areas of computer networks, cloud computing, and related emerging technologies. Accepted and presented papers will be published by SPIE – The International Society for Optical Engineering, and submitted to EI Compendex and Scopus for indexing. Topics of interest include, but are not limited to: Track 1. Cloud Computing Technologies and Applications - Cloud Computing Architecture and Ecosystem Evolution - Hybrid Cloud and Cloud Infrastructure - Cloud Resource Virtualization and Optimization - Cloud Storage and Cloud Traffic Engineering - Cloud Monitoring, Operation, and Reliability Assurance - Vertical Industry Cloud Applications - Cloud-Based Parallel Processing and Intelligent Modeling - Cloud-Native Technologies and Container Orchestration - Serverless Computing and Function-as-a-Service (FaaS) - Cloud Cost Optimization and Resource Scheduling Track 2. Computer Networks and Emerging Communications - Intelligent Networks and Novel Internet Architectures - 6G Cellular Network Technologies - Optical Networks and Multimedia Networking - MIMO Networks and Signal Transmission - Internet of Things (IoT) and Cyber-Physical Systems - Network Energy Efficiency Optimization - Integrated Sensing and Communication Technologies - Satellite Communications and Space–Air–Ground Integrated Networks - Network Slicing and Quality of Service (QoS) Guarantee - Programmable Data Planes and P4 Language Track 3. Network and Information Security - Network Security and System Fault Tolerance - Applied Cryptographic Techniques - Database and Operating System Security - Cloud Security and Privacy Protection - Coding Theory and Information Theory - Secure Programming - Zero-Trust Security Architectures - AI Security and Adversarial Machine Learning - Blockchain Security and Smart Contract Vulnerability Detection - Data Masking and Privacy-Preserving Computation Track 4. Artificial Intelligence and Intelligent Perception - Machine Learning and Pattern Recognition - Neural Networks and Artificial Intelligence - Computer Vision and Image Processing - Multimedia Human–Computer Interaction - Intelligent Perception in IoT - Network Intelligent Optimization Algorithms - Reinforcement Learning and Decision Intelligence - Generative AI and Multimodal Learning - Explainable AI and Model Interpretability - Edge Intelligence and Lightweight Deep Learning Track 5. Emerging Interdisciplinary Technologies - Blockchain and Cloud/Network Convergence Technologies - Distributed Computing and Storage - Digital Signal Processing - Higher-Order Spectral Analysis - Intelligent Computing Models and Tools - Quantum Computing and Quantum Communication - Federated Learning and Privacy-Preserving Machine Learning - Digital Twins and Network Simulation - Green Computing and Low-Carbon Data Centers - Computing Power Network and Resource Coordination Track 6. Edge Computing and Fog Computing - Edge Computing Architectures and Deployment Models - Fog Computing and Cloud–Edge Collaboration - Lightweight Virtualization and Containers at the Edge - Edge Intelligence and Model Inference Acceleration - Edge Network Protocols and Low-Latency Communication - Edge Caching and Content Distribution - Security and Privacy Protection in Edge Computing - Edge Resource Management and Task Offloading - Mobile Edge Computing and 5G/6G Integration - Edge Computing for Industrial IoT Applications SUBMISSION GUIDELINES Please choose one way to submit your contributions: - Website: https://sensys.guojia.ru/admin.php - *Email: aoagpublish@outlook.com PUBLICATION AND INDEXING - Accepted and presented papers will be published by SPIE – The International Society for Optical Engineering, and submitted to EI Compendex and Scopus for possible indexing. - For those who prefer NOT to publish their full research, the conference encourages the submission of abstracts, which will be considered for oral presentations only. Authors should register AFTER receiving the acceptance letter of their paper and before the registration deadline (September 11, 2026) to ensure their accepted paper is included in the conference proceedings. Service Contact: aoagpublish@outlook.com --- Organized by Nanchang Institute of Technology, China | Hybrid conference in Nanchang, China</text:p>
          </table:table-cell>
          <table:table-cell table:number-columns-repeated="1013"/>
        </table:table-row>
        <table:table-row table:style-name="ro1">
          <table:table-cell table:style-name="ce2" office:value-type="string" calcext:value-type="string">
            <text:p>ISAI-NLP 2026</text:p>
          </table:table-cell>
          <table:table-cell table:style-name="ce2" office:value-type="string" calcext:value-type="string">
            <text:p>2026 21th International Joint Symposium on Artificial Intelligence and Natural Language Processing</text:p>
          </table:table-cell>
          <table:table-cell table:style-name="ce2" office:value-type="float" office:value="75" calcext:value-type="float">
            <text:p>75</text:p>
          </table:table-cell>
          <table:table-cell table:style-name="ce2" office:value-type="float" office:value="25" calcext:value-type="float">
            <text:p>25</text:p>
          </table:table-cell>
          <table:table-cell table:style-name="ce3" office:value-type="date" office:date-value="2026-08-15" calcext:value-type="date">
            <text:p>2026-08-15</text:p>
          </table:table-cell>
          <table:table-cell table:style-name="ce3" office:value-type="date" office:date-value="2026-11-15" calcext:value-type="date">
            <text:p>2026-11-15</text:p>
          </table:table-cell>
          <table:table-cell table:style-name="ce3" office:value-type="date" office:date-value="2026-11-30" calcext:value-type="date">
            <text:p>2026-11-30</text:p>
          </table:table-cell>
          <table:table-cell table:style-name="ce2" office:value-type="string" calcext:value-type="string">
            <text:p>Bangkok, Thailand</text:p>
          </table:table-cell>
          <table:table-cell table:style-name="ce2" office:value-type="string" calcext:value-type="string">
            <text:p>Nov 19, 2026 - Nov 21, 2026</text:p>
          </table:table-cell>
          <table:table-cell table:style-name="ce4" office:value-type="string" calcext:value-type="string">
            <text:p><text:a xlink:href="https://isai-nlp2026.aiat.or.th" xlink:type="simple">https://isai-nlp2026.aiat.or.th</text:a></text:p>
          </table:table-cell>
          <table:table-cell table:style-name="ce2" office:value-type="string" calcext:value-type="string">
            <text:p>The 21st International Joint Symposium on Artificial Intelligence and Natural Language Processing (iSAI-NLP 2026) is organized and hosted by AIAT, to be held during November 19–21, 2026, in Bangkok, Thailand. This iSAI-NLP 2026 conference encourages knowledge-sharing and technological advancement among AI and NLP researchers worldwide. Encompassing various subjects, including machine learning, data analytics, robotics, IoT, embedded systems, signal and image processing, speech processing, smart technology, and cybersecurity. Researchers and experts in these areas are invited to submit their papers and present their work at iSAI-NLP 2026. The in-person event in Bangkok offers an excellent setting for networking, strengthening partnerships, and engaging in meaningful dialogue. --- Topics of Interest The topics include, but are not limited to: 💬 Track 1 Natural Language Processing 🤖 Track 2 Robotics, IoT and Embedded System 📊 Track 3 Data Analytic and Machine Learning 🖼️ Track 4 Signal, Image and Speech Processing 🏭 Track 5 Smart Industrial Technologies 📡 Track 6 AIoT Design and Applications ⚙️ Track 7 Management Technology 🔒 Track 8 Security in IoT 📜 Track 9 AI Governance, Ethics and Policy 🚀 Track 10 AI Use Cases --- Activities Date Paper Submission Deadline August 15, 2026 Paper Notification September 15, 2026 Camera-Ready Submission Deadline September 30, 2026 Early Registration October 15, 2026 Conference Days November 19–21, 2026 https://isai-nlp2026.aiat.or.th</text:p>
          </table:table-cell>
          <table:table-cell table:number-columns-repeated="1013"/>
        </table:table-row>
        <table:table-row table:style-name="ro1">
          <table:table-cell table:style-name="ce2" office:value-type="string" calcext:value-type="string">
            <text:p>MLPR 2026</text:p>
          </table:table-cell>
          <table:table-cell table:style-name="ce2" office:value-type="string" calcext:value-type="string">
            <text:p>2026 The 4th International Conference on Machine Learning and Pattern Recognition (MLPR 2026)</text:p>
          </table:table-cell>
          <table:table-cell table:style-name="ce2" office:value-type="float" office:value="92" calcext:value-type="float">
            <text:p>92</text:p>
          </table:table-cell>
          <table:table-cell table:style-name="ce2" office:value-type="float" office:value="28" calcext:value-type="float">
            <text:p>28</text:p>
          </table:table-cell>
          <table:table-cell table:style-name="ce3" office:value-type="date" office:date-value="2026-08-20" calcext:value-type="date">
            <text:p>2026-08-20</text:p>
          </table:table-cell>
          <table:table-cell table:number-columns-repeated="2"/>
          <table:table-cell table:style-name="ce2" office:value-type="string" calcext:value-type="string">
            <text:p>Kyoto, Japan</text:p>
          </table:table-cell>
          <table:table-cell table:style-name="ce2" office:value-type="string" calcext:value-type="string">
            <text:p>Dec 4, 2026 - Dec 6, 2026</text:p>
          </table:table-cell>
          <table:table-cell table:style-name="ce4" office:value-type="string" calcext:value-type="string">
            <text:p><text:a xlink:href="https://www.mlpr.org/" xlink:type="simple">https://www.mlpr.org/</text:a></text:p>
          </table:table-cell>
          <table:table-cell table:style-name="ce2" office:value-type="string" calcext:value-type="string">
            <text:p>Full Name: The 4th International Conference on Machine Learning and Pattern Recognition (MLPR 2026) Website: https://www.mlpr.org Conference Date: December 4-6, 2026 Conference Venue: Kyoto, Japan The 4th International Conference on Machine Learning and Pattern Recognition (MLPR 2026) will be held at Kyoto, Japan during December 4-6, 2026. MLPR 2026 is sponsored by Ritsumeikan University, Japan. The conference includes keynote talks, invited talks, forums and oral and poster presentations of author papers. We invite submissions of papers on all topics related to machine learning and pattern recognition for the main conference proceedings. All papers will be reviewed in a double-blind process and accepted papers will be presented at the conference. It is our pleasure to welcome you to MLPR 2026. Publication ==Conference Proceedings== Accepted papers of MLPR 2026 will be published in IET Conference Proceedings, which will be included in the IET Digital Library and IEEE Xplore and submitted to EI Compendex and Scopus for indexing. Topics (Topics of interest for submission include, but are not limited to:) Track 1: Foundations of Machine Learning - Statistical learning theory and generalization bounds - Optimization methods for deep learning (adaptive optimizers, loss landscapes) - Dimensionality reduction and manifold learning - Graphical models, causal inference, and probabilistic reasoning - Active learning and query strategies - Transfer, multi-task, and meta-learning - Learning from noisy, limited, or imbalanced data - Reinforcement learning theory and bandit algorithms Track 2: Deep Learning &amp; Generative Models - Generative AI (diffusion models, VAEs, GANs, flow-based models) - Large language models and vision-language models - Transformer architectures and attention variants - Self-supervised and foundation model pre-training - Model compression (pruning, quantization, knowledge distillation) - Neural architecture search and automated deep learning - Graph neural networks and geometric deep learning - Representation learning for video, 3D, and multimodal data Track 3: Pattern Recognition &amp; Computer Vision - Feature extraction, selection, and descriptor learning - Object detection, segmentation, and tracking - Face, gesture, and action recognition - Medical image analysis and computational pathology - Remote sensing image analysis and Earth observation - Document analysis and handwriting recognition - Biometric recognition (fingerprint, iris, voice) - 3D shape analysis and point cloud processing Track 4: Responsible &amp; Trustworthy AI - Fairness, accountability, and transparency in ML models - Explainable AI (XAI) and interpretability methods - Robustness against adversarial attacks and out-of-distribution inputs - Privacy-preserving ML (federated learning, differential privacy) - AI safety, value alignment, and ethical frameworks - Uncertainty quantification and reliable predictions - Bias detection and mitigation in datasets and algorithms - Regulatory compliance and auditable AI systems Track 5: Applications of ML &amp; Pattern Recognition - ML for healthcare (diagnosis, drug discovery, genomics) - Intelligent transportation and autonomous driving - Natural language processing and speech recognition - Recommender systems and personalization - Time-series forecasting (finance, energy, IoT) - Robotics and embodied AI - Smart manufacturing and predictive maintenance - Agriculture, environmental monitoring, and climate science Track 6: Reinforcement Learning &amp; Decision Intelligence - Deep reinforcement learning algorithms (DQN, PPO, SAC, TD3) - Multi-agent reinforcement learning and game-theoretic reasoning - Inverse reinforcement learning and imitation learning - Hierarchical reinforcement learning and option frameworks - Offline reinforcement learning and batch RL - Reinforcement learning from human feedback (RLHF) - Sequential decision making under uncertainty (POMDPs, bandits) - Applications of RL in robotics, autonomous driving, recommendation systems, and game AI More Details please click: https://www.mlpr.org/cfp.html Paper Requirement: Papers should be prepared in English and carefully checked for correct grammar. Figures should be of high quality. Your submitted work must be original in the sense that it has never been published nor submitted for publication consideration anywhere. To ensure high scientific quality, all papers will be double-blind reviewed by the Technical Committee Members. * Abstract submission for presentation only without publication. * Full paper submission for both presentation and publication. Full Paper should be no less than 5 full pages. If the paper length exceeds 6 printed pages, including all figures, tables, and references, extra page will be charged 60 USD per page. Submission Method: * Online Submission System: http://confsys.iconf.org/submission/mlpr2026. More Details please click: https://www.mlpr.org/sub.html Conference Program Friday - December 4, 2026 10:00 - 17:00 Sign In and Conference Material Collection 16:00 - 18:00 Committee Conference Saturday - December 5, 2026 9:00 - 12:00 Opening Ceremony and Keynote Speeches 12:00 - 13:30 Lunch 13:30 - 15:30 Invited Speeches and Parallel Oral Sessions 15:30 - 16:30 Poster Sessions 16:30 - 18:30 Invited Speeches and Parallel Oral Sessions 18:30 - 20:30 Dinner Banquet and Award Ceremony Sunday - December 6, 2026 9:00 - 12:00 Invited Speeches and Parallel Oral Sessions 12:00 - 13:30 Lunch 13:30 - 19:00 City Tour Contact us Conference secretary: Miss Tessa Chen Tel: +86-13103333373 Email: mlpr_Conf@outlook.com Office Hour: 9:30--18:00, Monday to Friday (GMT+8 Time Zone)</text:p>
          </table:table-cell>
          <table:table-cell table:number-columns-repeated="1013"/>
        </table:table-row>
        <table:table-row table:style-name="ro1">
          <table:table-cell table:style-name="ce2" office:value-type="string" calcext:value-type="string">
            <text:p>MLSC 2026</text:p>
          </table:table-cell>
          <table:table-cell table:style-name="ce2" office:value-type="string" calcext:value-type="string">
            <text:p>2026 2nd International Symposium on Machine Learning and Social Computing</text:p>
          </table:table-cell>
          <table:table-cell table:style-name="ce2" office:value-type="float" office:value="95" calcext:value-type="float">
            <text:p>95</text:p>
          </table:table-cell>
          <table:table-cell table:style-name="ce2" office:value-type="float" office:value="25" calcext:value-type="float">
            <text:p>25</text:p>
          </table:table-cell>
          <table:table-cell table:style-name="ce3" office:value-type="date" office:date-value="2026-08-20" calcext:value-type="date">
            <text:p>2026-08-20</text:p>
          </table:table-cell>
          <table:table-cell/>
          <table:table-cell table:style-name="ce3" office:value-type="date" office:date-value="2026-10-10" calcext:value-type="date">
            <text:p>2026-10-10</text:p>
          </table:table-cell>
          <table:table-cell table:style-name="ce2" office:value-type="string" calcext:value-type="string">
            <text:p>Bangkok, Thailand</text:p>
          </table:table-cell>
          <table:table-cell table:style-name="ce2" office:value-type="string" calcext:value-type="string">
            <text:p>Oct 26, 2026 - Oct 28, 2026</text:p>
          </table:table-cell>
          <table:table-cell table:style-name="ce4" office:value-type="string" calcext:value-type="string">
            <text:p><text:a xlink:href="https://www.aischolar.com/conference/mlsc2026?invite=wiki" xlink:type="simple">https://www.aischolar.com/conference/mlsc2026?invite=wiki</text:a></text:p>
          </table:table-cell>
          <table:table-cell table:style-name="ce2" office:value-type="string" calcext:value-type="string">
            <text:p>2026 2nd International Symposium on Machine Learning and Social Computing (MLSC 2026), a premier interdisciplinary forum dedicated to advancing the integration of machine learning and social computing research. This event will be held from October 26 to 28, 2026 in Bangkok, Thailand. 𝗖𝗼𝗻𝗳𝗲𝗿𝗲𝗻𝗰𝗲 𝗪𝗲𝗯𝘀𝗶𝘁𝗲:https://www.aischolar.com/conference/mlsc2026?invite=wiki ---𝗖𝗮𝗹𝗹 𝗳𝗼𝗿 𝗽𝗮𝗽𝗲𝗿𝘀--- The topics of interest for submission include, but are not limited to: I. Machine Learning Theory and Methods Supervised, unsupervised, and semi-supervised learning Deep learning and architecture design Reinforcement learning and meta-learning Automated machine learning (AutoML) Graph learning and graph neural networks Federated learning and privacy protection Model interpretability and fairness Causal inference Large-scale optimization algorithms Green AI and sustainable computing II. Social Computing Theory and Methods Social network analysis and evolution Swarm intelligence and multi-agent systems User behavior and emotion computing Social media dissemination and event detection Social attitudes and cultural modeling Online collaboration and crowdsourcing III. Digital Society Digital manufacturing Digital economy Digital management Digital learning Digital communication Digital transportation Digital community Digital governance Digital agriculture and water management Digital healthcare Digital infrastructure IV. Cross-Integration Technologies and Systems Integration of social networks and machine learning Multi-modal data fusion Adaptive social system algorithms Intelligent recommendation and personalized services Fake news detection and intervention Social influence and dissemination prediction Efficient social computing systems V. Intelligent Transportation and Urban Management Intelligent transportation systems Autonomous driving and vehicular networks Urban traffic congestion optimization Intelligent public transportation scheduling AI applications in urban planning Urban risk management and intelligent early warning Data-driven urban governance Urban logistics and distribution optimization VI. Application Practices Smart cities and public services Social analysis in healthcare Intelligent educational learning systems E-commerce user analysis and marketing Financial risk control and fraud detection Ethics, privacy, and fairness Large-scale system deployment ---𝗣𝘂𝗯𝗹𝗶𝗰𝗮𝘁𝗶𝗼𝗻--- All papers, both invited and contributed, will be reviewed by two or three experts from the committees. After a careful reviewing process, all accepted papers of MLSC 2026 will be published in ACM International Conference Proceedings Series, which will be indexed by Ei Compendex, Scopus. All ICPS papers will be published Open Access (OA). ---𝗜𝗺𝗽𝗼𝗿𝘁𝗮𝗻𝘁 𝗗𝗮𝘁𝗲𝘀--- Full Paper Submission Date: August 20, 2026 Notification Date: September 25, 2026 Registration Deadline: October 10, 2026 Final Paper Submission Date: October 10, 2026 Conference Dates: October 26-28, 2026 --- 𝗣𝗮𝗽𝗲𝗿 𝗦𝘂𝗯𝗺𝗶𝘀𝘀𝗶𝗼𝗻--- Please send the full paper(word+pdf) to Submission System: https://www.aischolar.com/conference/mlsc2026/submission?invite=wiki</text:p>
          </table:table-cell>
          <table:table-cell table:number-columns-repeated="1013"/>
        </table:table-row>
        <table:table-row table:style-name="ro1">
          <table:table-cell table:style-name="ce2" office:value-type="string" calcext:value-type="string">
            <text:p>ICDM Demos 2026</text:p>
          </table:table-cell>
          <table:table-cell table:style-name="ce2" office:value-type="string" calcext:value-type="string">
            <text:p>IEEE International Conference on Data Mining — Demo Track 2026</text:p>
          </table:table-cell>
          <table:table-cell table:style-name="ce2" office:value-type="float" office:value="88" calcext:value-type="float">
            <text:p>88</text:p>
          </table:table-cell>
          <table:table-cell table:style-name="ce2" office:value-type="float" office:value="25" calcext:value-type="float">
            <text:p>25</text:p>
          </table:table-cell>
          <table:table-cell table:style-name="ce3" office:value-type="date" office:date-value="2026-08-20" calcext:value-type="date">
            <text:p>2026-08-20</text:p>
          </table:table-cell>
          <table:table-cell table:style-name="ce3" office:value-type="date" office:date-value="2026-09-18" calcext:value-type="date">
            <text:p>2026-09-18</text:p>
          </table:table-cell>
          <table:table-cell/>
          <table:table-cell table:style-name="ce2" office:value-type="string" calcext:value-type="string">
            <text:p>Shenyang, China</text:p>
          </table:table-cell>
          <table:table-cell table:style-name="ce2" office:value-type="string" calcext:value-type="string">
            <text:p>Nov 12, 2026 - Nov 15, 2026</text:p>
          </table:table-cell>
          <table:table-cell table:style-name="ce4" office:value-type="string" calcext:value-type="string">
            <text:p><text:a xlink:href="http://icdm2026.neu.edu.cn/11669/list.htm" xlink:type="simple">http://icdm2026.neu.edu.cn/11669/list.htm</text:a></text:p>
          </table:table-cell>
          <table:table-cell table:style-name="ce2" office:value-type="string" calcext:value-type="string">
            <text:p>Website: http://icdm2026.neu.edu.cn/11669/list.htm Submission: https://wi-lab.com/cyberchair/2026/icdm26/scripts/ws_submit.php?subarea=S SCOPE The Demo Track provides a platform for researchers and practitioners to showcase innovative and practical systems. Demos must be based on fully implemented and tested systems. Submitted demos should align with the relevant topics of ICDM, including but not limited to data mining techniques, data management, and practical applications of data science. IMPORTANT DATES (all AoE, end of day) - Demo paper submission: August 20, 2026 - Notification to authors: September 18, 2026 SUBMISSION GUIDELINES - Single PDF up to 4 pages including references, in IEEE 2-column format. - Submissions are NOT anonymous — list names and affiliations. - Single-blind peer review by the Demo Committee. - Links to external material (code repositories, videos) encouraged. - Include a section on ethical use of data / informed consent where applicable (IEEE policies on research involving human participants). PUBLICATION &amp; PRESENTATION - Accepted demo papers will be published in the ICDM 2026 Workshop Proceedings, indexed by EI. - Optional brief pre-recorded video will appear on IEEE Xplore alongside the PDF. - At least one author must register at the AUTHOR rate (full Member/Non-Member) by the camera-ready deadline. Student registration does NOT satisfy this requirement. - Demos must be presented in person; on-site poster required. - Best Demo Paper Award will be given at the ICDM 2026 Awarding Ceremony. DEMO CO-CHAIRS - Xiangnan He, University of Science and Technology of China (hexn@ustc.edu.cn) - Gustavo Batista, University of New South Wales (gbatista@cse.unsw.edu.au)</text:p>
          </table:table-cell>
          <table:table-cell table:number-columns-repeated="1013"/>
        </table:table-row>
        <table:table-row table:style-name="ro1">
          <table:table-cell table:style-name="ce2" office:value-type="string" calcext:value-type="string">
            <text:p>ICDM 2026 Workshop-LLMTenA 2026</text:p>
          </table:table-cell>
          <table:table-cell table:style-name="ce2" office:value-type="string" calcext:value-type="string">
            <text:p>IEEE International Conference on Data Mining Workshop-LLM for Tensor Analysis &amp; Tensor for LLM Advancement</text:p>
          </table:table-cell>
          <table:table-cell table:style-name="ce2" office:value-type="float" office:value="28" calcext:value-type="float">
            <text:p>28</text:p>
          </table:table-cell>
          <table:table-cell table:style-name="ce2" office:value-type="float" office:value="25" calcext:value-type="float">
            <text:p>25</text:p>
          </table:table-cell>
          <table:table-cell table:style-name="ce3" office:value-type="date" office:date-value="2026-08-20" calcext:value-type="date">
            <text:p>2026-08-20</text:p>
          </table:table-cell>
          <table:table-cell table:style-name="ce3" office:value-type="date" office:date-value="2026-09-18" calcext:value-type="date">
            <text:p>2026-09-18</text:p>
          </table:table-cell>
          <table:table-cell table:style-name="ce3" office:value-type="date" office:date-value="2026-10-18" calcext:value-type="date">
            <text:p>2026-10-18</text:p>
          </table:table-cell>
          <table:table-cell table:style-name="ce2" office:value-type="string" calcext:value-type="string">
            <text:p>Shenyang, China</text:p>
          </table:table-cell>
          <table:table-cell table:style-name="ce2" office:value-type="string" calcext:value-type="string">
            <text:p>Nov 12, 2026 - Nov 15, 2026</text:p>
          </table:table-cell>
          <table:table-cell table:style-name="ce4" office:value-type="string" calcext:value-type="string">
            <text:p><text:a xlink:href="https://researchyes.github.io/ICDM2026-Workshop-LLMTenA" xlink:type="simple">https://researchyes.github.io/ICDM2026-Workshop-LLMTenA</text:a></text:p>
          </table:table-cell>
          <table:table-cell table:style-name="ce2" office:value-type="string" calcext:value-type="string">
            <text:p>ICDM 2026 Workshop---LLM for Tensor Analysis &amp; Tensor for LLM Advancement (LLMTenA 2026) Call for Papers: LLMTenA 2026 focuses on the emerging synergy between Large Language Models (LLMs) and tensor analysis. The central theme is a bidirectional research exchange: 1. LLM → Tensor: using LLMs to advance tensor-based data analysis, and 2. Tensor → LLM: using tensor methods to improve efficiency, interpretability, robustness, and scalability of LLMs. We invite original submissions on topics including, but not limited to: * Tensor-based compression and acceleration of LLMs * LLM-enhanced tensor decomposition, denoising, and completion * Multi-modal data fusion using tensors and LLMs * Interpretability, explainability, and reliability of LLMs via tensor methods * Tensor networks for efficient fine-tuning and prompt engineering * Knowledge graph embedding and reasoning with tensors and LLMs * Applications in recommendation systems, tabular data analysis, neuroscience, spatio-temporal data, and multi-agent systems For more information, please visit https://researchyes.github.io/ICDM2026-Workshop-LLMTenA</text:p>
          </table:table-cell>
          <table:table-cell table:number-columns-repeated="1013"/>
        </table:table-row>
        <table:table-row table:style-name="ro1">
          <table:table-cell table:style-name="ce2" office:value-type="string" calcext:value-type="string">
            <text:p>IEEE AIICRTA 2026</text:p>
          </table:table-cell>
          <table:table-cell table:style-name="ce2" office:value-type="string" calcext:value-type="string">
            <text:p>IEEE International Conference on AI Innovations, Cyber Resilience and Transformative Applications</text:p>
          </table:table-cell>
          <table:table-cell table:style-name="ce2" office:value-type="float" office:value="88" calcext:value-type="float">
            <text:p>88</text:p>
          </table:table-cell>
          <table:table-cell table:style-name="ce2" office:value-type="float" office:value="25" calcext:value-type="float">
            <text:p>25</text:p>
          </table:table-cell>
          <table:table-cell table:style-name="ce3" office:value-type="date" office:date-value="2026-08-20" calcext:value-type="date">
            <text:p>2026-08-20</text:p>
          </table:table-cell>
          <table:table-cell table:style-name="ce3" office:value-type="date" office:date-value="2026-10-20" calcext:value-type="date">
            <text:p>2026-10-20</text:p>
          </table:table-cell>
          <table:table-cell table:style-name="ce3" office:value-type="date" office:date-value="2026-11-20" calcext:value-type="date">
            <text:p>2026-11-20</text:p>
          </table:table-cell>
          <table:table-cell table:style-name="ce2" office:value-type="string" calcext:value-type="string">
            <text:p>Tunisia</text:p>
          </table:table-cell>
          <table:table-cell table:style-name="ce2" office:value-type="string" calcext:value-type="string">
            <text:p>Dec 22, 2026 - Dec 23, 2026</text:p>
          </table:table-cell>
          <table:table-cell table:style-name="ce4" office:value-type="string" calcext:value-type="string">
            <text:p><text:a xlink:href="https://aiicrta.ntu.edu.iq/" xlink:type="simple">https://aiicrta.ntu.edu.iq/</text:a></text:p>
          </table:table-cell>
          <table:table-cell table:style-name="ce2" office:value-type="string" calcext:value-type="string">
            <text:p>The First IEEE International Conference on AI Innovations, Cyber Resilience and Transformative Applications is a leading global forum bringing together researchers, practitioners, industry experts, and policymakers to discuss cutting-edge advancements in Artificial Intelligence and the evolving landscape of cyber resilience. This pioneering event provides a multidisciplinary platform to explore how AI technologies can transform industries while ensuring robust protection against emerging digital threats. The conference encourages cross-disciplinary collaboration, stimulates knowledge exchange, and promotes innovative solutions that address real-world challenges across security, healthcare, business, engineering, social sciences, and smart systems. Topics of Interest: AI Models, Algorithms, and Optimization AI in Security &amp; Cyber Defense AI in Medical Applications AI for Smart Cities, Industry, and IoT Systems AI in Education and Society AI for Business Analytics and Financial Technologies Cyber Resilience, Privacy, and Digital Trust</text:p>
          </table:table-cell>
          <table:table-cell table:number-columns-repeated="1013"/>
        </table:table-row>
        <table:table-row table:style-name="ro1">
          <table:table-cell table:style-name="ce2" office:value-type="string" calcext:value-type="string">
            <text:p>AIMLM 2026</text:p>
          </table:table-cell>
          <table:table-cell table:style-name="ce2" office:value-type="string" calcext:value-type="string">
            <text:p>2026 International Conference on Artificial Intelligence, Machine Learning and Multimodality</text:p>
          </table:table-cell>
          <table:table-cell table:style-name="ce2" office:value-type="float" office:value="80" calcext:value-type="float">
            <text:p>80</text:p>
          </table:table-cell>
          <table:table-cell table:style-name="ce2" office:value-type="float" office:value="30" calcext:value-type="float">
            <text:p>30</text:p>
          </table:table-cell>
          <table:table-cell table:style-name="ce3" office:value-type="date" office:date-value="2026-08-30" calcext:value-type="date">
            <text:p>2026-08-30</text:p>
          </table:table-cell>
          <table:table-cell/>
          <table:table-cell table:style-name="ce3" office:value-type="date" office:date-value="2026-10-15" calcext:value-type="date">
            <text:p>2026-10-15</text:p>
          </table:table-cell>
          <table:table-cell table:style-name="ce2" office:value-type="string" calcext:value-type="string">
            <text:p>Hengyang, China</text:p>
          </table:table-cell>
          <table:table-cell table:style-name="ce2" office:value-type="string" calcext:value-type="string">
            <text:p>Oct 30, 2026 - Nov 1, 2026</text:p>
          </table:table-cell>
          <table:table-cell table:style-name="ce4" office:value-type="string" calcext:value-type="string">
            <text:p><text:a xlink:href="https://ais.cn/u/IfQfe2" xlink:type="simple">https://ais.cn/u/IfQfe2</text:a></text:p>
          </table:table-cell>
          <table:table-cell table:style-name="ce2" office:value-type="string" calcext:value-type="string">
            <text:p>2026 International Conference on Artificial Intelligence, Machine Learning and Multimodality (AIMLM 2026) will be held in Hengyang, China, from October 30 to November 1, 2026. 𝗖𝗼𝗻𝗳𝗲𝗿𝗲𝗻𝗰𝗲 𝗪𝗲𝗯𝘀𝗶𝘁𝗲: https://ais.cn/u/IfQfe2 ---𝗖𝗮𝗹𝗹 𝗙𝗼𝗿 𝗣𝗮𝗽𝗲𝗿𝘀--- The topics of interest for submission include, but are not limited to: ◕The foundation of multimodal artificial intelligence Multimodal artificial intelligence theory Multimodal knowledge representation and reasoning Cross-modal relationship modeling Multi-modal data modeling method Multimodal feature learning Multimodal optimization method Multimodal intelligent computing Hybrid modal learning method Multimodal learning framework ◕Multimodal Language and Speech Processing Multimodal Natural Language Processing Visual-Lingual Comprehension Multimodal Text Analysis Multimodal machine translation Multimodal sentiment analysis Speech and vision fusion Multimodal Dialogue System Multimodal large model Multimodal Language Resources and Evaluation ◕Multimodal machine learning method Multimodal supervised learning Multimodal unsupervised learning Multimodal Reinforcement Learning Multimodal deep learning Cross-modal transfer learning Multimodal federal learning Multimodal model optimization Multimodal learning evaluation method Multimodal learning theory ◕Multimodal Data Fusion and Understanding Multimodal data processing Multimodal information fusion Cross-modal retrieval Multimodal representation learning Visual-linguistic fusion Audio and video fusion analysis Multimodal semantic understanding Multimodal data sets and evaluation Multimodal content understanding ◕ Multimodal Perception and Visual Computing Multimodal visual perception Image and video multimodal analysis Multi-modal target detection and recognition Multimodal scene understanding Multimodal 3D vision Multi-modal biometric identification Multimodal Behavior Analysis Multimodal pattern recognition Multimodal visual understanding ◕ Multimodal Intelligent Systems and Applications Multimodal Artificial Intelligence Applications Multimodal human-computer interaction Multimodal intelligent system The Application of Multimodality in Medical Treatment The Application of Multimodality in Finance and Commerce Multimodal Smart City Multimodal Robots and Automation Multimodal edge intelligence Multimodal credibility and ethical issues ---𝗣𝘂𝗯𝗹𝗶𝗰𝗮𝘁𝗶𝗼𝗻--- All papers,both invited and contributed, the accepted papers, will be published for inclusion into Conference proceedings with meeting scope and quality requirements, and also submitted to EI Compendex and Scopus for indexing. All conference proceedings paper can not be less than 4 pages. ---𝗜𝗺𝗽𝗼𝗿𝘁𝗮𝗻𝘁 𝗗𝗮𝘁𝗲𝘀--- Full Paper Submission Date: August 30, 2026 Notification of Acceptance: September 30, 2026 Registration Deadline: October 15, 2026 Final Paper Submission Date: October 15, 2026 Conference Dates: October 30 - November 1, 2026 --- 𝗣𝗮𝗽𝗲𝗿 𝗦𝘂𝗯𝗺𝗶𝘀𝘀𝗶𝗼𝗻--- Please send the abstract or full paper(word+pdf) to Submission System: https://ais.cn/u/IfQfe2</text:p>
          </table:table-cell>
          <table:table-cell table:number-columns-repeated="1013"/>
        </table:table-row>
        <table:table-row table:style-name="ro1">
          <table:table-cell table:style-name="ce2" office:value-type="string" calcext:value-type="string">
            <text:p>ICSISCET 2026</text:p>
          </table:table-cell>
          <table:table-cell table:style-name="ce2" office:value-type="string" calcext:value-type="string">
            <text:p>8th International Conference on Sustainable and Innovative Solutions for Current Challenges in Engineering &amp; Technology</text:p>
          </table:table-cell>
          <table:table-cell table:style-name="ce2" office:value-type="float" office:value="78" calcext:value-type="float">
            <text:p>78</text:p>
          </table:table-cell>
          <table:table-cell table:style-name="ce2" office:value-type="float" office:value="30" calcext:value-type="float">
            <text:p>30</text:p>
          </table:table-cell>
          <table:table-cell table:style-name="ce3" office:value-type="date" office:date-value="2026-08-30" calcext:value-type="date">
            <text:p>2026-08-30</text:p>
          </table:table-cell>
          <table:table-cell table:style-name="ce3" office:value-type="date" office:date-value="2026-09-30" calcext:value-type="date">
            <text:p>2026-09-30</text:p>
          </table:table-cell>
          <table:table-cell table:style-name="ce3" office:value-type="date" office:date-value="2026-10-15" calcext:value-type="date">
            <text:p>2026-10-15</text:p>
          </table:table-cell>
          <table:table-cell table:style-name="ce2" office:value-type="string" calcext:value-type="string">
            <text:p>Gwalior, India</text:p>
          </table:table-cell>
          <table:table-cell table:style-name="ce2" office:value-type="string" calcext:value-type="string">
            <text:p>Oct 30, 2026 - Oct 31, 2026</text:p>
          </table:table-cell>
          <table:table-cell table:style-name="ce4" office:value-type="string" calcext:value-type="string">
            <text:p><text:a xlink:href="https://scrs.in/conference/icsiscet2026" xlink:type="simple">https://scrs.in/conference/icsiscet2026</text:a></text:p>
          </table:table-cell>
          <table:table-cell table:style-name="ce2" office:value-type="string" calcext:value-type="string">
            <text:p>Madhav Institute of Technology &amp; Science (MITS), Gwalior, India is organizing the 8th International Conference on Sustainable and Innovative Solutions for Current Challenges in Engineering &amp; Technology (ICSISCET 2026) Online and in-person during October 30-31, 2026. The conference is technically sponsored by the Soft Computing Research Society (SCRS). Accepted papers will be published in the SCOPUS Indexed Springer Book Series, ‘Lecture Notes in Electrical Engineering'. All submissions need to be submitted through the CMT using the link : https://cmt3.research.microsoft.com/ICSISCET2026</text:p>
          </table:table-cell>
          <table:table-cell table:number-columns-repeated="1013"/>
        </table:table-row>
        <table:table-row table:style-name="ro1">
          <table:table-cell table:style-name="ce2" office:value-type="string" calcext:value-type="string">
            <text:p>RiTA 2026</text:p>
          </table:table-cell>
          <table:table-cell table:style-name="ce2" office:value-type="string" calcext:value-type="string">
            <text:p>14th International Conference on Robot Intelligence Technology and Applications</text:p>
          </table:table-cell>
          <table:table-cell table:style-name="ce2" office:value-type="float" office:value="40" calcext:value-type="float">
            <text:p>40</text:p>
          </table:table-cell>
          <table:table-cell table:style-name="ce2" office:value-type="float" office:value="28" calcext:value-type="float">
            <text:p>28</text:p>
          </table:table-cell>
          <table:table-cell table:style-name="ce3" office:value-type="date" office:date-value="2026-08-31" calcext:value-type="date">
            <text:p>2026-08-31</text:p>
          </table:table-cell>
          <table:table-cell table:number-columns-repeated="2" table:style-name="ce3" office:value-type="date" office:date-value="2026-10-15" calcext:value-type="date">
            <text:p>2026-10-15</text:p>
          </table:table-cell>
          <table:table-cell table:style-name="ce2" office:value-type="string" calcext:value-type="string">
            <text:p>Daejeon, Republic of Korea</text:p>
          </table:table-cell>
          <table:table-cell table:style-name="ce2" office:value-type="string" calcext:value-type="string">
            <text:p>Dec 2, 2026 - Dec 4, 2026</text:p>
          </table:table-cell>
          <table:table-cell table:style-name="ce4" office:value-type="string" calcext:value-type="string">
            <text:p><text:a xlink:href="https://icrita.org/" xlink:type="simple">https://icrita.org/</text:a></text:p>
          </table:table-cell>
          <table:table-cell table:style-name="ce2" office:value-type="string" calcext:value-type="string">
            <text:p>The 14th International Conference on Robot Intelligence Technology and Applications (RiTA 2026) will be held at the National Science Museum in Daejeon, South Korea, from December 2nd to 4th, 2026. This conference is to foster community solidarity among roboticists—even though the RiTA conference series was originally initiated by KAIST in 2012. • AI &amp; ML &amp; Deep RL • Language Models for Robotics • Dynamics &amp; Control • Multi-Robot Systems • Navigation, Perception &amp; SLAM • Safe Decision Making under Uncertainty • Risk-Aware Autonomy • Human Robot Interaction • Advances in Sensor Technology • Robot Manipulation • Formal Verification in Robotics • Mechatronic systems • Healthcare &amp; Assistive Robotics • Aerial &amp; Field Robotics</text:p>
          </table:table-cell>
          <table:table-cell table:number-columns-repeated="1013"/>
        </table:table-row>
        <table:table-row table:style-name="ro1">
          <table:table-cell table:style-name="ce2" office:value-type="string" calcext:value-type="string">
            <text:p>COMPLEX NETWORKS 2026</text:p>
          </table:table-cell>
          <table:table-cell table:style-name="ce2" office:value-type="string" calcext:value-type="string">
            <text:p>15th International Conference on Complex Networks &amp; Their Applications</text:p>
          </table:table-cell>
          <table:table-cell table:style-name="ce2" office:value-type="float" office:value="30" calcext:value-type="float">
            <text:p>30</text:p>
          </table:table-cell>
          <table:table-cell table:style-name="ce2" office:value-type="float" office:value="25" calcext:value-type="float">
            <text:p>25</text:p>
          </table:table-cell>
          <table:table-cell table:style-name="ce3" office:value-type="date" office:date-value="2026-09-02" calcext:value-type="date">
            <text:p>2026-09-02</text:p>
          </table:table-cell>
          <table:table-cell table:style-name="ce3" office:value-type="date" office:date-value="2026-10-01" calcext:value-type="date">
            <text:p>2026-10-01</text:p>
          </table:table-cell>
          <table:table-cell table:style-name="ce3" office:value-type="date" office:date-value="2026-10-08" calcext:value-type="date">
            <text:p>2026-10-08</text:p>
          </table:table-cell>
          <table:table-cell table:style-name="ce2" office:value-type="string" calcext:value-type="string">
            <text:p>Granada</text:p>
          </table:table-cell>
          <table:table-cell table:style-name="ce2" office:value-type="string" calcext:value-type="string">
            <text:p>Dec 2, 2026 - Dec 4, 2026</text:p>
          </table:table-cell>
          <table:table-cell table:style-name="ce4" office:value-type="string" calcext:value-type="string">
            <text:p><text:a xlink:href="https://complexnetworks.org/" xlink:type="simple">https://complexnetworks.org/</text:a></text:p>
          </table:table-cell>
          <table:table-cell table:style-name="ce2" office:value-type="string" calcext:value-type="string">
            <text:p>The 15th International Conference on Complex Networks and Their Applications (COMPLEX NETWORKS 2026) will be held in Granada, Spain, on December 2–4, 2026 (tutorials on December 1). COMPLEX NETWORKS is a leading international conference in network science, graph learning, complex systems, and computational social science. The conference brings together researchers and practitioners working on the analysis, modeling, and applications of complex networks across disciplines. Topics Network structure and dynamics Multilayer, temporal, and spatial networks Graph-based learning and link prediction Information diffusion and opinion dynamics Network neuroscience and epidemiology Smart cities, infrastructure, and mobility networks Machine learning for network analysis Social and information networks Publication Full papers will be published in Springer LNCS proceedings. Extended abstracts will be included in a Book of Abstracts. Selected papers will be invited to submit extended versions to journal special issues. Keynote Speakers Alexandra Brintrup (University of Cambridge, UK) Nitesh Chawla (University of Notre Dame, USA) Kimmo Kaski (Aalto University, Finland) Bruno Lepri (Bruno Kessler Foundation, Italy) Eckehard Schöll (TU Berlin, Germany) Tutorial Speakers Fariba Karimi (TU Graz, Austria) Huijuan Wang (TU delft) Submission https://cmt3.research.microsoft.com/COMPLEXNETWORKS2026/ Website https://complexnetworks.org/ Contact hocine.cherifi@gmail.com</text:p>
          </table:table-cell>
          <table:table-cell table:number-columns-repeated="1013"/>
        </table:table-row>
        <table:table-row table:style-name="ro1">
          <table:table-cell table:style-name="ce2" office:value-type="string" calcext:value-type="string">
            <text:p>ICPM 2027</text:p>
          </table:table-cell>
          <table:table-cell table:style-name="ce2" office:value-type="string" calcext:value-type="string">
            <text:p>8th International Conference on Process Mining</text:p>
          </table:table-cell>
          <table:table-cell table:style-name="ce2" office:value-type="float" office:value="15" calcext:value-type="float">
            <text:p>15</text:p>
          </table:table-cell>
          <table:table-cell table:style-name="ce2" office:value-type="float" office:value="25" calcext:value-type="float">
            <text:p>25</text:p>
          </table:table-cell>
          <table:table-cell table:style-name="ce3" office:value-type="date" office:date-value="2026-09-11" calcext:value-type="date">
            <text:p>2026-09-11</text:p>
          </table:table-cell>
          <table:table-cell table:style-name="ce3" office:value-type="date" office:date-value="2026-11-04" calcext:value-type="date">
            <text:p>2026-11-04</text:p>
          </table:table-cell>
          <table:table-cell table:style-name="ce3" office:value-type="date" office:date-value="2026-11-25" calcext:value-type="date">
            <text:p>2026-11-25</text:p>
          </table:table-cell>
          <table:table-cell table:style-name="ce2" office:value-type="string" calcext:value-type="string">
            <text:p>Rende, Italy</text:p>
          </table:table-cell>
          <table:table-cell table:style-name="ce2" office:value-type="string" calcext:value-type="string">
            <text:p>Feb 8, 2027 - Feb 12, 2027</text:p>
          </table:table-cell>
          <table:table-cell table:style-name="ce4" office:value-type="string" calcext:value-type="string">
            <text:p><text:a xlink:href="https://icpmconference.org/2027/research-papers/" xlink:type="simple">https://icpmconference.org/2027/research-papers/</text:a></text:p>
          </table:table-cell>
          <table:table-cell table:style-name="ce2" office:value-type="string" calcext:value-type="string">
            <text:p>The International Conference on Process Mining (ICPM) is the premier international venue for researchers and professionals working in the field of process mining. ICPM promotes the exchange of ideas and expertise through scientific presentations, interactive industry sessions, live challenges, practical tutorials, and expert-led panels. ICPM 2027 welcomes rigorous contributions spanning both technical and empirical process mining research, aiming to advance the state of the art and expand existing knowledge in the field. Submissions should explicitly articulate their original contributions and novelty and provide an evaluation appropriate to their contribution. Topics of interest include, but are not limited to: Event log building and preprocessing Process discovery Conformance checking Performance analysis Comparative process mining Predictive and prescriptive process monitoring Action-oriented process mining Formal foundations of process mining Conceptual models related to process mining Process mining visualizations Case studies and applications Experiments involving process mining methods and techniques Human-in-the-loop studies Survey- and interview-based studies ICPM 2027 welcomes two types of contributions: Regular Research Papers Regular research papers should present completed research with clearly outlined technical or empirical contributions. Accepted regular research papers will be presented in the main track of the conference and published open access in the ACM International Conference Proceedings Series (ICPS). Length: Maximum of 13 pages including references and appendices, single column. Posters Poster submissions provide a platform for presenting new ideas or ongoing, promising work that has not been published before. Poster papers will be reviewed but not included in the proceedings. Length: 3 to 6 pages, single column. IMPORTANT DATES Abstract submission: September 4, 2026 (AoE), mandatory Paper submission: September 11, 2026 (AoE) Notification to authors: November 4, 2026 Camera-ready submission: November 25, 2026 Conference: February 8-12, 2027 VENUE University of Calabria Rende, Italy PROGRAM COMMITTEE CHAIRS Niels Martin, Hasselt University Marcos Sepúlveda, Pontificia Universidad Católica de Chile Francesca Zerbato, Eindhoven University of Technology SUBMISSION Submissions should be made through the ICPM 2027 submission system: https://easychair.org/conferences/?conf=icpm2027 More information: https://icpmconference.org/2027/research-papers/ Contact: icpm2027-main@easychair.org</text:p>
          </table:table-cell>
          <table:table-cell table:number-columns-repeated="1013"/>
        </table:table-row>
        <table:table-row table:style-name="ro1">
          <table:table-cell table:style-name="ce2" office:value-type="string" calcext:value-type="string">
            <text:p>DaSET 2026</text:p>
          </table:table-cell>
          <table:table-cell table:style-name="ce2" office:value-type="string" calcext:value-type="string">
            <text:p>The 5th International Conference on Data Science and Emerging Technologies 2026</text:p>
          </table:table-cell>
          <table:table-cell table:style-name="ce2" office:value-type="float" office:value="78" calcext:value-type="float">
            <text:p>78</text:p>
          </table:table-cell>
          <table:table-cell table:style-name="ce2" office:value-type="float" office:value="28" calcext:value-type="float">
            <text:p>28</text:p>
          </table:table-cell>
          <table:table-cell table:style-name="ce3" office:value-type="date" office:date-value="2026-09-13" calcext:value-type="date">
            <text:p>2026-09-13</text:p>
          </table:table-cell>
          <table:table-cell table:style-name="ce3" office:value-type="date" office:date-value="2026-11-13" calcext:value-type="date">
            <text:p>2026-11-13</text:p>
          </table:table-cell>
          <table:table-cell table:style-name="ce3" office:value-type="date" office:date-value="2026-11-27" calcext:value-type="date">
            <text:p>2026-11-27</text:p>
          </table:table-cell>
          <table:table-cell table:style-name="ce2" office:value-type="string" calcext:value-type="string">
            <text:p>Selangor, Malaysia</text:p>
          </table:table-cell>
          <table:table-cell table:style-name="ce2" office:value-type="string" calcext:value-type="string">
            <text:p>Dec 16, 2026 - Dec 17, 2026</text:p>
          </table:table-cell>
          <table:table-cell table:style-name="ce4" office:value-type="string" calcext:value-type="string">
            <text:p><text:a xlink:href="https://daset.org/daset2026/" xlink:type="simple">https://daset.org/daset2026/</text:a></text:p>
          </table:table-cell>
          <table:table-cell table:style-name="ce2" office:value-type="string" calcext:value-type="string">
            <text:p>Call for Papers: Agents, Accountability &amp; Action: Governing the Next Era of Intelligence The fusion of Data Science and emerging technologies continues to reshape business operations, the workforce, and the broader landscape of economic and societal progress. As we transition from the initial wave of agentic systems into widespread deployment, the demand for sophisticated data science skills and the innovative application of enabling technologies like cloud computing, Blockchain, big data analytics, IoT, and 6G networks remains paramount for driving digital transformation towards a human-centric, reliable, and sustainable future. This year, --DaSET 2026-- focuses on the critical nexus of --Agents, Accountability &amp; Action: Governing the Next Era of Intelligence--. As Artificial Intelligence (AI) and frontier technologies evolve into highly autonomous agents capable of independent decision-making, the conversations must shift from what these technologies -can- do, to how they are -governed, monitored, and held accountable-. This conference aims to attract leading industry and academic researchers actively exploring the theoretical underpinnings, data architectures, and practical applications of data science required to build trustworthy, actionable, and responsible intelligent systems. --DaSET 2026-- invites paper submissions that address cutting-edge topics related to Data Science and Emerging Technologies, with a particular emphasis on the frameworks, methodologies, and applications of autonomous intelligence under responsible governance. We aim to provide a vibrant platform for experts and researchers to discuss the latest advancements, mitigate risks, and chart new directions for future research aligned with the Sustainable Development Goals for sustainable economic, social, and environmental progress. Authors are invited to contribute to the conference by submitting articles in the following (or any other relevant) areas: - Foundational Data Science - Machine Learning and AI Architecture - Data Science Applications - Emerging Trends in Data Science - Big Data Technologies &amp; Advanced Data Pipelines - Data Mining &amp; Visualization - Optimization Algorithms - Statistical Learning - Granular Computing and Fuzzy Systems - Computer Vision &amp; Natural Language Processing - Foundations of Agentic AI &amp; Multi-Agent Systems - Data-Driven Autonomous Systems &amp; Decision Engines - Machine Learning for Autonomous Agents - Applications of Autonomous Intelligence in Industry - Human-Agent Interaction &amp; Collaborative Intelligence - Frameworks for Algorithmic Accountability and Auditability - Trust, Security, and Ethics in Autonomous Systems - Explainable and Interpretable Autonomous Intelligence (XAI) - Bias Mitigation, Fairness, and Data Sovereignty - Legal, Regulatory, and Policy Implications of Autonomous Action - The Impact of Autonomous Action on Society and the Workforce - Edge AI and Distributed Autonomous Systems - Blockchain Technology &amp; Decentralized Governance - Cybersecurity &amp; Cryptography - Smart Manufacturing, Industry 4.0, and Envisioning Industry 5.0 - Digital Health and Biomedical Informatics - Green AI, Sustainable Computing, and Environmental Informatics</text:p>
          </table:table-cell>
          <table:table-cell table:number-columns-repeated="1013"/>
        </table:table-row>
        <table:table-row table:style-name="ro1">
          <table:table-cell table:style-name="ce2" office:value-type="string" calcext:value-type="string">
            <text:p>ICPRAM 2027</text:p>
          </table:table-cell>
          <table:table-cell table:style-name="ce2" office:value-type="string" calcext:value-type="string">
            <text:p>16th International Conference on Pattern Recognition Applications and Methods</text:p>
          </table:table-cell>
          <table:table-cell table:style-name="ce2" office:value-type="float" office:value="40" calcext:value-type="float">
            <text:p>40</text:p>
          </table:table-cell>
          <table:table-cell table:style-name="ce2" office:value-type="float" office:value="30" calcext:value-type="float">
            <text:p>30</text:p>
          </table:table-cell>
          <table:table-cell table:style-name="ce3" office:value-type="date" office:date-value="2026-09-15" calcext:value-type="date">
            <text:p>2026-09-15</text:p>
          </table:table-cell>
          <table:table-cell table:style-name="ce3" office:value-type="date" office:date-value="2026-11-13" calcext:value-type="date">
            <text:p>2026-11-13</text:p>
          </table:table-cell>
          <table:table-cell table:style-name="ce3" office:value-type="date" office:date-value="2026-11-27" calcext:value-type="date">
            <text:p>2026-11-27</text:p>
          </table:table-cell>
          <table:table-cell table:style-name="ce2" office:value-type="string" calcext:value-type="string">
            <text:p>Valletta, Malta</text:p>
          </table:table-cell>
          <table:table-cell table:style-name="ce2" office:value-type="string" calcext:value-type="string">
            <text:p>Feb 20, 2027 - Feb 22, 2027</text:p>
          </table:table-cell>
          <table:table-cell table:style-name="ce4" office:value-type="string" calcext:value-type="string">
            <text:p><text:a xlink:href="https://icpram.scitevents.org/" xlink:type="simple">https://icpram.scitevents.org/</text:a></text:p>
          </table:table-cell>
          <table:table-cell table:style-name="ce2" office:value-type="string" calcext:value-type="string">
            <text:p>CALL FOR PAPERS 16th International Conference on Pattern Recognition Applications and Methods (ICPRAM) Submission Deadline: September 15, 2026 In Cooperation with: ACM Special Interest Group on Artificial Intelligence International Neural Network Society Proceedings will be submitted for evaluation for indexation by: SCOPUS Google Scholar The DBLP Computer Science Bibliography Semantic Scholar Engineering Index Web of Science / Conference Proceedings Citation Index The event will be of hybrid nature, in the sense that online presentations of accepted papers will be possible for those authors that are unable to travel to the venue. https://icpram.scitevents.org/ February 20 - 22, 2027 Valletta, Malta --------- Scope: The International Conference on Pattern Recognition Applications and Methods is a major point of contact between researchers, engineers and practitioners working on Pattern Recognition and Machine Learning, both from theoretical and application perspectives. The conference includes contributions involving applications of Pattern Recognition techniques to real-world problems, interdisciplinary research, experimental and/or theoretical studies yielding new insights that advance Pattern Recognition methods. ICPRAM is organized in 2 major tracks: Theory and Methods Applications Conference Chair(s) Maria De Marsico, Sapienza Università di Roma, Italy Ana Fred, Instituto de Telecomunicações and Instituto Superior Técnico (University of Lisbon), Portugal Program Chair(s) Modesto Castrillon-Santana, Universidad de Las Palmas de Gran Canaria, Spain Daniel Riccio, University of Naples, Federico II, Italy Program Committee https://icpram.scitevents.org//ProgramCommittee.aspx ICPRAM Secretariat icpram.secretariat@insticc.org Address: Avenida de S. Francisco Xavier, Lote 7 Cv. C, Setubal 2900-616, Portugal Tel:+351 265 520 185 Web: https://icpram.scitevents.org/</text:p>
          </table:table-cell>
          <table:table-cell table:number-columns-repeated="1013"/>
        </table:table-row>
        <table:table-row table:style-name="ro1">
          <table:table-cell table:style-name="ce2" office:value-type="string" calcext:value-type="string">
            <text:p>VISAPP 2027</text:p>
          </table:table-cell>
          <table:table-cell table:style-name="ce2" office:value-type="string" calcext:value-type="string">
            <text:p>22nd International Conference on Computer Vision Theory and Applications</text:p>
          </table:table-cell>
          <table:table-cell table:style-name="ce2" office:value-type="float" office:value="25" calcext:value-type="float">
            <text:p>25</text:p>
          </table:table-cell>
          <table:table-cell table:style-name="ce2" office:value-type="float" office:value="28" calcext:value-type="float">
            <text:p>28</text:p>
          </table:table-cell>
          <table:table-cell table:style-name="ce3" office:value-type="date" office:date-value="2026-09-15" calcext:value-type="date">
            <text:p>2026-09-15</text:p>
          </table:table-cell>
          <table:table-cell table:style-name="ce3" office:value-type="date" office:date-value="2026-11-13" calcext:value-type="date">
            <text:p>2026-11-13</text:p>
          </table:table-cell>
          <table:table-cell table:style-name="ce3" office:value-type="date" office:date-value="2026-11-27" calcext:value-type="date">
            <text:p>2026-11-27</text:p>
          </table:table-cell>
          <table:table-cell table:style-name="ce2" office:value-type="string" calcext:value-type="string">
            <text:p>Valletta, Malta</text:p>
          </table:table-cell>
          <table:table-cell table:style-name="ce2" office:value-type="string" calcext:value-type="string">
            <text:p>Feb 26, 2027 - Feb 28, 2027</text:p>
          </table:table-cell>
          <table:table-cell table:style-name="ce4" office:value-type="string" calcext:value-type="string">
            <text:p><text:a xlink:href="https://visapp.scitevents.org/" xlink:type="simple">https://visapp.scitevents.org/</text:a></text:p>
          </table:table-cell>
          <table:table-cell table:style-name="ce2" office:value-type="string" calcext:value-type="string">
            <text:p>CALL FOR PAPERS 22nd International Conference on Computer Vision Theory and Applications (VISAPP) Submission Deadline: September 15, 2026 In Cooperation with: ACM Special Interest Group on Artificial Intelligence Proceedings will be submitted for evaluation for indexation by: SCOPUS Google Scholar The DBLP Computer Science Bibliography Semantic Scholar Engineering Index Web of Science / Conference Proceedings Citation Index The event will be of hybrid nature, in the sense that online presentations of accepted papers will be possible for those authors that are unable to travel to the venue. https://visapp.scitevents.org/ February 26 - 28, 2027 Valletta, Malta --------- Scope: The International Conference on Computer Vision Theory and Applications aims at becoming a major point of contact between researchers, engineers and practitioners on the area of computer vision methods, systems and applications. Several tracks cover all different aspects related to computer vision, including: Foundations &amp; Representation Learning; Recognition &amp; Detection; Low-level Vision &amp; Computational Imaging; and 3D Vision, Motion, Robotics, Application &amp; Systems. VISAPP is organized in 4 major tracks: Foundations and Representation Learning Recognition and Detection Low-Level Vision and Computational Imaging 3D Vision, Motion, Robotics, Application and Systems Conference Chair(s) Petia Radeva, University of Barcelona, Spain Program Chair(s) Antonino Furnari, University of Catania, Italy Program Committee https://visapp.scitevents.org//ProgramCommittee.aspx VISAPP Secretariat visapp.secretariat@insticc.org Address: Avenida de S. Francisco Xavier, Lote 7 Cv. C, Setubal 2900-616, Portugal Tel:+351 265 520 185 Web: https://visapp.scitevents.org/</text:p>
          </table:table-cell>
          <table:table-cell table:number-columns-repeated="1013"/>
        </table:table-row>
        <table:table-row table:style-name="ro1">
          <table:table-cell table:style-name="ce2" office:value-type="string" calcext:value-type="string">
            <text:p>MLHMI 2027</text:p>
          </table:table-cell>
          <table:table-cell table:style-name="ce2" office:value-type="string" calcext:value-type="string">
            <text:p>2027 8th International Conference on Machine Learning and Human-Computer Interaction (MLHMI 2027)</text:p>
          </table:table-cell>
          <table:table-cell table:style-name="ce2" office:value-type="float" office:value="75" calcext:value-type="float">
            <text:p>75</text:p>
          </table:table-cell>
          <table:table-cell table:style-name="ce2" office:value-type="float" office:value="28" calcext:value-type="float">
            <text:p>28</text:p>
          </table:table-cell>
          <table:table-cell table:style-name="ce3" office:value-type="date" office:date-value="2026-09-20" calcext:value-type="date">
            <text:p>2026-09-20</text:p>
          </table:table-cell>
          <table:table-cell table:number-columns-repeated="2"/>
          <table:table-cell table:style-name="ce2" office:value-type="string" calcext:value-type="string">
            <text:p>Sapporo, Japan</text:p>
          </table:table-cell>
          <table:table-cell table:style-name="ce2" office:value-type="string" calcext:value-type="string">
            <text:p>Mar 3, 2027 - Mar 5, 2027</text:p>
          </table:table-cell>
          <table:table-cell table:style-name="ce4" office:value-type="string" calcext:value-type="string">
            <text:p><text:a xlink:href="https://www.mlhmi.org" xlink:type="simple">https://www.mlhmi.org</text:a></text:p>
          </table:table-cell>
          <table:table-cell table:style-name="ce2" office:value-type="string" calcext:value-type="string">
            <text:p>Full name: 2027 8th International Conference on Machine Learning and Human-Computer Interaction (MLHMI 2027) Abbreviation: MLHMI 2027 2027 8th International Conference on Machine Learning and Human-Computer Interaction (MLHMI 2027) will be held in Hokkaido University, Sapporo, Japan during March 3-5, 2027. Conference Website: https://www.mlhmi.org MLHMI 2027 information: 1. MLHMI 2027 is Co-sponsored by Hokkaido University, Japan and Sensors and Systems Society of Singapore (SSS). 2. Accepted papers will be published in international Conference Proceedings Conference Venue: Hokkaido University, Sapporo, Japan Address:5 Chome Kita 8 Jonishi, Kita Ward, Sapporo, Hokkaido 060-0808, Japan Submission Methods: ZMEETING system: https://www.zmeeting.org/submission/MLHMI2027 E-mail: mlhmi.conference@gmail.com. Call for Papers: Machine learning methods Learning and adaptive control Learning/adaption of recognition and perception Learning for Handwriting Recognition Learning in Image Pre-Processing and Segmentation Learning in process automation Learning of appropriate behaviour Learning of action patterns Learning robots More topics: https://www.mlhmi.org/cfp.html Contact Methods: E-mail: mlhmi.conference@gmail.com Conference Specialist: Ms. Jassica Yao MLHMI 2027 aims to provide a forum for researchers, practitioners and professionals from the industry, academia and government to discourse on research and development, professional practice in Machine Learning and Human-Computer Interaction For more conference information, please visit the conference website: https://www.mlhmi.org/</text:p>
          </table:table-cell>
          <table:table-cell table:number-columns-repeated="1013"/>
        </table:table-row>
        <table:table-row table:style-name="ro1">
          <table:table-cell table:style-name="ce2" office:value-type="string" calcext:value-type="string">
            <text:p>ICSTTE 2026</text:p>
          </table:table-cell>
          <table:table-cell table:style-name="ce2" office:value-type="string" calcext:value-type="string">
            <text:p>2026 4th International Conference on SmartRail, Traffic and Transportation Engineering (ICSTTE 2026)</text:p>
          </table:table-cell>
          <table:table-cell table:style-name="ce2" office:value-type="float" office:value="10" calcext:value-type="float">
            <text:p>10</text:p>
          </table:table-cell>
          <table:table-cell table:style-name="ce2" office:value-type="float" office:value="30" calcext:value-type="float">
            <text:p>30</text:p>
          </table:table-cell>
          <table:table-cell table:style-name="ce3" office:value-type="date" office:date-value="2026-09-25" calcext:value-type="date">
            <text:p>2026-09-25</text:p>
          </table:table-cell>
          <table:table-cell table:number-columns-repeated="2"/>
          <table:table-cell table:style-name="ce2" office:value-type="string" calcext:value-type="string">
            <text:p>Weihai, China</text:p>
          </table:table-cell>
          <table:table-cell table:style-name="ce2" office:value-type="string" calcext:value-type="string">
            <text:p>Oct 23, 2026 - Oct 25, 2026</text:p>
          </table:table-cell>
          <table:table-cell table:style-name="ce4" office:value-type="string" calcext:value-type="string">
            <text:p><text:a xlink:href="https://www.icstte.org/" xlink:type="simple">https://www.icstte.org/</text:a></text:p>
          </table:table-cell>
          <table:table-cell table:style-name="ce2" office:value-type="string" calcext:value-type="string">
            <text:p>★CONTACT US Website: https://www.icstte.org/ Date：October 23-25, 2026 Venue：Beijing, China Conference Email: email@icstte.org Conference Tel: 028-85027305 (Mainland) +86 28 85027305 (International) Monday-Friday, 9:00am-12:00pm and 1:30pm-6:00pm ★Welcome to ICSTTE 2026 We are delighted to welcome your participation in 2026 4th International Conference on SmartRail, Traffic and Transportation Engineering (ICSTTE 2026). Organized by Beijing Jiaotong University and Beijing Subway Operation Co.,Ltd., the conference is scheduled to take pleace from October 23-25, 2026 in Beijing, China. It's more important than ever that we bring individuals together as an international society and shape our future with relentless endeavors in scientific innovations and discoveries. The exceptional event is to promote progress in the field of SmartRail, Traffic and Transportation Engineering by hosting a global forum aimed at facilitating discourse and the exchange of ideas among the world's top innovators, scientists, academics, researchers and thought leaders in the field. Over the three days of this conference, you'll have opportunities to hear about the latest developments and changes in an incredibly exciting field. ★Publication Information Registered and presented full papers will be included in the ICSTTE 2026 digital conference proceedings and submitted to major citation databases (including, but not limited to Ei Compendex and Scopus) for review and indexing. ★Call for papers （https://www.icstte.org/cfp.html） Topics of Interest include but not limited to: Track 1: Intelligent Equipment and Technology for Rail Transit High-speed trains Rack-type trains Straddle-type monorail vehicles Suspended monorail vehicles Key components for rail transit vehicles Traction and control of rail vehicles Health monitoring and management of rail vehicles Intelligent operation and maintenance Equipment for rail transit Track 2: Railway-Air-Maritime Transportation Geometric design of track Railway stations and yards Railway maintenance and rehabilitation Rail electrical controls and equipment Track drainage Alignment of railway lines Railway safety and management Signalling and interlocking Track 3: Transportation Planning Urban aesthetics and townscape Urban ecology Travel characteristics Land use and urban design Environmental considerations Travel demand and network modelling Evaluation and prioritization Asset management Track 4: Highway Transportation Highway geometric design Automated transportation systems Emergency response systems Highway maintenance/management Intelligent transportation systems Security and monitoring systems</text:p>
          </table:table-cell>
          <table:table-cell table:number-columns-repeated="1013"/>
        </table:table-row>
        <table:table-row table:style-name="ro1">
          <table:table-cell table:style-name="ce2" office:value-type="string" calcext:value-type="string">
            <text:p>ICMLC 2027</text:p>
          </table:table-cell>
          <table:table-cell table:style-name="ce2" office:value-type="string" calcext:value-type="string">
            <text:p>2027 19th International Conference on Machine Learning and Computing (ICMLC 2027)</text:p>
          </table:table-cell>
          <table:table-cell table:style-name="ce2" office:value-type="float" office:value="85" calcext:value-type="float">
            <text:p>85</text:p>
          </table:table-cell>
          <table:table-cell table:style-name="ce2" office:value-type="float" office:value="30" calcext:value-type="float">
            <text:p>30</text:p>
          </table:table-cell>
          <table:table-cell table:style-name="ce3" office:value-type="date" office:date-value="2026-09-25" calcext:value-type="date">
            <text:p>2026-09-25</text:p>
          </table:table-cell>
          <table:table-cell table:number-columns-repeated="2"/>
          <table:table-cell table:style-name="ce2" office:value-type="string" calcext:value-type="string">
            <text:p>Shenzhen, China</text:p>
          </table:table-cell>
          <table:table-cell table:style-name="ce2" office:value-type="string" calcext:value-type="string">
            <text:p>Feb 26, 2027 - Mar 1, 2027</text:p>
          </table:table-cell>
          <table:table-cell table:style-name="ce4" office:value-type="string" calcext:value-type="string">
            <text:p><text:a xlink:href="http://www.icmlc.org" xlink:type="simple">http://www.icmlc.org</text:a></text:p>
          </table:table-cell>
          <table:table-cell table:style-name="ce2" office:value-type="string" calcext:value-type="string">
            <text:p>★Full name: 2027 19th International Conference on Machine Learning and Computing (ICMLC 2027) ★Abbreviation: ICMLC 2027 ★Website: http://www.icmlc.org ★Date: February 26-March 01, 2027 ★Held in: Shenzhen, China ★Call for papers★ Topics of interest for submission include, but are not limited to: Track 1: Theoretical Foundations of Machine Learning *Computational Learning Theory *Statistical Learning Theory *PAC Learning *VC Dimension Track 2: Supervised Learning *Linear Regression *Logistic Regression *Decision Trees *Support Vector Machines Track 3: Unsupervised Learning *Clustering Analysis *Association Rule Mining *Principal Component Analysis Track 4: Reinforcement Learning *Q-Learning *Policy Gradient Methods *Applications in Robotics and Game AI Track 5: Deep Learning *Convolutional Neural Networks *Recurrent Neural Networks *Transformer Architecture Track 6: Applications of Machine Learning *Computer Vision *Natural Language Processing *Bioinformatics *Business Intelligence and Data Analytics Track 7: Data Management and Processing *Big Data Processing *Data Mining and Knowledge Discovery *Data Cleaning and Integration Track 8: Natural Language Processing (NLP) *Large Language Models (LLMs) *Multimodal NLP (Text+Vision/Audio) *Low-Resource/Domain-Specific NLP Track 9: Human-Computer Interaction in Machine Learning *User-Friendly Machine Learning Interfaces *Human-Machine Collaboration *Visualization of Machine Learning Processes More Topics, please visit at https://www.icmlc.org/topic.html ★Publication★ All accepted and presented papers will be published in the ICMLC 2027 Conference Proceedings. -- All the accepted papers in ICMLC 2017-2025 have been indexed by Ei Compendex and Scopus successfully. ● ICMLC 2025 Conference Proceedings (ISBN: 978-3-031-94898-5) | Springerlink: Volume 1 &amp; Volume 2 | Ei Compendex &amp; Scopus ● ICMLC 2024 Conference Proceedings (ISBN: 979-8-4007-0923-4) | ACM Digital Library | Ei Compendex &amp; Scopus ● ICMLC 2023 Conference Proceedings (ISBN: 978-1-4503-9841-1) | ACM Digital Library | Ei Compendex &amp; Scopus ● ICMLC 2022 Conference Proceedings (ISBN: 978-1-4503-9570-0) | ACM Digital Library | Ei Compendex &amp; Scopus ● ICMLC 2021 Conference Proceedings (ISBN: 978-1-4503-8931-0) | ACM Digital Library | Ei Compendex &amp; Scopus ● ICMLC 2020 Conference Proceedings (ISBN: 978-1-4503-7642-6) | ACM Digital Library | Ei Compendex &amp; Scopus ● ICMLC 2019 Conference Proceedings (ISBN: 978-1-4503-6600-7) | ACM Digital Library | Ei Compendex &amp; Scopus ● ICMLC 2018 Conference Proceedings (ISBN: 978-1-4503-6353-2) | ACM Digital Library | Ei Compendex &amp; Scopus ● ICMLC 2017 Conference Proceedings (ISBN: 978-1-4503-4817-1) | ACM Digital Library | Ei Compendex &amp; Scopus ★Submission★ 1. Full paper (publication and presentation) 2. Abstract (presentation only) Please submit your paper by Electronic Submission System: https://www.easychair.org/conferences/?conf=icmlc2027 Send your enquiry to icmlc@vip.126.com More details about submission, please visit at https://www.icmlc.org/submission.html ★Conference Schedule★ February 26, 2027 | Conference Materials Collection &amp; Welcome Reception February 27, 2027 | Opening Remarks &amp; Keynote Speeches &amp; Invited Speeches &amp; Parallel Sessions for Authors' Presentation February 28, 2027 | Keynote Speeches &amp; Invited Speeches &amp; Parallel Sessions for Authors' Presentation March 01, 2027 | Parallel Sessions for Authors' Presentations ★★Contact: Ms. Doris Ge (Conference Secretary) In charge of Paper Submission &amp; Publication/Conference Registration &amp; Participation Email: icmlc@vip.126.com Tel: +86-13709044746 WeChat No.: asr2020217 (Please note: ICMLC 2027) Ms. Allison Fung In charge of Invited Speech/Track/Special Session Information Email: allison_fung@outlook.com Working time: Monday to Friday from 10 am to 5:30 pm</text:p>
          </table:table-cell>
          <table:table-cell table:number-columns-repeated="1013"/>
        </table:table-row>
        <table:table-row table:style-name="ro1">
          <table:table-cell table:style-name="ce2" office:value-type="string" calcext:value-type="string">
            <text:p>SABID 2026</text:p>
          </table:table-cell>
          <table:table-cell table:style-name="ce2" office:value-type="string" calcext:value-type="string">
            <text:p>SABID 2026: Workshop on Solar &amp; Stellar Astronomy Big Data</text:p>
          </table:table-cell>
          <table:table-cell table:style-name="ce2" office:value-type="float" office:value="25" calcext:value-type="float">
            <text:p>25</text:p>
          </table:table-cell>
          <table:table-cell table:style-name="ce2" office:value-type="float" office:value="30" calcext:value-type="float">
            <text:p>30</text:p>
          </table:table-cell>
          <table:table-cell table:style-name="ce3" office:value-type="date" office:date-value="2026-09-25" calcext:value-type="date">
            <text:p>2026-09-25</text:p>
          </table:table-cell>
          <table:table-cell table:style-name="ce3" office:value-type="date" office:date-value="2026-10-31" calcext:value-type="date">
            <text:p>2026-10-31</text:p>
          </table:table-cell>
          <table:table-cell table:style-name="ce3" office:value-type="date" office:date-value="2026-11-14" calcext:value-type="date">
            <text:p>2026-11-14</text:p>
          </table:table-cell>
          <table:table-cell table:style-name="ce2" office:value-type="string" calcext:value-type="string">
            <text:p>Phoenix, Arizona, USA</text:p>
          </table:table-cell>
          <table:table-cell table:style-name="ce2" office:value-type="string" calcext:value-type="string">
            <text:p>Dec 14, 2026 - Dec 17, 2026</text:p>
          </table:table-cell>
          <table:table-cell table:style-name="ce4" office:value-type="string" calcext:value-type="string">
            <text:p><text:a xlink:href="https://wi-lab.com/cyberchair/2026/bigdata26/scripts/submit.php?subarea=S39&amp;undisplay_detail=1&amp;wh=/cyberchair/2026/bigdata26/scripts/ws_submit.php" xlink:type="simple">https://wi-lab.com/cyberchair/2026/bigdata26/scripts/submit.php?subarea=S39&amp;undisplay_detail=1&amp;wh=/cyberchair/2026/bigdata26/scripts/ws_submit.php</text:a></text:p>
          </table:table-cell>
          <table:table-cell table:style-name="ce2" office:value-type="string" calcext:value-type="string">
            <text:p>SABID 2026: Workshop on Solar &amp; Stellar Astronomy Big Data *Topics We invite original contributions on a wide range of topics related to managing, integration, and mining of Solar &amp; Stellar Astronomy Big Data, including, but not limited to: - Data Management - Astroinformatics &amp; Statistics - Data Acquisition &amp; Processing - Visualization &amp; Interfaces - Applications - Space Weather Forecasting - Solar–Stellar Connection - Infrastructure &amp; Standards *Important Dates - Submission deadline: September 25, 2026 - Notification of acceptance: October 31, 2026 - Author Registration: To be determined - Camera-ready of Accepted Papers: November 14, 2026 - Workshop date: To be determined *Submission Guidelines Authors are invited to submit original papers that have not been published elsewhere and are not currently under consideration for another journal, conference, or workshop. We invite: - A full-length paper (up to 10 pages in IEEE 2-column format, reference pages counted in the 10 pages); - A shorter paper (up to 6 pages in IEEE 2-column format, reference pages counted in the 6 pages) reporting works in progress. Papers should be formatted to IEEE Computer Society Proceedings Manuscript Formatting Guidelines (see link to "formatting instructions" below). https://www.ieee.org/conferences/publishing/templates.html Manuscripts must be submitted electronically through the online submission system: https://wi-lab.com/cyberchair/2026/bigdata26/scripts/submit.php?subarea=S39&amp;undisplay_detail=1&amp;wh=/cyberchair/2026/bigdata26/scripts/ws_submit.php Email submissions are not accepted. All submissions will be single-blind reviewed by the Program Committee based on technical quality, relevance to the scope of the conference, originality, significance, and clarity. Note: At least one author of an accepted paper must register and participate in the workshop. Please see details at the IEEE BigData 2026 website.</text:p>
          </table:table-cell>
          <table:table-cell table:number-columns-repeated="1013"/>
        </table:table-row>
        <table:table-row table:style-name="ro1">
          <table:table-cell table:style-name="ce2" office:value-type="string" calcext:value-type="string">
            <text:p>ICCDE--EI 2027</text:p>
          </table:table-cell>
          <table:table-cell table:style-name="ce2" office:value-type="string" calcext:value-type="string">
            <text:p>2027 13th International Conference on Computing and Data Engineering (ICCDE 2027)</text:p>
          </table:table-cell>
          <table:table-cell table:style-name="ce2" office:value-type="float" office:value="80" calcext:value-type="float">
            <text:p>80</text:p>
          </table:table-cell>
          <table:table-cell table:style-name="ce2" office:value-type="float" office:value="30" calcext:value-type="float">
            <text:p>30</text:p>
          </table:table-cell>
          <table:table-cell table:style-name="ce3" office:value-type="date" office:date-value="2026-09-25" calcext:value-type="date">
            <text:p>2026-09-25</text:p>
          </table:table-cell>
          <table:table-cell table:number-columns-repeated="2"/>
          <table:table-cell table:style-name="ce2" office:value-type="string" calcext:value-type="string">
            <text:p>Phuket, Thailand</text:p>
          </table:table-cell>
          <table:table-cell table:style-name="ce2" office:value-type="string" calcext:value-type="string">
            <text:p>Feb 17, 2027 - Feb 19, 2027</text:p>
          </table:table-cell>
          <table:table-cell table:style-name="ce4" office:value-type="string" calcext:value-type="string">
            <text:p><text:a xlink:href="https://www.iccde.org/" xlink:type="simple">https://www.iccde.org/</text:a></text:p>
          </table:table-cell>
          <table:table-cell table:style-name="ce2" office:value-type="string" calcext:value-type="string">
            <text:p>★Full name: 2027 13th International Conference on Computing and Data Engineering (ICCDE 2027) ★Abbreviation: ICCDE 2027 ★Website: https://www.iccde.org/ ★Date: February 17-19, 2027 ★Venue: Phuket, Thailand ★Organizing Committee Advisory Chair •Hai Jin, Huazhong University of Science and Technology, China Conference Chair •Peter Haddawy, Mahidol University, Thailand Conference Co-chair •Luca de Alfaro, University of California, Santa Cruz , United States Program Chairs •David Billard, University of Applied Sciences in Geneva, Switzerland •Uwe Serdult, Ritsumeikan University, Japan ...... More conference committee information, please check with: https://iccde.org/committees.html ★Call for Paper Computing: •Novel computing paradigms •Computational models •Algorithms •Application paradigms •Development environments •Compilers •Operating environments ....... Data Engineering: •Big Data, Data-Warehousing and Analytics •Crowdsourcing •Cloud Computing and Database-as-a-Service •Database Privacy, Security, and Trust •Data Integration, Metadata Management, and Interoperability •Data Models, Semantics, Query languages •Data Mining and Knowledge Discovery ...... More paper topic, please visit: https://www.iccde.org/cfp.html ★Proceedings Accepted papers will be published in the Conference Proceedings. History ●ICCDE 2026- ACM | ISBN: 979-8-4007-2021-5 ●ICCDE 2024- ACM | ISBN: 979-8-4007-0931-9 | Ei-Compendex &amp; Scopus ●ICCDE 2023- ACM | ISBN: 978-1-4503-9802-2 | Ei-Compendex &amp; Scopus ●ICCDE 2022- ACM | ISBN: 978-1-4503-9571-7 | Ei-Compendex &amp; Scopus ●ICCDE 2021- ACM | ISBN: 978-1-4503-8845-0 | Ei-Compendex &amp; Scopus ●ICCDE 2020- ACM | ISBN: 978-1-4503-7673-0 | Ei-Compendex &amp; Scopus ●ICCDE 2019- ACM | ISBN: 978-1-4503-6124-8 | Ei-Compendex &amp; Scopus ●ICCDE 2018- ACM | ISBN: 978-1-4503-6393-8 | Ei-Compendex &amp; Scopus ★Submission *Abstract (presentation only) *Full paper(for publication purpose) submissions must be original and should not have been published or under consideration for publication elsewhere while being reviewed by ICCDE. *The full paper submitted should be a maximum of 10 pages, but should be longer than 8 pages, including all figures, tables, and references. The file must not exceed 4 MB. Online Submission System: https://confsys.iconf.org/submission/iccde2027 Submit by Email: iccde@academic.net For more submission information about ICCDE 2027, please visit: https://www.iccde.org/submission.html ★Contact Ms. Lynn Gong Email: iccde@academic.net Website: https://www.iccde.org/ Tel: +86-18117808143 (Office Time 9:30 - 18:00, Time zone: GMT+8; Monday to Friday)</text:p>
          </table:table-cell>
          <table:table-cell table:number-columns-repeated="1013"/>
        </table:table-row>
        <table:table-row table:style-name="ro1">
          <table:table-cell table:style-name="ce2" office:value-type="string" calcext:value-type="string">
            <text:p>ICRIC--EI 2027</text:p>
          </table:table-cell>
          <table:table-cell table:style-name="ce2" office:value-type="string" calcext:value-type="string">
            <text:p>2027 International Conference on Robotics and Intelligent Control (ICRIC 2027)</text:p>
          </table:table-cell>
          <table:table-cell table:style-name="ce2" office:value-type="float" office:value="20" calcext:value-type="float">
            <text:p>20</text:p>
          </table:table-cell>
          <table:table-cell table:style-name="ce2" office:value-type="float" office:value="30" calcext:value-type="float">
            <text:p>30</text:p>
          </table:table-cell>
          <table:table-cell table:style-name="ce3" office:value-type="date" office:date-value="2026-09-25" calcext:value-type="date">
            <text:p>2026-09-25</text:p>
          </table:table-cell>
          <table:table-cell table:number-columns-repeated="2"/>
          <table:table-cell table:style-name="ce2" office:value-type="string" calcext:value-type="string">
            <text:p>Milan, Italy</text:p>
          </table:table-cell>
          <table:table-cell table:style-name="ce2" office:value-type="string" calcext:value-type="string">
            <text:p>Feb 17, 2027 - Feb 19, 2027</text:p>
          </table:table-cell>
          <table:table-cell table:style-name="ce4" office:value-type="string" calcext:value-type="string">
            <text:p><text:a xlink:href="https://icric.org/" xlink:type="simple">https://icric.org/</text:a></text:p>
          </table:table-cell>
          <table:table-cell table:style-name="ce2" office:value-type="string" calcext:value-type="string">
            <text:p>ICRIC 2027---Ei Compendex and Scopus Full Name: 2027 International Conference on Robotics and Intelligent Control (ICRIC 2027) Abbreviation: ICRIC 2027 Place: Milan, Italy Date: February 17-19, 2027 Website: https://icric.org/ 2027 International Conference on Robotics and Intelligent Control (ICRIC 2027) will be held in Milan, Italy during February 17-19, 2027. It's hosted by Polytechnic University of Milan. ICRIC facilitates face-to-face idea exchanges and practical experience sharing, bridging the gap between theoretical research and industrial practice. It helps participants establish academic and cooperative partnerships, promotes cross-regional technological innovation, and further boosts the sustainable development of global intelligent manufacturing and robotic technology. ☛ CALL FOR PAPERS Track 1: Intelligent Control Theory and Algorithms Genetic Algorithms Fuzzy Control Evolutionary Computation and Control Neural Networks based Control Systems Machine Learning in Control Applications Distributed Control Systems Planning and Scheduling Software Agents for Intelligent Control Systems Track 2: Robotic Systems: Design, Development and Autonomy Robot Design, Development and Control Humanoid Robots Mobile Robots and Intelligent Autonomous Systems Space and Underwater Robots Network Robotics Autonomous Agents Telerobotics and Teleoperation Track 3: Human-Robot Interaction and Cognitive Systems Human-Robot Interfaces Human-Machine Interfaces Cognitive Approach for Robotics Virtual Environment, Virtual and Augmented Reality Collective and Social Robots Track 4: Industrial and Applied Control Technologies Vehicle Control Applications Intelligent Transportation Technologies and Systems Surveillance, Fault Detection and Diagnosis Intelligent Fault Detection and Diagnosis Control and Supervision Systems For details about topics, please visit at https://icric.org/cfp.html ☛ PUBLICATION ✿ Conference Proceedings All the papers will be strictly peer-reviewed after submission. Accepted papers will be included into Conference Proceedings, and submitted for indexing by Scopus and Ei Compendex. ☛ SUBMISSION 1. Full Paper (Publication and Presentation) 2. Abstract (Presentation Only) For full paper(.pdf), please upload to https://www.zmeeting.org/submission/ICRIC2027 For abstract, please send it to icric_conference@163.com More details about submission, please visit at https://icric.org/sub.html ☛ CONFERENCE SCHEDULE February 17, 2027---Sign-in and Collect Conference Materials February 18, 2027---(Morning)----Opening Remarks &amp; Keynote Speeches (Afternoon)----Parallel Sessions February 19, 2027----Academic Visit ☛ CONTACT Mary Zhan (Conference Secretary) E-mail: icric_conference@163.com</text:p>
          </table:table-cell>
          <table:table-cell table:number-columns-repeated="1013"/>
        </table:table-row>
        <table:table-row table:style-name="ro1">
          <table:table-cell table:style-name="ce2" office:value-type="string" calcext:value-type="string">
            <text:p>Ei/Scopus-AI2A 2026 2026</text:p>
          </table:table-cell>
          <table:table-cell table:style-name="ce2" office:value-type="string" calcext:value-type="string">
            <text:p>2026 IEEE 6th International Conference on Artificial Intelligence, Automation and Algorithms (AI2A 2026)</text:p>
          </table:table-cell>
          <table:table-cell table:style-name="ce2" office:value-type="float" office:value="82" calcext:value-type="float">
            <text:p>82</text:p>
          </table:table-cell>
          <table:table-cell table:style-name="ce2" office:value-type="float" office:value="32" calcext:value-type="float">
            <text:p>32</text:p>
          </table:table-cell>
          <table:table-cell table:style-name="ce3" office:value-type="date" office:date-value="2026-09-30" calcext:value-type="date">
            <text:p>2026-09-30</text:p>
          </table:table-cell>
          <table:table-cell table:number-columns-repeated="2"/>
          <table:table-cell table:style-name="ce2" office:value-type="string" calcext:value-type="string">
            <text:p>Wuxi, China</text:p>
          </table:table-cell>
          <table:table-cell table:style-name="ce2" office:value-type="string" calcext:value-type="string">
            <text:p>Oct 23, 2026 - Oct 25, 2026</text:p>
          </table:table-cell>
          <table:table-cell table:style-name="ce4" office:value-type="string" calcext:value-type="string">
            <text:p><text:a xlink:href="http://www.icai2a.net/" xlink:type="simple">http://www.icai2a.net/</text:a></text:p>
          </table:table-cell>
          <table:table-cell table:style-name="ce2" office:value-type="string" calcext:value-type="string">
            <text:p>2026 IEEE 6th International Conference on Artificial Intelligence, Automation and Algorithms (AI2A 2026) Location: Wuxi, China Dates: October 23-25, 2026 Website: http://www.icai2a.net/ E-mail: sub@icai2a.net Conference Format: Online and In-person The 2026 IEEE 6th International Conference on Artificial Intelligence, Automation and Algorithms (AI2A 2026), sponsored by Jiangnan University, hosted by School of Artificial Intelligence and Computer Science, Jiangnan University, will be held in Wuxi, China during October 23-25, 2026. In an era defined by rapid digital transformation, Artificial Intelligence, Automation and Algorithms stand at the forefront of technological innovation, driving progress across every sector of society. From revolutionizing healthcare with predictive diagnostics to enabling autonomous systems and optimizing global supply chains, these interconnected fields are reshaping the way we live, work, and interact with the world. This conference brings together leading researchers, engineers, and industry pioneers to explore the latest advancements, emerging challenges, and future directions in algorithms, high-performance computing, and AI. As we push the boundaries of machine learning, quantum computing, and ethical AI frameworks, AI2A 2026 serves as a vital platform for fostering collaboration, sharing groundbreaking ideas, and addressing the societal impacts of these transformative technologies. Join us to engage in cutting-edge discussions, discover innovative solutions, and help shape a future where intelligent systems empower sustainable and inclusive. Topics: AI Algorithms Artificial Intelligence in Modelling and Simulation Machine learning and deep learning Machine vision Pattern Recognition Speech Understanding Distributed Intelligent Processing Fuzzy Logic Automation Engineering Intelligent Automation Robotics Pervasive and Ubiquitous Computing Techniques (For more topics: http://www.icai2a.net/topics.html ) Paper Publication and Indexing: After a rigorous reviewing process, accepted papers after proper registration and presentation will be included in AI2A 2026 Conference Proceedings, published by IEEE(ISBN: 979-8-3195-1234-5), archived in IEEE Xplore and indexed by Ei Compendex and Scopus. Paper Submission (Choose one way to submit your paper): 1. Submission System: https://cmt3.research.microsoft.com/ICAIAA2026/ (Recommend) 2. Email Submission: sub@icai2a.net You are also welcome to join us as: As Presenter: If you want to share you latest research results by giving presentation without publishing papers, please submit your abstract (300-400 words) As Listener: You are also warmly welcomed to take part in AI2A 2026 as a listener even though you have no paper to submit. As Reviewer: To ensure the fairness and to guarantee the quality of AI2A 2026, we cordially invite experts and scholars join us as a reviewer. AI2A 2026 Speakers: Prof. Liang Zhou (IEEE Fellow/IET Fellow/BCS Fellow/AAIA Fellow), Nanjing University of Posts and Telecommunications, China Prof. Pingyi Fan (IET Fellow), Tsinghua University, China Prof. Mo-Yuen Chow (IEEE Fellow), Shanghai Jiao Tong University, China Prof. Ismail Rakip Karas, Karabuk University, Turkey Contact us: Conference Secretary: Mrs. Caroline Li Email: sub@icai2a.net Tel: +852 95096877 Website: http://www.icai2a.net/</text:p>
          </table:table-cell>
          <table:table-cell table:number-columns-repeated="1013"/>
        </table:table-row>
        <table:table-row table:style-name="ro1">
          <table:table-cell table:style-name="ce2" office:value-type="string" calcext:value-type="string">
            <text:p>MLCC 2027</text:p>
          </table:table-cell>
          <table:table-cell table:style-name="ce2" office:value-type="string" calcext:value-type="string">
            <text:p>IEEE--2027 International Conference on Machine Learning and Cognitive Computing (MLCC 2027)</text:p>
          </table:table-cell>
          <table:table-cell table:style-name="ce2" office:value-type="float" office:value="80" calcext:value-type="float">
            <text:p>80</text:p>
          </table:table-cell>
          <table:table-cell table:style-name="ce2" office:value-type="float" office:value="30" calcext:value-type="float">
            <text:p>30</text:p>
          </table:table-cell>
          <table:table-cell table:style-name="ce3" office:value-type="date" office:date-value="2026-09-30" calcext:value-type="date">
            <text:p>2026-09-30</text:p>
          </table:table-cell>
          <table:table-cell table:number-columns-repeated="2"/>
          <table:table-cell table:style-name="ce2" office:value-type="string" calcext:value-type="string">
            <text:p>Chongqing, China</text:p>
          </table:table-cell>
          <table:table-cell table:style-name="ce2" office:value-type="string" calcext:value-type="string">
            <text:p>Mar 19, 2027 - Mar 21, 2027</text:p>
          </table:table-cell>
          <table:table-cell table:style-name="ce4" office:value-type="string" calcext:value-type="string">
            <text:p><text:a xlink:href="https://www.mlcc.net/" xlink:type="simple">https://www.mlcc.net/</text:a></text:p>
          </table:table-cell>
          <table:table-cell table:style-name="ce2" office:value-type="string" calcext:value-type="string">
            <text:p>★MLCC 2027-Ei Compendex and Scopus★ ★Abbreviation: MLCC 2027 ★Full name: IEEE--2027 International Conference on Machine Learning and Cognitive Computing (MLCC 2027) ★Venue: Chongqing, China ★Time: March 19-21, 2027 ★Website：https://www.mlcc.net/ ★Co-sponsored by: Chongqing University of Posts and Telecommunications ★Hosted by: School of Artificial Intelligence (CQUPT) ★Call for General Papers★ * Fundamental Theories and Algorithms of Machine Learning * Data Mining and Big Data Analysis * Knowledge Discovery and Representations * Feature Engineering and Representation Learning * Traditional Machine Learning and Ensemble Learning * Deep Learning and Neural Networks * Human-Machine Interaction * Neural Information Processing and Brain–machine Interfaces * Internet of Things and Intelligent Sensing * Intelligent Perception and Pattern Recognition * Recommendation Systems and Personalized Services * Social Network Analysis * Anomaly Detection and Fault Diagnosis * Intelligent Control and Optimal Control * Robotic Learning and Autonomous Systems For details about topics, please visit at：https://www.mlcc.net/cfp.html ★★Publication All accepted papers will be published in the Conference Proceedings, and sent to be reviewed by the IEEE Conference Publication Program for including in *IEEE Xplore*, *Ei Compendex* and *Scopus* index. ★Submission★ 1. Full paper(publication and presentation) 2. Abstract (presentation) For full paper, please upload it to the Electronic Submission System (.pdf) https://easychair.org/conferences/?conf=mlcc2027 For abstract, please send it to mlcc_conf@vip.163.com. More detail about submission, please visit at: https://www.mlcc.net/sub.html ★★Conference Schedule★★ March 19, 2027---Sign-in (Conference Material Collection) March 20, 2027(Morning)----Opening Remarks &amp; Keynote Speeches March 20, 2027(Afternoon)----Parallel Sessions March 21, 2027----Parallel Sessions ★★Contact: Conference Secretary: Ching Cao Email: mlcc_conf@vip.163.com Website: https://www.mlcc.net/ Tel: +86-13290000003</text:p>
          </table:table-cell>
          <table:table-cell table:number-columns-repeated="1013"/>
        </table:table-row>
        <table:table-row table:style-name="ro1">
          <table:table-cell table:style-name="ce2" office:value-type="string" calcext:value-type="string">
            <text:p>ISCAIE 2027</text:p>
          </table:table-cell>
          <table:table-cell table:style-name="ce2" office:value-type="string" calcext:value-type="string">
            <text:p>17th IEEE Symposium on Computer Applications and Industrial Electronics</text:p>
          </table:table-cell>
          <table:table-cell table:style-name="ce2" office:value-type="float" office:value="85" calcext:value-type="float">
            <text:p>85</text:p>
          </table:table-cell>
          <table:table-cell table:style-name="ce2" office:value-type="float" office:value="30" calcext:value-type="float">
            <text:p>30</text:p>
          </table:table-cell>
          <table:table-cell table:style-name="ce3" office:value-type="date" office:date-value="2026-09-30" calcext:value-type="date">
            <text:p>2026-09-30</text:p>
          </table:table-cell>
          <table:table-cell table:style-name="ce3" office:value-type="date" office:date-value="2026-11-30" calcext:value-type="date">
            <text:p>2026-11-30</text:p>
          </table:table-cell>
          <table:table-cell table:style-name="ce3" office:value-type="date" office:date-value="2027-01-31" calcext:value-type="date">
            <text:p>2027-01-31</text:p>
          </table:table-cell>
          <table:table-cell table:style-name="ce2" office:value-type="string" calcext:value-type="string">
            <text:p>Penang, Malaysia</text:p>
          </table:table-cell>
          <table:table-cell table:style-name="ce2" office:value-type="string" calcext:value-type="string">
            <text:p>Apr 24, 2027 - Apr 25, 2027</text:p>
          </table:table-cell>
          <table:table-cell table:style-name="ce4" office:value-type="string" calcext:value-type="string">
            <text:p><text:a xlink:href="https://www.ihsanyassin.com/cms/conference.php?conf_short_name=iscaie2027" xlink:type="simple">https://www.ihsanyassin.com/cms/conference.php?conf_short_name=iscaie2027</text:a></text:p>
          </table:table-cell>
          <table:table-cell table:style-name="ce2" office:value-type="string" calcext:value-type="string">
            <text:p>The 17th IEEE Symposium on Computer Applications &amp; Industrial Electronics (ISCAIE2027) serves as a premier platform for researchers, industry leaders, and innovators to explore groundbreaking advancements in Applied &amp; Industrial Electronics, Artificial Intelligence and Machine Learning, Computer Applications, Engineering &amp; Informatics, Cybersecurity and Information Security, Internet of Things (IoT) and others. Under the theme "Integrated Intelligence, Boundless Potential", this conference will highlight transformative trends, emerging technologies, and innovative solutions that shape the future of technology and engineering. Areas of Interest Applied &amp; Industrial Electronics Artificial Intelligence and Machine Learning Computer Applications, Engineering &amp; Informatics Cybersecurity and Information Security Internet of Things (IoT) Power Electronics and Energy Systems</text:p>
          </table:table-cell>
          <table:table-cell table:number-columns-repeated="1013"/>
        </table:table-row>
        <table:table-row table:style-name="ro1">
          <table:table-cell table:style-name="ce2" office:value-type="string" calcext:value-type="string">
            <text:p>Ei/Scopus-CCNML 2026</text:p>
          </table:table-cell>
          <table:table-cell table:style-name="ce2" office:value-type="string" calcext:value-type="string">
            <text:p>2026 6th International Conference on Communications, Networking and Machine Learning (CCNML 2026)</text:p>
          </table:table-cell>
          <table:table-cell table:style-name="ce2" office:value-type="float" office:value="65" calcext:value-type="float">
            <text:p>65</text:p>
          </table:table-cell>
          <table:table-cell table:style-name="ce2" office:value-type="float" office:value="30" calcext:value-type="float">
            <text:p>30</text:p>
          </table:table-cell>
          <table:table-cell table:style-name="ce3" office:value-type="date" office:date-value="2026-09-30" calcext:value-type="date">
            <text:p>2026-09-30</text:p>
          </table:table-cell>
          <table:table-cell table:number-columns-repeated="2"/>
          <table:table-cell table:style-name="ce2" office:value-type="string" calcext:value-type="string">
            <text:p>Wuxi, China</text:p>
          </table:table-cell>
          <table:table-cell table:style-name="ce2" office:value-type="string" calcext:value-type="string">
            <text:p>Oct 23, 2026 - Oct 25, 2026</text:p>
          </table:table-cell>
          <table:table-cell table:style-name="ce4" office:value-type="string" calcext:value-type="string">
            <text:p><text:a xlink:href="http://www.ccnml.net/" xlink:type="simple">http://www.ccnml.net/</text:a></text:p>
          </table:table-cell>
          <table:table-cell table:style-name="ce2" office:value-type="string" calcext:value-type="string">
            <text:p>2026 6th International Conference on Communications, Networking and Machine Learning (CCNML 2026) Location: Wuxi, China Dates: October 23-25, 2026 Website: http://www.ccnml.net/ E-mail: ccnml_conf@163.com Conference Format: Online and In-person The 2026 6th International Conference on Communications, Networking and Machine Learning (CCNML 2026), will held in Wuxi, China during October 23-25, 2026 CCNML 2026 aims to provide a forum for researchers, practitioners, and professionals from the industry, academia and government to discourse on research and development, professional practice in Communications, Networking and Machine Learning. CCNML 2026 will include presentations in form of contributed papers, poster sessions, and state of the art lectures by invited keynote speakers. In an era defined by rapid digital transformation, Communications, Networking and Machine Learning stand at the forefront of technological innovation, driving progress across every sector of society. From revolutionizing healthcare with predictive diagnostics to enabling autonomous systems and optimizing global supply chains, these interconnected fields are reshaping the way we live, work, and interact with the world. This conference brings together leading researchers, engineers, and industry pioneers to explore the latest advancements, emerging challenges, and future directions in algorithms, high-performance computing, and AI. Topics: Space-Time, MIMO and Adaptive Antennas B3G/4G Systems, WiMAX, WLAN and WPAN Radio Resource Management and Allocation Multiple Access Techniques Cognitive Radio Networks Networking and Information Security Capacity, Throughput, Outage and Coverage Intelligent Transportation System Mobile Computing Systems Signal Processing for Wireless Communications Interference Cancellation and MUD Multimedia Communications (For more topics: http://www.ccnml.net/topics.html ) Paper Publication and Indexing: After a rigorous reviewing process, accepted papers after proper registration and presentation will be included in Conference Proceedings, published by IEEE, archived in IEEE Xplore and indexed by Ei Compendex and Scopus. Paper Submission (Choose one way to submit your paper): 1. Submission System: https://cmt3.research.microsoft.com/CCNML2026/ (Recommend) 2. Email Submission: ccnml_conf@163.com You are also welcome to join us as: As Presenter: If you want to share you latest research results by giving presentation without publishing papers, please submit your abstract (300-400 words) As Listener: You are also warmly welcomed to take part in CCNML 2026 as a listener even though you have no paper to submit. As Reviewer: To ensure the fairness and to guarantee the quality of CCNML 2026, we cordially invite experts and scholars join us as a reviewer. CCNML 2026 Speakers: Prof. Liang Zhou (IEEE Fellow/IET Fellow/BCS Fellow/AAIA Fellow), Nanjing University of Posts and Telecommunications, China Prof. Pingyi Fan (IET Fellow), Tsinghua University, China Prof. Mo-Yuen Chow (IEEE Fellow), Shanghai Jiao Tong University, China Prof. Ismail Rakip Karas, Karabuk University, Turkey Contact us: Conference Secretary: Mrs. Caroline Li Email: ccnml_conf@163.com Tel: +852 95096877 Website: http://www.ccnml.net/</text:p>
          </table:table-cell>
          <table:table-cell table:number-columns-repeated="1013"/>
        </table:table-row>
        <table:table-row table:style-name="ro1">
          <table:table-cell table:style-name="ce2" office:value-type="string" calcext:value-type="string">
            <text:p>BPOD 2026</text:p>
          </table:table-cell>
          <table:table-cell table:style-name="ce2" office:value-type="string" calcext:value-type="string">
            <text:p>The Ninth IEEE International Workshop on Benchmarking, Performance Tuning and Optimization for Big Data Analytics and Big Models (BPOD 2026)</text:p>
          </table:table-cell>
          <table:table-cell table:style-name="ce2" office:value-type="float" office:value="92" calcext:value-type="float">
            <text:p>92</text:p>
          </table:table-cell>
          <table:table-cell table:style-name="ce2" office:value-type="float" office:value="32" calcext:value-type="float">
            <text:p>32</text:p>
          </table:table-cell>
          <table:table-cell table:style-name="ce3" office:value-type="date" office:date-value="2026-10-01" calcext:value-type="date">
            <text:p>2026-10-01</text:p>
          </table:table-cell>
          <table:table-cell table:style-name="ce3" office:value-type="date" office:date-value="2026-11-04" calcext:value-type="date">
            <text:p>2026-11-04</text:p>
          </table:table-cell>
          <table:table-cell table:style-name="ce3" office:value-type="date" office:date-value="2026-11-25" calcext:value-type="date">
            <text:p>2026-11-25</text:p>
          </table:table-cell>
          <table:table-cell table:style-name="ce2" office:value-type="string" calcext:value-type="string">
            <text:p>Phoenix, Arizona, USA</text:p>
          </table:table-cell>
          <table:table-cell table:style-name="ce2" office:value-type="string" calcext:value-type="string">
            <text:p>Dec 14, 2026 - Dec 17, 2026</text:p>
          </table:table-cell>
          <table:table-cell table:style-name="ce4" office:value-type="string" calcext:value-type="string">
            <text:p><text:a xlink:href="https://bdal.umbc.edu/bpod/bpod-2026/" xlink:type="simple">https://bdal.umbc.edu/bpod/bpod-2026/</text:a></text:p>
          </table:table-cell>
          <table:table-cell table:style-name="ce2" office:value-type="string" calcext:value-type="string">
            <text:p>The 9th Workshop on Benchmarking, Performance Tuning and Optimization for Big Data and Big Models (BPOD) Collocated at the 2026 IEEE International Conference on Big Data One day in December 14-17, 2026, Phoenix, AZ, USA https://bdal.umbc.edu/bpod-2026/ Description Applications of big data or big models such as large-language models (LLMs) have become ubiquitous, with models that can have billions of parameters and are trained on terabyte (TB) to petabyte (PB) data. Users of big data and large models are often not computer scientists, yet even for experts it is difficult to optimize performance because there are many decisions to make. Compared to “small data” and “small models,” these systems not only pose scalability challenges but also make it hard to optimize and fine-tune algorithms or models. In particular, there are many parameters to tune, and algorithms originally designed for “small” data or “small” models often need further optimization to work effectively in a big data or big model environment. It is also challenging to compare the performance of different algorithms, systems, or models across a variety of tasks. To make things more complex, users must consider not only computational running time, response time or throughput, and storage cost, but also accuracy or quality of results, monetary cost, trustworthiness, security, privacy, and sustainability. In traditional algorithms and relational databases, these issues are addressed by query optimizers and automatic tuning tools (e.g., index selection tools), and benchmarks exist to compare different systems and optimization methods. However, such tools are largely unavailable in big data or big model environments, making the problem more complicated than in traditional relational databases. Research Topics: The aim of this workshop is to bring researchers and practitioners together to better understand the problems of optimization and performance tuning in a big data and big model environment, to propose new approaches to address such problems, and to develop related benchmarks, tools and best practices. Topics of interest include, but not limited to: * Theoretical and empirical performance models, cost models, and performance prediction for big data applications, big data analytics, and large models * Optimization for machine learning and data mining in big data, including optimization and fine-tuning of big models (e.g., model fine-tuning, prompt engineering, retrieval-augmented generation (RAG)) * Benchmarking and comparative studies for big data processing platforms, big data analytics algorithms, and large models * Monitoring, analysis, and visualization of performance in big data environments and for big data analytics applications and large models * Workflow and process management and optimization in big data and big data analytics environments * Performance tuning and optimization for specific platforms, applications, and models (e.g., NoSQL databases, graph processing systems, stream systems, SQL-on-Hadoop systems, and large models) * Performance tuning and optimization for specific data sets (e.g., scientific, spatial, temporal, text, image, video, and mixed data) * Case studies and best practices for performance tuning and optimization in big data analytics and large models * Impact of security, privacy, and other system settings on performance of big data systems and large models * Self-adaptive or automatic tuning tools for big data applications, big data analytics, and large models * Optimization of big data applications and large models on High Performance Computing (HPC) and cloud environments * Trustworthiness, uncertainty, security, privacy, and other ethical considerations in big data analytics and LLMs Important Dates * Oct 1, 2026: Due date for full workshop papers submission * Nov 4, 2026: Notification of paper acceptance to authors * Nov 25, 2026: Camera-ready deadline for accepted papers * Dec 14-17, 2026: Workshops Paper Submission Authors are invited to submit full papers (maximal 10 pages) or short papers (maximal 6 pages) as per IEEE 8.5 x 11 manuscript guidelines (templates for LaTex, Word and PDF can be found at Authors are invited to submit full papers (maximal 10 pages) or short papers (maximal 6 pages) as per IEEE 8.5 x 11 manuscript guidelines (templates for LaTex, Word and PDF can be found at https://www.ieee.org/conferences/publishing/templates.html). All papers must be submitted via https://wi-lab.com/cyberchair/2026/bigdata26/scripts/submit.php?subarea=S23&amp;undisplay_detail=1&amp;wh=/cyberchair/2026/bigdata26/scripts/ws_submit.php.). At least one author of each accepted paper is required to attend the workshop and present the paper. All the accepted papers by the workshops will be included in the Proceedings of the IEEE Big Data 2026 Conference (IEEE BigData 2026) which will be published by IEEE Computer Society. Workshop Chairs * Zhiyuan Chen, University of Maryland Baltimore County * Jianwu Wang, University of Maryland Baltimore County * Feng Chen, University of Texas at Dallas * Junqi Yin, Oak Ridge National Laboratory PC members (tentative) * Laurent D’Orazio, Rennes University, France * Madhusudhan Govindaraju, Binghamton University, United States * Vidhya Govindaraju, Atlassian, United States * Marek Grzegorowski, University of Warsaw, Poland * Rachit Jain, Google, United States * Xin Huang, Towson University, United States * Md Azim Khan, Morgan State University, United States * Shad Kirmani, LinkedIn Corp., United States * Soufiana Mekouar, Mohammed V University Rabat, Morocco * Aravind Mohan, McMurry University, United States * Seraj Mostafa, Odyssey, United States * Mijanur Palash, Oak Ridge National Laboratory, United States * Frank Pallas, Paris Lodron University of Salzburg, Austria * Lauritz Thamsen, University of Glasgow, United Kingdom * Xiangfeng Wang, East China Normal University, China</text:p>
          </table:table-cell>
          <table:table-cell table:number-columns-repeated="1013"/>
        </table:table-row>
        <table:table-row table:style-name="ro1">
          <table:table-cell table:style-name="ce2" office:value-type="string" calcext:value-type="string">
            <text:p>IEEE-ICAIRS 2026</text:p>
          </table:table-cell>
          <table:table-cell table:style-name="ce2" office:value-type="string" calcext:value-type="string">
            <text:p>2026 International Conference on Artificial Intelligence and Robotic Systems (ICAIRS 2026)</text:p>
          </table:table-cell>
          <table:table-cell table:style-name="ce2" office:value-type="float" office:value="40" calcext:value-type="float">
            <text:p>40</text:p>
          </table:table-cell>
          <table:table-cell table:style-name="ce2" office:value-type="float" office:value="30" calcext:value-type="float">
            <text:p>30</text:p>
          </table:table-cell>
          <table:table-cell table:style-name="ce3" office:value-type="date" office:date-value="2026-10-05" calcext:value-type="date">
            <text:p>2026-10-05</text:p>
          </table:table-cell>
          <table:table-cell table:number-columns-repeated="2"/>
          <table:table-cell table:style-name="ce2" office:value-type="string" calcext:value-type="string">
            <text:p>Tianjin, China</text:p>
          </table:table-cell>
          <table:table-cell table:style-name="ce2" office:value-type="string" calcext:value-type="string">
            <text:p>Oct 23, 2026 - Oct 25, 2026</text:p>
          </table:table-cell>
          <table:table-cell table:style-name="ce4" office:value-type="string" calcext:value-type="string">
            <text:p><text:a xlink:href="https://www.icairs.net/" xlink:type="simple">https://www.icairs.net/</text:a></text:p>
          </table:table-cell>
          <table:table-cell table:style-name="ce2" office:value-type="string" calcext:value-type="string">
            <text:p>IEEE Conference--Call for Papers】 2026 International Conference on Artificial Intelligence and Robotic Systems (ICAIRS 2026) *【Important Information】: Website: https://www.icairs.net/ Venue: Tianjin, China (both online and in-person) Conference Date: Oct. 23-25, 2026 *【Conference Introduction】: ICAIRS 2026 has been officially listed on IEEE Conference List: https://conferences.ieee.org/conferences_events/conferences/conferencedetails/72058 2026 International Conference on Artificial Intelligence and Robotic Systems (ICAIRS 2026) will be held in Tianjin, China during Oct. 23-25, 2026. It is jointly organized by School of Control Science and Engineering, Tiangong University, China, and College of Creative Arts, Technology and Engineering, Buckinghamshire New University, UK; sponsored by IEEE, IEEE Robotics and Automation Society. ICAIRS 2026 will be held in Tiangong University, China. During the upcoming conference, the invited renowned professors will share with us the recent innovations in the fields of Artificial Intelligence and Robotic Systems. The conference will mainly feature on keynote speeches as well as peer-reviewed paper presentations. In addition, social program or academic visit will be arranged to encourage communication, discussion or cooperation among the researchers in these fields. We invite submissions of papers presenting an original high-quality research and development for the conference. All papers must be written in English and will be peer-reviewed by technical committees of the Conference and all accepted papers will be published in the conference proceedings. *【Publication and Indexing】: ★ ICAIRS 2026 Conference Proceedings will be published by IEEE (ISBN: 979-8-3195-0040-3), which will be archived in IEEE Xplore and indexed by EI Compendex, Scopus and CPCI (ISTP). *【Journal Recommendation】: ★You may choose to publish your paper in ICAIRS 2026 proceedings, or extend it for free publication in the following journals: ①Journal of Machine Learning Advances Frequency: Quarterly Submission to First Decision: 2 days Submission to Acceptance: 20 days Accept to Publish: 30 days Journal website: https://ojs.weavecorepress.com/index.php/JMLA ② Journal of Algorithms in Complex Systems Frequency: Quarterly Submission to First Decision: 2 days Submission to Acceptance: 20 days Accept to Publish: 30 days Journal website: https://ojs.weavecorepress.com/index.php/JACS *【Submission Methods】: 1. Online Submission System: https://cmt3.research.microsoft.com/ICAIRS2026 2. Submission Email: icairs@126.com Submission guidelines: https://www.icairs.net/Guide%20For%20Submissions.html *【Contact us】: Website: https://www.icairs.net/ Email: icairs@126.com Tel: +8613502461341(Wechat) QQ: 2056773349 *【Conference Speakers】: Keynote Speaker I: Prof. Yun Li, University of Electronic Science and Technology of China, China (IEEE Fellow) Keynote Speaker II: Prof. Xiuxian Li, Tongji University, China Keynote Speaker III: Prof. Li Zhan, Southwest Jiaotong University, China Keynote Speaker IV: Prof. Xingsi Xue, Fujian University of Technology, China *【Call for papers】: Track 1: Foundations of AI for Robotics Track 2: Perception, Navigation, and Control Track 3: Human-Robot Interaction and Collaborative Systems Track 4: Robotic Systems and Emerging Technologies Track 5: Applications, Safety, and Ethics (for more topics: https://www.icairs.net/Call%20For%20Papers.html) *【Guidelines for submission】: 1. The papers should be written in English and clearly state the title, objective, method, results, and conclusion with major keywords. 2. Papers prepared in the prescribed format are to be submitted. 3. The number of pages of the paper should be no less than 5 pages with double columns. 4. The review period is about 3-4 weeks. 5. The paper should be original work of the author(s), and no portion of the paper (including, but not limited to, graphics and figures) has been previously published. The paper is not currently under consideration for publication elsewhere. 6. Download the paper template from the official website. 7. The results will be available within 3-4 weeks after submission. If the review is fast, the results will be available within 1-2 weeks. The earlier the submission, the earlier the review and the earlier the acceptance notice. *【Types of Participation】: 1. Participation as an Author: For each accepted paper, one author is permitted to give a presentation; all co-authors can attend the conference free of charge. 2. Keynote Speaker: Applicants can apply to deliver a keynote speech, which will be subject to review by the organizing committee. 3. Oral Presentation: Each oral presenter will have 10-15 minutes for their presentation. 4. Poster Presentation: Poster presenters should prepare their posters in accordance with the poster template provided on the official website. 5. Listener: Participants who do not submit papers but only attend the conference can take part in Q&amp;A session, and are also eligible to give oral speeches or make poster presentations.</text:p>
          </table:table-cell>
          <table:table-cell table:number-columns-repeated="1013"/>
        </table:table-row>
        <table:table-row table:style-name="ro1">
          <table:table-cell table:style-name="ce2" office:value-type="string" calcext:value-type="string">
            <text:p>IEEE AIPE 2027</text:p>
          </table:table-cell>
          <table:table-cell table:style-name="ce2" office:value-type="string" calcext:value-type="string">
            <text:p>IEEE--2027 the 4th International Conference on Artificial Intelligence and Power Engineering (AIPE 2027)</text:p>
          </table:table-cell>
          <table:table-cell table:style-name="ce2" office:value-type="float" office:value="90" calcext:value-type="float">
            <text:p>90</text:p>
          </table:table-cell>
          <table:table-cell table:style-name="ce2" office:value-type="float" office:value="30" calcext:value-type="float">
            <text:p>30</text:p>
          </table:table-cell>
          <table:table-cell table:style-name="ce3" office:value-type="date" office:date-value="2026-10-10" calcext:value-type="date">
            <text:p>2026-10-10</text:p>
          </table:table-cell>
          <table:table-cell table:number-columns-repeated="2"/>
          <table:table-cell table:style-name="ce2" office:value-type="string" calcext:value-type="string">
            <text:p>Nanjing, China</text:p>
          </table:table-cell>
          <table:table-cell table:style-name="ce2" office:value-type="string" calcext:value-type="string">
            <text:p>Feb 26, 2027 - Feb 28, 2027</text:p>
          </table:table-cell>
          <table:table-cell table:style-name="ce4" office:value-type="string" calcext:value-type="string">
            <text:p><text:a xlink:href="https://www.aipe.org/" xlink:type="simple">https://www.aipe.org/</text:a></text:p>
          </table:table-cell>
          <table:table-cell table:style-name="ce2" office:value-type="string" calcext:value-type="string">
            <text:p>Full Name: IEEE--2027 the 4th International Conference on Artificial Intelligence and Power Engineering (AIPE 2027) Abbreviation: AIPE 2027 Nanjing, China | February 26 - 28, 2027 https://www.aipe.org/ **Sponsored by Nanjing Tech University, China **Proceedings The registered and presented papers will be published into AIPE 2027 Conference Proceedings, and reviewed by the IEEE Conference Publication Program for IEEE Xplore, Ei Compendex and Scopus. AIPE2025 | IEEE | ISBN: 979-8-3315-6507-7 - IEEE Xplore | Ei Compendex &amp; Scopus AIPE2024 | IEEE | ISBN: 979-8-3503-8824-4 - IEEE Xplore | Ei Compendex &amp; Scopus AIPE2023 | IEEE | ISBN: 979-8-3503-1078-8 - IEEE Xplore | Ei Compendex &amp; Scopus **Conference Committees *Advisory Chairs Tek-Tjing Lie, Auckland University of Technology, New Zealand Kenji Ushimaru, Infra Innovations, Inc., USA *Conference Chair Ciwei Gao, Southeast University, China *Conference Co-chairs Meng Song, Southeast University, China A. R. Al-Ali, American University of Sharjah, UAE *Conference Program Chairs Francesco Zirilli, Universita di Roma La Sapienza, Italy Masayuki Morimoto, Tokai University, Japan Marek R Ogiela, AGH University of Science and Technology, Poland **Call for Papers We invite authors to submit papers on topics of artificial intelligence and power engineering, including but not limited to: 1. Artificial Intelligence (AI) Core Methods &amp; Technologies Frontier Applications &amp; Interdisciplinary Areas 2. Power &amp; Energy Engineering Core &amp; Traditional Technologies Renewable Energy &amp; Modern Systems Operations, Markets &amp; Digitalization **Submission AIPE 2027 is now accepting manuscript submissions. Please submit your full paper to us: aipeconference@vip.163.com Submission guideline: https://www.aipe.org/submission.html **Contact us Ms. Xin Zhang Email: aipeconference@vip.163.com WeChat: Iconf-ee-1</text:p>
          </table:table-cell>
          <table:table-cell table:number-columns-repeated="1013"/>
        </table:table-row>
        <table:table-row table:style-name="ro1">
          <table:table-cell table:style-name="ce2" office:value-type="string" calcext:value-type="string">
            <text:p>SPRA 2027</text:p>
          </table:table-cell>
          <table:table-cell table:style-name="ce2" office:value-type="string" calcext:value-type="string">
            <text:p>SPIE--2027 7th Symposium on Pattern Recognition and Applications (SPRA 2027)</text:p>
          </table:table-cell>
          <table:table-cell table:style-name="ce2" office:value-type="float" office:value="70" calcext:value-type="float">
            <text:p>70</text:p>
          </table:table-cell>
          <table:table-cell table:style-name="ce2" office:value-type="float" office:value="30" calcext:value-type="float">
            <text:p>30</text:p>
          </table:table-cell>
          <table:table-cell table:style-name="ce3" office:value-type="date" office:date-value="2026-10-10" calcext:value-type="date">
            <text:p>2026-10-10</text:p>
          </table:table-cell>
          <table:table-cell table:number-columns-repeated="2"/>
          <table:table-cell table:style-name="ce2" office:value-type="string" calcext:value-type="string">
            <text:p>Tokyo, Japan</text:p>
          </table:table-cell>
          <table:table-cell table:style-name="ce2" office:value-type="string" calcext:value-type="string">
            <text:p>Mar 3, 2027 - Mar 5, 2027</text:p>
          </table:table-cell>
          <table:table-cell table:style-name="ce4" office:value-type="string" calcext:value-type="string">
            <text:p><text:a xlink:href="http://spra.org/" xlink:type="simple">http://spra.org/</text:a></text:p>
          </table:table-cell>
          <table:table-cell table:style-name="ce2" office:value-type="string" calcext:value-type="string">
            <text:p>Full name: SPIE--2027 7th Symposium on Pattern Recognition and Applications (SPRA 2027) Abbreviation: SPRA 2027 2027 7th Symposium on Pattern Recognition and Applications (SPRA 2027) is going to be held at Tokyo, Japan, during ◤March 03-05, 2027◢. Conference official website: http://spra.org/. SPRA 2027 accepted and presented papers can be published by SPIE, which will be included in SPIE Digital Library, provided to the Web of Science Conference Proceedings Citation Index-Science, Scopus, Ei Compendex, and others, to ensure maximum awareness of the Proceedings. Previous SPRA Proceedings all get published on SPIE proceedings and indexed successfully. ◆Call for Paper: including, but not limited to: Track 1: Computer Vision Track 2: Biomedical Image Analysis Track 3: Pattern Recognition and Machine Learning Track 4: Image, Speech, Signal and Video Processing Track 5: Document Analysis, Biometrics and Pattern Recognition Applications For more details please see: https://spra.org/cfp.html ◆Call for Special Session Special-session proposals should be submitted by the prospective organizer(s) who will commit to promoting and handling the review process of their special session as Chairs or Co-Chairs of the event. ◆Submit Way: For presentation only, please submit abstract will be enough; For publishing, please submit full paper, via Easychair System: https://www.easychair.org/conferences/?conf=spra2027 For any inquires, please contact us via email: spra_info@academic.net; ◆Contact: Allen Foster / spra_info@academic.net</text:p>
          </table:table-cell>
          <table:table-cell table:number-columns-repeated="1013"/>
        </table:table-row>
        <table:table-row table:style-name="ro1">
          <table:table-cell table:style-name="ce2" office:value-type="string" calcext:value-type="string">
            <text:p>AAIML 2027</text:p>
          </table:table-cell>
          <table:table-cell table:style-name="ce2" office:value-type="string" calcext:value-type="string">
            <text:p>IEEE--2027 2nd International Conference on Advances in Artificial Intelligence and Machine Learning</text:p>
          </table:table-cell>
          <table:table-cell table:style-name="ce2" office:value-type="float" office:value="90" calcext:value-type="float">
            <text:p>90</text:p>
          </table:table-cell>
          <table:table-cell table:style-name="ce2" office:value-type="float" office:value="30" calcext:value-type="float">
            <text:p>30</text:p>
          </table:table-cell>
          <table:table-cell table:style-name="ce3" office:value-type="date" office:date-value="2026-10-10" calcext:value-type="date">
            <text:p>2026-10-10</text:p>
          </table:table-cell>
          <table:table-cell table:style-name="ce3" office:value-type="date" office:date-value="2026-11-10" calcext:value-type="date">
            <text:p>2026-11-10</text:p>
          </table:table-cell>
          <table:table-cell table:style-name="ce3" office:value-type="date" office:date-value="2026-11-30" calcext:value-type="date">
            <text:p>2026-11-30</text:p>
          </table:table-cell>
          <table:table-cell table:style-name="ce2" office:value-type="string" calcext:value-type="string">
            <text:p>Tokyo, Japan</text:p>
          </table:table-cell>
          <table:table-cell table:style-name="ce2" office:value-type="string" calcext:value-type="string">
            <text:p>Mar 29, 2026 - Mar 31, 2026</text:p>
          </table:table-cell>
          <table:table-cell table:style-name="ce4" office:value-type="string" calcext:value-type="string">
            <text:p><text:a xlink:href="http://www.aaiml.net" xlink:type="simple">http://www.aaiml.net</text:a></text:p>
          </table:table-cell>
          <table:table-cell table:style-name="ce2" office:value-type="string" calcext:value-type="string">
            <text:p>2027 2nd International Conference on Advances in Artificial Intelligence and Machine Learning (AAIML 2027) Date: March 29-31, 2027 Location: Surugadai Campus, College of Science and Technology, Nihon University, Tokyo, Japan Website: https://aaiml.net/ *Keynote Speakers ------------------- Prof. Shun-Ichi Amari Life IEEE Fellow | Kyoto Prize Laureate 2025 Widely recognized as a pioneer in information geometry and neural networks Former Director, RIKEN Brain Science Institute (BSI), Japan Prof. Andrzej Cichocki IEEE Fellow Senior Visiting Researcher, RIKEN Center for Advanced Intelligence Project (AIP), Japan Professor, Systems Research Institute, Polish Academy of Sciences, Poland *PROCEEDINGS ------------------- Accepted and presented papers will be published in IEEE Xplore and indexed by Ei Compendex, Scopus, etc. *TOPICS ---------- We target contributions from both academia and industry on the following topics, but not limited to: ▪Innovations in Machine Learning Algorithms Deep Learning Architectures Reinforcement Learning Transfer Learning Explainable AI Federated Learning Meta-learning Ensemble Methods Generative Adversarial Networks (GANs) Automated Machine Learning (AutoML) Multimodal Learning ▪Future Trends and Research Directions in AI Human-AI Collaboration Next-Generation Robotics AI for Climate Change Societal Adaptation to AI Hybrid AI Systems Advanced AI Benchmarking AI and Blockchain Trends in AI Hardware Cross-disciplinary Research in AI The Future of AI in Creative Industries ▪Applications of AI and Machine Learning Across Industries AI in Healthcare Financial Technology Smart Cities AI in Manufacturing Natural Language Processing AI for Environmental Sustainability Autonomous Vehicles AI in Education Cybersecurity Sports Analytics ▪Integrating AI with Emerging Technologies AI and the Internet of Things (IoT) Synergies between AI and Edge Computing Blockchain and AI AI in Augmented Reality (AR) and Virtual Reality (VR) The Role of AI in 5G and Beyond Convergence of AI and Cyber-Physical Systems AI for Quantum Computing Utilizing AI in Cloud Computing Services Interdisciplinary Approaches AI and Autonomous Systems *SUBMISSION ----------------- 1. Full Paper (Publication and Presentation) 2. Abstract (Presentation only) Submission link: https://easychair.org/conferences/?conf=aaiml2027 *IMPORTANT DATES ------------------------ ▪Submission Deadline October 10, 2026 ▪Notification Date November 10, 2026 ▪Registration Deadline November 30, 2026 *AAIML 2027 AWARDS ------------------------ ▪Best Paper Award ▪Best Student Paper Award ▪Best Oral Presentation Award ▪Outstanding Oral Presentation Award ▪Best Poster Presentation Award *VENUE ---------- Surugadai Campus, College of Science and Technology Nihon University, Tokyo, Japan Address: Japan, 〒101-8308 Tokyo, Chiyoda City, Kanda Surugadai, 1 Chome−8-14 *CONTACT ---------- Ms. Kelly Cheung aaiml_conf@163.com website: www.aaiml.net</text:p>
          </table:table-cell>
          <table:table-cell table:number-columns-repeated="1013"/>
        </table:table-row>
        <table:table-row table:style-name="ro1">
          <table:table-cell table:style-name="ce2" office:value-type="string" calcext:value-type="string">
            <text:p>JCRAI 2026</text:p>
          </table:table-cell>
          <table:table-cell table:style-name="ce2" office:value-type="string" calcext:value-type="string">
            <text:p>2026 6th International Joint Conference on Robotics and Artificial Intelligence (JCRAI 2026)</text:p>
          </table:table-cell>
          <table:table-cell table:style-name="ce2" office:value-type="float" office:value="78" calcext:value-type="float">
            <text:p>78</text:p>
          </table:table-cell>
          <table:table-cell table:style-name="ce2" office:value-type="float" office:value="28" calcext:value-type="float">
            <text:p>28</text:p>
          </table:table-cell>
          <table:table-cell table:style-name="ce3" office:value-type="date" office:date-value="2026-10-16" calcext:value-type="date">
            <text:p>2026-10-16</text:p>
          </table:table-cell>
          <table:table-cell table:style-name="ce3" office:value-type="date" office:date-value="2026-10-23" calcext:value-type="date">
            <text:p>2026-10-23</text:p>
          </table:table-cell>
          <table:table-cell table:style-name="ce3" office:value-type="date" office:date-value="2026-10-30" calcext:value-type="date">
            <text:p>2026-10-30</text:p>
          </table:table-cell>
          <table:table-cell table:style-name="ce2" office:value-type="string" calcext:value-type="string">
            <text:p>Beijing, China</text:p>
          </table:table-cell>
          <table:table-cell table:style-name="ce2" office:value-type="string" calcext:value-type="string">
            <text:p>Nov 6, 2026 - Nov 8, 2026</text:p>
          </table:table-cell>
          <table:table-cell table:style-name="ce4" office:value-type="string" calcext:value-type="string">
            <text:p><text:a xlink:href="https://www.jcrai.org/" xlink:type="simple">https://www.jcrai.org/</text:a></text:p>
          </table:table-cell>
          <table:table-cell table:style-name="ce2" office:value-type="string" calcext:value-type="string">
            <text:p>2026 6th International Joint Conference on Robotics and Artificial Intelligence (JCRAI 2026) ★CONTACT US Website：https://www.jcrai.org/ Date：November 6-8, 2026 Venue：Beijing, China Email：email@jcrai.org Tel：+86 28 85575979 (International) Monday-Friday, 9:00 am-12:00 pm, 1:30 pm-6:00 pm ★ Welcome to FAIML 2026 We invite you to join the 2026 6th International Joint Conference on Robotics and Artificial Intelligence (JCRAI 2026), which will take place in Beijing, China during November 6-8, 2026. It is organized by Technical Committee on Imaging, Detection and Perception, CSIG and Technical Committee on Image Analysis, Chinese Society for Stereology, hosted by Beijing University of Chemical Technology and Beijing Information Science and Technology University, and co-organized by The Key Laboratory of Images and Graphics Intelligent Processing of State Ethnic Affairs Commission: IGIPLab. This conference is a forum for researchers, scientists, engineers and industry professionals to share the latest advances in the field of Robotics and Artificial Intelligence. ★Publication Information Registered and presented full papers will be included in the JCRAI 2026 digital conference proceedings and submitted to major citation databases (including, but not limited to Ei Compendex and Scopus) for review and indexing. ★Call for papers （https://www.jcrai.org/cfp.html） Topics of Interest include but not limited to: 1.ARTIFICIAL INTELLIGENCE Agents and Multi-Agent Systems Expert Systems Fuzzy Logic Genetic Algorithms Neural Networks Swarm Intelligence 2.AMBIENT INTELLIGENCE Ambient Assisted Living Data Science Intelligent Driving Internet of Things Smart Buildings and Cities Smart Healthcare 3. ROBOTICS Assistive Robots Autonomous Robots Creative and Entertaining Robots Human-Robot Interaction Mobile Robots Space and underwater robots 4.MACHINE VISION Augmented Reality Bioinformatics Human Computer Interaction Image/Video Processing Pattern Recognition Signal Processing 5.MACHINE LEARNING Ant colony optimization Bayesian networks Decision Making Natural language processing Supervised/Unsupervised Learning Support Vector Machines 6.SECURITY Big data analytics for security Biometrics Computer Forensics Intrusion Detection Security Intelligence Spam Detection</text:p>
          </table:table-cell>
          <table:table-cell table:number-columns-repeated="1013"/>
        </table:table-row>
        <table:table-row table:style-name="ro1">
          <table:table-cell table:style-name="ce2" office:value-type="string" calcext:value-type="string">
            <text:p>Ei/Scopus-ACEPE 2026</text:p>
          </table:table-cell>
          <table:table-cell table:style-name="ce2" office:value-type="string" calcext:value-type="string">
            <text:p>2026 3rd IEEE Asia Conference on Advances in Electrical and Power Engineering (ACEPE 2026)</text:p>
          </table:table-cell>
          <table:table-cell table:style-name="ce2" office:value-type="float" office:value="72" calcext:value-type="float">
            <text:p>72</text:p>
          </table:table-cell>
          <table:table-cell table:style-name="ce2" office:value-type="float" office:value="30" calcext:value-type="float">
            <text:p>30</text:p>
          </table:table-cell>
          <table:table-cell table:style-name="ce3" office:value-type="date" office:date-value="2026-10-30" calcext:value-type="date">
            <text:p>2026-10-30</text:p>
          </table:table-cell>
          <table:table-cell table:number-columns-repeated="2"/>
          <table:table-cell table:style-name="ce2" office:value-type="string" calcext:value-type="string">
            <text:p>Sanya, China</text:p>
          </table:table-cell>
          <table:table-cell table:style-name="ce2" office:value-type="string" calcext:value-type="string">
            <text:p>Nov 20, 2026 - Nov 22, 2026</text:p>
          </table:table-cell>
          <table:table-cell table:style-name="ce4" office:value-type="string" calcext:value-type="string">
            <text:p><text:a xlink:href="http://www.acepe.net/" xlink:type="simple">http://www.acepe.net/</text:a></text:p>
          </table:table-cell>
          <table:table-cell table:style-name="ce2" office:value-type="string" calcext:value-type="string">
            <text:p>2026 3rd IEEE Asia Conference on Advances in Electrical and Power Engineering (ACEPE 2026) Location: Sanya, China Dates: November 20-22, 2026 Website: http://www.acepe.net/ E-mail: acepe_conf@163.com Conference Format: Online and In-person 2026 3rd IEEE Asia Conference on Advances in Electrical and Power Engineering (ACEPE 2026), sponsored by Hainan Institute of Zhejiang University, IEEE, IEEE PES , hosted by Sanya Global Energy Research Institute , co-sponsored by Fujian Key Laboratory of New Energy Generation and Power Conversion and School of Electrical Engineering, Dalian University of Technology , will be held during November 20-22, 2026 in Sanya, China. This is the third consecutive year that IEEE PES has jointly sponsored the conference . ACEPE aims to provide a forum for researchers, practitioners, and professionals from the industry, academia and government to discourse on research and development, professional practice in Electrical and Power Engineering. ACEPE 2026 will include presentations in form of contributed papers, poster sessions, and state of the art lectures by invited keynote speakers. ACEPE 2026 has been listed on IEEE Conference List! Topics: Advanced electrical materials Electric and Hybrid Vehicles Electrical Machines and Drives Electric Machinery Renewable Energy Emerging technologies Energy Transformation from New Energy System to Power Grid Energy Conversion Energy Development and Power Generation Energy Management Systems Energy System Design Integrated energy systems Low-carbon energy system (For more topics: http://www.acepe.net/topics.html) Paper Publication and Indexing: Accepted papers after proper registration and presentation will be included in ACEPE 2026 Conference Proceedings, published by IEEE (ISBN: 979-8-3195-1023-5), archived in IEEE Xplore and indexed by Ei Compendex, Scopus, CPCI and other important databases. Previous Publication and indexing: *ACEPE 2025 was published by IEEE, archived in IEEE Xplore and will be indexed by Ei and Scopus soon. *ACEPE 2024 was published by IEEE, archived in IEEE Xplore and indexed by EI and Scopus successfully! Paper Submission (Choose one way to submit your paper): 1. Submission System: https://cmt3.research.microsoft.com/ACEPE2026/ (Recommend) 2. Email Submission: acepe_conf@163.com You are also welcome to join us as: As Presenter: If you want to share you latest research results by giving presentation without publishing papers, please submit your abstract (300-400 words) As Listener: You are also warmly welcomed to take part in ACEPE 2026 as a listener even though you have no paper to submit. As Reviewer: To ensure the fairness and to guarantee the quality of ACEPE 2026, we cordially invite experts and scholars join us as a reviewer. ACEPE 2026 Organizing committee members: Conference Chairs: Prof. Fushuan Wen, IEEE Fellow, Zhejiang University, China Prof. Om P. Malik, Life Fellow IEEE, University of Calgary, Canada Prof. Yiming Zhang, Fuzhou University, China Program Chairs: Prof. Han Yang, University of Electronic Science and Technology of China (UESTC), China Prof. Wenliang Zhao, Shandong University, China Prof. Weixing Li, Dalian University of Technology, China Contact us: Conference Secretary: Ms. Cici Xu Email: acepe_conf@163.com Tel: +852 92562476 Website: http://www.acepe.net/</text:p>
          </table:table-cell>
          <table:table-cell table:number-columns-repeated="1013"/>
        </table:table-row>
        <table:table-row table:style-name="ro1">
          <table:table-cell table:style-name="ce2" office:value-type="string" calcext:value-type="string">
            <text:p>IEEE-DSIS 2026</text:p>
          </table:table-cell>
          <table:table-cell table:style-name="ce2" office:value-type="string" calcext:value-type="string">
            <text:p>2026 IEEE 2nd International Conference on Data Science and Intelligent Systems (DSIS 2026)</text:p>
          </table:table-cell>
          <table:table-cell table:style-name="ce2" office:value-type="float" office:value="88" calcext:value-type="float">
            <text:p>88</text:p>
          </table:table-cell>
          <table:table-cell table:style-name="ce2" office:value-type="float" office:value="28" calcext:value-type="float">
            <text:p>28</text:p>
          </table:table-cell>
          <table:table-cell table:style-name="ce3" office:value-type="date" office:date-value="2026-10-30" calcext:value-type="date">
            <text:p>2026-10-30</text:p>
          </table:table-cell>
          <table:table-cell table:number-columns-repeated="2"/>
          <table:table-cell table:style-name="ce2" office:value-type="string" calcext:value-type="string">
            <text:p>Hangzhou, China</text:p>
          </table:table-cell>
          <table:table-cell table:style-name="ce2" office:value-type="string" calcext:value-type="string">
            <text:p>Nov 20, 2026 - Nov 22, 2026</text:p>
          </table:table-cell>
          <table:table-cell table:style-name="ce4" office:value-type="string" calcext:value-type="string">
            <text:p><text:a xlink:href="https://www.dsis2026.net/" xlink:type="simple">https://www.dsis2026.net/</text:a></text:p>
          </table:table-cell>
          <table:table-cell table:style-name="ce2" office:value-type="string" calcext:value-type="string">
            <text:p>*【Important Information】: Website: https://www.dsis2026.net/ Venue: Hangzhou, China (both online and in-person) Conference Date: Nov. 20-22, 2026 *【Conference Introduction】: DSIS 2026 has been officially listed on IEEE Conference List: https://conferences.ieee.org/conferences_events/conferences/conferencedetails/71903 2026 IEEE 2nd International Conference on Data Science and Intelligent Systems (DSIS 2026) will be held in Hangzhou, China during Nov. 20-22, 2026. It is organized by School of Computer Science and Technology (School of Artificial Intelligence), Zhejiang Sci-Tech University, China; sponsored by IEEE, IEEE Nanjing Section. DSIS 2026 will be held in Zhejiang Sci-Tech University, China. During the upcoming conference, the invited renowned professors will share with us the recent innovations in the fields of Data Science and Intelligent Systems. The conference will mainly feature on keynote speeches as well as peer-reviewed paper presentations. In addition, social program or academic visit will be arranged to encourage communication, discussion or cooperation among the researchers in these fields. We invite submissions of papers presenting an original high-quality research and development for the conference. All papers must be written in English and will be peer-reviewed by technical committees of the Conference and all accepted papers will be published in the conference proceedings. *【Publication and Indexing】: ★All accepted papers will be included in DSIS 2026 Conference Proceedings and published by IEEE, which will be archived in IEEE Xplore, and indexed by Ei Compendex, Scopus and CPCI (ISTP). ★DSIS 2025 all accepted papers have been published by IEEE and indexed by Ei Compendex and Scopus successfully within 1 month after publication. *【Journal Recommendation】: ★You may choose to publish your paper in DSIS 2026 proceedings, or extend it for free publication in the following journals: ①Journal of Machine Learning Advances Frequency: Quarterly Submission to First Decision: 2 days Submission to Acceptance: 20 days Accept to Publish: 30 days JMLA website: https://ojs.weavecorepress.com/index.php/JMLA ② Journal of Algorithms in Complex Systems Frequency: Quarterly Submission to First Decision: 2 days Submission to Acceptance: 20 days Accept to Publish: 30 days JACS website: https://ojs.weavecorepress.com/index.php/JACS *【Submission Methods】: 1. Online Submission System: https://cmt3.research.microsoft.com/DSISS2026 2. Submission Email: dsis2025@163.com Submission guidelines: https://www.dsis2026.net/Guide%20For%20Submissions.html *【Contact us】: Website: https://www.dsis2026.net/ Email: dsis2025@163.com Tel: +8613502461341(Wechat) QQ: 2056773349 *【Conference Speakers】: Keynote Speaker I: Prof. James Tin-Yau KWOK, The Hong Kong University of Science and Technology, Hong Kong (IEEE Fellow) Keynote Speaker II: Prof. Huanhuan Chen, University of Science and Technology of China, China (IEEE Fellow) Keynote Speaker III: Prof. Benjamin W. Wah, The Chinese University of Hong Kong, Hong Kong (IEEE Fellow) Keynote Speaker IV: Assoc. Prof. Ting Wang, East China Normal University, China *【Call for papers】: Track 1: Data Science and Artificial Intelligence Track 2: Image Processing and Pattern Recognition Track 3: Data Science Applications Track 4: Machine Learning and Intelligent Systems (for more topics: https://www.dsis2026.net/Call%20For%20Papers.html ) *【Guidelines for submission】: 1. The papers should be written in English and clearly state the title, objective, method, results, and conclusion with major keywords. 2. Papers prepared in the prescribed format are to be submitted. 3. The number of pages of the paper should be no less than 5 pages with double columns. 4. The review period is about 3-4 weeks. 5. The paper should be original work of the author(s), and no portion of the paper (including, but not limited to, graphics and figures) has been previously published. The paper is not currently under consideration for publication elsewhere. 6. Download the paper template from the official website. 7. The results will be available within 3-4 weeks after submission. If the review is fast, the results will be available within 1-2 weeks. The earlier the submission, the earlier the review and the earlier the acceptance notice. *【Types of Participation】: 1. Participation as an Author: For each accepted paper, one author is permitted to give a presentation; all co-authors can attend the conference free of charge. 2. Keynote Speaker: Applicants can apply to deliver a keynote speech, which will be subject to review by the organizing committee. 3. Oral Presentation: Each oral presenter will have 10-15 minutes for their presentation. 4. Poster Presentation: Poster presenters should prepare their posters in accordance with the poster template provided on the official website. 5. Listener: Participants who do not submit papers but only attend the conference can take part in Q&amp;A session, and are also eligible to give oral speeches or make poster presentations.</text:p>
          </table:table-cell>
          <table:table-cell table:number-columns-repeated="1013"/>
        </table:table-row>
        <table:table-row table:style-name="ro1">
          <table:table-cell table:style-name="ce2" office:value-type="string" calcext:value-type="string">
            <text:p>CSTE--EI 2027</text:p>
          </table:table-cell>
          <table:table-cell table:style-name="ce2" office:value-type="string" calcext:value-type="string">
            <text:p>2027 9th International Conference on Computer Science and Technologies in Education (CSTE 2027)</text:p>
          </table:table-cell>
          <table:table-cell table:style-name="ce2" office:value-type="float" office:value="25" calcext:value-type="float">
            <text:p>25</text:p>
          </table:table-cell>
          <table:table-cell table:style-name="ce2" office:value-type="float" office:value="30" calcext:value-type="float">
            <text:p>30</text:p>
          </table:table-cell>
          <table:table-cell table:style-name="ce3" office:value-type="date" office:date-value="2026-11-05" calcext:value-type="date">
            <text:p>2026-11-05</text:p>
          </table:table-cell>
          <table:table-cell table:number-columns-repeated="2"/>
          <table:table-cell table:style-name="ce2" office:value-type="string" calcext:value-type="string">
            <text:p>Wuhan, China</text:p>
          </table:table-cell>
          <table:table-cell table:style-name="ce2" office:value-type="string" calcext:value-type="string">
            <text:p>Apr 9, 2027 - Apr 11, 2027</text:p>
          </table:table-cell>
          <table:table-cell table:style-name="ce4" office:value-type="string" calcext:value-type="string">
            <text:p><text:a xlink:href="http://cste.net/" xlink:type="simple">http://cste.net/</text:a></text:p>
          </table:table-cell>
          <table:table-cell table:style-name="ce2" office:value-type="string" calcext:value-type="string">
            <text:p>Full name: 2027 9th International Conference on Computer Science and Technologies in Education (CSTE 2027) Abbreviation: CSTE 2027 April 9-11, 2027 ▪ Wuhan, China 2027 9th International Conference on Computer Science and Technologies in Education (CSTE) will be held in Wuhan, China during April 9-11, 2027. CSTE 2027 is sponsored by Central China Normal University, China, hosted by Faculty of Artificial Intelligence in Education, Central China Normal University, China. At CSTE 2027, participants will have the opportunity to engage with leading experts in education technology, and to gain insights into the latest research and best practices in the field. The conference will also provide a platform for networking and collaboration, enabling participants to build valuable connections with colleagues from around the world. ★Publication Submitted papers will be peer reviewed by program committees and technical committee, and accepted papers will be published into conference proceedings. (*All the previous Conference Proceedings have been archived in IEEE Xplore and indexded by Ei Compendex and Scopus.) ★Topics Topics of interest for submission include, but are not limited to: Track 1: Educational Technologies and Systems ▪ E-learning platforms and tools ▪ Computer-supported collaborative learning ▪ Mobile and ubiquitous learning Track 2: Computer-supported Collaborative Learning and Social Computing ▪ Collaborative learning theories and models ▪ Social computing and learning ▪ Online communities and networks in education Track 3: Artificial Intelligence in Education ▪ Intelligent tutoring systems ▪ Natural language processing in education ▪ Knowledge representation and reasoning in education Track 4: STEM Education and Computational Thinking ▪ STEM education and pedagogy ▪ Computational thinking and coding education ▪ Robotics and automation in STEM education Track 5: Educational Data Mining and Learning Analytics ▪ Data-driven approaches to education ▪ Learning analytics and visualization ▪ Educational data mining and machine learning Track 6: Digital Technologies for Human Development ▪ Digital technologies for social-emotional learning ▪ Digital technologies for psychological wellbeing ▪ Digital technologies for self-management and regulation Track 7: Inclusive EdTech: Diversity, Equity, and Innovative Pedagogies ▪ AI-enhanced pedagogy for diverse learners ▪ Learning analytics-driven differentiation ▪ Accessible immersive learning pedagogies For more topics, please visit: http://cste.net/cfp.html ★Submission Guideline ♢ English is the official language. Paper should be prepared and presented in English. ♢ Full paper (no less than 4 Pages in two-column format) submission is required for Publication and Presentation. For presentation only, just send us the abstract. ♢ Submission: - By online submission system: http://www.easychair.org/conferences/?conf=cste2027 - Submit to cste_contact@yeah.net as attachment. The email subject should be named as "Submission-CSTE 2027-Full Paper/ Abstract" ★General Program Day 1 - Friday - April 9, 2027 10:00-17:00 | Registration &amp; Materials Collection 14:00-17:00 | Committee Conference Day 2 - Saturday - April 10, 2027 09:00 - 09:05 | Opening Remark 09:05 - 11:50 | Keynote Speeches 12:00 - 13:30 | Lunch 13:30 - 18:00 | Parallel Sessions 18:00 - 20:30 | Award Ceremony &amp; Dinner Banquet Day 3 - Sunday - April 11, 2027 08:30 - 12:00 | Invited Speeches &amp; Parallel Sessions 13:30 - 18:00 | City Tour in Wuhan ★Central China Normal University, China Located in Wuhan, Central China Normal University (CCNU) is a key comprehensive normal university directly under the administration of the Ministry of Education, People’s Republic of China. It is also one of the universities on the list of the “211 National Education Priority Project” and “Double First-Class” Initiative. The origin of CCNU can be traced back to Boone College (Wenhua Shuyuan), which was established in 1903 and later renamed Huachung University. In the following years, it merged with Zhonghua University and the School of Education of Zhongyuan University. In 1985, its name was officially changed to Central China Normal University, which was handwritten by Deng Xiaoping, one of the founders of Zhongyuan University. Since its founding, CCNU has been recognized as an important base for cultivating brilliant talents for the country as well as a top-quality training center for excellent teachers in higher education. Embracing the essence of traditional culture, CCNU absorbs the sustenance of foreign cultures and promotes the tradition of progressive culture. It is dedicated to seeking truth, innovation, building morality and cultivating creativity within its students. Driven by the spirit of loyalty, erudition &amp; virtue, honesty and resolution, CCNU has educated over 600,000 outstanding talents in the past years. ★Contact Us Conference Secretary: Miss Joie Wu Email: cste_contact@yeah.net Tel: +86-18302820449 WeChat: csit2009 Website: http://www.cste.net/ Office Hour: Monday-Friday, 9:30-18:00 (GMT+8)</text:p>
          </table:table-cell>
          <table:table-cell table:number-columns-repeated="1013"/>
        </table:table-row>
        <table:table-row table:style-name="ro1">
          <table:table-cell table:style-name="ce2" office:value-type="string" calcext:value-type="string">
            <text:p>ICRCA 2027</text:p>
          </table:table-cell>
          <table:table-cell table:style-name="ce2" office:value-type="string" calcext:value-type="string">
            <text:p>2027 11th International Conference on Robotics, Control and Automation (ICRCA 2027)</text:p>
          </table:table-cell>
          <table:table-cell table:style-name="ce2" office:value-type="float" office:value="55" calcext:value-type="float">
            <text:p>55</text:p>
          </table:table-cell>
          <table:table-cell table:style-name="ce2" office:value-type="float" office:value="30" calcext:value-type="float">
            <text:p>30</text:p>
          </table:table-cell>
          <table:table-cell table:style-name="ce3" office:value-type="date" office:date-value="2026-11-10" calcext:value-type="date">
            <text:p>2026-11-10</text:p>
          </table:table-cell>
          <table:table-cell table:number-columns-repeated="2"/>
          <table:table-cell table:style-name="ce2" office:value-type="string" calcext:value-type="string">
            <text:p>Aizuwakamatsu, Japan</text:p>
          </table:table-cell>
          <table:table-cell table:style-name="ce2" office:value-type="string" calcext:value-type="string">
            <text:p>Mar 26, 2027 - Mar 28, 2027</text:p>
          </table:table-cell>
          <table:table-cell table:style-name="ce4" office:value-type="string" calcext:value-type="string">
            <text:p><text:a xlink:href="http://www.icrca.org/" xlink:type="simple">http://www.icrca.org/</text:a></text:p>
          </table:table-cell>
          <table:table-cell table:style-name="ce2" office:value-type="string" calcext:value-type="string">
            <text:p>ICRCA 2027-[EI compendex &amp; Scopus]★ Full Name: 2027 11th International Conference on Robotics, Control and Automation (ICRCA 2027) Abbreviation: ICRCA 2027 Website：http://www.icrca.org/ Time：March 26-28, 2027 Place: Aizuwakamatsu, Japan 2027 11th International Conference on Robotics, Control and Automation (ICRCA 2027) will be held in Aizuwakamatsu, Japan during March 26-28, 2027. It's aims to boost development of the robotics, control and automation field, expand channels of international academic exchange in science and technology, build a sharing platform of academic resources, promote scientific innovation on the global scale. ★★Publication All submitted papers will undergo a rigorous peer-review process by the conference technical program committee. Accepted papers that are duly registered and presented will be published in the ICRCA 2027 Conference Proceedings, which will be indexed by Ei Compendex and Scopus. **The proceedings of ICRCA 2017-ICRCA 2025 have been published online and successfully indexed by EI Compendex and Scopus. ★★History of Publication ICRCA 2026 | IEEE Xplore | ISBN: 979-8-3315-6454-4 ICRCA 2025 | IEEE Xplore | ISBN: 979-8-3315-4456-0 ICRCA 2024｜IEEE Xplore | ISBN: 979-8-3503-4471-4 ICRCA 2023｜IEEE Xplore | ISBN: 979-8-3503-4577-3 ICRCA 2022｜IEEE Xplore | ISBN: 978-1-6654-8173-1 ICRCA 2021｜ACM｜ISBN: 978-1-4503-8748-4 ICRCA 2019｜ACM｜ISBN: 978-1-4503-7183-4 ICRCA 2018｜ACM｜ISBN: 978-1-4503-6530-7 ICRCA 2017｜ACM｜ISBN: 978-1-4503-5327-4 For more information, please visit: http://www.icrca.org/history.html ★★Call for Paper Topics of interest for submission include, but are not limited to: Intelligent Control Systems and Optimization •Genetic Algorithms •Fuzzy Control •Decision Support Systems •Machine Learning in Control Applications •Knowledge-based Systems Applications •Hybrid Learning Systems •Distributed Control Systems Signal Processing, Sensors, Systems Modelling and Control •Adaptive Signal Processing and Control •Environmental Monitoring and Control •Optimization Problems in Signal Processing •Signal Reconstruction •Computer and Microprocessor-based Control •Real-Time Systems Control •Information-based Models for Control Robotics and Automation •Image Processing •Vision, Recognition and Reconstruction •Robot Design, Development and Control •Control and Supervision Systems •Telerobotics and Teleoperation •Vehicle Control Applications Industrial Engineering, Production and Management •Facilities Planning and Management •Energy Efficiency and Green Manufacturing •Precision Engineering •Business Process Modelling •Resources and Knowledge Management in Industry •Manufacturing Systems Engineering For more topics, please visit: http://www.icrca.org/cfp.html ★★Submission 1. Full paper (Publication and Presentation) 2. Abstract (Only Presentation) Submission Online Electrical System (.pdf): https://www.zmeeting.org/submission/icrca2027 More detail about submission, please visit at https://www.icrca.org/sub.html ★★Conference Program March 26, 2027 | Registration &amp; Material Collecting March 27, 2027 | Opening Remarks &amp; Keynote Speeches &amp; Parallel Sessions March 28, 2027 | Invited Speeches &amp; Parallel Sessions ★★Conference Venue University of Aizu, Aizuwakamatsu, Japan Address: Aizuwakamatsu City, Fukushima Prefecture, 965-8580, JAPAN ★★Contact Us Ms. Elvira Liu Email: icrca_conf@163.com Tel: +86-15902806624 Working Time: 10.00am-18.00pm (Monday - Friday / GMT+8)</text:p>
          </table:table-cell>
          <table:table-cell table:number-columns-repeated="1013"/>
        </table:table-row>
        <table:table-row table:style-name="ro1">
          <table:table-cell table:style-name="ce2" office:value-type="string" calcext:value-type="string">
            <text:p>ACM-AAMLDS 2026</text:p>
          </table:table-cell>
          <table:table-cell table:style-name="ce2" office:value-type="string" calcext:value-type="string">
            <text:p>2026 International Conference on Advanced Algorithms, Machine Learning, and Data Science (AAMLDS 2026)</text:p>
          </table:table-cell>
          <table:table-cell table:style-name="ce2" office:value-type="float" office:value="90" calcext:value-type="float">
            <text:p>90</text:p>
          </table:table-cell>
          <table:table-cell table:style-name="ce2" office:value-type="float" office:value="25" calcext:value-type="float">
            <text:p>25</text:p>
          </table:table-cell>
          <table:table-cell table:style-name="ce3" office:value-type="date" office:date-value="2026-11-10" calcext:value-type="date">
            <text:p>2026-11-10</text:p>
          </table:table-cell>
          <table:table-cell table:number-columns-repeated="2"/>
          <table:table-cell table:style-name="ce2" office:value-type="string" calcext:value-type="string">
            <text:p>Xiamen, China</text:p>
          </table:table-cell>
          <table:table-cell table:style-name="ce2" office:value-type="string" calcext:value-type="string">
            <text:p>Dec 4, 2026 - Dec 6, 2026</text:p>
          </table:table-cell>
          <table:table-cell table:style-name="ce4" office:value-type="string" calcext:value-type="string">
            <text:p><text:a xlink:href="https://www.aamlds.net/" xlink:type="simple">https://www.aamlds.net/</text:a></text:p>
          </table:table-cell>
          <table:table-cell table:style-name="ce2" office:value-type="string" calcext:value-type="string">
            <text:p>【Call for Papers】 2026 International Conference on Advanced Algorithms, Machine Learning, and Data Science (AAMLDS 2026) *【Important Information】: Website: https://www.aamlds.net/ Venue: Xiamen, China (both online and in-person) Conference Date: December 4-6, 2026 *【Conference Introduction】: 2026 International Conference on Advanced Algorithms, Machine Learning, and Data Science (AAMLDS 2026) will be held in Xiamen, China during December 4-6, 2026. It is sponsored by Xiamen University Intellegent Systems and Computing Lab; organized by Xiamen University Intellegent Systems and Computing Lab. During the upcoming conference, the invited renowned professors will share with us the recent innovations in the fields of Advanced Algorithms, Machine Learning and Data Science. The conference will mainly feature on keynote speeches as well as peer-reviewed paper presentations. In addition, social program or academic visit will be arranged to encourage communication, discussion or cooperation among the researchers in this field. We invite submissions of papers presenting an original high-quality research and development for the conference. All papers must be written in English and will be peer-reviewed by technical committees of the Conference and all accepted papers will be published in the conference proceedings. *【Publication and Indexing】: ★ AAMLDS 2026 Conference Proceedings will be published by ACM, which will be archived in the ACM Digital Library, and indexed by Ei Compendex and Scopus. *【Journal Recommendation】: ★You may choose to publish your paper in AAMLDS 2026 proceedings, or extend it for free publication in the following journals: ①Journal of Machine Learning Advances Frequency: Quarterly Submission to First Decision: 2 days Submission to Acceptance: 20 days Accept to Publish: 30 days Journal website: https://ojs.weavecorepress.com/index.php/JMLA ② Journal of Algorithms in Complex Systems Frequency: Quarterly Submission to First Decision: 2 days Submission to Acceptance: 20 days Accept to Publish: 30 days Journal website: https://ojs.weavecorepress.com/index.php/JACS *【Submission Methods】: 1. Online Submission System: https://cmt3.research.microsoft.com/AAMLDS2026 2. Submission Email: aamlds@126.com Submission guidelines: https://www.aamlds.net/Guide%20For%20Submissions.html *【Contact us】: Website: https://www.aamlds.net/ Email: aamlds@126.com Tel: +8613502461341(Wechat) QQ: 2056773349 *【Conference Speakers】: Keynote Speaker I: Prof. Nianyin Zeng, Xiamen University, China Keynote Speaker II: Prof. Weijia Jia, Beijing Normal University, China Keynote Speaker II: Prof. Qiu Daowen, Sun Yat-Sen University, China Keynote Speaker II: Prof. Haiquan Zhao, Southwest Jiaotong University, China *【Call for papers】: Track 1: Advanced Algorithm Design and Analysis Track 2: Machine Learning Theories and Models Track 3: Data Science and Big Data Analytics Track 4: Optimization, Learning Systems, and Scalability Track 5: Cross-disciplinary Applications and Emerging Topics (for more topics: https://www.aamlds.net/Guide%20For%20Submissions.html) *【Guidelines for submission】: 1. The papers should be written in English and clearly state the title, objective, method, results, and conclusion with major keywords. 2. Papers prepared in the prescribed format are to be submitted. 3. The number of pages of the paper should be no less than 6 pages. 4. The review period is about 3-4 weeks. 5. The paper should be original work of the author(s), and no portion of the paper (including, but not limited to, graphics and figures) has been previously published. The paper is not currently under consideration for publication elsewhere. 6. The results will be available within 3-4 weeks after submission. If the review is fast, the results will be available within 1-2 weeks. The earlier the submission, the earlier the review and the earlier the acceptance notice. *【Types of Participation】: 1. Participation as an Author: For each accepted paper, one author is permitted to give a presentation; all co-authors can attend the conference free of charge. 2. Keynote Speaker: Applicants can apply to deliver a keynote speech, which will be subject to review by the organizing committee. 3. Oral Presentation: Each oral presenter will have 10-15 minutes for their presentation. 4. Poster Presentation: Poster presenters should prepare their posters in accordance with the poster template provided on the official website. 5. Listener: Participants who do not submit papers but only attend the conference can take part in Q&amp;A session, and are also eligible to give oral speeches or make poster presentations.</text:p>
          </table:table-cell>
          <table:table-cell table:number-columns-repeated="1013"/>
        </table:table-row>
        <table:table-row table:style-name="ro1">
          <table:table-cell table:style-name="ce2" office:value-type="string" calcext:value-type="string">
            <text:p>Ei/Scopus-MLBDM 2026</text:p>
          </table:table-cell>
          <table:table-cell table:style-name="ce2" office:value-type="string" calcext:value-type="string">
            <text:p>2026 6th International Conference on Machine Learning and Big Data Management (MLBDM 2026)</text:p>
          </table:table-cell>
          <table:table-cell table:style-name="ce2" office:value-type="float" office:value="72" calcext:value-type="float">
            <text:p>72</text:p>
          </table:table-cell>
          <table:table-cell table:style-name="ce2" office:value-type="float" office:value="28" calcext:value-type="float">
            <text:p>28</text:p>
          </table:table-cell>
          <table:table-cell table:style-name="ce3" office:value-type="date" office:date-value="2026-11-20" calcext:value-type="date">
            <text:p>2026-11-20</text:p>
          </table:table-cell>
          <table:table-cell table:style-name="ce3" office:value-type="date" office:date-value="2026-12-04" calcext:value-type="date">
            <text:p>2026-12-04</text:p>
          </table:table-cell>
          <table:table-cell table:style-name="ce3" office:value-type="date" office:date-value="2026-12-10" calcext:value-type="date">
            <text:p>2026-12-10</text:p>
          </table:table-cell>
          <table:table-cell table:style-name="ce2" office:value-type="string" calcext:value-type="string">
            <text:p>Hangzhou, China</text:p>
          </table:table-cell>
          <table:table-cell table:style-name="ce2" office:value-type="string" calcext:value-type="string">
            <text:p>Dec 18, 2026 - Dec 20, 2026</text:p>
          </table:table-cell>
          <table:table-cell table:style-name="ce4" office:value-type="string" calcext:value-type="string">
            <text:p><text:a xlink:href="http://www.mlbdm.net/" xlink:type="simple">http://www.mlbdm.net/</text:a></text:p>
          </table:table-cell>
          <table:table-cell table:style-name="ce2" office:value-type="string" calcext:value-type="string">
            <text:p>2026 6th International Conference on Machine Learning and Big Data Management (MLBDM 2026) Location: Hangzhou, China Dates: December 18-20, 2026 Website: http://www.mlbdm.net/ E-mail: sub@mlbdm.net Conference Format: Online and In-person 2026 6th International Conference on Machine Learning and Big Data Management (MLBDM 2026), as the workshop of ACAI 2026, sponsored by Zhejiang University of Technology, Nanjing University, hosted by College of Computer Science and Technology, Zhejiang University of Technology, supported by Software Engineering Institute of East China Normal University, will be held during December 18-20, 2026 in Hangzhou, China. MLBDM aims to provide a forum for researchers, practitioners, and professionals from the industry, academia and government to discourse on research and development, professional practice in Machine Learning and Big Data Management. MLBDM 2026 will include presentations in form of contributed papers, poster sessions, and state of the art lectures by invited keynote speakers. Topics: Unsupervised Learning Algorithms and Systems for Big Data Search Meaningful Compression Distributed, and Peer-to-peer Search Computational Theories of Learning Big Data Search Architectures, Scalability and Efficiency Big Data Visualization Data Acquisition, Integration, Cleaning, and Best Practices Structure Discovery Visualization Analytics for Big Data Feature Elicitation Computational Modeling and Data Integration (For more topics: http://www.mlbdm.net/topics.html) Paper Publication and Indexing: Accepted papers after proper registration and presentation will be included in the Conference Proceedings, published by IEEE and indexed by Ei Compendex, Scopus, CPCI and other important databases. Previous Publication and indexing: *All papers included in MLBDM 2020-2025 have been published and indexed by EI and Scopus successfully! Paper Submission (Choose one way to submit your paper): 1. Submission System: https://cmt3.research.microsoft.com/MLBDM2026/ (Recommend) 2. Email Submission: sub@mlbdm.net You are also welcome to join us as: As Presenter: If you want to share you latest research results by giving presentation without publishing papers, please submit your abstract (300-400 words) As Listener: You are also warmly welcomed to take part in MLBDM 2026 as a listener even though you have no paper to submit. As Reviewer: To ensure the fairness and to guarantee the quality of MLBDM 2026, we cordially invite experts and scholars join us as a reviewer. MLBDM 2026 Organizing committee members: Conference Chairs: Prof. Xiangjie Kong, Zhejiang University of Technology, China Prof. James Tin Yau KWOK (Fellow IEEE), The Hong Kong University of Science and Technology, Hong Kong, China Prof. Wanyang Dai, Nanjing University, China Program Chairs: Prof. Zhen Lei, IEEE Fellow, IAPR Fellow, University of Chinese Academy of Sciences, China Prof. Yudong Zhang, Southeast University, China Prof. Xiaodong Liu, Head of Intelligence-Driven Software Engineering Research Group, Edinburgh Napier University, UK Prof. Lei Zhang, Vice Dean, East China Normal University, China Contact us: Conference Secretary: Mrs. Caroline Li Email: sub@mlbdm.net Tel: +852 92562476 Website: http://www.mlbdm.net/</text:p>
          </table:table-cell>
          <table:table-cell table:number-columns-repeated="1013"/>
        </table:table-row>
        <table:table-row table:style-name="ro1">
          <table:table-cell table:style-name="ce2" office:value-type="string" calcext:value-type="string">
            <text:p>IEEE-MLNLP 2026</text:p>
          </table:table-cell>
          <table:table-cell table:style-name="ce2" office:value-type="string" calcext:value-type="string">
            <text:p>2026 IEEE 9th International Conference on Machine Learning and Natural Language Processing (MLNLP 2026)</text:p>
          </table:table-cell>
          <table:table-cell table:style-name="ce2" office:value-type="float" office:value="85" calcext:value-type="float">
            <text:p>85</text:p>
          </table:table-cell>
          <table:table-cell table:style-name="ce2" office:value-type="float" office:value="30" calcext:value-type="float">
            <text:p>30</text:p>
          </table:table-cell>
          <table:table-cell table:style-name="ce3" office:value-type="date" office:date-value="2026-11-30" calcext:value-type="date">
            <text:p>2026-11-30</text:p>
          </table:table-cell>
          <table:table-cell table:number-columns-repeated="2"/>
          <table:table-cell table:style-name="ce2" office:value-type="string" calcext:value-type="string">
            <text:p>Xiamen, China</text:p>
          </table:table-cell>
          <table:table-cell table:style-name="ce2" office:value-type="string" calcext:value-type="string">
            <text:p>Dec 26, 2026 - Dec 28, 2026</text:p>
          </table:table-cell>
          <table:table-cell table:style-name="ce4" office:value-type="string" calcext:value-type="string">
            <text:p><text:a xlink:href="https://www.mlnlp2026.net/" xlink:type="simple">https://www.mlnlp2026.net/</text:a></text:p>
          </table:table-cell>
          <table:table-cell table:style-name="ce2" office:value-type="string" calcext:value-type="string">
            <text:p>*【Important Information】: Website: https://www.mlnlp2026.net/ Venue: Xiamen, China (both online and in-person) Conference Date: Dec. 26-28, 2026 *【Conference Introduction】: MLNLP 2026 has been officially listed on IEEE Conference List: https://conferences.ieee.org/conferences_events/conferences/conferencedetails/72106 2026 9th International Conference on Machine Learning and Natural Language Processing (MLNLP 2026) will be held in Xiamen, China during Dec. 26-28, 2026. It is organized by School of Computer Engineering, Jimei University, China; sponsored by IEEE, IEEE Computational Intelligence Society. MLNLP 2026 will be held in Jimei University, China. During the upcoming conference, the invited renowned professors will share with us the recent innovations in the fields of Machine Learning and Natural Language Processing. The conference will mainly feature on keynote speeches as well as peer-reviewed paper presentations. In addition, social program or academic visit will be arranged to encourage communication, discussion or cooperation among the researchers in these fields. We invite submissions of papers presenting an original high-quality research and development for the conference. All papers must be written in English and will be peer-reviewed by technical committees of the Conference and all accepted papers will be published in the conference proceedings. *【Publication and Indexing】: ★All accepted papers will be included in MLNLP 2026 Conference Proceedings and published by IEEE, which will be archived in IEEE Xplore, and indexed by Ei Compendex, Scopus and Web of Science (CPCI-S). ★MLNLP 2025 all accepted papers have been published by IEEE and indexed by IEEE Xplore, EI Compendex and Scopus successfully within 1 month after publication. ★MLNLP 2024 all accepted papers have been published by IEEE and indexed by IEEE Xplore, EI Compendex and Scopus successfully within 1 month after publication. ★MLNLP 2023 all accepted papers have been published by ACM and indexed by EI Compendex and Scopus successfully within 1 month after publication *【Journal Recommendation】: ★You may choose to publish your paper in the MLNLP 2026 proceedings, or extend it for free publication in the following journals: ①Journal of Machine Learning Advances Frequency: Quarterly Submission to First Decision: 2 days Submission to Acceptance: 20 days Accept to Publish: 30 days JMLA website: https://ojs.weavecorepress.com/index.php/JMLA ② Journal of Algorithms in Complex Systems Frequency: Quarterly Submission to First Decision: 2 days Submission to Acceptance: 20 days Accept to Publish: 30 days JACS website: https://ojs.weavecorepress.com/index.php/JACS *【Submission Methods】: 1. Online Submission System: https://cmt3.research.microsoft.com/MLNLP2026 2. Submission Email: mlnlp@applied-computing.net Submission guidelines: https://mlnlp2026.net/submission.html *【Contact us】: Website: https://www.mlnlp2026.net/ Email: mlnlp@applied-computing.net Tel: +8613502461341(Wechat) QQ: 2056773349 *【Conference Speakers】: Keynote Speaker I: Prof. James Tin-Yau Kwok, Hong Kong University of Science and Technology, Hong Kong, China (IEEE Fellow) Keynote Speaker II: Prof. Jixin Ma, University of Greenwich, UK Keynote Speaker III: Prof. Nianyin Zeng, Xiamen University, China *【Call for papers】: Track 1: Machine Learning (ML) Foundations: Supervised, unsupervised, and semi-supervised learning. Deep Learning: Neural network architectures, attention mechanisms, and graph neural networks. Learning Paradigms: Reinforcement learning, transfer learning, and multi-task learning. Trustworthy AI: Explainable AI (XAI), robustness, fairness, and privacy-preserving machine learning. Optimization: Large-scale optimization algorithms and evolutionary computing. Edge &amp; Distributed ML: Federated learning and on-device machine learning. Track 2: Natural Language Processing (NLP) Large Language Models (LLMs): Pre-training, fine-tuning, prompting, and alignment (RLHF). Linguistic Analysis: Syntactic parsing, semantic analysis, and pragmatic reasoning. Core NLP Tasks: Named entity recognition, sentiment analysis, and summarization. Dialogue &amp; Interactive Systems: Chatbots, multi-turn dialogue management, and human-computer interaction. Machine Translation: Neural machine translation and multilingual processing. Information Retrieval: Question answering, document ranking, and knowledge graph construction. Track 3: Track 3: ML &amp; NLP Convergence (Emerging Trends) Multimodal Learning: Integration of vision, audio, and text (Vision-Language Models). Cognitive Computing: Language understanding inspired by human cognition. AI for Science: Applications of MLNLP in healthcare, finance, and social sciences. Efficiency &amp; Sustainability: Green AI, model compression, and efficient inference. Creative AI: Controllable text generation and AI-aided content creation. Ethics &amp; Society: Detection of AI-generated content (Deepfake text) and bias mitigation. (for more topics: https://www.mlnlp2026.net/topic.html) *【Guidelines for submission】: 1. The papers should be written in English and clearly state the title, objective, method, results, and conclusion with major keywords. 2. Papers prepared in the prescribed format are to be submitted. 3. The number of pages of the paper should be no less than 5 pages with double columns. 4. The review period is about 3-4 weeks. 5. The paper should be original work of the author(s), and no portion of the paper (including, but not limited to, graphics and figures) has been previously published. The paper is not currently under consideration for publication elsewhere. 6. Download the paper template from the official website. 7. The results will be available within 3-4 weeks after submission. If the review is fast, the results will be available within 1-2 weeks. The earlier the submission, the earlier the review and the earlier the acceptance notice. *【Types of Participation】: 1. Participation as an Author: For each accepted paper, one author is permitted to give a presentation; all co-authors can attend the conference free of charge. 2. Keynote Speaker: Applicants can apply to deliver a keynote speech, which will be subject to review by the organizing committee. 3. Oral Presentation: Each oral presenter will have 10-15 minutes for their presentation. 4. Poster Presentation: Poster presenters should prepare their posters in accordance with the poster template provided on the official website. 5. Listener: Participants who do not submit papers but only attend the conference can take part in Q&amp;A session, and are also eligible to give oral speeches or make poster presentations.</text:p>
          </table:table-cell>
          <table:table-cell table:number-columns-repeated="1013"/>
        </table:table-row>
        <table:table-row table:style-name="ro1">
          <table:table-cell table:style-name="ce2" office:value-type="string" calcext:value-type="string">
            <text:p>ICNLP--EI 2027</text:p>
          </table:table-cell>
          <table:table-cell table:style-name="ce2" office:value-type="string" calcext:value-type="string">
            <text:p>2027 The 9th International Conference on Natural Language Processing (ICNLP 2027)</text:p>
          </table:table-cell>
          <table:table-cell table:style-name="ce2" office:value-type="float" office:value="70" calcext:value-type="float">
            <text:p>70</text:p>
          </table:table-cell>
          <table:table-cell table:style-name="ce2" office:value-type="float" office:value="25" calcext:value-type="float">
            <text:p>25</text:p>
          </table:table-cell>
          <table:table-cell table:style-name="ce3" office:value-type="date" office:date-value="2026-11-30" calcext:value-type="date">
            <text:p>2026-11-30</text:p>
          </table:table-cell>
          <table:table-cell table:number-columns-repeated="2"/>
          <table:table-cell table:style-name="ce2" office:value-type="string" calcext:value-type="string">
            <text:p>Zhenjiang, China</text:p>
          </table:table-cell>
          <table:table-cell table:style-name="ce2" office:value-type="string" calcext:value-type="string">
            <text:p>Apr 16, 2027 - Apr 18, 2027</text:p>
          </table:table-cell>
          <table:table-cell table:style-name="ce4" office:value-type="string" calcext:value-type="string">
            <text:p><text:a xlink:href="http://www.icnlp.net/" xlink:type="simple">http://www.icnlp.net/</text:a></text:p>
          </table:table-cell>
          <table:table-cell table:style-name="ce2" office:value-type="string" calcext:value-type="string">
            <text:p>★Full Name: 2027 The 9th International Conference on Natural Language Processing (ICNLP 2027) ★Abbreviation: ICNLP 2027 ★Website: http://www.icnlp.net/ ★Date: April 16-18, 2027 ★Place: Zhenjiang, China ★Organised by: mainly Sponsored by Jiangsu University of Science and Technology, hosted by School of Computer Science, Jiangsu University of Science and Technology, and jointly supported by many universities, industries, and academic institutions. ★News:The Proceedings of ICNLP 2026 have been successfully published in the IEEE Xplore Digital Library. https://ieeexplore.ieee.org/xpl/conhome/11527440/proceeding ★Call for paper★ 1. Language Analysis and Representation: Phonetics, Phonology, and Morphology; Syntax, Semantics, Discourse, Pragmatics, Dialogue, and Lexicon; Word and Sentence Representation; Semantic Role Labelling; 2. Language Processing Models and Techniques: Mathematical, Statistical, Machine Learning, and Deep Learning Models; Mathematical and Statistical Models; Machine Learning Models; Deep Learning Models; 3. Language Resources and Tools: Language Resources and Corpora; Electronic Dictionaries, Terminologies, and Ontologies; Linked Data; 4. Multilingual and Cross-Lingual Processing: Multilingual NLP; Machine Translation, Translation Memory Systems, and Computer-Aided Translation Tools; Text Simplification and Readability Estimation; 5. Information Extraction and Retrieval: Knowledge Acquisition; Information Retrieval; Text Categorization; 6. Sentiment Analysis and Human Interaction:: Opinion Mining and Sentiment Analysis; Computer-Aided Language Learning; For details about topics, please visit at https://icnlp.net/cfp.html ★ Publication Submissions must be original and should not have been published previously or be under consideration for publication while being evaluated for this conference, and all accepted and presented papers of ICNLP2027 will be published into Conference Proceedings. Recommended Journal Selected paper will be recommended and invited to publish an at least 30% extended version on the Graph Database, Knowledge Graph and Natural Language Processing, a special issue of Mathematics (ISSN 2227-7390). This special issue belongs to the section "Mathematics and Computer Science". (Indexing: SCIE, Scopus CNKI, etc.) ★Submission★ 1. Full paper(publication and presentation) 2. Abstract (presentation only) There are two methods for submitting your paper: 1. By Electronic Submission System: https://www.zmeeting.org/submission/icnlp2027 2. By our contact email: icnlp@chairmen.org More detail about submission, please visit at https://icnlp.net/sub.html ★★Conference Schedule★★ Friday, April 16, 2027| Conference Registration and Materials Collection/Pre-test for Online Conference Saturday, April 17, 2027 | Invited Talks (Keynote Speech, Plenary Speech, Invited Speech) &amp; Onsite Parallel Sessions &amp; Poster Session &amp; Special Sessions Sunday, April 18, 2027 | Social Program &amp; Online Parallel Sessions ★★Contact: Ms. Zenobia Yang (Conference Secretary) Email: icnlp@chairmen.org Telephone: (+86) 18702848313； (Working hour: GMT+8 10:00am-17:00pm) Wechat: 18081079313</text:p>
          </table:table-cell>
          <table:table-cell table:number-columns-repeated="1013"/>
        </table:table-row>
        <table:table-row table:style-name="ro1">
          <table:table-cell table:style-name="ce2" office:value-type="string" calcext:value-type="string">
            <text:p>IPMI 2027</text:p>
          </table:table-cell>
          <table:table-cell table:style-name="ce2" office:value-type="string" calcext:value-type="string">
            <text:p>Information Processing in Medical Imaging (IPMI) 2027</text:p>
          </table:table-cell>
          <table:table-cell table:style-name="ce2" office:value-type="float" office:value="10" calcext:value-type="float">
            <text:p>10</text:p>
          </table:table-cell>
          <table:table-cell table:style-name="ce2" office:value-type="float" office:value="22" calcext:value-type="float">
            <text:p>22</text:p>
          </table:table-cell>
          <table:table-cell table:style-name="ce3" office:value-type="date" office:date-value="2026-12-07" calcext:value-type="date">
            <text:p>2026-12-07</text:p>
          </table:table-cell>
          <table:table-cell table:style-name="ce3" office:value-type="date" office:date-value="2027-02-15" calcext:value-type="date">
            <text:p>2027-02-15</text:p>
          </table:table-cell>
          <table:table-cell/>
          <table:table-cell table:style-name="ce2" office:value-type="string" calcext:value-type="string">
            <text:p>Lake Stukely, QC, Canada</text:p>
          </table:table-cell>
          <table:table-cell table:style-name="ce2" office:value-type="string" calcext:value-type="string">
            <text:p>Jun 27, 2027 - Jul 2, 2027</text:p>
          </table:table-cell>
          <table:table-cell table:style-name="ce4" office:value-type="string" calcext:value-type="string">
            <text:p><text:a xlink:href="https://2027.ipmi-conf.org/" xlink:type="simple">https://2027.ipmi-conf.org/</text:a></text:p>
          </table:table-cell>
          <table:table-cell table:style-name="ce2" office:value-type="string" calcext:value-type="string">
            <text:p>Information Processing in Medical Imaging (IPMI) 2027 June 27 - July 02, 2027 • Lake Stukely, Orford, Quebec, Canada https://2027.ipmi-conf.org 🌐 Web: https://2027.ipmi-conf.org 💬 Contact: team-2027@ipmi-conf.org 🗓️ Dates: June 27 – July 02, 2027 📍 Location: Lake Stukely, Quebec, Canada ⏰ Submission: December 07, 2026 🎖️ About IPMI: Continuing almost 60 years of scientific excellence, IPMI remains the influential premier forum for methodological breakthroughs in medical image computing. 🔍 The Experience: Known for its immersive retreat-like atmosphere, IPMI fosters active scientific debate and in-depth discussion of new methodological developments. 📝 The Call: We invite high-quality submissions presenting innovative algorithms and sound theoretical foundations in biomedical imaging. 🎖️ ➤ About IPMI Join the 30th biennial IPMI conference from June 27 to July 02, 2027, at beautiful Lake Stukely in Quebec, Canada. Continuing almost 60 years of scientific excellence, IPMI is the influential premier forum for methodological breakthroughs in medical image computing. Known for its immersive retreat-like atmosphere, IPMI fosters active scientific debate and in-depth discussion of new methodological developments. We invite high-quality submissions featuring innovative algorithms and sound theoretical foundations in biomedical imaging. Web: https://2027.ipmi-conf.org Contact: team-2027@ipmi-conf.org 🗓️ ➤ Important Dates ● Submission Deadline: December 07, 2026, 23:59 PST (no extensions) ● Decision Notification: February 15, 2027 ● Conference: June 27 - July 02, 2027 🔍 ➤ The Venue IPMI 2027 honors its 58-year tradition of deep scientific exchange at the Jouvence Center on beautiful Lake Stukely in Canada. Its retreat-like atmosphere is located 90 minutes east of Montreal. There, discussion never stops. Modern facilities blend with pristine woodland, allowing interactions to flow from formal sessions to lakeside trails or lakeshore breaks. Whether hiking, canoeing or in the conference center, attendees engage in the uninterrupted networking and in influential debates that define IPMI’s history. 🔬 ➤ The Topics Following topics, and beyond, are welcome: ● Mathematical Foundations and Computational Methods Inverse problems and optimization theory • Computational anatomy and physiology • Geometric learning • Statistical and computational modeling • Quantum computing applications ● Image Formation and Reconstruction Image acquisition and reconstruction methods • Image registration, segmentation and fusion • Functional, diffusion and molecular imaging • Multidimensional, multimodality, multiscale problems ● Machine Learning and Intelligence Novel deep learning theory and architectures • Foundation models and multimodal learning • Generative modeling and synthesis • Transfer Learning, domain adaptation, federated learning • Uncertainty quantification and robust learning • Causal learning and interpretable methods ● Clinical Applications and Translation Image-guided interventions and surgery • Computer-aided diagnosis and treatment • Imaging genomics and omics integration • Digital twins and augmented reality applications ● Visualization and Human-AI Interaction Advanced visualization and immersive interfaces • Privacy-preserving and sustainable computing 📝 ➤ Submission Guidelines Papers have 12 pages, excluding references, in Springer LNCS format; strict adherence is required to avoid desk rejection. Submissions must be original unpublished work, not under review elsewhere during the IPMI review period, and will undergo a double-blind review. Authors are required to attend the conference in person to engage in discussions. Onsite language assistance will be available for those in need. Conference proceedings are traditionally published in the Springer Lecture Notes Computer Science (LNCS) series. 👥 ➤ Organization General Chairs: Hervé Lombaert, Julia Schnabel Program Chairs: Maria Zuluaga, Ninon Burgos, Ismail Ben Ayed, Pierre-Marc Jodoin Local Chairs: Maxime Descoteaux, Christian Desrosiers Scientific Advisors: Kaleem Siddiqi, Tal Arbel, Ipek Oguz Digital Chair: Hoel Kervadec Website: https://2027.ipmi-conf.org Contact: team-2027@ipmi-conf.org</text:p>
          </table:table-cell>
          <table:table-cell table:number-columns-repeated="1013"/>
        </table:table-row>
        <table:table-row table:style-name="ro1">
          <table:table-cell table:style-name="ce2" office:value-type="string" calcext:value-type="string">
            <text:p>IEA/AIE 2027 2027</text:p>
          </table:table-cell>
          <table:table-cell table:style-name="ce2" office:value-type="string" calcext:value-type="string">
            <text:p>The 40th International Conference on Industrial, Engineering &amp; Other Applications of Applied Intelligent Systems</text:p>
          </table:table-cell>
          <table:table-cell table:style-name="ce2" office:value-type="float" office:value="88" calcext:value-type="float">
            <text:p>88</text:p>
          </table:table-cell>
          <table:table-cell table:style-name="ce2" office:value-type="float" office:value="28" calcext:value-type="float">
            <text:p>28</text:p>
          </table:table-cell>
          <table:table-cell table:style-name="ce3" office:value-type="date" office:date-value="2026-12-15" calcext:value-type="date">
            <text:p>2026-12-15</text:p>
          </table:table-cell>
          <table:table-cell table:style-name="ce3" office:value-type="date" office:date-value="2027-03-10" calcext:value-type="date">
            <text:p>2027-03-10</text:p>
          </table:table-cell>
          <table:table-cell table:style-name="ce3" office:value-type="date" office:date-value="2027-04-15" calcext:value-type="date">
            <text:p>2027-04-15</text:p>
          </table:table-cell>
          <table:table-cell table:style-name="ce2" office:value-type="string" calcext:value-type="string">
            <text:p>Naples, Italy</text:p>
          </table:table-cell>
          <table:table-cell table:style-name="ce2" office:value-type="string" calcext:value-type="string">
            <text:p>Jul 20, 2027 - Jul 22, 2027</text:p>
          </table:table-cell>
          <table:table-cell table:style-name="ce4" office:value-type="string" calcext:value-type="string">
            <text:p><text:a xlink:href="https://www.i-somet.org/iea-aie2027/" xlink:type="simple">https://www.i-somet.org/iea-aie2027/</text:a></text:p>
          </table:table-cell>
          <table:table-cell table:style-name="ce2" office:value-type="string" calcext:value-type="string">
            <text:p>The 40th International Conference on Industrial, Engineering &amp; Other Applications of Applied Intelligent Systems IEA/AIE 2026 continues the tradition of emphasizing on applications of applied intelligent systems to solve real-life problems in all areas including engineering, science, industry, automation &amp; robotics, business &amp; finance, medicine and biomedicine, bioinformatics, cyberspace, and human-machine. The Conference Proceedings will be published by Lecture notes in AI, Springer. IEA/AIE 2027 IS ORGANIZED IN COOPERATION WITH ACM Special Interest Group on Artificial Intelligence (ACM SIGAI) / Catalan Association for Artificial Intelligence (ACIA) / China Computer Federation (CCF) / International Society of Applied Intelligence (ISAI) / Italian Association for Artificial Intelligence (AIxIA) / Iwate Prefectural University, Japan / Japanese Society for Artificial Intelligence (JSAI) / Society for the Study of Artificial Intelligence and the Simulation of Behavior (AISB) / Spanish Society for Artificial Intelligence (AEPIA)/ Taiwanese Association for Consumer Electronics (TACE) / Texas State University, USA / University of Hradec Kralove (UHK) / Universiti Tekonologi Malaysia (UTM) / Taiwanese Association for Artificial Intelligence (TAAI) Topics of interest include, but are not limited to: Adaptive Control Ambient Intelligence Argumentation Systems Artificial Immune Systems Automated Reasoning Autonomous Agents Bayesian Networks Bio-informatics Case-based Reasoning Computer Animation Computer Vision Cognitive Models Constraint Programming Data Mining Decision Support Systems Description Logics Evolutionary Computation Expert Systems Fuzzy Logic Games Information Retrieval Heuristic Search Human Robot Interaction Intelligent Systems Knowledge Representation Machine Learning Meta-heuristics Model-based Reasoning Multi-Agent Systems Multi-Media Processing Natural Language Processing Neural Networks Non-Monotonic Logics Optimization Planning and Scheduling Preference Reasoning Privacy Preserving Data Mining Robotics Semantic Web Smart Graphics Social Networks Soft Computing Speech Recognition Swarm Intelligence Temporal and Spatial Reasoning Uncertainty User Modeling Ontologies Submissions must be made through the system available at the following link: https://cmt3.research.microsoft.com/User/Login?ReturnUrl=%2FIEAAIE2027 Authors are invited to submit their papers in English of up to 12 single spaced pages including references, and presenting the results of original research or innovative practical applications relevant to the conference. Practical experiences with state-of-the-art AI methodologies are also acceptable when they reflect lessons of unique value to the conference attendees. Shorter works, up to 6 pages may be submitted as short papers representing work in progress or suggesting possible research directions. Submitted papers must be formatted using the Springer LNCS/LNAI style and will be done electronically using the submission button above. The use of the LaTeX2e style file available from Springer is required. Papers submitted to IEA/AIE 2027 must not have already been published, or accepted for publication, or be under review for a journal or another conference. Submissions will go through a double blind review process by Program Committee members for originality, significance, technical merit, and clarity of presentation. In this regard, authors should not include any information that would identify them or their affiliations. Such information can however be added to the camera-ready version, if the paper is accepted. The "best student paper award will be given to the best student submissions based on quality and novelty. Free registration fee and possible travel (if traveling is allowed) to the awarded winner will be offered by ACM SIGAI. Besides, there is other category for "best Technical paper" award and "best theory paper award; offered by Springer. The conference proceedings will be published by Springer in the Lecture Notes in Artificial Intelligence (LNCS/LNAI) series. A paper will be accepted either as a long or as a short paper. Long papers will be allocated 12 pages while short papers will be allocated 6 pages in the proceedings.</text:p>
          </table:table-cell>
          <table:table-cell table:number-columns-repeated="1013"/>
        </table:table-row>
        <table:table-row table:style-name="ro1">
          <table:table-cell table:style-name="ce2" office:value-type="string" calcext:value-type="string">
            <text:p>COMP 2026</text:p>
          </table:table-cell>
          <table:table-cell table:style-name="ce2" office:value-type="string" calcext:value-type="string">
            <text:p>OPEN COMPUTER SCIENCE</text:p>
          </table:table-cell>
          <table:table-cell table:style-name="ce2" office:value-type="float" office:value="90" calcext:value-type="float">
            <text:p>90</text:p>
          </table:table-cell>
          <table:table-cell table:style-name="ce2" office:value-type="float" office:value="35" calcext:value-type="float">
            <text:p>35</text:p>
          </table:table-cell>
          <table:table-cell table:style-name="ce3" office:value-type="date" office:date-value="2026-12-31" calcext:value-type="date">
            <text:p>2026-12-31</text:p>
          </table:table-cell>
          <table:table-cell table:number-columns-repeated="4"/>
          <table:table-cell table:style-name="ce4" office:value-type="string" calcext:value-type="string">
            <text:p><text:a xlink:href="https://www.degruyterbrill.com/comp" xlink:type="simple">https://www.degruyterbrill.com/comp</text:a></text:p>
          </table:table-cell>
          <table:table-cell table:style-name="ce2" office:value-type="string" calcext:value-type="string">
            <text:p>𝗢𝗣𝗘𝗡 𝗖𝗢𝗠𝗣𝗨𝗧𝗘𝗥 𝗦𝗖𝗜𝗘𝗡𝗖𝗘 (IF 2024: 1.2) is a fully peer-reviewed, open access, electronic journal devoted to computer science. The journal provides readers with free, instant, and permanent access to all content worldwide. The topics include (but are not limited to): - Algorithms and Complexity Theory - Operations Research - Machine Learning and Artificial Intelligence - Trustworthy and Responsible AI - Distributed and Parallel Computing Systems - Bioinformatics and Computational Biology - Computer Networks and Security - Data Mining and Information Systems - Human Computer Interaction - Programming Languages - Computing Systems and Software Engineering - Evolutionary Computation and Fuzzy Systems - Theoretical Computer Science ============ 𝗘𝗗𝗜𝗧𝗢𝗥-𝗜𝗡-𝗖𝗛𝗜𝗘𝗙 Christos Anagnostopoulos, School of Computing Science, University of Glasgow, UK ============ 𝗘𝗗𝗜𝗧𝗢𝗥𝗜𝗔𝗟 𝗖𝗢𝗡𝗧𝗔𝗖𝗧 AssistantManagingEditor@degruyterbrill.com =========== 𝗪𝗘𝗕𝗦𝗜𝗧𝗘 https://www.degruyterbrill.com/comp ============ 𝗦𝗨𝗕𝗠𝗜𝗦𝗦𝗜𝗢𝗡 𝗦𝗬𝗦𝗧𝗘𝗠 https://www.editorialmanager.com/opencs ============ 𝗬𝗢𝗨𝗥 𝗕𝗘𝗡𝗘𝗙𝗜𝗧𝗦 As an author of Open Computer Science from - fair and constructive peer review - quick online publication of accepted papers (continuous publication model) - language polishing services upon acceptance for authors from non-English speaking regions - all articles are freely available to the academic community worldwide without any restrictions - promotion of published papers to readers and citers - distribution to open access directories (such as DOAJ) and thousands of libraries worldwide - Inclusion in prestigious international indexing services - liberal policies on copyrights (authors retain copyright) and on self-archiving (no embargo periods) (License to Publish (CC-BY)) - secure archiving by De Gruyter Brill and the independent archiving service Portico ============ 𝗔𝗥𝗧𝗜𝗖𝗟𝗘 𝗣𝗥𝗢𝗖𝗘𝗦𝗦𝗜𝗡𝗚 𝗖𝗛𝗔𝗥𝗚𝗘𝗦 Articles accepted for publication in Open Computer Science are subject to Article Processing Charges (APCs). The publication fee amounts to 1050 EUR. Authors who have no funding for the submitted research can apply for a waiver or a discount during the submission process. For more details please check the Article Processing Charges file available in Supplementary Materials on our website. https://www.degruyterbrill.com/comp If the submitting author is affiliated with an organization that has an open access agreement with De Gruyter Brill, the article processing charges (APCs) may be waived or discounted. For more information please visit our website. https://www.degruyterbrill.com/publishing/for-authors/journal-authors/open-access/agreements</text:p>
          </table:table-cell>
          <table:table-cell table:number-columns-repeated="1013"/>
        </table:table-row>
        <table:table-row table:style-name="ro1">
          <table:table-cell table:style-name="ce2" office:value-type="string" calcext:value-type="string">
            <text:p>SCIA 2027</text:p>
          </table:table-cell>
          <table:table-cell table:style-name="ce2" office:value-type="string" calcext:value-type="string">
            <text:p>Scandinavian Conference on Image Analysis</text:p>
          </table:table-cell>
          <table:table-cell table:style-name="ce2" office:value-type="float" office:value="28" calcext:value-type="float">
            <text:p>28</text:p>
          </table:table-cell>
          <table:table-cell table:style-name="ce2" office:value-type="float" office:value="30" calcext:value-type="float">
            <text:p>30</text:p>
          </table:table-cell>
          <table:table-cell table:style-name="ce3" office:value-type="date" office:date-value="2027-01-26" calcext:value-type="date">
            <text:p>2027-01-26</text:p>
          </table:table-cell>
          <table:table-cell table:style-name="ce3" office:value-type="date" office:date-value="2027-03-16" calcext:value-type="date">
            <text:p>2027-03-16</text:p>
          </table:table-cell>
          <table:table-cell table:style-name="ce3" office:value-type="date" office:date-value="2027-04-11" calcext:value-type="date">
            <text:p>2027-04-11</text:p>
          </table:table-cell>
          <table:table-cell table:style-name="ce2" office:value-type="string" calcext:value-type="string">
            <text:p>Gjøvik, Norway</text:p>
          </table:table-cell>
          <table:table-cell table:style-name="ce2" office:value-type="string" calcext:value-type="string">
            <text:p>Apr 8, 2028 - Jun 11, 2027</text:p>
          </table:table-cell>
          <table:table-cell table:style-name="ce4" office:value-type="string" calcext:value-type="string">
            <text:p><text:a xlink:href="https://scia2027.org/" xlink:type="simple">https://scia2027.org/</text:a></text:p>
          </table:table-cell>
          <table:table-cell table:style-name="ce2" office:value-type="string" calcext:value-type="string">
            <text:p>The Scandinavian Conference on Image Analysis (SCIA2027), organized by NOBIM and NTNU’s Colourlab in Gjøvik, connects professionals in image and video analysis. Its goal is to encourage collaboration across academia, industry, and the public sector while highlighting premium research in computer vision and pattern recognition. SCIA welcomes both groundbreaking theoretical developments and applications in emerging areas, including but not limited to: - 3D Vision from Multiview and Other Sensors - Action and Behavior Recognition - Biometrics, Faces, Body Gestures, and Pose Estimation - Computational Photography - Datasets and Evaluation Methodologies - Detection, Recognition, Classification, and Localization in 2D and/or 3D - Vision + Language (+ Other Modalities) - Vision Applications and Systems - Vision for Robotics and Autonomous Vehicles - Explainable AI for Computer Vision - Foundation models for Computer Vision - Image and Video Processing, Analysis, Imaging, and Understanding - Low-Level and Physics-Based Vision - Machine Learning Techniques - Medical and Biomedical Image Analysis - Motion Analysis and Tracking - Scene, Text, and Document Analysis and Understanding - Segmentation, Grouping, and Shape Analysis Two types of submissions are accepted: - Full paper: Original and unpublished work. Accepted papers will be included in the conference programme and they will be submitted for publication in Springer LNCS. - Abstract only: Accepted abstracts will be included in the conference programme, but they will not be submitted for publication in the proceedings. All submissions will go through a double-blind review process. More information regarding submission procedures will be soon circulated. Write to scia2027@idi.ntnu.no for questions or visit https://scia2027.org/ for more details.</text:p>
          </table:table-cell>
          <table:table-cell table:number-columns-repeated="1013"/>
        </table:table-row>
        <table:table-row table:style-name="ro1">
          <table:table-cell table:style-name="ce2" office:value-type="string" calcext:value-type="string">
            <text:p>ICDAIIS 2027</text:p>
          </table:table-cell>
          <table:table-cell table:style-name="ce2" office:value-type="string" calcext:value-type="string">
            <text:p>1st International Conference on Data, AI &amp; Intelligent Systems</text:p>
          </table:table-cell>
          <table:table-cell table:style-name="ce2" office:value-type="float" office:value="88" calcext:value-type="float">
            <text:p>88</text:p>
          </table:table-cell>
          <table:table-cell table:style-name="ce2" office:value-type="float" office:value="28" calcext:value-type="float">
            <text:p>28</text:p>
          </table:table-cell>
          <table:table-cell table:style-name="ce3" office:value-type="date" office:date-value="2027-04-01" calcext:value-type="date">
            <text:p>2027-04-01</text:p>
          </table:table-cell>
          <table:table-cell table:style-name="ce3" office:value-type="date" office:date-value="2027-04-15" calcext:value-type="date">
            <text:p>2027-04-15</text:p>
          </table:table-cell>
          <table:table-cell table:style-name="ce3" office:value-type="date" office:date-value="2027-05-01" calcext:value-type="date">
            <text:p>2027-05-01</text:p>
          </table:table-cell>
          <table:table-cell table:style-name="ce2" office:value-type="string" calcext:value-type="string">
            <text:p>Rome, Italy</text:p>
          </table:table-cell>
          <table:table-cell table:style-name="ce2" office:value-type="string" calcext:value-type="string">
            <text:p>Jul 9, 2027 - Jul 10, 2027</text:p>
          </table:table-cell>
          <table:table-cell table:style-name="ce4" office:value-type="string" calcext:value-type="string">
            <text:p><text:a xlink:href="https://icdaiis.com/" xlink:type="simple">https://icdaiis.com/</text:a></text:p>
          </table:table-cell>
          <table:table-cell table:style-name="ce2" office:value-type="string" calcext:value-type="string">
            <text:p>The International Conference on Data, AI, and Intelligent Systems (ICDAIIS) aims to bring together researchers, practitioners, and industry experts to share cutting-edge research, innovative methodologies, and practical applications in these rapidly evolving fields. The conference serves as a platform for interdisciplinary collaboration, fostering the exchange of ideas that bridge theory and practice across engineering, computing, and management disciplines. ICDAIIS welcomes original and unpublished contributions that address emerging trends, novel techniques, and real-world applications in data-driven and intelligent systems. Submissions from academia, industry, and government organizations are encouraged, including full research papers, work-in-progress studies, and application-oriented case studies. The conference will cover a broad range of topics, including, but not limited to, areas related to data analytics, artificial intelligence, intelligent systems, cybersecurity, and engineering management, with an emphasis on innovation, integration, and impactful solutions for modern engineering challenges. All submissions will be evaluated through a double-blind peer review process by four independent reviewers, and a decision will be announced within 15 days of submission. Accepted and registered papers will be published in Springer’s Advances in Computer Science Applications and Research series. Following the conference, we are pleased to recognize outstanding contributions presented during the event through two distinctions: Best Paper Award and Best Presentation Award. The selection process will be based on peer review evaluations, as well as feedback from the program committee and session chairs. The Best Paper Award will be granted to the paper that demonstrates exceptional quality, originality, and impact, considering the initial submission, the camera-ready version, and the overall contribution to the field. The Best Presentation Award will be presented to the author(s) who deliver the most effective and engaging presentation during the conference. For each awarded contribution, a digital certificate will be issued in the name of the authors. DATA SCIENCE &amp; DATA ENGINEERING Descriptive, predictive, and prescriptive analytics Statistical modeling and data-driven decision-making Analytics for strategic planning and operations Business analytics and engineering management Data quality assessment and improvement Text, image, and multimedia data analytics Big data architectures and pipelines Data mining and knowledge discovery Workflow automation and data pipelines No-code/low-code data analytics platforms Data privacy and security Data governance frameworks Data encryption and anonymization techniques ------------------------------------------------- APPLICATIONS OF DATA ANALYTICS Data analytics in engineering systems Healthcare and public health analytics Environmental and sustainability analytics Smart cities and urban data systems Business, finance, and supply chain analytics Manufacuring fault detection analytics GIS and Spatial analytics ------------------------------------------------- AI &amp; ML AI for decision support system Supervised, unsupervised, and semi-supervised learning Deep learning and neural networks Reinforcement learning and adaptive systems Robust and reliable AI models AI model evaluation and validation Natural language processing (NLP) Computer vision and image analysis Human-AI interaction and collaboration User-centric and adaptive AI systems ----------------------------------------------------------- INTELLIGENT SYSTEMS Human-in-the-loop intelligent systems Cognitive and bio-inspired systems Human-AI collaboration in intelligent environments Behavioral modeling and adaptive interfaces Cognitive and affective intelligent systems EEG, eye-tracking, and biosignal-driven systems Cyber-physical systems (CPS) Cyber threat intelligence and modeling Network security protocols and architectures Smart grid and critical infrastructure protection Social engineering and phishing detection Endpoint and system protection Robotics and autonomous systems Adaptive and learning systems Digital twin technologies Simulation and modeling of intelligent systems Risk prediction and mitigation systems Intelligent Six Sigma and process improvement Autonomous logistics and routing systems Demand forecasting and inventory management AI in quality control and defect detection Data driven supply chain optimization AI for workforce planning and scheduling</text:p>
          </table:table-cell>
          <table:table-cell table:number-columns-repeated="1013"/>
        </table:table-row>
        <table:table-row table:style-name="ro1">
          <table:table-cell table:style-name="ce2" office:value-type="string" calcext:value-type="string">
            <text:p>SAMI 2028</text:p>
          </table:table-cell>
          <table:table-cell table:style-name="ce2" office:value-type="string" calcext:value-type="string">
            <text:p>25th IEEE World Symposium on Applied Machine Intelligence and Informatics</text:p>
          </table:table-cell>
          <table:table-cell table:style-name="ce2" office:value-type="float" office:value="85" calcext:value-type="float">
            <text:p>85</text:p>
          </table:table-cell>
          <table:table-cell table:style-name="ce2" office:value-type="float" office:value="32" calcext:value-type="float">
            <text:p>32</text:p>
          </table:table-cell>
          <table:table-cell table:style-name="ce3" office:value-type="date" office:date-value="2027-10-25" calcext:value-type="date">
            <text:p>2027-10-25</text:p>
          </table:table-cell>
          <table:table-cell table:style-name="ce3" office:value-type="date" office:date-value="2027-11-24" calcext:value-type="date">
            <text:p>2027-11-24</text:p>
          </table:table-cell>
          <table:table-cell table:style-name="ce3" office:value-type="date" office:date-value="2027-12-23" calcext:value-type="date">
            <text:p>2027-12-23</text:p>
          </table:table-cell>
          <table:table-cell table:style-name="ce2" office:value-type="string" calcext:value-type="string">
            <text:p>Stara Lesna, Slovakia.</text:p>
          </table:table-cell>
          <table:table-cell table:style-name="ce2" office:value-type="string" calcext:value-type="string">
            <text:p>Jan 29, 2028 - Jan 31, 2028</text:p>
          </table:table-cell>
          <table:table-cell table:style-name="ce4" office:value-type="string" calcext:value-type="string">
            <text:p><text:a xlink:href="https://conf.uni-obuda.hu/sami2028/" xlink:type="simple">https://conf.uni-obuda.hu/sami2028/</text:a></text:p>
          </table:table-cell>
          <table:table-cell table:style-name="ce2" office:value-type="string" calcext:value-type="string">
            <text:p>Authors are welcome to submit original and unpublished paper and attend the IEEE 25th World Symposium on Applied Machine Intelligence and Informatics (SAMI 2028) to be held on January 2028 in Stará Lesná, Slovakia. The conference is going to be organized in-person with onsite presentations only. The conference web site is at: https://conf.uni-obuda.hu/sami2028/</text:p>
          </table:table-cell>
          <table:table-cell table:number-columns-repeated="1013"/>
        </table:table-row>
        <table:table-row table:style-name="ro1">
          <table:table-cell table:style-name="ce2" office:value-type="string" calcext:value-type="string">
            <text:p>SPIE IWPR 2026</text:p>
          </table:table-cell>
          <table:table-cell table:style-name="ce2" office:value-type="string" calcext:value-type="string">
            <text:p>SPIE--2026 11th International Workshop on Pattern Recognition (IWPR 2026)</text:p>
          </table:table-cell>
          <table:table-cell table:style-name="ce2" office:value-type="float" office:value="75" calcext:value-type="float">
            <text:p>75</text:p>
          </table:table-cell>
          <table:table-cell table:style-name="ce2" office:value-type="float" office:value="30" calcext:value-type="float">
            <text:p>30</text:p>
          </table:table-cell>
          <table:table-cell table:style-name="ce3" office:value-type="date" office:date-value="2026-07-10" calcext:value-type="date">
            <text:p>2026-07-10</text:p>
          </table:table-cell>
          <table:table-cell table:number-columns-repeated="2"/>
          <table:table-cell table:style-name="ce2" office:value-type="string" calcext:value-type="string">
            <text:p>Milan, Italy</text:p>
          </table:table-cell>
          <table:table-cell table:style-name="ce2" office:value-type="string" calcext:value-type="string">
            <text:p>Aug 28, 2026 - Aug 30, 2026</text:p>
          </table:table-cell>
          <table:table-cell table:style-name="ce4" office:value-type="string" calcext:value-type="string">
            <text:p><text:a xlink:href="http://www.icopr.org" xlink:type="simple">http://www.icopr.org</text:a></text:p>
          </table:table-cell>
          <table:table-cell table:style-name="ce2" office:value-type="string" calcext:value-type="string">
            <text:p>Abbreviation: IWPR 2026 Full Name: 2026 11th International Workshop on Pattern Recognition Location: Milan, Italy Conference Date: August 28-30, 2026 Web: www.icopr.org Publication All accepted papers for IWPR 2026, which will be registered and presented at the conference, will be published into Conference Proceedings by SPIE, included in SPIE Digital Libraryand submitted for Web of Science Conference Proceedings Citation Index Science, Scopus, Ei Compendex, etc, to ensure maximum awareness of the Proceedings like the last few years. Call for Paper: Track 1: Computer Vision Early vision Low-level vision Biologically motivated vision Track 2: Biomedical Image Analysis Vision sensors Medical image and signal analysis Biological image and signal analysis Track 3: Pattern Recognition and Machine Learning Statistical, syntactic and structural pattern recognition Machine learning and data mining Artificial neural networks Track 4: Image, Speech, Signal and Video Processing Signal, image and video processing Image and video analysis and understanding Audio and acoustic processing and analysis Track 5: Document Analysis, Biometrics and Pattern Recognition Applications Pattern Recognition for Bioinformatics Pattern Recognition for Surveillance and Security Pattern Recognition for Search, Retrieval and Visualization More topics via: http://icopr.org/cfp.html Agenda Overview August 28, 2026 Conference Check in and Kits Collection August 29, 2026 Opening Remarks and Keynote Speeches in the Morning August 29, 2026 Parallel Sessions in the Afternoon August 30, 2026 Academic Visiting &amp; One day tour (Pending) Submission Methods: Full Paper (publication and oral presentation) Abstract (oral presentation only) Electronic Submission System (.pdf) http://confsys.iconf.org/submission/iwpr2026 or email: iwpr2016@vip.163.com. Contacts: Ms. Teri Zhang E-mail: iwpr2016@vip.163.com Tel: +86-13096333337</text:p>
          </table:table-cell>
          <table:table-cell table:number-columns-repeated="1013"/>
        </table:table-row>
        <table:table-row table:style-name="ro1">
          <table:table-cell table:style-name="ce2" office:value-type="string" calcext:value-type="string">
            <text:p>ICCSD 2026</text:p>
          </table:table-cell>
          <table:table-cell table:style-name="ce2" office:value-type="string" calcext:value-type="string">
            <text:p>2026 6th International Conference on Circuits, Systems and Devices (ICCSD 2026)</text:p>
          </table:table-cell>
          <table:table-cell table:style-name="ce2" office:value-type="float" office:value="55" calcext:value-type="float">
            <text:p>55</text:p>
          </table:table-cell>
          <table:table-cell table:style-name="ce2" office:value-type="float" office:value="30" calcext:value-type="float">
            <text:p>30</text:p>
          </table:table-cell>
          <table:table-cell table:style-name="ce3" office:value-type="date" office:date-value="2026-07-10" calcext:value-type="date">
            <text:p>2026-07-10</text:p>
          </table:table-cell>
          <table:table-cell table:number-columns-repeated="2"/>
          <table:table-cell table:style-name="ce2" office:value-type="string" calcext:value-type="string">
            <text:p>Ningbo, China</text:p>
          </table:table-cell>
          <table:table-cell table:style-name="ce2" office:value-type="string" calcext:value-type="string">
            <text:p>Nov 13, 2026 - Nov 15, 2026</text:p>
          </table:table-cell>
          <table:table-cell table:style-name="ce4" office:value-type="string" calcext:value-type="string">
            <text:p><text:a xlink:href="https://iccsd.net/" xlink:type="simple">https://iccsd.net/</text:a></text:p>
          </table:table-cell>
          <table:table-cell table:style-name="ce2" office:value-type="string" calcext:value-type="string">
            <text:p>Full Name: 2026 6th International Conference on Circuits, Systems and Devices (ICCSD 2026) Abbreviation: ICCSD 2026 Website: https://iccsd.net/ Venue: Ningbo, China Dates: November 13-15, 2026 2026 6th International Conference on Circuits, Systems and Devices (ICCSD 2026) will take place in Ningbo, China during November 13-15, 2026. Sponsored by Ningbo University, ICCSD 2026 will offer a distinguished interdisciplinary platform for researchers, practitioners, and educators to showcase and deliberate on the latest innovations, trends, and concerns, as well as the practical challenges faced and solutions adopted in the realms of Circuits, Devices, and Systems. [ Conference Awards ] Young Scientist Award Best Student Paper Award Outstanding Organization Award Best Oral Presentation Award Best Poster Presentation Award Outstanding Reviewer Awards [ Proceedings ] All papers submitted to ICCSD that fall within its technical scope will be published in the Conference Proceedings, and at least one author of each accepted paper is expected to present at the conference. ICCSD 2021: Online ISSN: 1742-6596. online, indexed by Ei Compendex &amp; Scopus. ICCSD 2020: Online ISSN: 1742-6596. online, indexed by Ei Compendex &amp; Scopus. ICCSD 2019: ISBN: 978-1-7281-3062-0. IEEE Xplore, indexed by Ei Compendex &amp; Scopus. ICCSD 2018: ISBN: 978-1-5386-8311-8. IEEE Xplore, indexed by Ei Compendex &amp; Scopus. ICCSD 2017: ISBN: 978-1-5386-1870-7. IEEE Xplore, indexed by Ei Compendex &amp; Scopus. [ Call for Papers ] Track 1: Microelectronic Devices Advanced Transistors（GAAFETs/ VSAFETs） Wide Bandgap Semiconductor Devices Quantum Devices Compound Semiconductor Devices Spintronic Devices Track 2: Power Devices and Power Management Insulated-Gate Bipolar Transistor (IGBT) Power MOSFET Silicon Carbide（SiC） Nano Energy Devices Energy Conversion Devices Energy Harvesting Technology DC-DC Converter Power Management &amp; Energy Efficient Technology Track 3: Sensors and Displays Bio/Gas/Thermal/Voltage/Current Sensors Vision Intelligence &amp; Image Sensors Acoustic Sensors Display Technology &amp; Devices Photoelectric Conversion &amp; Optical Fiber Sensing Track 4: Electromagnetics &amp; Microwave Devices Power Amplifiers Mixer &amp; Microwave Sources Terahertz Devices Magnetic Devices Electromagnetic Components Antenna Design Terahertz Sensing and Imaging Computational Electromagnetics Track 5: 3D Integration &amp; Microsystems System in Package（SiP） Through Glass Via &amp; Through Silicon Via 3D Integration Technology High Density Packaging CAD Tools for Packing Microelectromechanical Systems Photoelectric Fusion Module Chiplets Based Microsystems Wafer-Scale Integration &amp; System on Wafer Track 6: Digital Devices &amp; VLSI Physical Design Nonvolatile Memory Computing in Memory Emerging Memory Technologies Clock Generator and Management Physical Modeling for VLSI Design Placement &amp; Routing Algorithm Evaluation Methods for VLSI Reliability Aging Prediction &amp; Mitigation more details: https://iccsd.net/cfp.html [ Call for Special Session ] Special Sessions may address one or more Tracks, but they should be Organized under a unified theme. Special Sessions are intended to allow projects or any other group of authors to present their own work. It is not expected that open calls for papers are launched for Special Sessions, in order to attract authors or presenters. Special Sessions will be evaluated according to the following criteria: – Relevance – Timeliness – Technical content – Novelty – Overall Recommendation more details: https://iccsd.net/ss.html [ Submission ] Make a submission: https://www.zmeeting.org/submission/iccsd2026 more details: https://iccsd.net/submission.html [ Contact us ] Dr. Fidelia Lee E-mail: iccsd@academic.net</text:p>
          </table:table-cell>
          <table:table-cell table:number-columns-repeated="1013"/>
        </table:table-row>
        <table:table-row table:style-name="ro1">
          <table:table-cell table:style-name="ce2" office:value-type="string" calcext:value-type="string">
            <text:p>ORAJ 2026</text:p>
          </table:table-cell>
          <table:table-cell table:style-name="ce2" office:value-type="string" calcext:value-type="string">
            <text:p>Operations Research and Applications: An International Journal</text:p>
          </table:table-cell>
          <table:table-cell table:style-name="ce2" office:value-type="float" office:value="85" calcext:value-type="float">
            <text:p>85</text:p>
          </table:table-cell>
          <table:table-cell table:style-name="ce2" office:value-type="float" office:value="25" calcext:value-type="float">
            <text:p>25</text:p>
          </table:table-cell>
          <table:table-cell table:style-name="ce3" office:value-type="date" office:date-value="2026-07-10" calcext:value-type="date">
            <text:p>2026-07-10</text:p>
          </table:table-cell>
          <table:table-cell table:style-name="ce3" office:value-type="date" office:date-value="2026-08-10" calcext:value-type="date">
            <text:p>2026-08-10</text:p>
          </table:table-cell>
          <table:table-cell table:style-name="ce3" office:value-type="date" office:date-value="2026-08-17" calcext:value-type="date">
            <text:p>2026-08-17</text:p>
          </table:table-cell>
          <table:table-cell table:number-columns-repeated="2"/>
          <table:table-cell table:style-name="ce4" office:value-type="string" calcext:value-type="string">
            <text:p><text:a xlink:href="https://airccse.com/oraj/index.html" xlink:type="simple">https://airccse.com/oraj/index.html</text:a></text:p>
          </table:table-cell>
          <table:table-cell table:style-name="ce2" office:value-type="string" calcext:value-type="string">
            <text:p>Operations Research and Applications: An International Journal (ORAJ) Scope and Topics Operations Research and Applications: An International Journal (ORAJ) is a quarterly open access peer-reviewed journal that publishes articles which contribute new results in all areas of the Operations Research and innovative Applications. The journal focuses on all technical and practical aspects of Operations Research, applications and Implementation techniques. The goal of this journal is to bring together researchers and practitioners from academia and industry to focus on understanding advances in Operations Research and establishing new collaborations in these areas. Authors are solicited to contribute to the journal by submitting articles that illustrate research results, projects, surveying works and industrial experiences that describe significant advances in the areas of Operations Research and Applications but are not limited to, the following : Topics of interest include but are not limited to, the following Combinatorial Optimisation Constraint Satisfaction Data Analytics Decision Analysis and Analytics Game Theory Inventory Theory &amp; Applications Mathematical Programming Network Optimisation Non-linear Programming Optimisation Project Management Queuing Routing Scheduling Simulation Soft System Methods Stochastic Systems Supply Chain Management System Thinking Quantitative Methods in Banking and Finance Statistics and Econometrics Educations Future technologies Paper Submission Authors are invited to submit papers for this journal through E-mail oraj@airccse.com . Submissions must be original and should not have been published previously or be under consideration for publication while being evaluated for this Journal Important Dates Submission Deadline : July 10, 2026 Authors Notification : August 10, 2026 Final Manuscript Due : August 17, 2026 Publication Date : Determined by the Editor-in-Chief Editorial Board Members Abdel Salhi , University of Essex, England Abhinandan Chowdhury , Gettysburg College, USA Acharyulu K.V.L.N , Bapatla Engineering College, India Andrew Dynneson , University of Texas at El Paso, China Ayhan Esi , Adiyaman University, Turkey Deepmala , Indian Statistical Institute, India Donal O’Regan , National University of Ireland, Galway Ekrem SAVAS , Istanbul Commerce University, Turkey Fahreddin Abdullayev , Mersin University, Turkey Gazanfer Unal , Yeditepe University, Turkey Gershon Wolansky , Technion, Inst. of Technology, Israel Gokhan Yildirim , University of Southern California, United States Haslifah Hashim , University of Essex, United Kingdom ... More</text:p>
          </table:table-cell>
          <table:table-cell table:number-columns-repeated="1013"/>
        </table:table-row>
        <table:table-row table:style-name="ro1">
          <table:table-cell table:style-name="ce2" office:value-type="string" calcext:value-type="string">
            <text:p>IJCCMS 2026</text:p>
          </table:table-cell>
          <table:table-cell table:style-name="ce2" office:value-type="string" calcext:value-type="string">
            <text:p>International Journal of Chaos, Control, Modelling and Simulation</text:p>
          </table:table-cell>
          <table:table-cell table:style-name="ce2" office:value-type="float" office:value="82" calcext:value-type="float">
            <text:p>82</text:p>
          </table:table-cell>
          <table:table-cell table:style-name="ce2" office:value-type="float" office:value="35" calcext:value-type="float">
            <text:p>35</text:p>
          </table:table-cell>
          <table:table-cell table:style-name="ce3" office:value-type="date" office:date-value="2026-07-12" calcext:value-type="date">
            <text:p>2026-07-12</text:p>
          </table:table-cell>
          <table:table-cell table:style-name="ce3" office:value-type="date" office:date-value="2026-08-11" calcext:value-type="date">
            <text:p>2026-08-11</text:p>
          </table:table-cell>
          <table:table-cell table:style-name="ce3" office:value-type="date" office:date-value="2026-08-18" calcext:value-type="date">
            <text:p>2026-08-18</text:p>
          </table:table-cell>
          <table:table-cell table:number-columns-repeated="2"/>
          <table:table-cell table:style-name="ce4" office:value-type="string" calcext:value-type="string">
            <text:p><text:a xlink:href="https://airccse.org/journal/ijccms/index.html" xlink:type="simple">https://airccse.org/journal/ijccms/index.html</text:a></text:p>
          </table:table-cell>
          <table:table-cell table:style-name="ce2" office:value-type="string" calcext:value-type="string">
            <text:p>International Journal of Chaos, Control, Modelling and Simulation (IJCCMS) Scope &amp; Topics The International Journal of Chaos, Control, Modelling and Simulation is a Quarterly open access peer-reviewed journal that publishes articles which contribute new results in all areas of Chaos Theory, Control Systems, Scientific Modelling and Computer Simulation. In the last few decades, chaos theory has found important applications in secure communication devices and secure data encryption. Control methods are very useful in several applied areas like Chaos, Automation, Communication, Robotics, Power Systems, and Biomedical Instrumentation. The journal focuses on all technical and practical aspects of Chaos, Control, Modelling and Simulation. The goal of this journal is to bring together researchers and practitioners from academia and industry to focus on chaotic systems and applications, control theory, process control, automation, modelling concepts, computational methods, computer simulation and establishing new collaborations in these areas. Authors are solicited to contribute to this journal by submitting articles that illustrate research results, projects, surveying works and industrial experiences that describe significant advances in Chaos Theory, Control Systems, Modelling and Simulation Techniques. Topics of interest include but are not limited to, the following Adaptive control Advanced chaos theory Advanced computing techniques Algorithms, modelling and simulation Applications of chaos in science and engineering Artificial intelligence Artificial neural networks Automation and mobile robots Bioinformatics Biological modelling Biological systems and models Chaotic systems Chaos modelling Circuit realization of chaotic systems Control of chaotic systems Cloud computing Communication engineering Computational biology Computational fluid dynamics Computer science Control devices &amp; instruments Control theory Data mining Data Structures and Algorithms Scientific computing Secure communication devices Stochastic modelling and control Data visualization Digital control Digital image processing Digital signal processing Dynamical systems and stability theory Embedded systems and control Evolutionary techniques in engineering Flight control and surveillance systems Fuzzy logic control Genetic algorithms and applications Hyperchaotic systems Industrial applications of control Intelligent systems Information theory Linear and nonlinear programming Linear control theory Materials science Mathematical control theory Mathematical modelling and applications Measurement systems Modelling and control Nonlinear control theory Numerical methods in control systems Optimization and optimal control Parallel computing Process control and automation Real-time systems Real and complex analysis Robust control Soft computing techniques Paper Submission Authors are invited to Submit papers for this journal through E-mail ijccms@aircconline.com . Submissions must be original and should not have been published previously or be under consideration for publication while being evaluated for this Journal. Important Dates Submission Deadline : July 12, 2026 Authors Notification : August 11, 2026 Final Manuscript Due : August 18, 2026 Publication Date : Determined by the Editor-in-Chief Editorial Board Members Aditya Goel, Comviva Technologies Ltd., India Anand Rajavat, Shri Vaishnav Institute of Technology and Science, India Ankit Chaudhary, University of Iowa, USA Anurag Pal, Siksha O Anusandhan University, India Ashutosh Kumar Dubey, Trinity Institute of Technology and Research, India Mohammed Imran B, University of Dammam, Saudi Arabia Prasad B.D.C.N, Prasad V. Potluri Siddhartha Institute of Technology, India Binod Kumar Pattanayak, Siksha 'O' Anusandhan University, India Christos K. Volos, Hellenic Army Academy, Greece Maheswari C, Anna University, India Satish Kumar D, Nehru institute of technology, India Shravani D, Matrusri Institute of Post-Graduate Studies, India Deepak Gupta, IMS Engineering College, India Dinesh Kumar Madan, The Technological Institute of Textile &amp; Sciences, India Doreswamy, Mangalore University, India ... More</text:p>
          </table:table-cell>
          <table:table-cell table:number-columns-repeated="1013"/>
        </table:table-row>
        <table:table-row table:style-name="ro1">
          <table:table-cell table:style-name="ce2" office:value-type="string" calcext:value-type="string">
            <text:p>CAIS 2026</text:p>
          </table:table-cell>
          <table:table-cell table:style-name="ce2" office:value-type="string" calcext:value-type="string">
            <text:p>IEEE 2026 International Conference on Artificial Intelligence and Simulation</text:p>
          </table:table-cell>
          <table:table-cell table:style-name="ce2" office:value-type="float" office:value="76" calcext:value-type="float">
            <text:p>76</text:p>
          </table:table-cell>
          <table:table-cell table:style-name="ce2" office:value-type="float" office:value="24" calcext:value-type="float">
            <text:p>24</text:p>
          </table:table-cell>
          <table:table-cell table:style-name="ce3" office:value-type="date" office:date-value="2026-07-13" calcext:value-type="date">
            <text:p>2026-07-13</text:p>
          </table:table-cell>
          <table:table-cell/>
          <table:table-cell table:style-name="ce3" office:value-type="date" office:date-value="2026-09-11" calcext:value-type="date">
            <text:p>2026-09-11</text:p>
          </table:table-cell>
          <table:table-cell table:style-name="ce2" office:value-type="string" calcext:value-type="string">
            <text:p>Kuala Lumpur, Malaysia</text:p>
          </table:table-cell>
          <table:table-cell table:style-name="ce2" office:value-type="string" calcext:value-type="string">
            <text:p>Sep 28, 2026 - Sep 30, 2026</text:p>
          </table:table-cell>
          <table:table-cell table:style-name="ce4" office:value-type="string" calcext:value-type="string">
            <text:p><text:a xlink:href="https://www.aischolar.com/conference/icais2026?invite=wiki" xlink:type="simple">https://www.aischolar.com/conference/icais2026?invite=wiki</text:a></text:p>
          </table:table-cell>
          <table:table-cell table:style-name="ce2" office:value-type="string" calcext:value-type="string">
            <text:p>IEEE 2026 International Conference on Artificial Intelligence and Simulation (CAIS 2026) will be held in Kuala Lumpur, Malaysia,on September 28-30, 2026. 𝗖𝗼𝗻𝗳𝗲𝗿𝗲𝗻𝗰𝗲 𝗪𝗲𝗯𝘀𝗶𝘁𝗲: https://www.aischolar.com/conference/icais2026?invite=wiki ---𝗖𝗮𝗹𝗹 𝗙𝗼𝗿 𝗣𝗮𝗽𝗲𝗿𝘀--- The topics of interest for submission include, but are not limited to: ◕Foundations of Artificial Intelligence &amp; Machine Intelligence* Soft Computing Algorithms Distributed Intelligent Algorithms Fuzzy Intelligent Systems Evolutionary Computing Applications Neural Networks and Learning Cognitive Intelligent Modeling Hybrid Intelligent Systems Intelligent Optimization Methods Intelligent Data Analytics Data Mining Knowledge Discovery Pattern Analysis Sentiment Analysis Social Computing Big Data Analytics Machine Intelligence ◕Intelligent Simulation, Digital Twins &amp; Robotics* Intelligent System Simulation Multi-Agent Simulation Real-Time Simulation Systems Data-Driven Simulation Digital Twin Technology Quantum System Simulation Intelligent Simulation Platforms Metaverse Virtual Simulation Robotic System Simulation Convergence of AI &amp; Simulation Simulation Optimisation using AI &amp; ML Agent-based M&amp;S (Modelling &amp; Simulation) Validation &amp; Verification using Advanced Simulation Digital Twins in Engineering System Simulation Modelling, Simulating and Testing IoT environments Internet of Things (IoT) Robotics Systems Integration Reliability Modelling and Simulation ◕Applied AI &amp; Domain Solutions Healthcare and Medical Imaging* Finance and Banking Retail and E-commerce Manufacturing and Industry Transportation and Automotive Energy and Utilities Telecommunications Education Agriculture Entertainment and Media Legal and Forensics Human Resources and Recruitment Defense and Military Construction and Real Estate Marketing and Advertising Ontologies for Business Modeling Ontologies for Scientific Disciplines (Biology, Chemistry, Geography, etc.) Ontologies for the Humanities (Arts, History, Literature, etc.) Ontologies for the Social Sciences (Economics, Law, Political Science, etc.) Ontologies for Open Science and Data ◕Virtual Reality, Mixed Reality &amp; Human-Computer Interaction* Mixed Reality (VR/AR/MR) VR/AR/MR Input Devices 3D Display, Tracking and Sensing Haptics, Audio, and Others Modelling and Animation Virtual Humans and Embodiment Collaborative VR/AR/MR Perception, Presence and Cognition HCI Methods and Theories Mobile HCI Persuasive Technology Emotions in HCI Brain-Computer/Machine Interface Animal-Computer Interaction Interaction Design Physical Computing Tangible Media Computer Supported Collaborative Work Ubiquitous Computing Game Design Gamification Interfaces Entertainment Systems Adaptive and Personalised Interfaces ◕ Visual Informatics &amp; Knowledge Engineering* Image Processing Computer Vision Information Visualization Visual Informatics in Information Systems &amp; IoT Visual Informatics in Energy Informatics Visual Informatics in Business Intelligence Visual Informatics in Cyber Security Ontology-driven information systems engineering Legacy reengineering or system modernization with ontologies Ontology-based data access Knowledge management Information retrieval Computational linguistics Metadata management Ontologies for engineering (Shape, Form, Function, Design) ---𝗦𝗽𝗲𝗮𝗸𝗲𝗿𝘀--- Prof. Rezzy Eko Caraka,IEEE Senior Member,National Research and Innovation Agency (BRIN), Indonesia / Chaoyang University of Technology, Taiwan Mr. Saurabh Kakkar,Director / Program Manager – Basel Data Repository (BDR),Santander Bank –Dallas, USA Dr. Ali Ahmadian,Mediterranean University of Reggio Calabria, Italy Dr. Ely Salwana,Universiti Kebangsaan Malaysia, Malaysia ---𝗣𝘂𝗯𝗹𝗶𝗰𝗮𝘁𝗶𝗼𝗻--- Submitted papers will be peer reviewed by conference committees, and accepted papers after registration and presentation will be published in the IEEE, ISBN:979-8-3195-0972-7, which will be submitted for indexing by IEEE Xplore, EI Compendex and Scopus. ---𝗜𝗺𝗽𝗼𝗿𝘁𝗮𝗻𝘁 𝗗𝗮𝘁𝗲𝘀--- Full Paper Submission Deadline: July 13, 2026 Notification Date: August 13, 2026 Registration Deadline: August 27, 2026 Final Paper Submission Date: September 11, 2026 Conference Dates: September 28-30, 2026 --- 𝗣𝗮𝗽𝗲𝗿 𝗦𝘂𝗯𝗺𝗶𝘀𝘀𝗶𝗼𝗻--- Please send the abstract or full paper(word+pdf) to Submission System: https://www.aischolar.com/conference/icais2026/submission?invite=wiki</text:p>
          </table:table-cell>
          <table:table-cell table:number-columns-repeated="1013"/>
        </table:table-row>
        <table:table-row table:style-name="ro1">
          <table:table-cell table:style-name="ce2" office:value-type="string" calcext:value-type="string">
            <text:p>IEEE ICITES 2026</text:p>
          </table:table-cell>
          <table:table-cell table:style-name="ce2" office:value-type="string" calcext:value-type="string">
            <text:p>IEEE--2026 6th International Conference on Intelligent Technology and Embedded Systems (ICITES 2026)--SCI</text:p>
          </table:table-cell>
          <table:table-cell table:style-name="ce2" office:value-type="float" office:value="75" calcext:value-type="float">
            <text:p>75</text:p>
          </table:table-cell>
          <table:table-cell table:style-name="ce2" office:value-type="float" office:value="30" calcext:value-type="float">
            <text:p>30</text:p>
          </table:table-cell>
          <table:table-cell table:style-name="ce3" office:value-type="date" office:date-value="2026-07-15" calcext:value-type="date">
            <text:p>2026-07-15</text:p>
          </table:table-cell>
          <table:table-cell table:number-columns-repeated="2"/>
          <table:table-cell table:style-name="ce2" office:value-type="string" calcext:value-type="string">
            <text:p>Hangzhou, China</text:p>
          </table:table-cell>
          <table:table-cell table:style-name="ce2" office:value-type="string" calcext:value-type="string">
            <text:p>Sep 18, 2026 - Sep 21, 2026</text:p>
          </table:table-cell>
          <table:table-cell table:style-name="ce4" office:value-type="string" calcext:value-type="string">
            <text:p><text:a xlink:href="https://icites.net/" xlink:type="simple">https://icites.net/</text:a></text:p>
          </table:table-cell>
          <table:table-cell table:style-name="ce2" office:value-type="string" calcext:value-type="string">
            <text:p>Full Name: IEEE--2026 6th International Conference on Intelligent Technology and Embedded Systems (ICITES 2026)--SCI Abbreviation: ICITES 2026 September 18-21, 2026 | Hangzhou, China More details, please visit: https://icites.net/ ICITES 2026 will be held in Hangzhou, China during September 18-21, 2026. It is co-sponsored by Hangzhou International Innovation Institute of Beihang University, IEEE Council on Electronic Design Automation, University of Electronic Science and Technology of China, IEEE CEDA Chengdu Section and IEEE EDS Chengdu Chapter, hosted by University of Electronic Science and Technology of China, supported by Nanjing University of Science and Technology, Zhejiang University, Dalian University of Technology, Research Institute Computer and Systems Aléatoires, George Mason University. [ Proceedings ] Accepted and registered full papers of ICITES 2026 will be published by ICITES Conference Proceedings. Authors are required to attend the conference and share a report based on the paper. [ Previous ICITES ] ► ICITES 2025，Online Soon ► ICITES 2024 , Scopus &amp; Ei index Proceedings: https://ieeexplore.ieee.org/xpl/conhome/10777393/proceeding ► ICITES 2023 , Scopus &amp; Ei index Proceedings: https://ieeexplore.ieee.org/xpl/conhome/10356861/proceeding ► ICITES 2022 , Scopus &amp; Ei index Proceedings: https://ieeexplore.ieee.org/xpl/conhome/9943567/proceeding ► ICITES 2021 , Scopus &amp; Ei index Proceedings: https://ieeexplore.ieee.org/xpl/conhome/9637046/proceeding [ Call for Papers ] Include but not limited: Track 1: Embedded Processor and System on Chip Track 2: Modeling and Design Automation Track 3: Safety, Security and Reliability Track 4: Embedded Machine Learning Track 5: Accelerators and Heterogeneous System Track 6: Communication and Memory Subsystem Track 7: Embedded Operating Systems and Middleware ..... more please click: https://icites.net/cfp.html [ Special Session ] Special Session 1: Intelligent and embedded computing for electric power systems Special Session 2: AI and embedded systems for computer vision and multimedia Special Session 3: Trustworthy AI for embedded applications ..... [SCI / EI / Scopus Journals] Selected papers after extension will be recommended to the following journals: Sustainable Computing: Informatics and Systems ISSN: 1674-862X Citescore Score: 8 Impact Factor: 4.5 Indexing: Ei Compendex, Scopus, SCIE, etc. Journal of Systems Architecture ISSN: 1383-7621 Citescore Track: 7.3; Impact Factor: 5.836 Indexing: SCIE, Ei, Scopus, etc. Journal of Circuits, Systems and Computers ISSN: 0218-1266 Citescore Track: 2.6; Impact Factor: 1.278 Indexing: SCIE, Compendex, Scopus, etc. [ Submission ] Make a submission via Easychair: https://easychair.org/conferences/?conf=icites2026 PS: Listener is warmly welcomed to register via: https://www.zmeeting.org/register/icites2026 [ Contact us ] Ms. Yuki Yu E-mail: icites@163.com</text:p>
          </table:table-cell>
          <table:table-cell table:number-columns-repeated="1013"/>
        </table:table-row>
        <table:table-row table:style-name="ro1">
          <table:table-cell table:style-name="ce2" office:value-type="string" calcext:value-type="string">
            <text:p>IEEE ICCS 2026</text:p>
          </table:table-cell>
          <table:table-cell table:style-name="ce2" office:value-type="string" calcext:value-type="string">
            <text:p>IEEE--2026 8th International Conference on Circuits and Systems (ICCS 2026)</text:p>
          </table:table-cell>
          <table:table-cell table:style-name="ce2" office:value-type="float" office:value="75" calcext:value-type="float">
            <text:p>75</text:p>
          </table:table-cell>
          <table:table-cell table:style-name="ce2" office:value-type="float" office:value="30" calcext:value-type="float">
            <text:p>30</text:p>
          </table:table-cell>
          <table:table-cell table:style-name="ce3" office:value-type="date" office:date-value="2026-07-20" calcext:value-type="date">
            <text:p>2026-07-20</text:p>
          </table:table-cell>
          <table:table-cell table:number-columns-repeated="2"/>
          <table:table-cell table:style-name="ce2" office:value-type="string" calcext:value-type="string">
            <text:p>Hangzhou, China</text:p>
          </table:table-cell>
          <table:table-cell table:style-name="ce2" office:value-type="string" calcext:value-type="string">
            <text:p>Sep 18, 2026 - Sep 21, 2026</text:p>
          </table:table-cell>
          <table:table-cell table:style-name="ce4" office:value-type="string" calcext:value-type="string">
            <text:p><text:a xlink:href="https://iccs.org/" xlink:type="simple">https://iccs.org/</text:a></text:p>
          </table:table-cell>
          <table:table-cell table:style-name="ce2" office:value-type="string" calcext:value-type="string">
            <text:p>Full Name: 2026 8th International Conference on Circuits and Systems Abbreviation: ICCS 2026 Website: https://iccs.org/ Venue: Hangzhou, China Dates: September 18-21, 2026 2026 8th International Conference on Circuits and Systems will take place in Hangzhou, China during September 18-21, 2026. ICCS 2026 is co-sponsored by Hangzhou International Innovation Institute of Beihang University, University of Electronic Science and Technology of China, Yangtze Delta Region Institute of University of Electronic Science and Technology of China, Huzhou, hosted by State Key Laboratory of Spintronics/Yuhang Nano Center, and patroned by Fudan University (China), Auckland University of Technology(New Zealand), Zhejiang University (China), INAOE. [ Conference Awards ] Young Scientist Award Outstanding Organization Award Best Paper Award Best Oral Presentation Award Best Poster Presentation Award [ Proceedings ] All papers submitted to ICCS that fall within IEEE technical scope will be published in the IEEE Conference Proceedings, which will be included in IEEE Xplore, and submitted for Ei Compendex &amp; Scopus index after conference. At least one author of each accepted paper is expected to present at the conference. ICCS 2024 - ISBN: 979-8-3503-5214-6 | IEEE Xplore Online | Ei Compendex &amp; Scopus index ICCS 2023 - ISBN: 979-8-3503-0827-3 | IEEE Xplore Online | Ei Compendex &amp; Scopus index ICCS 2022 - ISBN: 978-1-6654-6036-1 | IEEE Xplore Online | Ei Compendex &amp; Scopus index ICCS 2021 - ISBN: 978-1-6654-1233-9 | IEEE Xplore Online | Ei Compendex &amp; Scopus index ICCS 2020 - ISBN: 978-1-7281-9121-8 | IEEE Xplore Online | Ei Compendex &amp; Scopus index ICCS 2017 - ISBN: 978-1-5090-6480-9 | IEEE Xplore Online | EI Compendex &amp; Scopus index =EI Journal= Selected papers after extension will be recommended to the following journal: Journal of Semiconductors Indexing: Ei Compendex, ESCI, Scopus, INSPEC, CA, SA, AJ, CSTPCD, CSCD, WAJCI, etc. International Journal of Numerical Modelling: Electronic Networks, Devices and Fields Online ISSN:1099-1204 Indexing: SCI, EI Compendex, Scopus, etc Computer Technology and Development (Monthly) ISSN: 1673-629X Journal of Electronic Science and Technology ISSN: 1674-862X Citescore Track: 2.7 Indexing: Ei Compendex, Scopus, INSPEC, CSCD, DOAJ etc., OA on ScienceDirect. [ Special Session ] Chiplet-based Integrated Systems Organizers: Letian Huang, University of Electronic Science and Technology of China Xiaohang Wang, Zhejiang University [ Call for Papers ] Topics are interested but not limited to: Track 1: Analog and Nonlinear Circuits Design Computing-in-Memory (CIM) and Analog AI Accelerators Nonlinear Dynamics for Secure Communications General Analog Circuits ADCs /DACs PLL &amp; Clock Generators Chaos and Applications Dynamic Nonlinear Circuits Track 2: VLSI Design &amp; Electronic Design Automatic Hardware for AI/ML and Domain-Specific Accelerators 3D/2.5D Heterogeneous Integration and Chiplet-based Systems Hardware Security: PUF, TRNG, and Side-Channel Attack Countermeasures System Level Modeling &amp; Verification High Level Synthesis Formal Verification Hardware/Software Co-Design Application Driven Accelerators Design &amp; Domain-Specific Processor FPGA based Design &amp; Heterogynous System Track 3: Circuits and Systems for Signal Processing Circuits and Systems for Edge AI and TinyML Biomedical Signal Processing for Wearable/Implantable Devices Advanced Image Sensing and Processing Circuits and Systems for Image Processing Circuits and Systems for Audio &amp; Video Analysis /Recognition/ Reconstruction Biomedical Image Processing System Body and Brain Interfaces Circuits and Systems for Radar Signal Processing Circuits and Systems for Signal Detection Track 4: RF &amp; Communication Circuits Millimeter-Wave and Terahertz (THz) Circuits for 6G/B5G Integrated Silicon Photonics for Optical Communication Over-the-Air (OTA) Testing and Calibration of AiP Modules Advanced RF Building Blocks Wireline Communication Interfaces Wireless Transmitters, Receivers, and Transceivers Circuits and Systems for Equalization, Synchronization &amp; Channel Estimation Circuits and Systems for Coding and Modulation Track 5: Design for Test &amp; Reliability Test and Reliability for AI Hardware and Secure Chips Aging Modeling and Mitigation in Advanced CMOS Nodes SoC Test Methodology Analog &amp; Mixed Signal Circuits Test Fault Tolerant Design Aging Modeling &amp; Mitigation Hardware Security Track 6: Power Electronic Circuits Integrated Power Management and High-Efficiency Converters Circuits for Wireless Power Transfer and Energy Harvesting Distributed Circuits and Systems Power Line Analyzing &amp; Modeling Energy Storage Circuits Energy Sources &amp; Power Converter Circuits and Systems for Smart Grid Track 7: Control Aspects of Circuits and Systems Control and Navigation for Autonomous Systems Adaptive and Learning-Based Control Systems Circuits and Systems for Automated Driving &amp; Automated Vehicle Circuits and Systems for Motor Control Mechatronics Control Theory Application in Circuits and Systems Adaptive Circuits and Systems Track 8: Circuits and Systems for Instrumentation and Measurement Smart Sensors and Sensor Fusion for IoT Fiber-Optic Sensing for Infrastructure and Biomedical Monitoring Direct Sampling Time-Domain Measurement Techniques Sensors and Sensor Interfaces Circuits and Systems for Instruments Circuits and Systems for Fault Detection &amp; Diagnosis Circuits and Systems for Data Acquisition &amp; Confusion Circuits and Systems for Measurement &amp; Positioning more details: https://iccs.org/cfp.html [ Submission ] Make a submission via Easychair: https://easychair.org/my/conference?conf=iccs20260 more details:https://iccs.org/submission.html [ Contact us ] Dr. Fidelia Lee E-mail: iccs@chairmen.org</text:p>
          </table:table-cell>
          <table:table-cell table:number-columns-repeated="1013"/>
        </table:table-row>
        <table:table-row table:style-name="ro1">
          <table:table-cell table:style-name="ce2" office:value-type="string" calcext:value-type="string">
            <text:p>AMMS 2026</text:p>
          </table:table-cell>
          <table:table-cell table:style-name="ce2" office:value-type="string" calcext:value-type="string">
            <text:p>ACM--2026 8th International Applied Mathematics, Modelling and Simulation Conference (AMMS 2026)</text:p>
          </table:table-cell>
          <table:table-cell table:style-name="ce2" office:value-type="float" office:value="85" calcext:value-type="float">
            <text:p>85</text:p>
          </table:table-cell>
          <table:table-cell table:style-name="ce2" office:value-type="float" office:value="25" calcext:value-type="float">
            <text:p>25</text:p>
          </table:table-cell>
          <table:table-cell table:style-name="ce3" office:value-type="date" office:date-value="2026-07-20" calcext:value-type="date">
            <text:p>2026-07-20</text:p>
          </table:table-cell>
          <table:table-cell table:number-columns-repeated="2"/>
          <table:table-cell table:style-name="ce2" office:value-type="string" calcext:value-type="string">
            <text:p>Paris, France</text:p>
          </table:table-cell>
          <table:table-cell table:style-name="ce2" office:value-type="string" calcext:value-type="string">
            <text:p>Sep 11, 2026 - Sep 13, 2026</text:p>
          </table:table-cell>
          <table:table-cell table:style-name="ce4" office:value-type="string" calcext:value-type="string">
            <text:p><text:a xlink:href="http://www.amms.org" xlink:type="simple">http://www.amms.org</text:a></text:p>
          </table:table-cell>
          <table:table-cell table:style-name="ce2" office:value-type="string" calcext:value-type="string">
            <text:p>Full name: 2026 8th International Applied Mathematics, Modelling and Simulation Conference Abbreviation: AMMS 2026 2026 8th International Applied Mathematics, Modelling and Simulation Conference (AMMS 2026) will be held from September 11-13, 2026 in Paris, France. This Conference will cover topics on Applied Mathematics, Modelling, Simulation and related fields. It dedicates to providing a platform for exchanging the latest research results and sharing the advanced research methods for researchers, practitioners, and professionals from all over the world. Conference Website: http://www.amms.org Conference Date: September 11-13, 2026 Some social programs such as academic visit and city tour will be arranged on September 13, 2026(depends on the actual notice). Paper Publication 1. Conference Proceedings by ACM, which will be archived in ACM Digital Library, indexed by Ei Compendex and Scopus, and submitted to be reviewed by Thomson Reuters Conference Proceedings Citation Index (ISI Web of Science). 2. For those who are not willing to publish their papers, it's acceptable to submit abstracts for Presentation Only. Call for papers Topics of interest for submission include, but are not limited to: Topic 1: Mathematics Analysis；Algebra；Applied Mathematics；Computational Mathematics；Control Theory and Automation；Data Mining and Soft Computing；Geometry；Mathematical Chemistry and Biology；Optimization and Operational Research；Rough Set and Soft Set Theory；Statistics；Theoretical Computer Science Topic 2: Statistics Probability Theory；Stochastic Processes；Simulation, Parametric and Nonparametric Inference；Multivariate；Baysian Inference；Regression Analysis Estimation Theory；Decision Theory；Econometrics；Statistical Tomography and Image Processing；Sampling Theory Etc Topic 3: Simulation Tools and Platforms Enterprise Resource Planning；Petri Nets；Virtual Reality and Graphical Simulations；Discrete-Event Simulation；Security/Emergency Support Tools；Plant Simulation；Domain-Specific Tools；Serious Games；Team-support Tools；Education and Training；e-Learning Platforms；Laboratory Simulation Software；Computer Simulation Techniques；Case Studies Topic 4: Complex Systems Modeling and Simulation Collaborative Systems;Business Process Modeling Multiscale Simulation;Performance Analysis;Social Systems Simulation;Swarm Simulation;Fluid Dynamics;Biological Systems;Environmental Modeling;Crisis Modelling and Simulation Topic 5: Formal Methods Security;Planning and Scheduling;Ontologies;Conceptual Modeling;Stochastic Modeling and Simulation;Dynamical Systems Models and Methods;Non-Linear Systems;Distributed Simulation;Decision Support;Mathematical Simulation;Neural Nets and Fuzzy Systems;Risk Analysis Topic 6: Application Domains Automotive Industry;Chemical and Petroleum Engineering;Military and Defense;Construction Engineering and Project Management;Telecommunication Systems and Networks;Energy and Power Systems;Electronics Design and Manufacturing;Industrial Processes;Logistics, Traffic and Transportation;Robotics, Automation and Mechatronics;Hydraulic and Pneumatic Systems;GIS/GPS Systems More topics can be found at http://amms.org/cfp.html Call for Invited Speakers: Research Area: Applied Mathematics, Modelling and Simulation Presentation Format: 20-25-minute English presentation Participation Mode: Online or Offline Application Materials: Please submit your bio (within 200 words) and a photo to the conference email: amms@cbees.net. Upon successful application, your information will be updated on the conference website. *Both submission and registration must follow the procedures for invited speakers. Upon successful application, the conference will provide partial financial support. Call for Special Session Chairs: To enhance communication in the fields of Applied Mathematics, Modelling and Simulation, AMMS 2026 is specifically soliciting proposals for special sessions. Interested scholars are invited to submit their proposals the conference email box: amms@cbees.net. Optional Topics: 1) AI-Driven Multiscale Modeling and Simulation 2) Uncertainty Quantification and Trustworthy Simulation 3) Differentiable Programming and Automatic Differentiation in Scientific Computing 4) Data Assimilation, Fusion, and Real-time Simulation 5) Deep Generative Models for Physics-informed Simulation *After the organization of the Special Sessions is successful, the organizing committee will provide certain financial support. Conference Venue: Hotel Le Parchamp Addr.：114 Route de la Reine, 46 Rue de Billancourt, 92100 Boulogne-Billancourt, France Tel.：+33181890680 Web.： https://www.marriott.com/fr/hotels/parbt-le-parchamp-paris-boulogne-a-tribute-portfolio-hotel/overview/ Submission Methods and Listener Registration: Electronic Submission System: http://confsys.iconf.org/submission/amms2026 E-mail: amms@cbees.net Listener Registration: http://confsys.iconf.org/register/amms2026 Contact Methods: Conference Secretary: Ms. Jasmine Chen E-mail: amms@cbees.net Tel: +852-3500-0799 AMMS 2026 welcomes scholars and researchers working in the field of Applied Mathematics, Modelling and Simulation from all over the world to submit original and not published papers for reviewing of publication and presentation; submit abstract for presentation only or register for participation and listening conference. For more information, please visit: https://amms.org/index.html</text:p>
          </table:table-cell>
          <table:table-cell table:number-columns-repeated="1013"/>
        </table:table-row>
        <table:table-row table:style-name="ro1">
          <table:table-cell table:style-name="ce2" office:value-type="string" calcext:value-type="string">
            <text:p>CSPE 2026</text:p>
          </table:table-cell>
          <table:table-cell table:style-name="ce2" office:value-type="string" calcext:value-type="string">
            <text:p>IEEE--2026 International Conference on Computational Science and Power Engineering (CSPE 2026)</text:p>
          </table:table-cell>
          <table:table-cell table:style-name="ce2" office:value-type="float" office:value="88" calcext:value-type="float">
            <text:p>88</text:p>
          </table:table-cell>
          <table:table-cell table:style-name="ce2" office:value-type="float" office:value="28" calcext:value-type="float">
            <text:p>28</text:p>
          </table:table-cell>
          <table:table-cell table:style-name="ce3" office:value-type="date" office:date-value="2026-07-30" calcext:value-type="date">
            <text:p>2026-07-30</text:p>
          </table:table-cell>
          <table:table-cell table:number-columns-repeated="2"/>
          <table:table-cell table:style-name="ce2" office:value-type="string" calcext:value-type="string">
            <text:p>Hefei, Anhui, China</text:p>
          </table:table-cell>
          <table:table-cell table:style-name="ce2" office:value-type="string" calcext:value-type="string">
            <text:p>Nov 13, 2026 - Nov 15, 2026</text:p>
          </table:table-cell>
          <table:table-cell table:style-name="ce4" office:value-type="string" calcext:value-type="string">
            <text:p><text:a xlink:href="http://www.cspe.org" xlink:type="simple">http://www.cspe.org</text:a></text:p>
          </table:table-cell>
          <table:table-cell table:style-name="ce2" office:value-type="string" calcext:value-type="string">
            <text:p>★Full Name: 2026 the International Conference on Computational Science and Power Engineering ★Abbreviation: CSPE 2026 ★Dates: November 13-15, 2026 ★Location: Hefei, Anhui, China ★Website: www.cspe.org ★CSPE 2026 is sponsored by Hefei University of Technology, China, and hosted by School of Electrical Engineering and Automation of Hefei University of Technology, China. ****** Organizing Committees -Advisory Chair Lijian Ding, Vice President of Hefei University of Technology, China -Conference Committee Chairs Yuan Ge, Anhui Polytechnic University, China Bing Li, Hefei University of Technology, China Saad Mekhilef, Swinburne University of Technology, Australia &amp; University of Malaya, Malaysia Zhixin Wang, Shanghai Jiao Tong University, China Nianwen Xiang, Hefei University of Technology, China -Conference Committee Co-chair A. R.Al-Ali, American University of Sharjah, UAE Mingsan Ouyang, Anhui University of Science and Technology, China Jinping Wang, Hefei University of Technology, China Yujiao Zhang, Hefei University of Technology, China -Program Committee Chairs Hui Chen, Shanghai University of Electric Power, China Woongchul Choi, Kookmin University, South Korea Baiqiang Yin, Hefei University of Technology, China Miao Yu, Zhejiang University, China Rigui Zhou, Shanghai Maritime University, China Lei Zuo, Hefei University of Technology, China -Program Committee Co-Chairs Fei Wang, Shanghai University, China Haoyu Wang, ShanghaiTech University, China Zhiwei Chen, Hefei University of Technology, China Wenlong Ming, Cardiff University, UK ****** ★Publication All submissions will be peer reviewed by 2-3 reviewers. The registered and presented papers will be published into CSPE2026 Conference Proceedings. ****** ★Submission (Both full paper and abstract can be accepted but only full paper will be published on conference proceedings.) Submission System: https://easychair.org/conferences/?conf=cspe20260 Submission Template: https://www.cspe.org/IEEE-Formatting.docx Submission Inquery: cspe_conf@vip.163.com ****** ★Call for Papers Track 1: Computational models and algorithms Track 2: Simulation and modeling Track 3: Data Analysis in Power Systems Track 4: Renewable Energy Technologies Track 5: Automation and Control of Power Systems Track 6: Grid security and protection technology More topics, please click: https://www.cspe.org/cfp.html ****** ★Call for Special Sessions Proposal should include the following information: 1. Session title 2. Session overview or scope (abstract) 3. Contact information: organizer names and contact Email address 4. List of prospective papers including authors, affiliations, title, and Emil address Proposal: https://www.cspe.org/CSPE2026-Special-Session-Proposal-template.docx More information, please click: https://www.cspe.org/special.html ★CSPE Award *Young Investigator Award *Outstanding Organization Award *Best Paper Award *Best Student Paper Award *Best Industrial Paper Award *Outstanding Contribution Award *Outstanding Reviewer Award *Best Oral Presentation Award More information, please click: https://www.cspe.org/award.html ****** ★Contact us Conference Secretary: Ms. Greta Shen Conference Email: cspe_conf@vip.163.com</text:p>
          </table:table-cell>
          <table:table-cell table:number-columns-repeated="1013"/>
        </table:table-row>
        <table:table-row table:style-name="ro1">
          <table:table-cell table:style-name="ce2" office:value-type="string" calcext:value-type="string">
            <text:p>ICICM 2026</text:p>
          </table:table-cell>
          <table:table-cell table:style-name="ce2" office:value-type="string" calcext:value-type="string">
            <text:p>IEEE--2026 The 11th International Conference on Integrated Circuits and Microsystems (ICICM 2026)</text:p>
          </table:table-cell>
          <table:table-cell table:number-columns-repeated="2" table:style-name="ce2" office:value-type="float" office:value="30" calcext:value-type="float">
            <text:p>30</text:p>
          </table:table-cell>
          <table:table-cell table:style-name="ce3" office:value-type="date" office:date-value="2026-08-01" calcext:value-type="date">
            <text:p>2026-08-01</text:p>
          </table:table-cell>
          <table:table-cell table:number-columns-repeated="2"/>
          <table:table-cell table:style-name="ce2" office:value-type="string" calcext:value-type="string">
            <text:p>Xi'an, China</text:p>
          </table:table-cell>
          <table:table-cell table:style-name="ce2" office:value-type="string" calcext:value-type="string">
            <text:p>Oct 16, 2026 - Oct 18, 2026</text:p>
          </table:table-cell>
          <table:table-cell table:style-name="ce4" office:value-type="string" calcext:value-type="string">
            <text:p><text:a xlink:href="http://icicm.net/" xlink:type="simple">http://icicm.net/</text:a></text:p>
          </table:table-cell>
          <table:table-cell table:style-name="ce2" office:value-type="string" calcext:value-type="string">
            <text:p>★IEEE| ICICM2026--Ei Compendex,Scopus--Xi'an, China★Hosted by Xi'an Jiaotong University★ ★10 Years EI Compemdex Indexing★ ★Special Awards for Encouragement: Young Scientist Award, Best Paper Award, Best Student Paper Award, Best Organization Award, etc.★ ★Full name: 2026 The 11th International Conference on Integrated Circuits and Microsystems ★Abbreviation: ICICM 2026 **Place: Xi'an, China **Time: October 16-18, 2026 **Website: http://icicm.net/ ★Co-Sponsored by: ==IEEE ==Xi'an Jiaotong University ==Southeast University ==University of Electronic Science and Technology of China ★Hosted by: ==Xi'an Jiaotong University =Publication= Submitted papers will be Peer-Reviewed (Double Blind) and the accepted ones will be collected in the IEEE conference proceedings, included in IEEE Xplore and indexed by EI Compendex and Scopus. ***ICICM2016-2025 (previous 10 years) have been successfully indexed by EI Compendex and Scopus already! ==History== ICICM2016 | Chengdu on November 23-25, 2016 ICICM2017 | Nanjing on November 8-11, 2017 ICICM2018 | Shanghai on November 24-26, 2018 ICICM2019 | Beijing on October 25-27,2019 ICICM2020 | Nanjing on October 23-25, 2020 ICICM2021 | Nanjing on October 22-24, 2021 ICICM2022 | Xi'an on October 28-31, 2022 ICICM2023 | Nanjing on October 20-23, 2023 ICICM2024 | Wuhan on October 25-27, 2024 ICICM2025 | Hefei on October 17-19, 2025 ==Submission== 1. Full Paper with at least 4 full pages (Presentation and Publication) Template Download in Word: https://www.icicm.net/files/Template.doc Template Download in Latex: https://www.icicm.net/files/IEEE-conference-proceeding-Latex.rar 2. Abstract within 300-500 words (Presentation only) *All manuscripts must be written in English. ★ Electronic submission system: https://easychair.org/conferences/?conf=icicm2026 ★ Email submission: icicm_conf@vip.163.com More detail about submission, please visit at http://icicm.net/submission.html =Topics (include but not limit)= Track 1: Electronic Design Automation (EDA) • Progress of EDA algorithms • EDA for emerging technologies • Hardware-software co-design with EDA • EDA in High Performance Computing (HPC) • EDA in analog and mixed-signal design Track 2: Integrated Circuit and System Design • Digital, analog, mixed-signal IC and SOC design technology • IC computer-aided design technology, DFM • Modeling and simulation Track 3: Semiconductor Devices and Circuits • Components and circuits for wireless systems • Low power, RF devices and circuits • Silicon/Germanium Devices and Device Physics • Compound semiconductor devices and circuits Track 4: Process Technology and Manufacturing • Silicon integrated circuits and manufacturing • Interconnect, low-K, high-K and other process technologies • Packaging and testing technology, equipment technology For more topics, please visit at: http://icicm.net/call-for-papers.html ==Organizing Committee== Conference Chairs Zhigong Wang, Southeast University, China Xiulong Wu, Anhui University, China Kaixue Ma, Tianjin University, China Conference Co-Chairs Ning Xu, Wuhan University of Technology, China Xiaoqing Wen, Kyushu Institute of Technology, Japan Qiang Li, University of Electronic Science and Technology of China, China Program Chairs Abdel-Hamid Ali Soliman, Staffordshire University, UK Jun Han, Fudan University, China Xiaopeng Yu, Zhejiang University, China Meng Zhang, Southeast University, China Sheng Chang, Wuhan University, China Yingmei Chen, Southeast University, China Zhikuang Cai, Nanjing University of Posts and Telecommunications, China Zhuo Zou, Fudan University, China (IEEE Senior Member) Jianguo Hu, Sun Yat-sen University , China Bei Yu, The Chinese University of Hong Kong , China Program Co-Chairs Junyong Deng, Xi'an University of Posts &amp; Telecommunications, China Jun Xu, Nanjing University, China Zhixiong Di, Southwest Jiaotong University, China Guojie Luo, Peking University, China Xiaojun Zhai, University of Essex, UK Wei Xing, The University of Sheffield, UK Program Committee Bo Liu, Southeast University, China Shi Pu, Wuhan University of Technology , China Haizhi Song, University Of Electronic Science And Technology Of China, China Lu Zhu, Sun Yat-sen University, China Youming Zhang, Southeast University, China Jianshi Tang, Tsinghua University, China Weiguang Sheng, Shanghai Jiao Tong University, China Hao Gao, Austria &amp; Eindhoven University of Technology, The Netherland Yun Fang, Silicon Austria Labs, Austria Jeff Kilby, Auckland University of Technology, New Zealand Zhijun Zhou, Southeast University, China Xingyuan Tong, Xi`an University Of Posts &amp; Telecommunications, China Wei Hu, Northwestern Polytechnical University, China Zhaori Bi, Fudan University, China Zhengfeng Huang, Hefei University of Technology, China Local Chair Lin Cheng, University of Science and Technology of China Student Program Chairs Hongbin Sun, Xi'an Jiaotong University, China Keping Wang, Tianjin University, China Delong Shang, Institute of Microelectronics of the Chinese Academy of Sciences, China Fanyi Meng, Tianjin University, China Student Program Committee Li Du, Nanjing University, China Lei Wang, Nanjing University Of Posts And Telecommunications, China Xianbo Li, Sun Yat-sen University, China Tiehu Li, Chongqing University of Technology, China Moufu Kong, University of Electronic Science and Technology of China, China Jiaxin Liu, University of Electronic Science and Technology of China, China Maliang Liu, Xidian University, China Xu Meng, Hefei University of Technology, China Tianming Ni, Anhui University of Engineering, China Qiang Zhao, Anhui University, China More Organizing Committee list, please visit: https://icicm.net/committee.html =Contact us= Ms. Carrie Lim Email: icicm_conf@vip.163.com Web: http://icicm.net/ Tel: (86)134-0855-5552</text:p>
          </table:table-cell>
          <table:table-cell table:number-columns-repeated="1013"/>
        </table:table-row>
        <table:table-row table:style-name="ro1">
          <table:table-cell table:style-name="ce2" office:value-type="string" calcext:value-type="string">
            <text:p>MLPR--EI 2026</text:p>
          </table:table-cell>
          <table:table-cell table:style-name="ce2" office:value-type="string" calcext:value-type="string">
            <text:p>2026 The 4th International Conference on Machine Learning and Pattern Recognition (MLPR 2026)</text:p>
          </table:table-cell>
          <table:table-cell table:style-name="ce2" office:value-type="float" office:value="77" calcext:value-type="float">
            <text:p>77</text:p>
          </table:table-cell>
          <table:table-cell table:style-name="ce2" office:value-type="float" office:value="28" calcext:value-type="float">
            <text:p>28</text:p>
          </table:table-cell>
          <table:table-cell table:style-name="ce3" office:value-type="date" office:date-value="2026-08-20" calcext:value-type="date">
            <text:p>2026-08-20</text:p>
          </table:table-cell>
          <table:table-cell table:number-columns-repeated="2"/>
          <table:table-cell table:style-name="ce2" office:value-type="string" calcext:value-type="string">
            <text:p>Kyoto, Japan</text:p>
          </table:table-cell>
          <table:table-cell table:style-name="ce2" office:value-type="string" calcext:value-type="string">
            <text:p>Dec 4, 2026 - Dec 6, 2026</text:p>
          </table:table-cell>
          <table:table-cell table:style-name="ce4" office:value-type="string" calcext:value-type="string">
            <text:p><text:a xlink:href="https://www.mlpr.org/" xlink:type="simple">https://www.mlpr.org/</text:a></text:p>
          </table:table-cell>
          <table:table-cell table:style-name="ce2" office:value-type="string" calcext:value-type="string">
            <text:p>Full Name: The 4th International Conference on Machine Learning and Pattern Recognition (MLPR 2026) Website: https://www.mlpr.org Conference Date: December 4-6, 2026 Conference Venue: Kyoto, Japan The 4th International Conference on Machine Learning and Pattern Recognition (MLPR 2026) will be held at Kyoto, Japan during December 4-6, 2026. MLPR 2026 is sponsored by Ritsumeikan University, Japan. The conference includes keynote talks, invited talks, forums and oral and poster presentations of author papers. We invite submissions of papers on all topics related to machine learning and pattern recognition for the main conference proceedings. All papers will be reviewed in a double-blind process and accepted papers will be presented at the conference. It is our pleasure to welcome you to MLPR 2026. Publication ==Conference Proceedings== Accepted papers of MLPR 2026 will be published in IET Conference Proceedings, which will be included in the IET Digital Library and IEEE Xplore and submitted to EI Compendex and Scopus for indexing. Topics (Topics of interest for submission include, but are not limited to:) Track 1: Foundations of Machine Learning - Statistical learning theory and generalization bounds - Optimization methods for deep learning (adaptive optimizers, loss landscapes) - Dimensionality reduction and manifold learning - Graphical models, causal inference, and probabilistic reasoning - Active learning and query strategies - Transfer, multi-task, and meta-learning - Learning from noisy, limited, or imbalanced data - Reinforcement learning theory and bandit algorithms Track 2: Deep Learning &amp; Generative Models - Generative AI (diffusion models, VAEs, GANs, flow-based models) - Large language models and vision-language models - Transformer architectures and attention variants - Self-supervised and foundation model pre-training - Model compression (pruning, quantization, knowledge distillation) - Neural architecture search and automated deep learning - Graph neural networks and geometric deep learning - Representation learning for video, 3D, and multimodal data Track 3: Pattern Recognition &amp; Computer Vision - Feature extraction, selection, and descriptor learning - Object detection, segmentation, and tracking - Face, gesture, and action recognition - Medical image analysis and computational pathology - Remote sensing image analysis and Earth observation - Document analysis and handwriting recognition - Biometric recognition (fingerprint, iris, voice) - 3D shape analysis and point cloud processing Track 4: Responsible &amp; Trustworthy AI - Fairness, accountability, and transparency in ML models - Explainable AI (XAI) and interpretability methods - Robustness against adversarial attacks and out-of-distribution inputs - Privacy-preserving ML (federated learning, differential privacy) - AI safety, value alignment, and ethical frameworks - Uncertainty quantification and reliable predictions - Bias detection and mitigation in datasets and algorithms - Regulatory compliance and auditable AI systems Track 5: Applications of ML &amp; Pattern Recognition - ML for healthcare (diagnosis, drug discovery, genomics) - Intelligent transportation and autonomous driving - Natural language processing and speech recognition - Recommender systems and personalization - Time-series forecasting (finance, energy, IoT) - Robotics and embodied AI - Smart manufacturing and predictive maintenance - Agriculture, environmental monitoring, and climate science Track 6: Reinforcement Learning &amp; Decision Intelligence - Deep reinforcement learning algorithms (DQN, PPO, SAC, TD3) - Multi-agent reinforcement learning and game-theoretic reasoning - Inverse reinforcement learning and imitation learning - Hierarchical reinforcement learning and option frameworks - Offline reinforcement learning and batch RL - Reinforcement learning from human feedback (RLHF) - Sequential decision making under uncertainty (POMDPs, bandits) - Applications of RL in robotics, autonomous driving, recommendation systems, and game AI More Details please click: https://www.mlpr.org/cfp.html Paper Requirement: Papers should be prepared in English and carefully checked for correct grammar. Figures should be of high quality. Your submitted work must be original in the sense that it has never been published nor submitted for publication consideration anywhere. To ensure high scientific quality, all papers will be double-blind reviewed by the Technical Committee Members. * Abstract submission for presentation only without publication. * Full paper submission for both presentation and publication. Full Paper should be no less than 5 full pages. If the paper length exceeds 6 printed pages, including all figures, tables, and references, extra page will be charged 60 USD per page. Submission Method: * Online Submission System: http://confsys.iconf.org/submission/mlpr2026. More Details please click: https://www.mlpr.org/sub.html Conference Program Friday - December 4, 2026 10:00 - 17:00 Sign In and Conference Material Collection 16:00 - 18:00 Committee Conference Saturday - December 5, 2026 9:00 - 12:00 Opening Ceremony and Keynote Speeches 12:00 - 13:30 Lunch 13:30 - 15:30 Invited Speeches and Parallel Oral Sessions 15:30 - 16:30 Poster Sessions 16:30 - 18:30 Invited Speeches and Parallel Oral Sessions 18:30 - 20:30 Dinner Banquet and Award Ceremony Sunday - December 6, 2026 9:00 - 12:00 Invited Speeches and Parallel Oral Sessions 12:00 - 13:30 Lunch 13:30 - 19:00 City Tour Contact us Conference secretary: Miss Tessa Chen Tel: +86-13103333373 Email: mlpr_Conf@outlook.com Office Hour: 9:30--18:00, Monday to Friday (GMT+8 Time Zone)</text:p>
          </table:table-cell>
          <table:table-cell table:number-columns-repeated="1013"/>
        </table:table-row>
        <table:table-row table:style-name="ro2" table:number-rows-repeated="104832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style="long" number:textual="true"/>
      <number:text> </number:text>
      <number:day number:style="long"/>
      <number:text>, </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onf_5f_main" style:display-name="PageStyle_conf_mai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76" meta:object-count="0"/>
    <meta:generator>LibreOfficeDev/6.0.5.2$Linux_X86_64 LibreOffice_project/</meta:generator>
  </office:meta>
</office:document-meta>
</file>